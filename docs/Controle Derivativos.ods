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1000001F2000000C26B9DFDBB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Pictures/10000001000001F2000000C26B9DFDBB.png" manifest:media-type="image/png"/>
  <manifest:file-entry manifest:full-path="Pictures/10000001000001280000017373DC06B6.png" manifest:media-type="image/png"/>
  <manifest:file-entry manifest:full-path="Pictures/10000001000000B5000000E36FC42639.png" manifest:media-type="image/png"/>
  <manifest:file-entry manifest:full-path="Pictures/100000010000019600000196CD52D19B.png" manifest:media-type="image/png"/>
  <manifest:file-entry manifest:full-path="Pictures/100000010000011C000001643C71A785.png" manifest:media-type="image/png"/>
  <manifest:file-entry manifest:full-path="Pictures/1000000100000107000000D3CA0178BE.png" manifest:media-type="image/png"/>
  <manifest:file-entry manifest:full-path="Pictures/10000001000001030000006572F976C5.png" manifest:media-type="image/png"/>
  <manifest:file-entry manifest:full-path="Pictures/100000010000011B000001646CED050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yRIAD PRO" svg:font-family="'MyRIAD PRO'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2.226cm"/>
    </style:style>
    <style:style style:name="co6" style:family="table-column">
      <style:table-column-properties fo:break-before="auto" style:column-width="6.726cm"/>
    </style:style>
    <style:style style:name="co7" style:family="table-column">
      <style:table-column-properties fo:break-before="auto" style:column-width="5.362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3.374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6.438cm"/>
    </style:style>
    <style:style style:name="co15" style:family="table-column">
      <style:table-column-properties fo:break-before="auto" style:column-width="2.466cm"/>
    </style:style>
    <style:style style:name="co16" style:family="table-column">
      <style:table-column-properties fo:break-before="auto" style:column-width="4.168cm"/>
    </style:style>
    <style:style style:name="co17" style:family="table-column">
      <style:table-column-properties fo:break-before="auto" style:column-width="2.656cm"/>
    </style:style>
    <style:style style:name="co18" style:family="table-column">
      <style:table-column-properties fo:break-before="auto" style:column-width="2.106cm"/>
    </style:style>
    <style:style style:name="co19" style:family="table-column">
      <style:table-column-properties fo:break-before="auto" style:column-width="2.249cm"/>
    </style:style>
    <style:style style:name="co20" style:family="table-column">
      <style:table-column-properties fo:break-before="auto" style:column-width="1.963cm"/>
    </style:style>
    <style:style style:name="co21" style:family="table-column">
      <style:table-column-properties fo:break-before="auto" style:column-width="2.178cm"/>
    </style:style>
    <style:style style:name="co22" style:family="table-column">
      <style:table-column-properties fo:break-before="auto" style:column-width="6.846cm"/>
    </style:style>
    <style:style style:name="co23" style:family="table-column">
      <style:table-column-properties fo:break-before="auto" style:column-width="2.417cm"/>
    </style:style>
    <style:style style:name="co24" style:family="table-column">
      <style:table-column-properties fo:break-before="auto" style:column-width="1.4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46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4.212cm"/>
    </style:style>
    <style:style style:name="co29" style:family="table-column">
      <style:table-column-properties fo:break-before="auto" style:column-width="6.08cm"/>
    </style:style>
    <style:style style:name="co30" style:family="table-column">
      <style:table-column-properties fo:break-before="auto" style:column-width="3.016cm"/>
    </style:style>
    <style:style style:name="co31" style:family="table-column">
      <style:table-column-properties fo:break-before="auto" style:column-width="7.158cm"/>
    </style:style>
    <style:style style:name="co32" style:family="table-column">
      <style:table-column-properties fo:break-before="auto" style:column-width="6.75cm"/>
    </style:style>
    <style:style style:name="co33" style:family="table-column">
      <style:table-column-properties fo:break-before="auto" style:column-width="0.238cm"/>
    </style:style>
    <style:style style:name="co34" style:family="table-column">
      <style:table-column-properties fo:break-before="auto" style:column-width="7.828cm"/>
    </style:style>
    <style:style style:name="co35" style:family="table-column">
      <style:table-column-properties fo:break-before="auto" style:column-width="2.298cm"/>
    </style:style>
    <style:style style:name="co36" style:family="table-column">
      <style:table-column-properties fo:break-before="auto" style:column-width="0.31cm"/>
    </style:style>
    <style:style style:name="co37" style:family="table-column">
      <style:table-column-properties fo:break-before="auto" style:column-width="6.055cm"/>
    </style:style>
    <style:style style:name="co38" style:family="table-column">
      <style:table-column-properties fo:break-before="auto" style:column-width="2.536cm"/>
    </style:style>
    <style:style style:name="co39" style:family="table-column">
      <style:table-column-properties fo:break-before="auto" style:column-width="3.231cm"/>
    </style:style>
    <style:style style:name="co40" style:family="table-column">
      <style:table-column-properties fo:break-before="auto" style:column-width="2.5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10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806cm" fo:break-before="auto" style:use-optimal-row-height="true"/>
    </style:style>
    <style:style style:name="ta1" style:family="table" style:master-page-name="PageStyle_5f_dms">
      <style:table-properties table:display="true" style:writing-mode="lr-tb" table:tab-color="#c00000"/>
    </style:style>
    <style:style style:name="ta2" style:family="table" style:master-page-name="PageStyle_5f_Din.MTM_5f_LB">
      <style:table-properties table:display="false" style:writing-mode="lr-tb" table:tab-color="#c00000"/>
    </style:style>
    <style:style style:name="ta3" style:family="table" style:master-page-name="PageStyle_5f_Preços_5f_MTM">
      <style:table-properties table:display="true" style:writing-mode="lr-tb" table:tab-color="#00b0f0"/>
    </style:style>
    <style:style style:name="ta4" style:family="table" style:master-page-name="PageStyle_5f_Op._20_Long_5f_Basis_5f_Liq">
      <style:table-properties table:display="true" style:writing-mode="lr-tb" table:tab-color="#ffc000"/>
    </style:style>
    <style:style style:name="ta5" style:family="table" style:master-page-name="PageStyle_5f_Reporte_5f_Liq">
      <style:table-properties table:display="true" style:writing-mode="lr-tb" table:tab-color="#ffc000"/>
    </style:style>
    <style:style style:name="ta6" style:family="table" style:master-page-name="PageStyle_5f_Op._20_Long_5f_Basis_5f_Vig">
      <style:table-properties table:display="true" style:writing-mode="lr-tb" table:tab-color="#92d050"/>
    </style:style>
    <style:style style:name="ta7" style:family="table" style:master-page-name="PageStyle_5f_MTM_5f_LB-Milho-26">
      <style:table-properties table:display="true" style:writing-mode="lr-tb" table:tab-color="#92d050"/>
    </style:style>
    <style:style style:name="ta8" style:family="table" style:master-page-name="PageStyle_5f_Analítico_5f_Deriv_5f_Op">
      <style:table-properties table:display="true" style:writing-mode="lr-tb" table:tab-color="#92d050"/>
    </style:style>
    <style:style style:name="ta9" style:family="table" style:master-page-name="PageStyle_5f_Analítico_5f_Deriv">
      <style:table-properties table:display="true" style:writing-mode="lr-tb" table:tab-color="#92d050"/>
    </style:style>
    <style:style style:name="ta10" style:family="table" style:master-page-name="PageStyle_5f_Resumo_5f_Derivativos">
      <style:table-properties table:display="true" style:writing-mode="lr-tb" table:tab-color="#152858"/>
    </style:style>
    <style:style style:name="ta11" style:family="table" style:master-page-name="PageStyle_5f_Evolução_5f_MTM">
      <style:table-properties table:display="false" style:writing-mode="lr-tb" table:tab-color="#000000"/>
    </style:style>
    <style:style style:name="ta12" style:family="table" style:master-page-name="PageStyle_5f_Liquidações.Derivativos">
      <style:table-properties table:display="true" style:writing-mode="lr-tb" table:tab-color="#152858"/>
    </style:style>
    <style:style style:name="ta13" style:family="table" style:master-page-name="PageStyle_5f_Caixa_5f_Corretoras">
      <style:table-properties table:display="true" style:writing-mode="lr-tb" table:tab-color="#152858"/>
    </style:style>
    <style:style style:name="ta14" style:family="table" style:master-page-name="PageStyle_5f_Var_5f_Cambial">
      <style:table-properties table:display="true" style:writing-mode="lr-tb" table:tab-color="#152858"/>
    </style:style>
    <style:style style:name="ta15" style:family="table" style:master-page-name="PageStyle_5f_Fluxo_5f_Caixa">
      <style:table-properties table:display="true" style:writing-mode="lr-tb" table:tab-color="#152858"/>
    </style:style>
    <style:style style:name="ta16" style:family="table" style:master-page-name="PageStyle_5f_Gestão_5f_Stonex">
      <style:table-properties table:display="true" style:writing-mode="lr-tb" table:tab-color="#152858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/>
    </style:style>
    <style:style style:name="ce5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15285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Default">
      <style:table-cell-properties fo:border="0.99pt solid #000000"/>
    </style:style>
    <style:style style:name="ce12" style:family="table-cell" style:parent-style-name="Default" style:data-style-name="N4">
      <style:table-cell-properties fo:border-bottom="none" fo:border-left="0.99pt solid #000000" fo:border-right="2.01pt solid #000000" fo:border-top="2.01pt solid #000000"/>
    </style:style>
    <style:style style:name="ce13" style:family="table-cell" style:parent-style-name="Pivot_20_Table_20_Value" style:data-style-name="N4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4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4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Default" style:data-style-name="N4">
      <style:table-cell-properties style:rotation-align="none"/>
    </style:style>
    <style:style style:name="ce17" style:family="table-cell" style:parent-style-name="Default">
      <style:table-cell-properties fo:background-color="#1528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38">
      <style:table-cell-properties fo:background-color="#1528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fo:color="#ffffff"/>
    </style:style>
    <style:style style:name="ce21" style:family="table-cell" style:parent-style-name="Default">
      <style:table-cell-properties fo:background-color="#1528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22" style:family="table-cell" style:parent-style-name="Default" style:data-style-name="N138">
      <style:table-cell-properties fo:background-color="#1528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2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4">
      <style:table-cell-properties fo:background-color="#1528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2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18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ffc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0.00000001,-9.99999999999999E+018)" style:apply-style-name="ConditionalStyle_5f_44" style:base-cell-address="'Op. Long_Basis_Liq'.N1"/>
    </style:style>
    <style:style style:name="ce3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-is-between(-0.00000001,-9.99999999999999E+018)" style:apply-style-name="ConditionalStyle_5f_44" style:base-cell-address="'Op. Long_Basis_Liq'.N1"/>
    </style:style>
    <style:style style:name="ce31" style:family="table-cell" style:parent-style-name="Default" style:data-style-name="N3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  <style:map style:condition="cell-content-is-between(-0.00000001,-9.99999999999999E+018)" style:apply-style-name="ConditionalStyle_5f_44" style:base-cell-address="'Op. Long_Basis_Liq'.N1"/>
    </style:style>
    <style:style style:name="ce32" style:family="table-cell" style:parent-style-name="Default" style:data-style-name="N4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3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18">
      <style:table-cell-properties style:rotation-align="none"/>
    </style:style>
    <style:style style:name="ce3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43" style:base-cell-address="'Op. Long_Basis_Liq'.Y1"/>
    </style:style>
    <style:style style:name="ce3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-is-between(-1E-017,-9.99999999999999E+047)" style:apply-style-name="ConditionalStyle_5f_43" style:base-cell-address="'Op. Long_Basis_Liq'.Y1"/>
    </style:style>
    <style:style style:name="ce37" style:family="table-cell" style:parent-style-name="Default" style:data-style-name="N4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/>
      <style:map style:condition="cell-content-is-between(-1E-017,-9.99999999999999E+047)" style:apply-style-name="ConditionalStyle_5f_43" style:base-cell-address="'Op. Long_Basis_Liq'.Y1"/>
    </style:style>
    <style:style style:name="ce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43" style:base-cell-address="'Op. Long_Basis_Liq'.Y1"/>
    </style:style>
    <style:style style:name="ce39" style:family="table-cell" style:parent-style-name="Default" style:data-style-name="N3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/>
      <style:map style:condition="cell-content-is-between(-1E-017,-9.99999999999999E+047)" style:apply-style-name="ConditionalStyle_5f_43" style:base-cell-address="'Op. Long_Basis_Liq'.Y1"/>
    </style:style>
    <style:style style:name="ce40" style:family="table-cell" style:parent-style-name="Default" style:data-style-name="N138">
      <style:table-cell-properties style:rotation-align="none"/>
    </style:style>
    <style:style style:name="ce41" style:family="table-cell" style:parent-style-name="Default" style:data-style-name="N138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15285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  <style:map style:condition="cell-content-is-between(-1E-017,-9.99999999999999E+047)" style:apply-style-name="ConditionalStyle_5f_43" style:base-cell-address="'Op. Long_Basis_Liq'.Y1"/>
    </style:style>
    <style:style style:name="ce4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-is-between(-1E-017,-9.99999999999999E+047)" style:apply-style-name="ConditionalStyle_5f_43" style:base-cell-address="'Op. Long_Basis_Liq'.Y1"/>
    </style:style>
    <style:style style:name="ce46" style:family="table-cell" style:parent-style-name="Excel_20_Built-in_20_Percen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-is-between(-1E-017,-9.99999999999999E+047)" style:apply-style-name="ConditionalStyle_5f_43" style:base-cell-address="'Op. Long_Basis_Liq'.Y1"/>
    </style:style>
    <style:style style:name="ce47" style:family="table-cell" style:parent-style-name="Excel_20_Built-in_20_Percent" style:data-style-name="N11">
      <style:table-cell-properties fo:background-color="#152858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between(-1E-017,-9.99999999999999E+047)" style:apply-style-name="ConditionalStyle_5f_43" style:base-cell-address="'Op. Long_Basis_Liq'.Y1"/>
    </style:style>
    <style:style style:name="ce48" style:family="table-cell" style:parent-style-name="Default">
      <style:map style:condition="cell-content-is-between(-0.000000000001,-9.99999999999999E+021)" style:apply-style-name="ConditionalStyle_5f_42" style:base-cell-address="'Op. Long_Basis_Liq'.AR1"/>
    </style:style>
    <style:style style:name="ce4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-is-between(-0.000000000001,-9.99999999999999E+021)" style:apply-style-name="ConditionalStyle_5f_42" style:base-cell-address="'Op. Long_Basis_Liq'.AR1"/>
    </style:style>
    <style:style style:name="ce50" style:family="table-cell" style:parent-style-name="Default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  <style:map style:condition="cell-content-is-between(-0.000000000001,-9.99999999999999E+021)" style:apply-style-name="ConditionalStyle_5f_42" style:base-cell-address="'Op. Long_Basis_Liq'.AR1"/>
    </style:style>
    <style:style style:name="ce5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0.000000000001,-9.99999999999999E+021)" style:apply-style-name="ConditionalStyle_5f_42" style:base-cell-address="'Op. Long_Basis_Liq'.AR1"/>
    </style:style>
    <style:style style:name="ce52" style:family="table-cell" style:parent-style-name="Default">
      <style:table-cell-properties fo:border-bottom="1.76pt solid #ffffff" fo:background-color="#dceff4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fffff" style:vertical-align="bottom" loext:vertical-justify="auto">
        <loext:border-bottom-complex-color loext:theme-type="light1" loext:color-type="theme"/>
        <loext:border-lef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solid #ffffff" fo:background-color="#dceff4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none" style:vertical-align="bottom" loext:vertical-justify="auto">
        <loext:border-bottom-complex-color loext:theme-type="light1" loext:color-type="theme"/>
        <loext:border-left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1b4b59" style:diagonal-bl-tr="none" style:diagonal-tl-br="none" style:text-align-source="fix" style:repeat-content="false" fo:wrap-option="no-wrap" fo:border="0.74pt solid #608f9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8f5f8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608f96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1.76pt double-thin #608f96" style:border-line-width-bottom="0.018cm 0.026cm 0.018cm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0.74pt solid #608f96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0.74pt solid #608f96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1.76pt double-thin #608f96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dceff4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Excel_20_Built-in_20_Currency" style:data-style-name="N132">
      <style:table-cell-properties fo:border-bottom="1.76pt solid #ffffff" fo:background-color="#dceff4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Excel_20_Built-in_20_Currency" style:data-style-name="N132">
      <style:table-cell-properties fo:background-color="#dceff4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4b59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4b59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63" style:family="table-cell" style:parent-style-name="Default" style:data-style-name="N118">
      <style:table-cell-properties fo:background-color="#e8f5f8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 style:data-style-name="N118">
      <style:table-cell-properties fo:border-bottom="1.76pt solid #ffffff" fo:background-color="#e8f5f8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118">
      <style:table-cell-properties fo:border-bottom="0.74pt solid #608f96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118">
      <style:table-cell-properties fo:border-bottom="1.76pt double-thin #608f96" style:border-line-width-bottom="0.018cm 0.026cm 0.018cm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0.74pt solid #608f96" style:vertical-align="bottom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order-bottom="0.74pt solid #608f96" style:diagonal-bl-tr="none" style:diagonal-tl-br="none" style:text-align-source="fix" style:repeat-content="false" fo:wrap-option="no-wrap" fo:border-left="none" style:direction="ltr" fo:border-right="0.74pt solid #608f96" style:rotation-angle="0" style:rotation-align="none" style:shrink-to-fit="false" fo:border-top="1.76pt double-thin #608f96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1.76pt solid #ffffff" fo:background-color="#dceff4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>
        <loext:border-bottom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Excel_20_Built-in_20_Currency" style:data-style-name="N132">
      <style:table-cell-properties fo:border-bottom="1.76pt solid #ffffff" fo:background-color="#dceff4" style:cell-protect="protected" style:print-content="true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none" style:vertical-align="bottom" loext:vertical-justify="auto">
        <loext:border-bottom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Excel_20_Built-in_20_Currency" style:data-style-name="N132">
      <style:table-cell-properties fo:border-bottom="1.76pt solid #ffffff" fo:background-color="#dceff4" style:cell-protect="protected" style:print-content="true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>
        <loext:border-bottom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fo:background-color="#1b4b59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0.74pt solid #608f96" style:vertical-align="bottom" loext:vertical-justify="auto"/>
      <style:paragraph-properties fo:text-align="center" css3t:text-justify="auto" fo:margin-left="0cm" style:writing-mode="page"/>
      <style:text-properties fo:color="#e8f5f8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608f96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139">
      <style:table-cell-properties fo:background-color="#e8f5f8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Excel_20_Built-in_20_Percent" style:data-style-name="N139">
      <style:table-cell-properties fo:background-color="#e8f5f8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139">
      <style:table-cell-properties fo:border-bottom="1.76pt solid #ffffff" fo:background-color="#e8f5f8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4">
      <style:table-cell-properties fo:background-color="#e8f5f8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-is-between(0.0000001,9.99999999999999E+034)" style:apply-style-name="ConditionalStyle_5f_41" style:base-cell-address="Reporte_Liq.D25"/>
      <style:map style:condition="cell-content-is-between(-0.000000000001,-99999999999999)" style:apply-style-name="ConditionalStyle_5f_40" style:base-cell-address="Reporte_Liq.D25"/>
    </style:style>
    <style:style style:name="ce77" style:family="table-cell" style:parent-style-name="Default" style:data-style-name="N3">
      <style:table-cell-properties fo:background-color="#1b4b59" style:diagonal-bl-tr="none" style:diagonal-tl-br="none" style:text-align-source="fix" style:repeat-content="false" fo:wrap-option="no-wrap" fo:border="0.74pt solid #608f9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8f5f8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3">
      <style:table-cell-properties fo:border-bottom="0.74pt solid #608f96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3">
      <style:table-cell-properties fo:border-bottom="1.76pt double-thin #608f96" style:border-line-width-bottom="0.018cm 0.026cm 0.018cm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0.74pt solid #608f96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 style:data-style-name="N3">
      <style:table-cell-properties fo:border-bottom="0.74pt solid #608f96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 style:data-style-name="N4">
      <style:table-cell-properties fo:background-color="#1b4b59" style:diagonal-bl-tr="none" style:diagonal-tl-br="none" style:text-align-source="fix" style:repeat-content="false" fo:wrap-option="no-wrap" fo:border="0.74pt solid #608f9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8f5f8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4">
      <style:table-cell-properties fo:border-bottom="0.74pt solid #608f96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4">
      <style:table-cell-properties fo:border-bottom="1.76pt double-thin #608f96" style:border-line-width-bottom="0.018cm 0.026cm 0.018cm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0.74pt solid #608f96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39">
      <style:table-cell-properties fo:border-bottom="0.74pt solid #608f96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afc7c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4b59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86" style:family="table-cell" style:parent-style-name="Default">
      <style:table-cell-properties fo:background-color="#afc7c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4b59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8" style:family="table-cell" style:parent-style-name="Default" style:data-style-name="N137">
      <style:table-cell-properties fo:border-bottom="0.74pt solid #608f96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137">
      <style:table-cell-properties fo:border-bottom="1.76pt double-thin #608f96" style:border-line-width-bottom="0.018cm 0.026cm 0.018cm" style:diagonal-bl-tr="none" style:diagonal-tl-br="none" style:text-align-source="fix" style:repeat-content="false" fo:wrap-option="no-wrap" fo:border-left="0.74pt solid #608f96" style:direction="ltr" fo:border-right="0.74pt solid #608f96" style:rotation-angle="0" style:rotation-align="none" style:shrink-to-fit="false" fo:border-top="0.74pt solid #608f96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d0d0d" style:direction="ltr" style:rotation-angle="0" style:rotation-align="none" style:shrink-to-fit="false" style:vertical-align="bottom" loext:vertical-justify="auto">
        <loext:border-bottom-complex-color loext:theme-type="dark1" loext:color-type="theme">
          <loext:transformation loext:type="lummod" loext:value="9500"/>
          <loext:transformation loext:type="lumoff" loext:value="499"/>
        </loext:border-bottom-complex-color>
        <loext:border-left-complex-color loext:theme-type="dark1" loext:color-type="theme">
          <loext:transformation loext:type="lummod" loext:value="9500"/>
          <loext:transformation loext:type="lumoff" loext:value="499"/>
        </loext:border-left-complex-color>
        <loext:border-right-complex-color loext:theme-type="dark1" loext:color-type="theme">
          <loext:transformation loext:type="lummod" loext:value="9500"/>
          <loext:transformation loext:type="lumoff" loext:value="499"/>
        </loext:border-right-complex-color>
        <loext:border-top-complex-color loext:theme-type="dark1" loext:color-type="theme">
          <loext:transformation loext:type="lummod" loext:value="9500"/>
          <loext:transformation loext:type="lumoff" loext:value="499"/>
        </loext:border-top-complex-color>
      </style:table-cell-properties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diagonal-bl-tr="none" style:diagonal-tl-br="none" fo:border="0.74pt solid #0d0d0d" style:rotation-align="none">
        <loext:border-bottom-complex-color loext:theme-type="dark1" loext:color-type="theme">
          <loext:transformation loext:type="lummod" loext:value="9500"/>
          <loext:transformation loext:type="lumoff" loext:value="499"/>
        </loext:border-bottom-complex-color>
        <loext:border-left-complex-color loext:theme-type="dark1" loext:color-type="theme">
          <loext:transformation loext:type="lummod" loext:value="9500"/>
          <loext:transformation loext:type="lumoff" loext:value="499"/>
        </loext:border-left-complex-color>
        <loext:border-right-complex-color loext:theme-type="dark1" loext:color-type="theme">
          <loext:transformation loext:type="lummod" loext:value="9500"/>
          <loext:transformation loext:type="lumoff" loext:value="499"/>
        </loext:border-right-complex-color>
        <loext:border-top-complex-color loext:theme-type="dark1" loext:color-type="theme">
          <loext:transformation loext:type="lummod" loext:value="9500"/>
          <loext:transformation loext:type="lumoff" loext:value="499"/>
        </loext:border-top-complex-color>
      </style:table-cell-properties>
    </style:style>
    <style:style style:name="ce92" style:family="table-cell" style:parent-style-name="Default" style:data-style-name="N139">
      <style:table-cell-properties style:diagonal-bl-tr="none" style:diagonal-tl-br="none" fo:border="0.74pt solid #0d0d0d" style:rotation-align="none">
        <loext:border-bottom-complex-color loext:theme-type="dark1" loext:color-type="theme">
          <loext:transformation loext:type="lummod" loext:value="9500"/>
          <loext:transformation loext:type="lumoff" loext:value="499"/>
        </loext:border-bottom-complex-color>
        <loext:border-left-complex-color loext:theme-type="dark1" loext:color-type="theme">
          <loext:transformation loext:type="lummod" loext:value="9500"/>
          <loext:transformation loext:type="lumoff" loext:value="499"/>
        </loext:border-left-complex-color>
        <loext:border-right-complex-color loext:theme-type="dark1" loext:color-type="theme">
          <loext:transformation loext:type="lummod" loext:value="9500"/>
          <loext:transformation loext:type="lumoff" loext:value="499"/>
        </loext:border-right-complex-color>
        <loext:border-top-complex-color loext:theme-type="dark1" loext:color-type="theme">
          <loext:transformation loext:type="lummod" loext:value="9500"/>
          <loext:transformation loext:type="lumoff" loext:value="499"/>
        </loext:border-top-complex-color>
      </style:table-cell-properties>
    </style:style>
    <style:style style:name="ce93" style:family="table-cell" style:parent-style-name="Default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4" style:family="table-cell" style:parent-style-name="Default" style:data-style-name="N118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 style:data-style-name="N11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ackground-color="#ffc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9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0.00000001,-9.99999999999999E+018)" style:apply-style-name="ConditionalStyle_5f_37" style:base-cell-address="'Op. Long_Basis_Vig'.L1"/>
    </style:style>
    <style:style style:name="ce98" style:family="table-cell" style:parent-style-name="Default" style:data-style-name="N3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-is-between(-0.00000001,-9.99999999999999E+018)" style:apply-style-name="ConditionalStyle_5f_37" style:base-cell-address="'Op. Long_Basis_Vig'.L1"/>
    </style:style>
    <style:style style:name="ce99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-is-between(-0.00000001,-9.99999999999999E+018)" style:apply-style-name="ConditionalStyle_5f_37" style:base-cell-address="'Op. Long_Basis_Vig'.L1"/>
    </style:style>
    <style:style style:name="ce100" style:family="table-cell" style:parent-style-name="Default" style:data-style-name="N4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36" style:base-cell-address="'Op. Long_Basis_Vig'.W1"/>
    </style:style>
    <style:style style:name="ce103" style:family="table-cell" style:parent-style-name="Default" style:data-style-name="N4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36" style:base-cell-address="'Op. Long_Basis_Vig'.W1"/>
    </style:style>
    <style:style style:name="ce10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36" style:base-cell-address="'Op. Long_Basis_Vig'.W1"/>
    </style:style>
    <style:style style:name="ce105" style:family="table-cell" style:parent-style-name="Default" style:data-style-name="N3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36" style:base-cell-address="'Op. Long_Basis_Vig'.W1"/>
    </style:style>
    <style:style style:name="ce106" style:family="table-cell" style:parent-style-name="Default" style:data-style-name="N138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 style:data-style-name="N13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109" style:family="table-cell" style:parent-style-name="Default" style:data-style-name="N4">
      <style:table-cell-properties fo:background-color="#15285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36" style:base-cell-address="'Op. Long_Basis_Vig'.W1"/>
    </style:style>
    <style:style style:name="ce11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-is-between(-1E-017,-9.99999999999999E+047)" style:apply-style-name="ConditionalStyle_5f_36" style:base-cell-address="'Op. Long_Basis_Vig'.W1"/>
    </style:style>
    <style:style style:name="ce111" style:family="table-cell" style:parent-style-name="Excel_20_Built-in_20_Percent" style:data-style-name="N11">
      <style:table-cell-properties fo:background-color="#152858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-is-between(-1E-017,-9.99999999999999E+047)" style:apply-style-name="ConditionalStyle_5f_36" style:base-cell-address="'Op. Long_Basis_Vig'.W1"/>
    </style:style>
    <style:style style:name="ce112" style:family="table-cell" style:parent-style-name="Default">
      <style:map style:condition="cell-content-is-between(-0.000000000001,-9.99999999999999E+021)" style:apply-style-name="ConditionalStyle_5f_35" style:base-cell-address="'Op. Long_Basis_Vig'.AP1"/>
    </style:style>
    <style:style style:name="ce113" style:family="table-cell" style:parent-style-name="Default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-is-between(-0.000000000001,-9.99999999999999E+021)" style:apply-style-name="ConditionalStyle_5f_35" style:base-cell-address="'Op. Long_Basis_Vig'.AP1"/>
    </style:style>
    <style:style style:name="ce11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0.000000000001,-9.99999999999999E+021)" style:apply-style-name="ConditionalStyle_5f_35" style:base-cell-address="'Op. Long_Basis_Vig'.AP1"/>
    </style:style>
    <style:style style:name="ce115" style:family="table-cell" style:parent-style-name="Default">
      <style:table-cell-properties fo:border-bottom="1.76pt solid #000000" fo:background-color="#5b6f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16" style:family="table-cell" style:parent-style-name="Default" style:data-style-name="N139">
      <style:table-cell-properties fo:background-color="#cad6f2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39">
      <style:table-cell-properties fo:border-bottom="0.74pt solid #ffffff" fo:background-color="#e7ecf9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fo:background-color="#f9e084"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139">
      <style:table-cell-properties fo:background-color="#cad6f2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39">
      <style:table-cell-properties fo:border-bottom="0.74pt solid #ffffff" fo:background-color="#e7ecf9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139">
      <style:table-cell-properties fo:background-color="#f9e08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152858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style:rotation-align="none"/>
      <style:text-properties fo:color="#152858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0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 style:data-style-name="N138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 style:data-style-name="N8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0.000001,-9.99999999999999E+019)" style:apply-style-name="ConditionalStyle_5f_32" style:base-cell-address="Analítico_Deriv.R1"/>
    </style:style>
    <style:style style:name="ce134" style:family="table-cell" style:parent-style-name="Default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cell-content-is-between(-0.000001,-9.99999999999999E+019)" style:apply-style-name="ConditionalStyle_5f_32" style:base-cell-address="Analítico_Deriv.R1"/>
    </style:style>
    <style:style style:name="ce13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0.000001,-9.99999999999999E+019)" style:apply-style-name="ConditionalStyle_5f_32" style:base-cell-address="Analítico_Deriv.R1"/>
    </style:style>
    <style:style style:name="ce13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31" style:base-cell-address="Analítico_Deriv.X1"/>
    </style:style>
    <style:style style:name="ce137" style:family="table-cell" style:parent-style-name="Default" style:data-style-name="N4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31" style:base-cell-address="Analítico_Deriv.X1"/>
    </style:style>
    <style:style style:name="ce13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-is-between(-1E-017,-9.99999999999999E+047)" style:apply-style-name="ConditionalStyle_5f_31" style:base-cell-address="Analítico_Deriv.X1"/>
    </style:style>
    <style:style style:name="ce139" style:family="table-cell" style:parent-style-name="Default" style:data-style-name="N4">
      <style:table-cell-properties fo:border-bottom="0.74pt solid #000000" fo:background-color="#ffc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cell-content-is-between(-1E-017,-9.99999999999999E+047)" style:apply-style-name="ConditionalStyle_5f_31" style:base-cell-address="Analítico_Deriv.X1"/>
    </style:style>
    <style:style style:name="ce14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cell-content-is-between(-1E-017,-9.99999999999999E+047)" style:apply-style-name="ConditionalStyle_5f_31" style:base-cell-address="Analítico_Deriv.X1"/>
    </style:style>
    <style:style style:name="ce14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31" style:base-cell-address="Analítico_Deriv.X1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-is-between(-1E-017,-9.99999999999999E+047)" style:apply-style-name="ConditionalStyle_5f_31" style:base-cell-address="Analítico_Deriv.X1"/>
    </style:style>
    <style:style style:name="ce143" style:family="table-cell" style:parent-style-name="Default" style:data-style-name="N3">
      <style:table-cell-properties fo:border-bottom="0.74pt solid #000000" fo:background-color="#ffc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cell-content-is-between(-1E-017,-9.99999999999999E+047)" style:apply-style-name="ConditionalStyle_5f_31" style:base-cell-address="Analítico_Deriv.X1"/>
    </style:style>
    <style:style style:name="ce144" style:family="table-cell" style:parent-style-name="Default" style:data-style-name="N3">
      <style:table-cell-properties fo:border-bottom="0.74pt solid #000000" fo:background-color="#15285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cell-content-is-between(-1E-017,-9.99999999999999E+047)" style:apply-style-name="ConditionalStyle_5f_31" style:base-cell-address="Analítico_Deriv.X1"/>
    </style:style>
    <style:style style:name="ce14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Excel_20_Built-in_20_Percent" style:data-style-name="N11">
      <style:table-cell-properties fo:border-bottom="0.74pt solid #000000" fo:background-color="#15285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ackground-color="#8da5a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2858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ackground-color="#8da5a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2858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order-bottom="0.74pt solid #0b77a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1.76pt double-thin #0b77a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b77a0" style:vertical-align="middle" loext:vertical-justify="auto">
        <loext:border-bottom-complex-color loext:theme-type="accent4" loext:color-type="theme">
          <loext:transformation loext:type="lummod" loext:value="7500"/>
        </loext:border-bottom-complex-color>
        <loext:border-top-complex-color loext:theme-type="accent4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1.76pt double-thin #0b77a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74pt solid #0b77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</style:style>
    <style:style style:name="ce156" style:family="table-cell" style:parent-style-name="Default">
      <style:table-cell-properties fo:background-color="#dcef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>
      <style:table-cell-properties fo:border-bottom="1.76pt double-thin #0b77a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0.74pt solid #0b77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b77a0" style:vertical-align="middle" loext:vertical-justify="auto">
        <loext:border-top-complex-color loext:theme-type="accent4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2" style:family="table-cell" style:parent-style-name="Default">
      <style:table-cell-properties fo:background-color="#dcef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b77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b77a0" style:vertical-align="middle" loext:vertical-justify="auto">
        <loext:border-bottom-complex-color loext:theme-type="accent4" loext:color-type="theme">
          <loext:transformation loext:type="lummod" loext:value="7500"/>
        </loext:border-bottom-complex-color>
        <loext:border-top-complex-color loext:theme-type="accent4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0.74pt solid #0b77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Default" style:data-style-name="N139">
      <style:table-cell-properties fo:background-color="#dcef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 style:data-style-name="N139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 style:data-style-name="N139">
      <style:table-cell-properties fo:border-bottom="1.76pt double-thin #0b77a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</style:style>
    <style:style style:name="ce169" style:family="table-cell" style:parent-style-name="Default" style:data-style-name="N139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13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b77a0" style:vertical-align="bottom" loext:vertical-justify="auto">
        <loext:border-top-complex-color loext:theme-type="accent4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cm" style:writing-mode="page"/>
    </style:style>
    <style:style style:name="ce171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2" style:family="table-cell" style:parent-style-name="Default" style:data-style-name="N139">
      <style:table-cell-properties fo:background-color="#dcef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 style:data-style-name="N13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b77a0" style:vertical-align="bottom" loext:vertical-justify="auto">
        <loext:border-top-complex-color loext:theme-type="accent4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b77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1.76pt double-thin #0b77a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79" style:family="table-cell" style:parent-style-name="Default" style:data-style-name="N14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b77a0" style:vertical-align="bottom" loext:vertical-justify="auto">
        <loext:border-top-complex-color loext:theme-type="accent4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80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81" style:family="table-cell" style:parent-style-name="Default" style:data-style-name="N140">
      <style:table-cell-properties fo:border-bottom="0.74pt solid #0b77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140">
      <style:table-cell-properties fo:border-bottom="1.76pt double-thin #0b77a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75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14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>
      <style:table-cell-properties fo:background-color="#ffc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71717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2" loext:color-type="theme">
          <loext:transformation loext:type="lummod" loext:value="1000"/>
        </loext:char-complex-color>
      </style:text-properties>
    </style:style>
    <style:style style:name="ce186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 style:data-style-name="N3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-is-between(-0.00000001,-9.99999999999999E+024)" style:apply-style-name="ConditionalStyle_5f_28" style:base-cell-address="'Liquidações.Derivativos'.M1"/>
    </style:style>
    <style:style style:name="ce189" style:family="table-cell" style:parent-style-name="Default" style:data-style-name="N4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-is-between(-0.00000001,-9.99999999999999E+024)" style:apply-style-name="ConditionalStyle_5f_28" style:base-cell-address="'Liquidações.Derivativos'.M1"/>
    </style:style>
    <style:style style:name="ce190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-is-between(-0.00000001,-9.99999999999999E+024)" style:apply-style-name="ConditionalStyle_5f_28" style:base-cell-address="'Liquidações.Derivativos'.M1"/>
    </style:style>
    <style:style style:name="ce191" style:family="table-cell" style:parent-style-name="Default">
      <style:table-cell-properties fo:background-color="#152858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92" style:family="table-cell" style:parent-style-name="Default" style:data-style-name="N13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 style:data-style-name="N118">
      <style:table-cell-properties fo:background-color="#a1d5e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 style:data-style-name="N139">
      <style:table-cell-properties fo:background-color="#a1d5e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Default" style:data-style-name="N13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6" style:family="table-cell" style:parent-style-name="Default" style:data-style-name="N139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8e8e8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2" loext:color-type="theme"/>
      </style:text-properties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fo:background-color="#15285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Default" style:data-style-name="N139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Default">
      <style:table-cell-properties fo:border-bottom="none" style:diagonal-bl-tr="none" style:diagonal-tl-br="none" fo:border-left="1.76pt solid #084f6b" fo:border-right="none" style:rotation-align="none" fo:border-top="1.76pt solid #084f6b">
        <loext:border-left-complex-color loext:theme-type="accent4" loext:color-type="theme">
          <loext:transformation loext:type="lummod" loext:value="5000"/>
        </loext:border-left-complex-color>
        <loext:border-top-complex-color loext:theme-type="accent4" loext:color-type="theme">
          <loext:transformation loext:type="lummod" loext:value="5000"/>
        </loext:border-top-complex-color>
      </style:table-cell-properties>
    </style:style>
    <style:style style:name="ce201" style:family="table-cell" style:parent-style-name="Default">
      <style:table-cell-properties fo:border-bottom="none" style:diagonal-bl-tr="none" style:diagonal-tl-br="none" fo:border-left="1.76pt solid #084f6b" fo:border-right="none" style:rotation-align="none" fo:border-top="none">
        <loext:border-left-complex-color loext:theme-type="accent4" loext:color-type="theme">
          <loext:transformation loext:type="lummod" loext:value="5000"/>
        </loext:border-left-complex-color>
      </style:table-cell-properties>
    </style:style>
    <style:style style:name="ce202" style:family="table-cell" style:parent-style-name="Default">
      <style:table-cell-properties fo:border-bottom="1.76pt solid #084f6b" style:diagonal-bl-tr="none" style:diagonal-tl-br="none" fo:border-left="1.76pt solid #084f6b" fo:border-right="none" style:rotation-align="none" fo:border-top="none">
        <loext:border-bottom-complex-color loext:theme-type="accent4" loext:color-type="theme">
          <loext:transformation loext:type="lummod" loext:value="5000"/>
        </loext:border-bottom-complex-color>
        <loext:border-left-complex-color loext:theme-type="accent4" loext:color-type="theme">
          <loext:transformation loext:type="lummod" loext:value="5000"/>
        </loext:border-left-complex-color>
      </style:table-cell-properties>
    </style:style>
    <style:style style:name="ce2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84f6b">
        <loext:border-top-complex-color loext:theme-type="accent4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-bottom="1.76pt solid #084f6b" style:diagonal-bl-tr="none" style:diagonal-tl-br="none" fo:border-left="none" fo:border-right="none" style:rotation-align="none" fo:border-top="none">
        <loext:border-bottom-complex-color loext:theme-type="accent4" loext:color-type="theme">
          <loext:transformation loext:type="lummod" loext:value="5000"/>
        </loext:border-bottom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08" style:family="table-cell" style:parent-style-name="Default">
      <style:table-cell-properties fo:border-bottom="1.76pt solid #084f6b" style:diagonal-bl-tr="none" style:diagonal-tl-br="none" fo:border-left="none" fo:border-right="none" style:rotation-align="none" fo:border-top="1.76pt solid #084f6b">
        <loext:border-bottom-complex-color loext:theme-type="accent4" loext:color-type="theme">
          <loext:transformation loext:type="lummod" loext:value="5000"/>
        </loext:border-bottom-complex-color>
        <loext:border-top-complex-color loext:theme-type="accent4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Default">
      <style:table-cell-properties fo:border-bottom="1.76pt solid #084f6b" style:diagonal-bl-tr="none" style:diagonal-tl-br="none" fo:border-left="none" fo:border-right="none" style:rotation-align="none" fo:border-top="none">
        <loext:border-bottom-complex-color loext:theme-type="accent4" loext:color-type="theme">
          <loext:transformation loext:type="lummod" loext:value="5000"/>
        </loext:border-bottom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>
        <loext:char-complex-color loext:theme-type="dark1" loext:color-type="theme"/>
      </style:text-properties>
    </style:style>
    <style:style style:name="ce211" style:family="table-cell" style:parent-style-name="Default">
      <style:table-cell-properties fo:border-bottom="1.76pt solid #084f6b" style:diagonal-bl-tr="none" style:diagonal-tl-br="none" fo:border-left="none" fo:border-right="none" style:rotation-align="none" fo:border-top="none">
        <loext:border-bottom-complex-color loext:theme-type="accent4" loext:color-type="theme">
          <loext:transformation loext:type="lummod" loext:value="5000"/>
        </loext:border-bottom-complex-color>
      </style:table-cell-properties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>
        <loext:char-complex-color loext:theme-type="dark1" loext:color-type="theme"/>
      </style:text-properties>
    </style:style>
    <style:style style:name="ce2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Default">
      <style:table-cell-properties fo:border-bottom="1.76pt solid #084f6b" fo:background-color="#d9d9d9" style:diagonal-bl-tr="none" style:diagonal-tl-br="none" fo:border-left="none" fo:border-right="none" style:rotation-align="none" fo:border-top="1.76pt solid #084f6b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8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 style:data-style-name="N4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 style:data-style-name="N13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19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139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 style:data-style-name="N4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Default" style:data-style-name="N4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 style:data-style-name="N13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139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>
        <loext:char-complex-color loext:theme-type="dark1" loext:color-type="theme"/>
      </style:text-properties>
    </style:style>
    <style:style style:name="ce225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 style:data-style-name="N139">
      <style:table-cell-properties fo:border-bottom="1.76pt solid #084f6b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8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 style:data-style-name="N11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>
        <loext:char-complex-color loext:theme-type="dark1" loext:color-type="theme"/>
      </style:text-properties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30" style:family="table-cell" style:parent-style-name="Default" style:data-style-name="N118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>
        <loext:char-complex-color loext:theme-type="dark1" loext:color-type="theme"/>
      </style:text-properties>
    </style:style>
    <style:style style:name="ce231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Default">
      <style:table-cell-properties fo:border-bottom="1.76pt solid #084f6b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8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84f6b">
        <loext:border-top-complex-color loext:theme-type="accent4" loext:color-type="theme">
          <loext:transformation loext:type="lummod" loext:value="5000"/>
        </loext:border-top-complex-color>
      </style:table-cell-properties>
    </style:style>
    <style:style style:name="ce234" style:family="table-cell" style:parent-style-name="Default">
      <style:table-cell-properties style:diagonal-bl-tr="none" style:diagonal-tl-br="none" fo:border="none" style:rotation-align="none"/>
    </style:style>
    <style:style style:name="ce235" style:family="table-cell" style:parent-style-name="Default">
      <style:table-cell-properties fo:border-bottom="1.76pt solid #084f6b" style:diagonal-bl-tr="none" style:diagonal-tl-br="none" fo:border-left="none" fo:border-right="none" style:rotation-align="none" fo:border-top="none">
        <loext:border-bottom-complex-color loext:theme-type="accent4" loext:color-type="theme">
          <loext:transformation loext:type="lummod" loext:value="5000"/>
        </loext:border-bottom-complex-color>
      </style:table-cell-properties>
    </style:style>
    <style:style style:name="ce236" style:family="table-cell" style:parent-style-name="Default">
      <style:table-cell-properties fo:border-bottom="0.74pt solid #084f6b" fo:background-color="#a1d5e3" style:diagonal-bl-tr="none" style:diagonal-tl-br="none" fo:border-left="none" fo:border-right="none" style:rotation-align="none" fo:border-top="1.76pt solid #084f6b">
        <loext:border-bottom-complex-color loext:theme-type="accent4" loext:color-type="theme">
          <loext:transformation loext:type="lummod" loext:value="5000"/>
        </loext:border-bottom-complex-color>
        <loext:border-top-complex-color loext:theme-type="accent4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fo:border-bottom="0.74pt solid #084f6b" fo:background-color="#d9d9d9" style:diagonal-bl-tr="none" style:diagonal-tl-br="none" fo:border-left="none" fo:border-right="none" style:rotation-align="none" fo:border-top="0.74pt solid #084f6b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8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Default">
      <style:table-cell-properties fo:border-bottom="0.74pt dotted #084f6b" fo:background-color="#f2f2f2" style:diagonal-bl-tr="none" style:diagonal-tl-br="none" fo:border-left="none" fo:border-right="none" style:rotation-align="none" fo:border-top="0.74pt solid #084f6b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0" style:family="table-cell" style:parent-style-name="Default">
      <style:table-cell-properties fo:border-bottom="0.74pt dotted #084f6b" style:diagonal-bl-tr="none" style:diagonal-tl-br="none" fo:background-color="transparent" fo:border-left="none" fo:border-right="none" style:rotation-align="none" fo:border-top="none">
        <loext:border-bottom-complex-color loext:theme-type="accent4" loext:color-type="theme">
          <loext:transformation loext:type="lummod" loext:value="5000"/>
        </loext:border-bottom-complex-color>
      </style:table-cell-properties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1" style:family="table-cell" style:parent-style-name="Default">
      <style:table-cell-properties fo:border-bottom="0.74pt dotted #084f6b" fo:background-color="#f2f2f2" style:diagonal-bl-tr="none" style:diagonal-tl-br="none" fo:border-left="none" fo:border-right="none" style:rotation-align="none" fo:border-top="0.74pt dotted #084f6b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Default">
      <style:table-cell-properties fo:border-bottom="0.74pt solid #084f6b" style:diagonal-bl-tr="none" style:diagonal-tl-br="none" fo:background-color="transparent" fo:border-left="none" fo:border-right="none" style:rotation-align="none" fo:border-top="none">
        <loext:border-bottom-complex-color loext:theme-type="accent4" loext:color-type="theme">
          <loext:transformation loext:type="lummod" loext:value="5000"/>
        </loext:border-bottom-complex-color>
      </style:table-cell-properties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3" style:family="table-cell" style:parent-style-name="Default">
      <style:table-cell-properties fo:border-bottom="0.74pt dotted #084f6b" fo:background-color="#f2f2f2" style:diagonal-bl-tr="none" style:diagonal-tl-br="none" fo:border-left="none" fo:border-right="none" style:rotation-align="none" fo:border-top="none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4" style:family="table-cell" style:parent-style-name="Default">
      <style:table-cell-properties fo:border-bottom="1.76pt solid #084f6b" style:diagonal-bl-tr="none" style:diagonal-tl-br="none" fo:background-color="transparent" fo:border-left="none" fo:border-right="none" style:rotation-align="none" fo:border-top="none">
        <loext:border-bottom-complex-color loext:theme-type="accent4" loext:color-type="theme">
          <loext:transformation loext:type="lummod" loext:value="5000"/>
        </loext:border-bottom-complex-color>
      </style:table-cell-properties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5" style:family="table-cell" style:parent-style-name="Default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middle" loext:vertical-justify="auto">
        <loext:border-bottom-complex-color loext:theme-type="accent4" loext:color-type="theme">
          <loext:transformation loext:type="lummod" loext:value="5000"/>
        </loext:border-bottom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4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48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49" style:family="table-cell" style:parent-style-name="Default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0" style:family="table-cell" style:parent-style-name="Default" style:data-style-name="N4">
      <style:table-cell-properties fo:border-bottom="0.74pt solid #084f6b" fo:background-color="#a1d5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1" style:family="table-cell" style:parent-style-name="Default" style:data-style-name="N4">
      <style:table-cell-properties fo:border-bottom="0.74pt solid #084f6b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8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2" style:family="table-cell" style:parent-style-name="Default" style:data-style-name="N4">
      <style:table-cell-properties fo:border-bottom="0.74pt dotted #084f6b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3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4" style:family="table-cell" style:parent-style-name="Default" style:data-style-name="N4">
      <style:table-cell-properties fo:border-bottom="0.74pt dotte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5" style:family="table-cell" style:parent-style-name="Default" style:data-style-name="N4">
      <style:table-cell-properties fo:border-bottom="0.74pt dotted #084f6b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6" style:family="table-cell" style:parent-style-name="Default" style:data-style-name="N4">
      <style:table-cell-properties fo:border-bottom="0.74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7" style:family="table-cell" style:parent-style-name="Default" style:data-style-name="N4">
      <style:table-cell-properties fo:border-bottom="0.74pt dotted #084f6b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8" style:family="table-cell" style:parent-style-name="Default" style:data-style-name="N4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59" style:family="table-cell" style:parent-style-name="Default" style:data-style-name="N4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  <style:map style:condition="cell-content-is-between(-0.0000000001,-9.99999999999999E+021)" style:apply-style-name="ConditionalStyle_5f_25" style:base-cell-address="Var_Cambial.H1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Default">
      <style:table-cell-properties fo:border-bottom="1.76pt solid #084f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Default">
      <style:table-cell-properties fo:border-bottom="1.76pt solid #084f6b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84f6b" style:vertical-align="bottom" loext:vertical-justify="auto">
        <loext:border-bottom-complex-color loext:theme-type="accent4" loext:color-type="theme">
          <loext:transformation loext:type="lummod" loext:value="5000"/>
        </loext:border-bottom-complex-color>
        <loext:background-complex-color loext:theme-type="light1" loext:color-type="theme">
          <loext:transformation loext:type="lummod" loext:value="8500"/>
        </loext:background-complex-color>
        <loext:border-top-complex-color loext:theme-type="accent4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>
      <style:table-cell-properties fo:border-bottom="none" style:diagonal-bl-tr="none" style:diagonal-tl-br="none" fo:border-left="none" fo:border-right="1.76pt solid #084f6b" style:rotation-align="none" fo:border-top="1.76pt solid #084f6b">
        <loext:border-right-complex-color loext:theme-type="accent4" loext:color-type="theme">
          <loext:transformation loext:type="lummod" loext:value="5000"/>
        </loext:border-right-complex-color>
        <loext:border-top-complex-color loext:theme-type="accent4" loext:color-type="theme">
          <loext:transformation loext:type="lummod" loext:value="5000"/>
        </loext:border-top-complex-color>
      </style:table-cell-properties>
    </style:style>
    <style:style style:name="ce266" style:family="table-cell" style:parent-style-name="Default">
      <style:table-cell-properties fo:border-bottom="none" style:diagonal-bl-tr="none" style:diagonal-tl-br="none" fo:border-left="none" fo:border-right="1.76pt solid #084f6b" style:rotation-align="none" fo:border-top="none">
        <loext:border-right-complex-color loext:theme-type="accent4" loext:color-type="theme">
          <loext:transformation loext:type="lummod" loext:value="5000"/>
        </loext:border-right-complex-color>
      </style:table-cell-properties>
    </style:style>
    <style:style style:name="ce267" style:family="table-cell" style:parent-style-name="Default">
      <style:table-cell-properties fo:border-bottom="1.76pt solid #084f6b" style:diagonal-bl-tr="none" style:diagonal-tl-br="none" fo:border-left="none" fo:border-right="1.76pt solid #084f6b" style:rotation-align="none" fo:border-top="none">
        <loext:border-bottom-complex-color loext:theme-type="accent4" loext:color-type="theme">
          <loext:transformation loext:type="lummod" loext:value="5000"/>
        </loext:border-bottom-complex-color>
        <loext:border-right-complex-color loext:theme-type="accent4" loext:color-type="theme">
          <loext:transformation loext:type="lummod" loext:value="5000"/>
        </loext:border-right-complex-color>
      </style:table-cell-properties>
    </style:style>
    <style:style style:name="ce26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70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71" style:family="table-cell" style:parent-style-name="Pivot_20_Table_20_Field">
      <style:table-cell-properties fo:border-bottom="0.99pt solid #000000" fo:border-left="2.01pt solid #000000" fo:border-right="0.99pt solid #000000" fo:border-top="none"/>
    </style:style>
    <style:style style:name="ce27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paragraph-properties fo:margin-left="0.344cm"/>
    </style:style>
    <style:style style:name="ce27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paragraph-properties fo:margin-left="0.688cm"/>
    </style:style>
    <style:style style:name="ce27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paragraph-properties fo:margin-left="1.032cm"/>
    </style:style>
    <style:style style:name="ce27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  <style:paragraph-properties fo:margin-left="1.032cm"/>
    </style:style>
    <style:style style:name="ce276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paragraph-properties fo:margin-left="1.032cm"/>
    </style:style>
    <style:style style:name="ce277" style:family="table-cell" style:parent-style-name="Pivot_20_Table_20_Field">
      <style:table-cell-properties fo:border-bottom="none" fo:border-left="0.99pt solid #000000" fo:border-right="none" fo:border-top="2.01pt solid #000000"/>
    </style:style>
    <style:style style:name="ce278" style:family="table-cell" style:parent-style-name="Pivot_20_Table_20_Category" style:data-style-name="N4">
      <style:table-cell-properties fo:border-bottom="none" fo:border-left="0.99pt solid #000000" fo:border-right="none" fo:border-top="none"/>
    </style:style>
    <style:style style:name="ce2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80" style:family="table-cell" style:parent-style-name="Pivot_20_Table_20_Value" style:data-style-name="N139">
      <style:table-cell-properties fo:border="0.99pt solid #000000"/>
    </style:style>
    <style:style style:name="ce281" style:family="table-cell" style:parent-style-name="Pivot_20_Table_20_Value" style:data-style-name="N139">
      <style:table-cell-properties fo:border-bottom="none" fo:border-left="none" fo:border-right="none" fo:border-top="0.99pt solid #000000"/>
    </style:style>
    <style:style style:name="ce282" style:family="table-cell" style:parent-style-name="Pivot_20_Table_20_Value" style:data-style-name="N139">
      <style:table-cell-properties fo:border-bottom="none" fo:border-left="0.99pt solid #000000" fo:border-right="0.99pt solid #000000" fo:border-top="0.99pt solid #000000"/>
    </style:style>
    <style:style style:name="ce283" style:family="table-cell" style:parent-style-name="Pivot_20_Table_20_Value" style:data-style-name="N139">
      <style:table-cell-properties fo:border-bottom="0.99pt solid #000000" fo:border-left="0.99pt solid #000000" fo:border-right="0.99pt solid #000000" fo:border-top="none"/>
    </style:style>
    <style:style style:name="ce284" style:family="table-cell" style:parent-style-name="Pivot_20_Table_20_Value" style:data-style-name="N139">
      <style:table-cell-properties fo:border-bottom="none" fo:border-left="0.99pt solid #000000" fo:border-right="0.99pt solid #000000" fo:border-top="none"/>
    </style:style>
    <style:style style:name="ce285" style:family="table-cell" style:parent-style-name="Pivot_20_Table_20_Result" style:data-style-name="N139">
      <style:table-cell-properties fo:border-bottom="2.01pt solid #000000" fo:border-left="0.99pt solid #000000" fo:border-right="0.99pt solid #000000" fo:border-top="0.99pt solid #000000"/>
    </style:style>
    <style:style style:name="ce286" style:family="table-cell" style:parent-style-name="Pivot_20_Table_20_Corner">
      <style:table-cell-properties fo:border-bottom="none" fo:border-left="none" fo:border-right="none" fo:border-top="2.01pt solid #000000"/>
    </style:style>
    <style:style style:name="ce287" style:family="table-cell" style:parent-style-name="Pivot_20_Table_20_Category" style:data-style-name="N4"/>
    <style:style style:name="ce28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89" style:family="table-cell" style:parent-style-name="Pivot_20_Table_20_Value" style:data-style-name="N139">
      <style:table-cell-properties fo:border-bottom="0.99pt solid #000000" fo:border-left="none" fo:border-right="none" fo:border-top="none"/>
    </style:style>
    <style:style style:name="ce29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91" style:family="table-cell" style:parent-style-name="Pivot_20_Table_20_Title" style:data-style-name="N4">
      <style:table-cell-properties fo:border-bottom="none" fo:border-left="0.99pt solid #000000" fo:border-right="2.01pt solid #000000" fo:border-top="0.99pt solid #000000"/>
    </style:style>
    <style:style style:name="ce29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93" style:family="table-cell" style:parent-style-name="Pivot_20_Table_20_Result" style:data-style-name="N139">
      <style:table-cell-properties fo:border-bottom="0.99pt solid #000000" fo:border-left="0.99pt solid #000000" fo:border-right="2.01pt solid #000000" fo:border-top="0.99pt solid #000000"/>
    </style:style>
    <style:style style:name="ce294" style:family="table-cell" style:parent-style-name="Pivot_20_Table_20_Result" style:data-style-name="N139">
      <style:table-cell-properties fo:border-bottom="none" fo:border-left="0.99pt solid #000000" fo:border-right="2.01pt solid #000000" fo:border-top="0.99pt solid #000000"/>
    </style:style>
    <style:style style:name="ce295" style:family="table-cell" style:parent-style-name="Pivot_20_Table_20_Result" style:data-style-name="N139">
      <style:table-cell-properties fo:border-bottom="0.99pt solid #000000" fo:border-left="0.99pt solid #000000" fo:border-right="2.01pt solid #000000" fo:border-top="none"/>
    </style:style>
    <style:style style:name="ce296" style:family="table-cell" style:parent-style-name="Pivot_20_Table_20_Result" style:data-style-name="N139">
      <style:table-cell-properties fo:border-bottom="none" fo:border-left="0.99pt solid #000000" fo:border-right="2.01pt solid #000000" fo:border-top="none"/>
    </style:style>
    <style:style style:name="ce297" style:family="table-cell" style:parent-style-name="Pivot_20_Table_20_Result" style:data-style-name="N139">
      <style:table-cell-properties fo:border-bottom="2.01pt solid #000000" fo:border-left="0.99pt solid #000000" fo:border-right="2.01pt solid #000000" fo:border-top="0.99pt solid #000000"/>
    </style:style>
    <style:style style:name="ce298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99" style:family="table-cell" style:parent-style-name="Default" style:data-style-name="N139">
      <style:table-cell-properties style:rotation-align="none"/>
    </style:style>
    <style:style style:name="ce300" style:family="table-cell" style:parent-style-name="Default" style:data-style-name="N139">
      <style:table-cell-properties style:rotation-align="non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01" style:family="table-cell" style:parent-style-name="Default">
      <style:table-cell-properties fo:background-color="#1b4b59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302" style:family="table-cell" style:parent-style-name="Default">
      <style:table-cell-properties fo:background-color="#1b4b59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303" style:family="table-cell" style:parent-style-name="Default">
      <style:table-cell-properties fo:border-bottom="1.76pt solid #152858" style:diagonal-bl-tr="none" style:diagonal-tl-br="none" fo:border-left="none" fo:border-right="none" style:rotation-align="none" fo:border-top="none"/>
    </style:style>
    <style:style style:name="ce304" style:family="table-cell" style:parent-style-name="Default">
      <style:table-cell-properties fo:border-bottom="1.76pt solid #15285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52858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306" style:family="table-cell" style:parent-style-name="Default">
      <style:table-cell-properties fo:background-color="#f2f2f2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308" style:family="table-cell" style:parent-style-name="Default">
      <style:table-cell-properties fo:border-bottom="1.76pt double-thin #152858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3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able-cell-properties fo:border-bottom="1.76pt solid #15285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52858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313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>
      <style:table-cell-properties fo:background-color="#e8f5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6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39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 style:data-style-name="N139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 style:data-style-name="N139">
      <style:table-cell-properties fo:border-bottom="1.76pt double-thin #152858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Percent" style:data-style-name="N10">
      <style:table-cell-properties fo:background-color="#e8f5f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46cm, 0.405cm, 1.542cm, 0.388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overflow-behavior="cli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85cm, 0.247cm, 0.943cm, 0.237cm)" draw:image-opacity="100%" style:mirror="none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82cm, 0.555cm, 1.687cm, 0.532cm)" draw:image-opacity="100%" style:mirror="none" loext:decorative="false"/>
      <style:paragraph-properties fo:text-align="start"/>
      <style:text-properties fo:font-size="18pt"/>
    </style:style>
    <style:style style:name="gr5" style:family="graphic" style:parent-style-name="Default">
      <style:graphic-properties draw:stroke="solid" svg:stroke-width="0.053cm" svg:stroke-color="#ffc000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'Aptos Narrow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gr6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88cm, 0.388cm, 1.48cm, 0.372cm)" draw:image-opacity="100%" style:mirror="none" loext:decorative="false"/>
      <style:paragraph-properties fo:text-align="start"/>
      <style:text-properties fo:font-size="18pt"/>
    </style:style>
    <style:style style:name="gr7" style:family="graphic" style:parent-style-name="Default">
      <style:graphic-properties draw:stroke="solid" svg:stroke-width="0cm" svg:stroke-color="#008000" draw:fill="solid" draw:fill-color="#ffffff" draw:textarea-horizontal-align="justify" draw:textarea-vertical-align="top" draw:auto-grow-height="false" draw:fit-to-size="false" style:shrink-to-fit="false" fo:min-height="7.841cm" fo:min-width="15.237cm" fo:padding-top="0.125cm" fo:padding-bottom="0.125cm" fo:padding-left="0.25cm" fo:padding-right="0.25cm" fo:wrap-option="wrap" style:overflow-behavior="clip" loext:decorative="false"/>
      <style:paragraph-properties style:writing-mode="lr-tb" fo:text-align="start"/>
      <style:text-properties fo:font-size="18pt"/>
    </style:style>
    <style:style style:name="gr8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1cm, 1.04cm, 0.375cm, 0.887cm)" draw:image-opacity="100%" style:mirror="none" loext:decorative="false"/>
      <style:paragraph-properties fo:text-align="start"/>
      <style:text-properties fo:font-size="18pt"/>
    </style:style>
    <style:style style:name="gr9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10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1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88cm, 0.387cm, 1.48cm, 0.371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4" style:family="paragraph">
      <loext:graphic-properties draw:fill="none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'Aptos Narrow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152858" loext:opacity="100%" style:text-outline="false" style:text-line-through-style="none" style:text-line-through-type="none" style:text-position="0% 100%" style:font-name="MyRIAD PRO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152858" loext:opacity="100%" style:text-outline="false" style:text-line-through-style="none" style:text-line-through-type="none" style:text-position="0% 100%" style:font-name="MyRIAD PRO" fo:font-size="9pt" fo:letter-spacing="normal" fo:language="pt" fo:country="BR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fo:font-variant="normal" fo:text-transform="none" fo:color="#152858" loext:opacity="100%" style:text-outline="false" style:text-line-through-style="none" style:text-line-through-type="none" style:text-position="0% 100%" style:font-name="MyRIAD PRO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152858" loext:opacity="100%" style:text-outline="false" style:text-line-through-style="none" style:text-line-through-type="none" style:text-position="0% 100%" style:font-name="MyRIAD PRO" fo:font-size="14pt" fo:letter-spacing="normal" fo:language="pt" fo:country="B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'Aptos Narrow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152858" loext:opacity="100%" style:text-outline="false" style:text-line-through-style="none" style:text-line-through-type="none" style:text-position="0% 100%" style:font-name="MyRIAD PRO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152858" loext:opacity="100%" style:text-outline="false" style:text-line-through-style="none" style:text-line-through-type="none" style:text-position="0% 100%" style:font-name="MyRIAD PRO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152858" loext:opacity="100%" style:text-outline="false" style:text-line-through-style="none" style:text-line-through-type="none" style:text-position="0% 100%" fo:font-family="'MiRYAD PRO'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152858" loext:opacity="100%" style:text-outline="false" style:text-line-through-style="none" style:text-line-through-type="none" style:text-position="0% 100%" fo:font-family="'MiRYAD PRO'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152858" loext:opacity="100%" style:text-outline="false" style:text-line-through-style="none" style:text-line-through-type="none" style:text-position="0% 100%" fo:font-family="'MiRYAD PRO'" fo:font-size="12pt" fo:letter-spacing="normal" fo:language="pt" fo:country="B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1b4b59" style:font-name="MyRIAD PR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ms.$Q$5:.$Q$7])" table:allow-empty-cell="true" table:display-list="unsorted" table:base-cell-address="Reporte_Liq.R7">
          <table:help-message table:display="true"/>
          <table:error-message table:message-type="stop" table:display="true"/>
        </table:content-validation>
        <table:content-validation table:name="val2" table:condition="of:cell-content-is-in-list([$dms.$P$5:.$P$12])" table:allow-empty-cell="true" table:display-list="unsorted" table:base-cell-address="Reporte_Liq.H12">
          <table:help-message table:display="true"/>
          <table:error-message table:message-type="stop" table:display="true"/>
        </table:content-validation>
      </table:content-validations>
      <table:table table:name="dm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" table:default-cell-style-name="ce2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number-columns-repeated="5" table:default-cell-style-name="ce2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67"/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>
            <draw:frame draw:z-index="1" draw:name="Imagem 3" draw:style-name="gr1" draw:text-style-name="P1" svg:width="2.129cm" svg:height="1.296cm" svg:x="0.926cm" svg:y="0.053cm">
              <draw:image xlink:href="Pictures/10000001000001280000017373DC06B6.png" xlink:type="simple" xlink:show="embed" xlink:actuate="onLoad" draw:mime-type="image/png">
                <text:p/>
              </draw:image>
              <svg:desc>Relfer – Estruturas Metálicas</svg:desc>
            </draw:frame>
          </table:table-cell>
          <table:table-cell table:number-columns-repeated="16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2">
          <table:table-cell table:style-name="ce1">
            <draw:custom-shape draw:z-index="0" draw:name="CaixaDeTexto 2" draw:style-name="gr2" draw:text-style-name="P3" svg:width="4.409cm" svg:height="0.682cm" svg:x="0.169cm" svg:y="0.275cm">
              <text:p text:style-name="P2"><text:span text:style-name="T1">PLANILHAS DE </text:span><text:span text:style-name="T2">DIMENSÃO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2"/>
          <table:table-cell table:style-name="ce3" office:value-type="string" calcext:value-type="string">
            <text:p>Chave Commo + Bolsa</text:p>
          </table:table-cell>
          <table:table-cell table:style-name="ce3" office:value-type="string" calcext:value-type="string">
            <text:p>Vol Kgs /Lote</text:p>
          </table:table-cell>
          <table:table-cell table:style-name="ce4"/>
          <table:table-cell table:style-name="ce3" office:value-type="string" calcext:value-type="string">
            <text:p>Número</text:p>
          </table:table-cell>
          <table:table-cell table:style-name="ce3" office:value-type="string" calcext:value-type="string">
            <text:p>Mês</text:p>
          </table:table-cell>
          <table:table-cell table:style-name="ce4"/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Mês</text:p>
          </table:table-cell>
          <table:table-cell table:style-name="ce3" office:value-type="string" calcext:value-type="string">
            <text:p>Mês nome</text:p>
          </table:table-cell>
          <table:table-cell table:style-name="ce3" office:value-type="string" calcext:value-type="string">
            <text:p>Ano</text:p>
          </table:table-cell>
          <table:table-cell table:style-name="ce3" office:value-type="string" calcext:value-type="string">
            <text:p>Concat Mês/Ano</text:p>
          </table:table-cell>
          <table:table-cell table:style-name="ce4"/>
          <table:table-cell table:style-name="ce6" office:value-type="string" calcext:value-type="string">
            <text:p>Opções <text:s/>movimentação Conta Derivativo</text:p>
          </table:table-cell>
          <table:table-cell table:style-name="ce6" office:value-type="string" calcext:value-type="string">
            <text:p>Tipos de Liquidação</text:p>
          </table:table-cell>
          <table:table-cell table:style-name="ce1" table:number-columns-repeated="16367"/>
        </table:table-row>
        <table:table-row table:style-name="ro1">
          <table:table-cell table:number-columns-repeated="3"/>
          <table:table-cell office:value-type="string" calcext:value-type="string">
            <text:p>Soja CBOT</text:p>
          </table:table-cell>
          <table:table-cell office:value-type="float" office:value="136078" calcext:value-type="float">
            <text:p>136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/>
          <table:table-cell table:style-name="ce5" office:value-type="date" office:date-value="2026-06-16" calcext:value-type="date">
            <text:p>16/6/2026</text:p>
          </table:table-cell>
          <table:table-cell table:formula="of:=MONTH([.J5])" office:value-type="float" office:value="6" calcext:value-type="float">
            <text:p>6</text:p>
          </table:table-cell>
          <table:table-cell table:formula="of:=COM.MICROSOFT.XLOOKUP([$dms.$K5];[.G:.G];[.H:.H])" office:value-type="string" office:string-value="Jun" calcext:value-type="string">
            <text:p>Jun</text:p>
          </table:table-cell>
          <table:table-cell table:formula="of:=YEAR([$dms.$J5])" office:value-type="float" office:value="2026" calcext:value-type="float">
            <text:p>2026</text:p>
          </table:table-cell>
          <table:table-cell table:formula="of:=COM.MICROSOFT.CONCAT([$dms.$L5];&quot; &quot;;[$dms.$M5])" office:value-type="string" office:string-value="Jun 2026" calcext:value-type="string">
            <text:p>Jun 2026</text:p>
          </table:table-cell>
          <table:table-cell/>
          <table:table-cell office:value-type="string" calcext:value-type="string">
            <text:p>Envio de recurso próprio</text:p>
          </table:table-cell>
          <table:table-cell office:value-type="string" calcext:value-type="string">
            <text:p>Offset de posição antecipado</text:p>
          </table:table-cell>
          <table:table-cell table:style-name="Default" table:number-columns-repeated="16367"/>
        </table:table-row>
        <table:table-row table:style-name="ro1">
          <table:table-cell table:number-columns-repeated="3"/>
          <table:table-cell office:value-type="string" calcext:value-type="string">
            <text:p>Milho CBOT</text:p>
          </table:table-cell>
          <table:table-cell office:value-type="float" office:value="127000" calcext:value-type="float">
            <text:p>127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v</text:p>
          </table:table-cell>
          <table:table-cell/>
          <table:table-cell table:style-name="ce5" office:value-type="date" office:date-value="2026-06-17" calcext:value-type="date">
            <text:p>17/6/2026</text:p>
          </table:table-cell>
          <table:table-cell table:formula="of:=MONTH([.J6])" office:value-type="float" office:value="6" calcext:value-type="float">
            <text:p>6</text:p>
          </table:table-cell>
          <table:table-cell table:formula="of:=COM.MICROSOFT.XLOOKUP([$dms.$K6];[.G:.G];[.H:.H])" office:value-type="string" office:string-value="Jun" calcext:value-type="string">
            <text:p>Jun</text:p>
          </table:table-cell>
          <table:table-cell table:formula="of:=YEAR([$dms.$J6])" office:value-type="float" office:value="2026" calcext:value-type="float">
            <text:p>2026</text:p>
          </table:table-cell>
          <table:table-cell table:formula="of:=COM.MICROSOFT.CONCAT([$dms.$L6];&quot; &quot;;[$dms.$M6])" office:value-type="string" office:string-value="Jun 2026" calcext:value-type="string">
            <text:p>Jun 2026</text:p>
          </table:table-cell>
          <table:table-cell/>
          <table:table-cell office:value-type="string" calcext:value-type="string">
            <text:p>Juros para utilização de limite de crédito</text:p>
          </table:table-cell>
          <table:table-cell office:value-type="string" calcext:value-type="string">
            <text:p>Offset de posição por vencimento</text:p>
          </table:table-cell>
          <table:table-cell table:style-name="Default" table:number-columns-repeated="16367"/>
        </table:table-row>
        <table:table-row table:style-name="ro1">
          <table:table-cell table:number-columns-repeated="3"/>
          <table:table-cell office:value-type="string" calcext:value-type="string">
            <text:p>Milho BMF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/>
          <table:table-cell table:style-name="ce5" office:value-type="date" office:date-value="2026-06-18" calcext:value-type="date">
            <text:p>18/6/2026</text:p>
          </table:table-cell>
          <table:table-cell table:formula="of:=MONTH([.J7])" office:value-type="float" office:value="6" calcext:value-type="float">
            <text:p>6</text:p>
          </table:table-cell>
          <table:table-cell table:formula="of:=COM.MICROSOFT.XLOOKUP([$dms.$K7];[.G:.G];[.H:.H])" office:value-type="string" office:string-value="Jun" calcext:value-type="string">
            <text:p>Jun</text:p>
          </table:table-cell>
          <table:table-cell table:formula="of:=YEAR([$dms.$J7])" office:value-type="float" office:value="2026" calcext:value-type="float">
            <text:p>2026</text:p>
          </table:table-cell>
          <table:table-cell table:formula="of:=COM.MICROSOFT.CONCAT([$dms.$L7];&quot; &quot;;[$dms.$M7])" office:value-type="string" office:string-value="Jun 2026" calcext:value-type="string">
            <text:p>Jun 2026</text:p>
          </table:table-cell>
          <table:table-cell/>
          <table:table-cell office:value-type="string" calcext:value-type="string">
            <text:p>Prêmio de Opção</text:p>
          </table:table-cell>
          <table:table-cell/>
          <table:table-cell table:style-name="Default" table:number-columns-repeated="16367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Abr</text:p>
          </table:table-cell>
          <table:table-cell/>
          <table:table-cell table:style-name="ce5" office:value-type="date" office:date-value="2026-06-19" calcext:value-type="date">
            <text:p>19/6/2026</text:p>
          </table:table-cell>
          <table:table-cell table:formula="of:=MONTH([.J8])" office:value-type="float" office:value="6" calcext:value-type="float">
            <text:p>6</text:p>
          </table:table-cell>
          <table:table-cell table:formula="of:=COM.MICROSOFT.XLOOKUP([$dms.$K8];[.G:.G];[.H:.H])" office:value-type="string" office:string-value="Jun" calcext:value-type="string">
            <text:p>Jun</text:p>
          </table:table-cell>
          <table:table-cell table:formula="of:=YEAR([$dms.$J8])" office:value-type="float" office:value="2026" calcext:value-type="float">
            <text:p>2026</text:p>
          </table:table-cell>
          <table:table-cell table:formula="of:=COM.MICROSOFT.CONCAT([$dms.$L8];&quot; &quot;;[$dms.$M8])" office:value-type="string" office:string-value="Jun 2026" calcext:value-type="string">
            <text:p>Jun 2026</text:p>
          </table:table-cell>
          <table:table-cell/>
          <table:table-cell office:value-type="string" calcext:value-type="string">
            <text:p>Reversão</text:p>
          </table:table-cell>
          <table:table-cell/>
          <table:table-cell table:style-name="Default" table:number-columns-repeated="16367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ai</text:p>
          </table:table-cell>
          <table:table-cell/>
          <table:table-cell table:style-name="ce5" office:value-type="date" office:date-value="2026-06-20" calcext:value-type="date">
            <text:p>20/6/2026</text:p>
          </table:table-cell>
          <table:table-cell table:formula="of:=MONTH([.J9])" office:value-type="float" office:value="6" calcext:value-type="float">
            <text:p>6</text:p>
          </table:table-cell>
          <table:table-cell table:formula="of:=COM.MICROSOFT.XLOOKUP([$dms.$K9];[.G:.G];[.H:.H])" office:value-type="string" office:string-value="Jun" calcext:value-type="string">
            <text:p>Jun</text:p>
          </table:table-cell>
          <table:table-cell table:formula="of:=YEAR([$dms.$J9])" office:value-type="float" office:value="2026" calcext:value-type="float">
            <text:p>2026</text:p>
          </table:table-cell>
          <table:table-cell table:formula="of:=COM.MICROSOFT.CONCAT([$dms.$L9];&quot; &quot;;[$dms.$M9])" office:value-type="string" office:string-value="Jun 2026" calcext:value-type="string">
            <text:p>Jun 2026</text:p>
          </table:table-cell>
          <table:table-cell/>
          <table:table-cell office:value-type="string" calcext:value-type="string">
            <text:p>Saque</text:p>
          </table:table-cell>
          <table:table-cell/>
          <table:table-cell table:style-name="Default" table:number-columns-repeated="16367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/>
          <table:table-cell table:style-name="ce5" office:value-type="date" office:date-value="2026-06-21" calcext:value-type="date">
            <text:p>21/6/2026</text:p>
          </table:table-cell>
          <table:table-cell table:formula="of:=MONTH([.J10])" office:value-type="float" office:value="6" calcext:value-type="float">
            <text:p>6</text:p>
          </table:table-cell>
          <table:table-cell table:formula="of:=COM.MICROSOFT.XLOOKUP([$dms.$K10];[.G:.G];[.H:.H])" office:value-type="string" office:string-value="Jun" calcext:value-type="string">
            <text:p>Jun</text:p>
          </table:table-cell>
          <table:table-cell table:formula="of:=YEAR([$dms.$J10])" office:value-type="float" office:value="2026" calcext:value-type="float">
            <text:p>2026</text:p>
          </table:table-cell>
          <table:table-cell table:formula="of:=COM.MICROSOFT.CONCAT([$dms.$L10];&quot; &quot;;[$dms.$M10])" office:value-type="string" office:string-value="Jun 2026" calcext:value-type="string">
            <text:p>Jun 2026</text:p>
          </table:table-cell>
          <table:table-cell/>
          <table:table-cell office:value-type="string" calcext:value-type="string">
            <text:p>Selldown</text:p>
          </table:table-cell>
          <table:table-cell/>
          <table:table-cell table:style-name="Default" table:number-columns-repeated="16367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/>
          <table:table-cell table:style-name="ce5" office:value-type="date" office:date-value="2026-06-22" calcext:value-type="date">
            <text:p>22/6/2026</text:p>
          </table:table-cell>
          <table:table-cell table:formula="of:=MONTH([.J11])" office:value-type="float" office:value="6" calcext:value-type="float">
            <text:p>6</text:p>
          </table:table-cell>
          <table:table-cell table:formula="of:=COM.MICROSOFT.XLOOKUP([$dms.$K11];[.G:.G];[.H:.H])" office:value-type="string" office:string-value="Jun" calcext:value-type="string">
            <text:p>Jun</text:p>
          </table:table-cell>
          <table:table-cell table:formula="of:=YEAR([$dms.$J11])" office:value-type="float" office:value="2026" calcext:value-type="float">
            <text:p>2026</text:p>
          </table:table-cell>
          <table:table-cell table:formula="of:=COM.MICROSOFT.CONCAT([$dms.$L11];&quot; &quot;;[$dms.$M11])" office:value-type="string" office:string-value="Jun 2026" calcext:value-type="string">
            <text:p>Jun 2026</text:p>
          </table:table-cell>
          <table:table-cell/>
          <table:table-cell office:value-type="string" calcext:value-type="string">
            <text:p>Transferência interna</text:p>
          </table:table-cell>
          <table:table-cell/>
          <table:table-cell table:style-name="Default" table:number-columns-repeated="16367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Ago</text:p>
          </table:table-cell>
          <table:table-cell/>
          <table:table-cell table:style-name="ce5" office:value-type="date" office:date-value="2026-06-23" calcext:value-type="date">
            <text:p>23/6/2026</text:p>
          </table:table-cell>
          <table:table-cell table:formula="of:=MONTH([.J12])" office:value-type="float" office:value="6" calcext:value-type="float">
            <text:p>6</text:p>
          </table:table-cell>
          <table:table-cell table:formula="of:=COM.MICROSOFT.XLOOKUP([$dms.$K12];[.G:.G];[.H:.H])" office:value-type="string" office:string-value="Jun" calcext:value-type="string">
            <text:p>Jun</text:p>
          </table:table-cell>
          <table:table-cell table:formula="of:=YEAR([$dms.$J12])" office:value-type="float" office:value="2026" calcext:value-type="float">
            <text:p>2026</text:p>
          </table:table-cell>
          <table:table-cell table:formula="of:=COM.MICROSOFT.CONCAT([$dms.$L12];&quot; &quot;;[$dms.$M12])" office:value-type="string" office:string-value="Jun 2026" calcext:value-type="string">
            <text:p>Jun 2026</text:p>
          </table:table-cell>
          <table:table-cell/>
          <table:table-cell office:value-type="string" calcext:value-type="string">
            <text:p>IRRF S/ Operações OTC</text:p>
          </table:table-cell>
          <table:table-cell/>
          <table:table-cell table:style-name="Default" table:number-columns-repeated="16367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et</text:p>
          </table:table-cell>
          <table:table-cell/>
          <table:table-cell table:style-name="ce5" office:value-type="date" office:date-value="2026-06-24" calcext:value-type="date">
            <text:p>24/6/2026</text:p>
          </table:table-cell>
          <table:table-cell table:formula="of:=MONTH([.J13])" office:value-type="float" office:value="6" calcext:value-type="float">
            <text:p>6</text:p>
          </table:table-cell>
          <table:table-cell table:formula="of:=COM.MICROSOFT.XLOOKUP([$dms.$K13];[.G:.G];[.H:.H])" office:value-type="string" office:string-value="Jun" calcext:value-type="string">
            <text:p>Jun</text:p>
          </table:table-cell>
          <table:table-cell table:formula="of:=YEAR([$dms.$J13])" office:value-type="float" office:value="2026" calcext:value-type="float">
            <text:p>2026</text:p>
          </table:table-cell>
          <table:table-cell table:formula="of:=COM.MICROSOFT.CONCAT([$dms.$L13];&quot; &quot;;[$dms.$M13])" office:value-type="string" office:string-value="Jun 2026" calcext:value-type="string">
            <text:p>Jun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Out</text:p>
          </table:table-cell>
          <table:table-cell/>
          <table:table-cell table:style-name="ce5" office:value-type="date" office:date-value="2026-06-25" calcext:value-type="date">
            <text:p>25/6/2026</text:p>
          </table:table-cell>
          <table:table-cell table:formula="of:=MONTH([.J14])" office:value-type="float" office:value="6" calcext:value-type="float">
            <text:p>6</text:p>
          </table:table-cell>
          <table:table-cell table:formula="of:=COM.MICROSOFT.XLOOKUP([$dms.$K14];[.G:.G];[.H:.H])" office:value-type="string" office:string-value="Jun" calcext:value-type="string">
            <text:p>Jun</text:p>
          </table:table-cell>
          <table:table-cell table:formula="of:=YEAR([$dms.$J14])" office:value-type="float" office:value="2026" calcext:value-type="float">
            <text:p>2026</text:p>
          </table:table-cell>
          <table:table-cell table:formula="of:=COM.MICROSOFT.CONCAT([$dms.$L14];&quot; &quot;;[$dms.$M14])" office:value-type="string" office:string-value="Jun 2026" calcext:value-type="string">
            <text:p>Jun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/>
          <table:table-cell table:style-name="ce5" office:value-type="date" office:date-value="2026-06-26" calcext:value-type="date">
            <text:p>26/6/2026</text:p>
          </table:table-cell>
          <table:table-cell table:formula="of:=MONTH([.J15])" office:value-type="float" office:value="6" calcext:value-type="float">
            <text:p>6</text:p>
          </table:table-cell>
          <table:table-cell table:formula="of:=COM.MICROSOFT.XLOOKUP([$dms.$K15];[.G:.G];[.H:.H])" office:value-type="string" office:string-value="Jun" calcext:value-type="string">
            <text:p>Jun</text:p>
          </table:table-cell>
          <table:table-cell table:formula="of:=YEAR([$dms.$J15])" office:value-type="float" office:value="2026" calcext:value-type="float">
            <text:p>2026</text:p>
          </table:table-cell>
          <table:table-cell table:formula="of:=COM.MICROSOFT.CONCAT([$dms.$L15];&quot; &quot;;[$dms.$M15])" office:value-type="string" office:string-value="Jun 2026" calcext:value-type="string">
            <text:p>Jun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Dez</text:p>
          </table:table-cell>
          <table:table-cell/>
          <table:table-cell table:style-name="ce5" office:value-type="date" office:date-value="2026-06-27" calcext:value-type="date">
            <text:p>27/6/2026</text:p>
          </table:table-cell>
          <table:table-cell table:formula="of:=MONTH([.J16])" office:value-type="float" office:value="6" calcext:value-type="float">
            <text:p>6</text:p>
          </table:table-cell>
          <table:table-cell table:formula="of:=COM.MICROSOFT.XLOOKUP([$dms.$K16];[.G:.G];[.H:.H])" office:value-type="string" office:string-value="Jun" calcext:value-type="string">
            <text:p>Jun</text:p>
          </table:table-cell>
          <table:table-cell table:formula="of:=YEAR([$dms.$J16])" office:value-type="float" office:value="2026" calcext:value-type="float">
            <text:p>2026</text:p>
          </table:table-cell>
          <table:table-cell table:formula="of:=COM.MICROSOFT.CONCAT([$dms.$L16];&quot; &quot;;[$dms.$M16])" office:value-type="string" office:string-value="Jun 2026" calcext:value-type="string">
            <text:p>Jun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6-28" calcext:value-type="date">
            <text:p>28/6/2026</text:p>
          </table:table-cell>
          <table:table-cell table:formula="of:=MONTH([.J17])" office:value-type="float" office:value="6" calcext:value-type="float">
            <text:p>6</text:p>
          </table:table-cell>
          <table:table-cell table:formula="of:=COM.MICROSOFT.XLOOKUP([$dms.$K17];[.G:.G];[.H:.H])" office:value-type="string" office:string-value="Jun" calcext:value-type="string">
            <text:p>Jun</text:p>
          </table:table-cell>
          <table:table-cell table:formula="of:=YEAR([$dms.$J17])" office:value-type="float" office:value="2026" calcext:value-type="float">
            <text:p>2026</text:p>
          </table:table-cell>
          <table:table-cell table:formula="of:=COM.MICROSOFT.CONCAT([$dms.$L17];&quot; &quot;;[$dms.$M17])" office:value-type="string" office:string-value="Jun 2026" calcext:value-type="string">
            <text:p>Jun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6-29" calcext:value-type="date">
            <text:p>29/6/2026</text:p>
          </table:table-cell>
          <table:table-cell table:formula="of:=MONTH([.J18])" office:value-type="float" office:value="6" calcext:value-type="float">
            <text:p>6</text:p>
          </table:table-cell>
          <table:table-cell table:formula="of:=COM.MICROSOFT.XLOOKUP([$dms.$K18];[.G:.G];[.H:.H])" office:value-type="string" office:string-value="Jun" calcext:value-type="string">
            <text:p>Jun</text:p>
          </table:table-cell>
          <table:table-cell table:formula="of:=YEAR([$dms.$J18])" office:value-type="float" office:value="2026" calcext:value-type="float">
            <text:p>2026</text:p>
          </table:table-cell>
          <table:table-cell table:formula="of:=COM.MICROSOFT.CONCAT([$dms.$L18];&quot; &quot;;[$dms.$M18])" office:value-type="string" office:string-value="Jun 2026" calcext:value-type="string">
            <text:p>Jun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6-30" calcext:value-type="date">
            <text:p>30/6/2026</text:p>
          </table:table-cell>
          <table:table-cell table:formula="of:=MONTH([.J19])" office:value-type="float" office:value="6" calcext:value-type="float">
            <text:p>6</text:p>
          </table:table-cell>
          <table:table-cell table:formula="of:=COM.MICROSOFT.XLOOKUP([$dms.$K19];[.G:.G];[.H:.H])" office:value-type="string" office:string-value="Jun" calcext:value-type="string">
            <text:p>Jun</text:p>
          </table:table-cell>
          <table:table-cell table:formula="of:=YEAR([$dms.$J19])" office:value-type="float" office:value="2026" calcext:value-type="float">
            <text:p>2026</text:p>
          </table:table-cell>
          <table:table-cell table:formula="of:=COM.MICROSOFT.CONCAT([$dms.$L19];&quot; &quot;;[$dms.$M19])" office:value-type="string" office:string-value="Jun 2026" calcext:value-type="string">
            <text:p>Jun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01" calcext:value-type="date">
            <text:p>1/7/2026</text:p>
          </table:table-cell>
          <table:table-cell table:formula="of:=MONTH([.J20])" office:value-type="float" office:value="7" calcext:value-type="float">
            <text:p>7</text:p>
          </table:table-cell>
          <table:table-cell table:formula="of:=COM.MICROSOFT.XLOOKUP([$dms.$K20];[.G:.G];[.H:.H])" office:value-type="string" office:string-value="Jul" calcext:value-type="string">
            <text:p>Jul</text:p>
          </table:table-cell>
          <table:table-cell table:formula="of:=YEAR([$dms.$J20])" office:value-type="float" office:value="2026" calcext:value-type="float">
            <text:p>2026</text:p>
          </table:table-cell>
          <table:table-cell table:formula="of:=COM.MICROSOFT.CONCAT([$dms.$L20];&quot; &quot;;[$dms.$M20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02" calcext:value-type="date">
            <text:p>2/7/2026</text:p>
          </table:table-cell>
          <table:table-cell table:formula="of:=MONTH([.J21])" office:value-type="float" office:value="7" calcext:value-type="float">
            <text:p>7</text:p>
          </table:table-cell>
          <table:table-cell table:formula="of:=COM.MICROSOFT.XLOOKUP([$dms.$K21];[.G:.G];[.H:.H])" office:value-type="string" office:string-value="Jul" calcext:value-type="string">
            <text:p>Jul</text:p>
          </table:table-cell>
          <table:table-cell table:formula="of:=YEAR([$dms.$J21])" office:value-type="float" office:value="2026" calcext:value-type="float">
            <text:p>2026</text:p>
          </table:table-cell>
          <table:table-cell table:formula="of:=COM.MICROSOFT.CONCAT([$dms.$L21];&quot; &quot;;[$dms.$M21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03" calcext:value-type="date">
            <text:p>3/7/2026</text:p>
          </table:table-cell>
          <table:table-cell table:formula="of:=MONTH([.J22])" office:value-type="float" office:value="7" calcext:value-type="float">
            <text:p>7</text:p>
          </table:table-cell>
          <table:table-cell table:formula="of:=COM.MICROSOFT.XLOOKUP([$dms.$K22];[.G:.G];[.H:.H])" office:value-type="string" office:string-value="Jul" calcext:value-type="string">
            <text:p>Jul</text:p>
          </table:table-cell>
          <table:table-cell table:formula="of:=YEAR([$dms.$J22])" office:value-type="float" office:value="2026" calcext:value-type="float">
            <text:p>2026</text:p>
          </table:table-cell>
          <table:table-cell table:formula="of:=COM.MICROSOFT.CONCAT([$dms.$L22];&quot; &quot;;[$dms.$M22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04" calcext:value-type="date">
            <text:p>4/7/2026</text:p>
          </table:table-cell>
          <table:table-cell table:formula="of:=MONTH([.J23])" office:value-type="float" office:value="7" calcext:value-type="float">
            <text:p>7</text:p>
          </table:table-cell>
          <table:table-cell table:formula="of:=COM.MICROSOFT.XLOOKUP([$dms.$K23];[.G:.G];[.H:.H])" office:value-type="string" office:string-value="Jul" calcext:value-type="string">
            <text:p>Jul</text:p>
          </table:table-cell>
          <table:table-cell table:formula="of:=YEAR([$dms.$J23])" office:value-type="float" office:value="2026" calcext:value-type="float">
            <text:p>2026</text:p>
          </table:table-cell>
          <table:table-cell table:formula="of:=COM.MICROSOFT.CONCAT([$dms.$L23];&quot; &quot;;[$dms.$M23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05" calcext:value-type="date">
            <text:p>5/7/2026</text:p>
          </table:table-cell>
          <table:table-cell table:formula="of:=MONTH([.J24])" office:value-type="float" office:value="7" calcext:value-type="float">
            <text:p>7</text:p>
          </table:table-cell>
          <table:table-cell table:formula="of:=COM.MICROSOFT.XLOOKUP([$dms.$K24];[.G:.G];[.H:.H])" office:value-type="string" office:string-value="Jul" calcext:value-type="string">
            <text:p>Jul</text:p>
          </table:table-cell>
          <table:table-cell table:formula="of:=YEAR([$dms.$J24])" office:value-type="float" office:value="2026" calcext:value-type="float">
            <text:p>2026</text:p>
          </table:table-cell>
          <table:table-cell table:formula="of:=COM.MICROSOFT.CONCAT([$dms.$L24];&quot; &quot;;[$dms.$M24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06" calcext:value-type="date">
            <text:p>6/7/2026</text:p>
          </table:table-cell>
          <table:table-cell table:formula="of:=MONTH([.J25])" office:value-type="float" office:value="7" calcext:value-type="float">
            <text:p>7</text:p>
          </table:table-cell>
          <table:table-cell table:formula="of:=COM.MICROSOFT.XLOOKUP([$dms.$K25];[.G:.G];[.H:.H])" office:value-type="string" office:string-value="Jul" calcext:value-type="string">
            <text:p>Jul</text:p>
          </table:table-cell>
          <table:table-cell table:formula="of:=YEAR([$dms.$J25])" office:value-type="float" office:value="2026" calcext:value-type="float">
            <text:p>2026</text:p>
          </table:table-cell>
          <table:table-cell table:formula="of:=COM.MICROSOFT.CONCAT([$dms.$L25];&quot; &quot;;[$dms.$M25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07" calcext:value-type="date">
            <text:p>7/7/2026</text:p>
          </table:table-cell>
          <table:table-cell table:formula="of:=MONTH([.J26])" office:value-type="float" office:value="7" calcext:value-type="float">
            <text:p>7</text:p>
          </table:table-cell>
          <table:table-cell table:formula="of:=COM.MICROSOFT.XLOOKUP([$dms.$K26];[.G:.G];[.H:.H])" office:value-type="string" office:string-value="Jul" calcext:value-type="string">
            <text:p>Jul</text:p>
          </table:table-cell>
          <table:table-cell table:formula="of:=YEAR([$dms.$J26])" office:value-type="float" office:value="2026" calcext:value-type="float">
            <text:p>2026</text:p>
          </table:table-cell>
          <table:table-cell table:formula="of:=COM.MICROSOFT.CONCAT([$dms.$L26];&quot; &quot;;[$dms.$M26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08" calcext:value-type="date">
            <text:p>8/7/2026</text:p>
          </table:table-cell>
          <table:table-cell table:formula="of:=MONTH([.J27])" office:value-type="float" office:value="7" calcext:value-type="float">
            <text:p>7</text:p>
          </table:table-cell>
          <table:table-cell table:formula="of:=COM.MICROSOFT.XLOOKUP([$dms.$K27];[.G:.G];[.H:.H])" office:value-type="string" office:string-value="Jul" calcext:value-type="string">
            <text:p>Jul</text:p>
          </table:table-cell>
          <table:table-cell table:formula="of:=YEAR([$dms.$J27])" office:value-type="float" office:value="2026" calcext:value-type="float">
            <text:p>2026</text:p>
          </table:table-cell>
          <table:table-cell table:formula="of:=COM.MICROSOFT.CONCAT([$dms.$L27];&quot; &quot;;[$dms.$M27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09" calcext:value-type="date">
            <text:p>9/7/2026</text:p>
          </table:table-cell>
          <table:table-cell table:formula="of:=MONTH([.J28])" office:value-type="float" office:value="7" calcext:value-type="float">
            <text:p>7</text:p>
          </table:table-cell>
          <table:table-cell table:formula="of:=COM.MICROSOFT.XLOOKUP([$dms.$K28];[.G:.G];[.H:.H])" office:value-type="string" office:string-value="Jul" calcext:value-type="string">
            <text:p>Jul</text:p>
          </table:table-cell>
          <table:table-cell table:formula="of:=YEAR([$dms.$J28])" office:value-type="float" office:value="2026" calcext:value-type="float">
            <text:p>2026</text:p>
          </table:table-cell>
          <table:table-cell table:formula="of:=COM.MICROSOFT.CONCAT([$dms.$L28];&quot; &quot;;[$dms.$M28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0" calcext:value-type="date">
            <text:p>10/7/2026</text:p>
          </table:table-cell>
          <table:table-cell table:formula="of:=MONTH([.J29])" office:value-type="float" office:value="7" calcext:value-type="float">
            <text:p>7</text:p>
          </table:table-cell>
          <table:table-cell table:formula="of:=COM.MICROSOFT.XLOOKUP([$dms.$K29];[.G:.G];[.H:.H])" office:value-type="string" office:string-value="Jul" calcext:value-type="string">
            <text:p>Jul</text:p>
          </table:table-cell>
          <table:table-cell table:formula="of:=YEAR([$dms.$J29])" office:value-type="float" office:value="2026" calcext:value-type="float">
            <text:p>2026</text:p>
          </table:table-cell>
          <table:table-cell table:formula="of:=COM.MICROSOFT.CONCAT([$dms.$L29];&quot; &quot;;[$dms.$M29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1" calcext:value-type="date">
            <text:p>11/7/2026</text:p>
          </table:table-cell>
          <table:table-cell table:formula="of:=MONTH([.J30])" office:value-type="float" office:value="7" calcext:value-type="float">
            <text:p>7</text:p>
          </table:table-cell>
          <table:table-cell table:formula="of:=COM.MICROSOFT.XLOOKUP([$dms.$K30];[.G:.G];[.H:.H])" office:value-type="string" office:string-value="Jul" calcext:value-type="string">
            <text:p>Jul</text:p>
          </table:table-cell>
          <table:table-cell table:formula="of:=YEAR([$dms.$J30])" office:value-type="float" office:value="2026" calcext:value-type="float">
            <text:p>2026</text:p>
          </table:table-cell>
          <table:table-cell table:formula="of:=COM.MICROSOFT.CONCAT([$dms.$L30];&quot; &quot;;[$dms.$M30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2" calcext:value-type="date">
            <text:p>12/7/2026</text:p>
          </table:table-cell>
          <table:table-cell table:formula="of:=MONTH([.J31])" office:value-type="float" office:value="7" calcext:value-type="float">
            <text:p>7</text:p>
          </table:table-cell>
          <table:table-cell table:formula="of:=COM.MICROSOFT.XLOOKUP([$dms.$K31];[.G:.G];[.H:.H])" office:value-type="string" office:string-value="Jul" calcext:value-type="string">
            <text:p>Jul</text:p>
          </table:table-cell>
          <table:table-cell table:formula="of:=YEAR([$dms.$J31])" office:value-type="float" office:value="2026" calcext:value-type="float">
            <text:p>2026</text:p>
          </table:table-cell>
          <table:table-cell table:formula="of:=COM.MICROSOFT.CONCAT([$dms.$L31];&quot; &quot;;[$dms.$M31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3" calcext:value-type="date">
            <text:p>13/7/2026</text:p>
          </table:table-cell>
          <table:table-cell table:formula="of:=MONTH([.J32])" office:value-type="float" office:value="7" calcext:value-type="float">
            <text:p>7</text:p>
          </table:table-cell>
          <table:table-cell table:formula="of:=COM.MICROSOFT.XLOOKUP([$dms.$K32];[.G:.G];[.H:.H])" office:value-type="string" office:string-value="Jul" calcext:value-type="string">
            <text:p>Jul</text:p>
          </table:table-cell>
          <table:table-cell table:formula="of:=YEAR([$dms.$J32])" office:value-type="float" office:value="2026" calcext:value-type="float">
            <text:p>2026</text:p>
          </table:table-cell>
          <table:table-cell table:formula="of:=COM.MICROSOFT.CONCAT([$dms.$L32];&quot; &quot;;[$dms.$M32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4" calcext:value-type="date">
            <text:p>14/7/2026</text:p>
          </table:table-cell>
          <table:table-cell table:formula="of:=MONTH([.J33])" office:value-type="float" office:value="7" calcext:value-type="float">
            <text:p>7</text:p>
          </table:table-cell>
          <table:table-cell table:formula="of:=COM.MICROSOFT.XLOOKUP([$dms.$K33];[.G:.G];[.H:.H])" office:value-type="string" office:string-value="Jul" calcext:value-type="string">
            <text:p>Jul</text:p>
          </table:table-cell>
          <table:table-cell table:formula="of:=YEAR([$dms.$J33])" office:value-type="float" office:value="2026" calcext:value-type="float">
            <text:p>2026</text:p>
          </table:table-cell>
          <table:table-cell table:formula="of:=COM.MICROSOFT.CONCAT([$dms.$L33];&quot; &quot;;[$dms.$M33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5" calcext:value-type="date">
            <text:p>15/7/2026</text:p>
          </table:table-cell>
          <table:table-cell table:formula="of:=MONTH([.J34])" office:value-type="float" office:value="7" calcext:value-type="float">
            <text:p>7</text:p>
          </table:table-cell>
          <table:table-cell table:formula="of:=COM.MICROSOFT.XLOOKUP([$dms.$K34];[.G:.G];[.H:.H])" office:value-type="string" office:string-value="Jul" calcext:value-type="string">
            <text:p>Jul</text:p>
          </table:table-cell>
          <table:table-cell table:formula="of:=YEAR([$dms.$J34])" office:value-type="float" office:value="2026" calcext:value-type="float">
            <text:p>2026</text:p>
          </table:table-cell>
          <table:table-cell table:formula="of:=COM.MICROSOFT.CONCAT([$dms.$L34];&quot; &quot;;[$dms.$M34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6" calcext:value-type="date">
            <text:p>16/7/2026</text:p>
          </table:table-cell>
          <table:table-cell table:formula="of:=MONTH([.J35])" office:value-type="float" office:value="7" calcext:value-type="float">
            <text:p>7</text:p>
          </table:table-cell>
          <table:table-cell table:formula="of:=COM.MICROSOFT.XLOOKUP([$dms.$K35];[.G:.G];[.H:.H])" office:value-type="string" office:string-value="Jul" calcext:value-type="string">
            <text:p>Jul</text:p>
          </table:table-cell>
          <table:table-cell table:formula="of:=YEAR([$dms.$J35])" office:value-type="float" office:value="2026" calcext:value-type="float">
            <text:p>2026</text:p>
          </table:table-cell>
          <table:table-cell table:formula="of:=COM.MICROSOFT.CONCAT([$dms.$L35];&quot; &quot;;[$dms.$M35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7" calcext:value-type="date">
            <text:p>17/7/2026</text:p>
          </table:table-cell>
          <table:table-cell table:formula="of:=MONTH([.J36])" office:value-type="float" office:value="7" calcext:value-type="float">
            <text:p>7</text:p>
          </table:table-cell>
          <table:table-cell table:formula="of:=COM.MICROSOFT.XLOOKUP([$dms.$K36];[.G:.G];[.H:.H])" office:value-type="string" office:string-value="Jul" calcext:value-type="string">
            <text:p>Jul</text:p>
          </table:table-cell>
          <table:table-cell table:formula="of:=YEAR([$dms.$J36])" office:value-type="float" office:value="2026" calcext:value-type="float">
            <text:p>2026</text:p>
          </table:table-cell>
          <table:table-cell table:formula="of:=COM.MICROSOFT.CONCAT([$dms.$L36];&quot; &quot;;[$dms.$M36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8" calcext:value-type="date">
            <text:p>18/7/2026</text:p>
          </table:table-cell>
          <table:table-cell table:formula="of:=MONTH([.J37])" office:value-type="float" office:value="7" calcext:value-type="float">
            <text:p>7</text:p>
          </table:table-cell>
          <table:table-cell table:formula="of:=COM.MICROSOFT.XLOOKUP([$dms.$K37];[.G:.G];[.H:.H])" office:value-type="string" office:string-value="Jul" calcext:value-type="string">
            <text:p>Jul</text:p>
          </table:table-cell>
          <table:table-cell table:formula="of:=YEAR([$dms.$J37])" office:value-type="float" office:value="2026" calcext:value-type="float">
            <text:p>2026</text:p>
          </table:table-cell>
          <table:table-cell table:formula="of:=COM.MICROSOFT.CONCAT([$dms.$L37];&quot; &quot;;[$dms.$M37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19" calcext:value-type="date">
            <text:p>19/7/2026</text:p>
          </table:table-cell>
          <table:table-cell table:formula="of:=MONTH([.J38])" office:value-type="float" office:value="7" calcext:value-type="float">
            <text:p>7</text:p>
          </table:table-cell>
          <table:table-cell table:formula="of:=COM.MICROSOFT.XLOOKUP([$dms.$K38];[.G:.G];[.H:.H])" office:value-type="string" office:string-value="Jul" calcext:value-type="string">
            <text:p>Jul</text:p>
          </table:table-cell>
          <table:table-cell table:formula="of:=YEAR([$dms.$J38])" office:value-type="float" office:value="2026" calcext:value-type="float">
            <text:p>2026</text:p>
          </table:table-cell>
          <table:table-cell table:formula="of:=COM.MICROSOFT.CONCAT([$dms.$L38];&quot; &quot;;[$dms.$M38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0" calcext:value-type="date">
            <text:p>20/7/2026</text:p>
          </table:table-cell>
          <table:table-cell table:formula="of:=MONTH([.J39])" office:value-type="float" office:value="7" calcext:value-type="float">
            <text:p>7</text:p>
          </table:table-cell>
          <table:table-cell table:formula="of:=COM.MICROSOFT.XLOOKUP([$dms.$K39];[.G:.G];[.H:.H])" office:value-type="string" office:string-value="Jul" calcext:value-type="string">
            <text:p>Jul</text:p>
          </table:table-cell>
          <table:table-cell table:formula="of:=YEAR([$dms.$J39])" office:value-type="float" office:value="2026" calcext:value-type="float">
            <text:p>2026</text:p>
          </table:table-cell>
          <table:table-cell table:formula="of:=COM.MICROSOFT.CONCAT([$dms.$L39];&quot; &quot;;[$dms.$M39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1" calcext:value-type="date">
            <text:p>21/7/2026</text:p>
          </table:table-cell>
          <table:table-cell table:formula="of:=MONTH([.J40])" office:value-type="float" office:value="7" calcext:value-type="float">
            <text:p>7</text:p>
          </table:table-cell>
          <table:table-cell table:formula="of:=COM.MICROSOFT.XLOOKUP([$dms.$K40];[.G:.G];[.H:.H])" office:value-type="string" office:string-value="Jul" calcext:value-type="string">
            <text:p>Jul</text:p>
          </table:table-cell>
          <table:table-cell table:formula="of:=YEAR([$dms.$J40])" office:value-type="float" office:value="2026" calcext:value-type="float">
            <text:p>2026</text:p>
          </table:table-cell>
          <table:table-cell table:formula="of:=COM.MICROSOFT.CONCAT([$dms.$L40];&quot; &quot;;[$dms.$M40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2" calcext:value-type="date">
            <text:p>22/7/2026</text:p>
          </table:table-cell>
          <table:table-cell table:formula="of:=MONTH([.J41])" office:value-type="float" office:value="7" calcext:value-type="float">
            <text:p>7</text:p>
          </table:table-cell>
          <table:table-cell table:formula="of:=COM.MICROSOFT.XLOOKUP([$dms.$K41];[.G:.G];[.H:.H])" office:value-type="string" office:string-value="Jul" calcext:value-type="string">
            <text:p>Jul</text:p>
          </table:table-cell>
          <table:table-cell table:formula="of:=YEAR([$dms.$J41])" office:value-type="float" office:value="2026" calcext:value-type="float">
            <text:p>2026</text:p>
          </table:table-cell>
          <table:table-cell table:formula="of:=COM.MICROSOFT.CONCAT([$dms.$L41];&quot; &quot;;[$dms.$M41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3" calcext:value-type="date">
            <text:p>23/7/2026</text:p>
          </table:table-cell>
          <table:table-cell table:formula="of:=MONTH([.J42])" office:value-type="float" office:value="7" calcext:value-type="float">
            <text:p>7</text:p>
          </table:table-cell>
          <table:table-cell table:formula="of:=COM.MICROSOFT.XLOOKUP([$dms.$K42];[.G:.G];[.H:.H])" office:value-type="string" office:string-value="Jul" calcext:value-type="string">
            <text:p>Jul</text:p>
          </table:table-cell>
          <table:table-cell table:formula="of:=YEAR([$dms.$J42])" office:value-type="float" office:value="2026" calcext:value-type="float">
            <text:p>2026</text:p>
          </table:table-cell>
          <table:table-cell table:formula="of:=COM.MICROSOFT.CONCAT([$dms.$L42];&quot; &quot;;[$dms.$M42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4" calcext:value-type="date">
            <text:p>24/7/2026</text:p>
          </table:table-cell>
          <table:table-cell table:formula="of:=MONTH([.J43])" office:value-type="float" office:value="7" calcext:value-type="float">
            <text:p>7</text:p>
          </table:table-cell>
          <table:table-cell table:formula="of:=COM.MICROSOFT.XLOOKUP([$dms.$K43];[.G:.G];[.H:.H])" office:value-type="string" office:string-value="Jul" calcext:value-type="string">
            <text:p>Jul</text:p>
          </table:table-cell>
          <table:table-cell table:formula="of:=YEAR([$dms.$J43])" office:value-type="float" office:value="2026" calcext:value-type="float">
            <text:p>2026</text:p>
          </table:table-cell>
          <table:table-cell table:formula="of:=COM.MICROSOFT.CONCAT([$dms.$L43];&quot; &quot;;[$dms.$M43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5" calcext:value-type="date">
            <text:p>25/7/2026</text:p>
          </table:table-cell>
          <table:table-cell table:formula="of:=MONTH([.J44])" office:value-type="float" office:value="7" calcext:value-type="float">
            <text:p>7</text:p>
          </table:table-cell>
          <table:table-cell table:formula="of:=COM.MICROSOFT.XLOOKUP([$dms.$K44];[.G:.G];[.H:.H])" office:value-type="string" office:string-value="Jul" calcext:value-type="string">
            <text:p>Jul</text:p>
          </table:table-cell>
          <table:table-cell table:formula="of:=YEAR([$dms.$J44])" office:value-type="float" office:value="2026" calcext:value-type="float">
            <text:p>2026</text:p>
          </table:table-cell>
          <table:table-cell table:formula="of:=COM.MICROSOFT.CONCAT([$dms.$L44];&quot; &quot;;[$dms.$M44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6" calcext:value-type="date">
            <text:p>26/7/2026</text:p>
          </table:table-cell>
          <table:table-cell table:formula="of:=MONTH([.J45])" office:value-type="float" office:value="7" calcext:value-type="float">
            <text:p>7</text:p>
          </table:table-cell>
          <table:table-cell table:formula="of:=COM.MICROSOFT.XLOOKUP([$dms.$K45];[.G:.G];[.H:.H])" office:value-type="string" office:string-value="Jul" calcext:value-type="string">
            <text:p>Jul</text:p>
          </table:table-cell>
          <table:table-cell table:formula="of:=YEAR([$dms.$J45])" office:value-type="float" office:value="2026" calcext:value-type="float">
            <text:p>2026</text:p>
          </table:table-cell>
          <table:table-cell table:formula="of:=COM.MICROSOFT.CONCAT([$dms.$L45];&quot; &quot;;[$dms.$M45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7" calcext:value-type="date">
            <text:p>27/7/2026</text:p>
          </table:table-cell>
          <table:table-cell table:formula="of:=MONTH([.J46])" office:value-type="float" office:value="7" calcext:value-type="float">
            <text:p>7</text:p>
          </table:table-cell>
          <table:table-cell table:formula="of:=COM.MICROSOFT.XLOOKUP([$dms.$K46];[.G:.G];[.H:.H])" office:value-type="string" office:string-value="Jul" calcext:value-type="string">
            <text:p>Jul</text:p>
          </table:table-cell>
          <table:table-cell table:formula="of:=YEAR([$dms.$J46])" office:value-type="float" office:value="2026" calcext:value-type="float">
            <text:p>2026</text:p>
          </table:table-cell>
          <table:table-cell table:formula="of:=COM.MICROSOFT.CONCAT([$dms.$L46];&quot; &quot;;[$dms.$M46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8" calcext:value-type="date">
            <text:p>28/7/2026</text:p>
          </table:table-cell>
          <table:table-cell table:formula="of:=MONTH([.J47])" office:value-type="float" office:value="7" calcext:value-type="float">
            <text:p>7</text:p>
          </table:table-cell>
          <table:table-cell table:formula="of:=COM.MICROSOFT.XLOOKUP([$dms.$K47];[.G:.G];[.H:.H])" office:value-type="string" office:string-value="Jul" calcext:value-type="string">
            <text:p>Jul</text:p>
          </table:table-cell>
          <table:table-cell table:formula="of:=YEAR([$dms.$J47])" office:value-type="float" office:value="2026" calcext:value-type="float">
            <text:p>2026</text:p>
          </table:table-cell>
          <table:table-cell table:formula="of:=COM.MICROSOFT.CONCAT([$dms.$L47];&quot; &quot;;[$dms.$M47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29" calcext:value-type="date">
            <text:p>29/7/2026</text:p>
          </table:table-cell>
          <table:table-cell table:formula="of:=MONTH([.J48])" office:value-type="float" office:value="7" calcext:value-type="float">
            <text:p>7</text:p>
          </table:table-cell>
          <table:table-cell table:formula="of:=COM.MICROSOFT.XLOOKUP([$dms.$K48];[.G:.G];[.H:.H])" office:value-type="string" office:string-value="Jul" calcext:value-type="string">
            <text:p>Jul</text:p>
          </table:table-cell>
          <table:table-cell table:formula="of:=YEAR([$dms.$J48])" office:value-type="float" office:value="2026" calcext:value-type="float">
            <text:p>2026</text:p>
          </table:table-cell>
          <table:table-cell table:formula="of:=COM.MICROSOFT.CONCAT([$dms.$L48];&quot; &quot;;[$dms.$M48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30" calcext:value-type="date">
            <text:p>30/7/2026</text:p>
          </table:table-cell>
          <table:table-cell table:formula="of:=MONTH([.J49])" office:value-type="float" office:value="7" calcext:value-type="float">
            <text:p>7</text:p>
          </table:table-cell>
          <table:table-cell table:formula="of:=COM.MICROSOFT.XLOOKUP([$dms.$K49];[.G:.G];[.H:.H])" office:value-type="string" office:string-value="Jul" calcext:value-type="string">
            <text:p>Jul</text:p>
          </table:table-cell>
          <table:table-cell table:formula="of:=YEAR([$dms.$J49])" office:value-type="float" office:value="2026" calcext:value-type="float">
            <text:p>2026</text:p>
          </table:table-cell>
          <table:table-cell table:formula="of:=COM.MICROSOFT.CONCAT([$dms.$L49];&quot; &quot;;[$dms.$M49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7-31" calcext:value-type="date">
            <text:p>31/7/2026</text:p>
          </table:table-cell>
          <table:table-cell table:formula="of:=MONTH([.J50])" office:value-type="float" office:value="7" calcext:value-type="float">
            <text:p>7</text:p>
          </table:table-cell>
          <table:table-cell table:formula="of:=COM.MICROSOFT.XLOOKUP([$dms.$K50];[.G:.G];[.H:.H])" office:value-type="string" office:string-value="Jul" calcext:value-type="string">
            <text:p>Jul</text:p>
          </table:table-cell>
          <table:table-cell table:formula="of:=YEAR([$dms.$J50])" office:value-type="float" office:value="2026" calcext:value-type="float">
            <text:p>2026</text:p>
          </table:table-cell>
          <table:table-cell table:formula="of:=COM.MICROSOFT.CONCAT([$dms.$L50];&quot; &quot;;[$dms.$M50])" office:value-type="string" office:string-value="Jul 2026" calcext:value-type="string">
            <text:p>Jul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01" calcext:value-type="date">
            <text:p>1/8/2026</text:p>
          </table:table-cell>
          <table:table-cell table:formula="of:=MONTH([.J51])" office:value-type="float" office:value="8" calcext:value-type="float">
            <text:p>8</text:p>
          </table:table-cell>
          <table:table-cell table:formula="of:=COM.MICROSOFT.XLOOKUP([$dms.$K51];[.G:.G];[.H:.H])" office:value-type="string" office:string-value="Ago" calcext:value-type="string">
            <text:p>Ago</text:p>
          </table:table-cell>
          <table:table-cell table:formula="of:=YEAR([$dms.$J51])" office:value-type="float" office:value="2026" calcext:value-type="float">
            <text:p>2026</text:p>
          </table:table-cell>
          <table:table-cell table:formula="of:=COM.MICROSOFT.CONCAT([$dms.$L51];&quot; &quot;;[$dms.$M51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02" calcext:value-type="date">
            <text:p>2/8/2026</text:p>
          </table:table-cell>
          <table:table-cell table:formula="of:=MONTH([.J52])" office:value-type="float" office:value="8" calcext:value-type="float">
            <text:p>8</text:p>
          </table:table-cell>
          <table:table-cell table:formula="of:=COM.MICROSOFT.XLOOKUP([$dms.$K52];[.G:.G];[.H:.H])" office:value-type="string" office:string-value="Ago" calcext:value-type="string">
            <text:p>Ago</text:p>
          </table:table-cell>
          <table:table-cell table:formula="of:=YEAR([$dms.$J52])" office:value-type="float" office:value="2026" calcext:value-type="float">
            <text:p>2026</text:p>
          </table:table-cell>
          <table:table-cell table:formula="of:=COM.MICROSOFT.CONCAT([$dms.$L52];&quot; &quot;;[$dms.$M52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03" calcext:value-type="date">
            <text:p>3/8/2026</text:p>
          </table:table-cell>
          <table:table-cell table:formula="of:=MONTH([.J53])" office:value-type="float" office:value="8" calcext:value-type="float">
            <text:p>8</text:p>
          </table:table-cell>
          <table:table-cell table:formula="of:=COM.MICROSOFT.XLOOKUP([$dms.$K53];[.G:.G];[.H:.H])" office:value-type="string" office:string-value="Ago" calcext:value-type="string">
            <text:p>Ago</text:p>
          </table:table-cell>
          <table:table-cell table:formula="of:=YEAR([$dms.$J53])" office:value-type="float" office:value="2026" calcext:value-type="float">
            <text:p>2026</text:p>
          </table:table-cell>
          <table:table-cell table:formula="of:=COM.MICROSOFT.CONCAT([$dms.$L53];&quot; &quot;;[$dms.$M53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04" calcext:value-type="date">
            <text:p>4/8/2026</text:p>
          </table:table-cell>
          <table:table-cell table:formula="of:=MONTH([.J54])" office:value-type="float" office:value="8" calcext:value-type="float">
            <text:p>8</text:p>
          </table:table-cell>
          <table:table-cell table:formula="of:=COM.MICROSOFT.XLOOKUP([$dms.$K54];[.G:.G];[.H:.H])" office:value-type="string" office:string-value="Ago" calcext:value-type="string">
            <text:p>Ago</text:p>
          </table:table-cell>
          <table:table-cell table:formula="of:=YEAR([$dms.$J54])" office:value-type="float" office:value="2026" calcext:value-type="float">
            <text:p>2026</text:p>
          </table:table-cell>
          <table:table-cell table:formula="of:=COM.MICROSOFT.CONCAT([$dms.$L54];&quot; &quot;;[$dms.$M54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05" calcext:value-type="date">
            <text:p>5/8/2026</text:p>
          </table:table-cell>
          <table:table-cell table:formula="of:=MONTH([.J55])" office:value-type="float" office:value="8" calcext:value-type="float">
            <text:p>8</text:p>
          </table:table-cell>
          <table:table-cell table:formula="of:=COM.MICROSOFT.XLOOKUP([$dms.$K55];[.G:.G];[.H:.H])" office:value-type="string" office:string-value="Ago" calcext:value-type="string">
            <text:p>Ago</text:p>
          </table:table-cell>
          <table:table-cell table:formula="of:=YEAR([$dms.$J55])" office:value-type="float" office:value="2026" calcext:value-type="float">
            <text:p>2026</text:p>
          </table:table-cell>
          <table:table-cell table:formula="of:=COM.MICROSOFT.CONCAT([$dms.$L55];&quot; &quot;;[$dms.$M55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06" calcext:value-type="date">
            <text:p>6/8/2026</text:p>
          </table:table-cell>
          <table:table-cell table:formula="of:=MONTH([.J56])" office:value-type="float" office:value="8" calcext:value-type="float">
            <text:p>8</text:p>
          </table:table-cell>
          <table:table-cell table:formula="of:=COM.MICROSOFT.XLOOKUP([$dms.$K56];[.G:.G];[.H:.H])" office:value-type="string" office:string-value="Ago" calcext:value-type="string">
            <text:p>Ago</text:p>
          </table:table-cell>
          <table:table-cell table:formula="of:=YEAR([$dms.$J56])" office:value-type="float" office:value="2026" calcext:value-type="float">
            <text:p>2026</text:p>
          </table:table-cell>
          <table:table-cell table:formula="of:=COM.MICROSOFT.CONCAT([$dms.$L56];&quot; &quot;;[$dms.$M56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07" calcext:value-type="date">
            <text:p>7/8/2026</text:p>
          </table:table-cell>
          <table:table-cell table:formula="of:=MONTH([.J57])" office:value-type="float" office:value="8" calcext:value-type="float">
            <text:p>8</text:p>
          </table:table-cell>
          <table:table-cell table:formula="of:=COM.MICROSOFT.XLOOKUP([$dms.$K57];[.G:.G];[.H:.H])" office:value-type="string" office:string-value="Ago" calcext:value-type="string">
            <text:p>Ago</text:p>
          </table:table-cell>
          <table:table-cell table:formula="of:=YEAR([$dms.$J57])" office:value-type="float" office:value="2026" calcext:value-type="float">
            <text:p>2026</text:p>
          </table:table-cell>
          <table:table-cell table:formula="of:=COM.MICROSOFT.CONCAT([$dms.$L57];&quot; &quot;;[$dms.$M57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08" calcext:value-type="date">
            <text:p>8/8/2026</text:p>
          </table:table-cell>
          <table:table-cell table:formula="of:=MONTH([.J58])" office:value-type="float" office:value="8" calcext:value-type="float">
            <text:p>8</text:p>
          </table:table-cell>
          <table:table-cell table:formula="of:=COM.MICROSOFT.XLOOKUP([$dms.$K58];[.G:.G];[.H:.H])" office:value-type="string" office:string-value="Ago" calcext:value-type="string">
            <text:p>Ago</text:p>
          </table:table-cell>
          <table:table-cell table:formula="of:=YEAR([$dms.$J58])" office:value-type="float" office:value="2026" calcext:value-type="float">
            <text:p>2026</text:p>
          </table:table-cell>
          <table:table-cell table:formula="of:=COM.MICROSOFT.CONCAT([$dms.$L58];&quot; &quot;;[$dms.$M58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09" calcext:value-type="date">
            <text:p>9/8/2026</text:p>
          </table:table-cell>
          <table:table-cell table:formula="of:=MONTH([.J59])" office:value-type="float" office:value="8" calcext:value-type="float">
            <text:p>8</text:p>
          </table:table-cell>
          <table:table-cell table:formula="of:=COM.MICROSOFT.XLOOKUP([$dms.$K59];[.G:.G];[.H:.H])" office:value-type="string" office:string-value="Ago" calcext:value-type="string">
            <text:p>Ago</text:p>
          </table:table-cell>
          <table:table-cell table:formula="of:=YEAR([$dms.$J59])" office:value-type="float" office:value="2026" calcext:value-type="float">
            <text:p>2026</text:p>
          </table:table-cell>
          <table:table-cell table:formula="of:=COM.MICROSOFT.CONCAT([$dms.$L59];&quot; &quot;;[$dms.$M59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0" calcext:value-type="date">
            <text:p>10/8/2026</text:p>
          </table:table-cell>
          <table:table-cell table:formula="of:=MONTH([.J60])" office:value-type="float" office:value="8" calcext:value-type="float">
            <text:p>8</text:p>
          </table:table-cell>
          <table:table-cell table:formula="of:=COM.MICROSOFT.XLOOKUP([$dms.$K60];[.G:.G];[.H:.H])" office:value-type="string" office:string-value="Ago" calcext:value-type="string">
            <text:p>Ago</text:p>
          </table:table-cell>
          <table:table-cell table:formula="of:=YEAR([$dms.$J60])" office:value-type="float" office:value="2026" calcext:value-type="float">
            <text:p>2026</text:p>
          </table:table-cell>
          <table:table-cell table:formula="of:=COM.MICROSOFT.CONCAT([$dms.$L60];&quot; &quot;;[$dms.$M60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1" calcext:value-type="date">
            <text:p>11/8/2026</text:p>
          </table:table-cell>
          <table:table-cell table:formula="of:=MONTH([.J61])" office:value-type="float" office:value="8" calcext:value-type="float">
            <text:p>8</text:p>
          </table:table-cell>
          <table:table-cell table:formula="of:=COM.MICROSOFT.XLOOKUP([$dms.$K61];[.G:.G];[.H:.H])" office:value-type="string" office:string-value="Ago" calcext:value-type="string">
            <text:p>Ago</text:p>
          </table:table-cell>
          <table:table-cell table:formula="of:=YEAR([$dms.$J61])" office:value-type="float" office:value="2026" calcext:value-type="float">
            <text:p>2026</text:p>
          </table:table-cell>
          <table:table-cell table:formula="of:=COM.MICROSOFT.CONCAT([$dms.$L61];&quot; &quot;;[$dms.$M61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2" calcext:value-type="date">
            <text:p>12/8/2026</text:p>
          </table:table-cell>
          <table:table-cell table:formula="of:=MONTH([.J62])" office:value-type="float" office:value="8" calcext:value-type="float">
            <text:p>8</text:p>
          </table:table-cell>
          <table:table-cell table:formula="of:=COM.MICROSOFT.XLOOKUP([$dms.$K62];[.G:.G];[.H:.H])" office:value-type="string" office:string-value="Ago" calcext:value-type="string">
            <text:p>Ago</text:p>
          </table:table-cell>
          <table:table-cell table:formula="of:=YEAR([$dms.$J62])" office:value-type="float" office:value="2026" calcext:value-type="float">
            <text:p>2026</text:p>
          </table:table-cell>
          <table:table-cell table:formula="of:=COM.MICROSOFT.CONCAT([$dms.$L62];&quot; &quot;;[$dms.$M62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3" calcext:value-type="date">
            <text:p>13/8/2026</text:p>
          </table:table-cell>
          <table:table-cell table:formula="of:=MONTH([.J63])" office:value-type="float" office:value="8" calcext:value-type="float">
            <text:p>8</text:p>
          </table:table-cell>
          <table:table-cell table:formula="of:=COM.MICROSOFT.XLOOKUP([$dms.$K63];[.G:.G];[.H:.H])" office:value-type="string" office:string-value="Ago" calcext:value-type="string">
            <text:p>Ago</text:p>
          </table:table-cell>
          <table:table-cell table:formula="of:=YEAR([$dms.$J63])" office:value-type="float" office:value="2026" calcext:value-type="float">
            <text:p>2026</text:p>
          </table:table-cell>
          <table:table-cell table:formula="of:=COM.MICROSOFT.CONCAT([$dms.$L63];&quot; &quot;;[$dms.$M63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4" calcext:value-type="date">
            <text:p>14/8/2026</text:p>
          </table:table-cell>
          <table:table-cell table:formula="of:=MONTH([.J64])" office:value-type="float" office:value="8" calcext:value-type="float">
            <text:p>8</text:p>
          </table:table-cell>
          <table:table-cell table:formula="of:=COM.MICROSOFT.XLOOKUP([$dms.$K64];[.G:.G];[.H:.H])" office:value-type="string" office:string-value="Ago" calcext:value-type="string">
            <text:p>Ago</text:p>
          </table:table-cell>
          <table:table-cell table:formula="of:=YEAR([$dms.$J64])" office:value-type="float" office:value="2026" calcext:value-type="float">
            <text:p>2026</text:p>
          </table:table-cell>
          <table:table-cell table:formula="of:=COM.MICROSOFT.CONCAT([$dms.$L64];&quot; &quot;;[$dms.$M64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5" calcext:value-type="date">
            <text:p>15/8/2026</text:p>
          </table:table-cell>
          <table:table-cell table:formula="of:=MONTH([.J65])" office:value-type="float" office:value="8" calcext:value-type="float">
            <text:p>8</text:p>
          </table:table-cell>
          <table:table-cell table:formula="of:=COM.MICROSOFT.XLOOKUP([$dms.$K65];[.G:.G];[.H:.H])" office:value-type="string" office:string-value="Ago" calcext:value-type="string">
            <text:p>Ago</text:p>
          </table:table-cell>
          <table:table-cell table:formula="of:=YEAR([$dms.$J65])" office:value-type="float" office:value="2026" calcext:value-type="float">
            <text:p>2026</text:p>
          </table:table-cell>
          <table:table-cell table:formula="of:=COM.MICROSOFT.CONCAT([$dms.$L65];&quot; &quot;;[$dms.$M65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6" calcext:value-type="date">
            <text:p>16/8/2026</text:p>
          </table:table-cell>
          <table:table-cell table:formula="of:=MONTH([.J66])" office:value-type="float" office:value="8" calcext:value-type="float">
            <text:p>8</text:p>
          </table:table-cell>
          <table:table-cell table:formula="of:=COM.MICROSOFT.XLOOKUP([$dms.$K66];[.G:.G];[.H:.H])" office:value-type="string" office:string-value="Ago" calcext:value-type="string">
            <text:p>Ago</text:p>
          </table:table-cell>
          <table:table-cell table:formula="of:=YEAR([$dms.$J66])" office:value-type="float" office:value="2026" calcext:value-type="float">
            <text:p>2026</text:p>
          </table:table-cell>
          <table:table-cell table:formula="of:=COM.MICROSOFT.CONCAT([$dms.$L66];&quot; &quot;;[$dms.$M66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7" calcext:value-type="date">
            <text:p>17/8/2026</text:p>
          </table:table-cell>
          <table:table-cell table:formula="of:=MONTH([.J67])" office:value-type="float" office:value="8" calcext:value-type="float">
            <text:p>8</text:p>
          </table:table-cell>
          <table:table-cell table:formula="of:=COM.MICROSOFT.XLOOKUP([$dms.$K67];[.G:.G];[.H:.H])" office:value-type="string" office:string-value="Ago" calcext:value-type="string">
            <text:p>Ago</text:p>
          </table:table-cell>
          <table:table-cell table:formula="of:=YEAR([$dms.$J67])" office:value-type="float" office:value="2026" calcext:value-type="float">
            <text:p>2026</text:p>
          </table:table-cell>
          <table:table-cell table:formula="of:=COM.MICROSOFT.CONCAT([$dms.$L67];&quot; &quot;;[$dms.$M67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8" calcext:value-type="date">
            <text:p>18/8/2026</text:p>
          </table:table-cell>
          <table:table-cell table:formula="of:=MONTH([.J68])" office:value-type="float" office:value="8" calcext:value-type="float">
            <text:p>8</text:p>
          </table:table-cell>
          <table:table-cell table:formula="of:=COM.MICROSOFT.XLOOKUP([$dms.$K68];[.G:.G];[.H:.H])" office:value-type="string" office:string-value="Ago" calcext:value-type="string">
            <text:p>Ago</text:p>
          </table:table-cell>
          <table:table-cell table:formula="of:=YEAR([$dms.$J68])" office:value-type="float" office:value="2026" calcext:value-type="float">
            <text:p>2026</text:p>
          </table:table-cell>
          <table:table-cell table:formula="of:=COM.MICROSOFT.CONCAT([$dms.$L68];&quot; &quot;;[$dms.$M68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19" calcext:value-type="date">
            <text:p>19/8/2026</text:p>
          </table:table-cell>
          <table:table-cell table:formula="of:=MONTH([.J69])" office:value-type="float" office:value="8" calcext:value-type="float">
            <text:p>8</text:p>
          </table:table-cell>
          <table:table-cell table:formula="of:=COM.MICROSOFT.XLOOKUP([$dms.$K69];[.G:.G];[.H:.H])" office:value-type="string" office:string-value="Ago" calcext:value-type="string">
            <text:p>Ago</text:p>
          </table:table-cell>
          <table:table-cell table:formula="of:=YEAR([$dms.$J69])" office:value-type="float" office:value="2026" calcext:value-type="float">
            <text:p>2026</text:p>
          </table:table-cell>
          <table:table-cell table:formula="of:=COM.MICROSOFT.CONCAT([$dms.$L69];&quot; &quot;;[$dms.$M69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0" calcext:value-type="date">
            <text:p>20/8/2026</text:p>
          </table:table-cell>
          <table:table-cell table:formula="of:=MONTH([.J70])" office:value-type="float" office:value="8" calcext:value-type="float">
            <text:p>8</text:p>
          </table:table-cell>
          <table:table-cell table:formula="of:=COM.MICROSOFT.XLOOKUP([$dms.$K70];[.G:.G];[.H:.H])" office:value-type="string" office:string-value="Ago" calcext:value-type="string">
            <text:p>Ago</text:p>
          </table:table-cell>
          <table:table-cell table:formula="of:=YEAR([$dms.$J70])" office:value-type="float" office:value="2026" calcext:value-type="float">
            <text:p>2026</text:p>
          </table:table-cell>
          <table:table-cell table:formula="of:=COM.MICROSOFT.CONCAT([$dms.$L70];&quot; &quot;;[$dms.$M70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1" calcext:value-type="date">
            <text:p>21/8/2026</text:p>
          </table:table-cell>
          <table:table-cell table:formula="of:=MONTH([.J71])" office:value-type="float" office:value="8" calcext:value-type="float">
            <text:p>8</text:p>
          </table:table-cell>
          <table:table-cell table:formula="of:=COM.MICROSOFT.XLOOKUP([$dms.$K71];[.G:.G];[.H:.H])" office:value-type="string" office:string-value="Ago" calcext:value-type="string">
            <text:p>Ago</text:p>
          </table:table-cell>
          <table:table-cell table:formula="of:=YEAR([$dms.$J71])" office:value-type="float" office:value="2026" calcext:value-type="float">
            <text:p>2026</text:p>
          </table:table-cell>
          <table:table-cell table:formula="of:=COM.MICROSOFT.CONCAT([$dms.$L71];&quot; &quot;;[$dms.$M71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2" calcext:value-type="date">
            <text:p>22/8/2026</text:p>
          </table:table-cell>
          <table:table-cell table:formula="of:=MONTH([.J72])" office:value-type="float" office:value="8" calcext:value-type="float">
            <text:p>8</text:p>
          </table:table-cell>
          <table:table-cell table:formula="of:=COM.MICROSOFT.XLOOKUP([$dms.$K72];[.G:.G];[.H:.H])" office:value-type="string" office:string-value="Ago" calcext:value-type="string">
            <text:p>Ago</text:p>
          </table:table-cell>
          <table:table-cell table:formula="of:=YEAR([$dms.$J72])" office:value-type="float" office:value="2026" calcext:value-type="float">
            <text:p>2026</text:p>
          </table:table-cell>
          <table:table-cell table:formula="of:=COM.MICROSOFT.CONCAT([$dms.$L72];&quot; &quot;;[$dms.$M72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3" calcext:value-type="date">
            <text:p>23/8/2026</text:p>
          </table:table-cell>
          <table:table-cell table:formula="of:=MONTH([.J73])" office:value-type="float" office:value="8" calcext:value-type="float">
            <text:p>8</text:p>
          </table:table-cell>
          <table:table-cell table:formula="of:=COM.MICROSOFT.XLOOKUP([$dms.$K73];[.G:.G];[.H:.H])" office:value-type="string" office:string-value="Ago" calcext:value-type="string">
            <text:p>Ago</text:p>
          </table:table-cell>
          <table:table-cell table:formula="of:=YEAR([$dms.$J73])" office:value-type="float" office:value="2026" calcext:value-type="float">
            <text:p>2026</text:p>
          </table:table-cell>
          <table:table-cell table:formula="of:=COM.MICROSOFT.CONCAT([$dms.$L73];&quot; &quot;;[$dms.$M73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4" calcext:value-type="date">
            <text:p>24/8/2026</text:p>
          </table:table-cell>
          <table:table-cell table:formula="of:=MONTH([.J74])" office:value-type="float" office:value="8" calcext:value-type="float">
            <text:p>8</text:p>
          </table:table-cell>
          <table:table-cell table:formula="of:=COM.MICROSOFT.XLOOKUP([$dms.$K74];[.G:.G];[.H:.H])" office:value-type="string" office:string-value="Ago" calcext:value-type="string">
            <text:p>Ago</text:p>
          </table:table-cell>
          <table:table-cell table:formula="of:=YEAR([$dms.$J74])" office:value-type="float" office:value="2026" calcext:value-type="float">
            <text:p>2026</text:p>
          </table:table-cell>
          <table:table-cell table:formula="of:=COM.MICROSOFT.CONCAT([$dms.$L74];&quot; &quot;;[$dms.$M74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5" calcext:value-type="date">
            <text:p>25/8/2026</text:p>
          </table:table-cell>
          <table:table-cell table:formula="of:=MONTH([.J75])" office:value-type="float" office:value="8" calcext:value-type="float">
            <text:p>8</text:p>
          </table:table-cell>
          <table:table-cell table:formula="of:=COM.MICROSOFT.XLOOKUP([$dms.$K75];[.G:.G];[.H:.H])" office:value-type="string" office:string-value="Ago" calcext:value-type="string">
            <text:p>Ago</text:p>
          </table:table-cell>
          <table:table-cell table:formula="of:=YEAR([$dms.$J75])" office:value-type="float" office:value="2026" calcext:value-type="float">
            <text:p>2026</text:p>
          </table:table-cell>
          <table:table-cell table:formula="of:=COM.MICROSOFT.CONCAT([$dms.$L75];&quot; &quot;;[$dms.$M75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6" calcext:value-type="date">
            <text:p>26/8/2026</text:p>
          </table:table-cell>
          <table:table-cell table:formula="of:=MONTH([.J76])" office:value-type="float" office:value="8" calcext:value-type="float">
            <text:p>8</text:p>
          </table:table-cell>
          <table:table-cell table:formula="of:=COM.MICROSOFT.XLOOKUP([$dms.$K76];[.G:.G];[.H:.H])" office:value-type="string" office:string-value="Ago" calcext:value-type="string">
            <text:p>Ago</text:p>
          </table:table-cell>
          <table:table-cell table:formula="of:=YEAR([$dms.$J76])" office:value-type="float" office:value="2026" calcext:value-type="float">
            <text:p>2026</text:p>
          </table:table-cell>
          <table:table-cell table:formula="of:=COM.MICROSOFT.CONCAT([$dms.$L76];&quot; &quot;;[$dms.$M76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7" calcext:value-type="date">
            <text:p>27/8/2026</text:p>
          </table:table-cell>
          <table:table-cell table:formula="of:=MONTH([.J77])" office:value-type="float" office:value="8" calcext:value-type="float">
            <text:p>8</text:p>
          </table:table-cell>
          <table:table-cell table:formula="of:=COM.MICROSOFT.XLOOKUP([$dms.$K77];[.G:.G];[.H:.H])" office:value-type="string" office:string-value="Ago" calcext:value-type="string">
            <text:p>Ago</text:p>
          </table:table-cell>
          <table:table-cell table:formula="of:=YEAR([$dms.$J77])" office:value-type="float" office:value="2026" calcext:value-type="float">
            <text:p>2026</text:p>
          </table:table-cell>
          <table:table-cell table:formula="of:=COM.MICROSOFT.CONCAT([$dms.$L77];&quot; &quot;;[$dms.$M77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8" calcext:value-type="date">
            <text:p>28/8/2026</text:p>
          </table:table-cell>
          <table:table-cell table:formula="of:=MONTH([.J78])" office:value-type="float" office:value="8" calcext:value-type="float">
            <text:p>8</text:p>
          </table:table-cell>
          <table:table-cell table:formula="of:=COM.MICROSOFT.XLOOKUP([$dms.$K78];[.G:.G];[.H:.H])" office:value-type="string" office:string-value="Ago" calcext:value-type="string">
            <text:p>Ago</text:p>
          </table:table-cell>
          <table:table-cell table:formula="of:=YEAR([$dms.$J78])" office:value-type="float" office:value="2026" calcext:value-type="float">
            <text:p>2026</text:p>
          </table:table-cell>
          <table:table-cell table:formula="of:=COM.MICROSOFT.CONCAT([$dms.$L78];&quot; &quot;;[$dms.$M78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29" calcext:value-type="date">
            <text:p>29/8/2026</text:p>
          </table:table-cell>
          <table:table-cell table:formula="of:=MONTH([.J79])" office:value-type="float" office:value="8" calcext:value-type="float">
            <text:p>8</text:p>
          </table:table-cell>
          <table:table-cell table:formula="of:=COM.MICROSOFT.XLOOKUP([$dms.$K79];[.G:.G];[.H:.H])" office:value-type="string" office:string-value="Ago" calcext:value-type="string">
            <text:p>Ago</text:p>
          </table:table-cell>
          <table:table-cell table:formula="of:=YEAR([$dms.$J79])" office:value-type="float" office:value="2026" calcext:value-type="float">
            <text:p>2026</text:p>
          </table:table-cell>
          <table:table-cell table:formula="of:=COM.MICROSOFT.CONCAT([$dms.$L79];&quot; &quot;;[$dms.$M79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30" calcext:value-type="date">
            <text:p>30/8/2026</text:p>
          </table:table-cell>
          <table:table-cell table:formula="of:=MONTH([.J80])" office:value-type="float" office:value="8" calcext:value-type="float">
            <text:p>8</text:p>
          </table:table-cell>
          <table:table-cell table:formula="of:=COM.MICROSOFT.XLOOKUP([$dms.$K80];[.G:.G];[.H:.H])" office:value-type="string" office:string-value="Ago" calcext:value-type="string">
            <text:p>Ago</text:p>
          </table:table-cell>
          <table:table-cell table:formula="of:=YEAR([$dms.$J80])" office:value-type="float" office:value="2026" calcext:value-type="float">
            <text:p>2026</text:p>
          </table:table-cell>
          <table:table-cell table:formula="of:=COM.MICROSOFT.CONCAT([$dms.$L80];&quot; &quot;;[$dms.$M80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8-31" calcext:value-type="date">
            <text:p>31/8/2026</text:p>
          </table:table-cell>
          <table:table-cell table:formula="of:=MONTH([.J81])" office:value-type="float" office:value="8" calcext:value-type="float">
            <text:p>8</text:p>
          </table:table-cell>
          <table:table-cell table:formula="of:=COM.MICROSOFT.XLOOKUP([$dms.$K81];[.G:.G];[.H:.H])" office:value-type="string" office:string-value="Ago" calcext:value-type="string">
            <text:p>Ago</text:p>
          </table:table-cell>
          <table:table-cell table:formula="of:=YEAR([$dms.$J81])" office:value-type="float" office:value="2026" calcext:value-type="float">
            <text:p>2026</text:p>
          </table:table-cell>
          <table:table-cell table:formula="of:=COM.MICROSOFT.CONCAT([$dms.$L81];&quot; &quot;;[$dms.$M81])" office:value-type="string" office:string-value="Ago 2026" calcext:value-type="string">
            <text:p>Ago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01" calcext:value-type="date">
            <text:p>1/9/2026</text:p>
          </table:table-cell>
          <table:table-cell table:formula="of:=MONTH([.J82])" office:value-type="float" office:value="9" calcext:value-type="float">
            <text:p>9</text:p>
          </table:table-cell>
          <table:table-cell table:formula="of:=COM.MICROSOFT.XLOOKUP([$dms.$K82];[.G:.G];[.H:.H])" office:value-type="string" office:string-value="Set" calcext:value-type="string">
            <text:p>Set</text:p>
          </table:table-cell>
          <table:table-cell table:formula="of:=YEAR([$dms.$J82])" office:value-type="float" office:value="2026" calcext:value-type="float">
            <text:p>2026</text:p>
          </table:table-cell>
          <table:table-cell table:formula="of:=COM.MICROSOFT.CONCAT([$dms.$L82];&quot; &quot;;[$dms.$M82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02" calcext:value-type="date">
            <text:p>2/9/2026</text:p>
          </table:table-cell>
          <table:table-cell table:formula="of:=MONTH([.J83])" office:value-type="float" office:value="9" calcext:value-type="float">
            <text:p>9</text:p>
          </table:table-cell>
          <table:table-cell table:formula="of:=COM.MICROSOFT.XLOOKUP([$dms.$K83];[.G:.G];[.H:.H])" office:value-type="string" office:string-value="Set" calcext:value-type="string">
            <text:p>Set</text:p>
          </table:table-cell>
          <table:table-cell table:formula="of:=YEAR([$dms.$J83])" office:value-type="float" office:value="2026" calcext:value-type="float">
            <text:p>2026</text:p>
          </table:table-cell>
          <table:table-cell table:formula="of:=COM.MICROSOFT.CONCAT([$dms.$L83];&quot; &quot;;[$dms.$M83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03" calcext:value-type="date">
            <text:p>3/9/2026</text:p>
          </table:table-cell>
          <table:table-cell table:formula="of:=MONTH([.J84])" office:value-type="float" office:value="9" calcext:value-type="float">
            <text:p>9</text:p>
          </table:table-cell>
          <table:table-cell table:formula="of:=COM.MICROSOFT.XLOOKUP([$dms.$K84];[.G:.G];[.H:.H])" office:value-type="string" office:string-value="Set" calcext:value-type="string">
            <text:p>Set</text:p>
          </table:table-cell>
          <table:table-cell table:formula="of:=YEAR([$dms.$J84])" office:value-type="float" office:value="2026" calcext:value-type="float">
            <text:p>2026</text:p>
          </table:table-cell>
          <table:table-cell table:formula="of:=COM.MICROSOFT.CONCAT([$dms.$L84];&quot; &quot;;[$dms.$M84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04" calcext:value-type="date">
            <text:p>4/9/2026</text:p>
          </table:table-cell>
          <table:table-cell table:formula="of:=MONTH([.J85])" office:value-type="float" office:value="9" calcext:value-type="float">
            <text:p>9</text:p>
          </table:table-cell>
          <table:table-cell table:formula="of:=COM.MICROSOFT.XLOOKUP([$dms.$K85];[.G:.G];[.H:.H])" office:value-type="string" office:string-value="Set" calcext:value-type="string">
            <text:p>Set</text:p>
          </table:table-cell>
          <table:table-cell table:formula="of:=YEAR([$dms.$J85])" office:value-type="float" office:value="2026" calcext:value-type="float">
            <text:p>2026</text:p>
          </table:table-cell>
          <table:table-cell table:formula="of:=COM.MICROSOFT.CONCAT([$dms.$L85];&quot; &quot;;[$dms.$M85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05" calcext:value-type="date">
            <text:p>5/9/2026</text:p>
          </table:table-cell>
          <table:table-cell table:formula="of:=MONTH([.J86])" office:value-type="float" office:value="9" calcext:value-type="float">
            <text:p>9</text:p>
          </table:table-cell>
          <table:table-cell table:formula="of:=COM.MICROSOFT.XLOOKUP([$dms.$K86];[.G:.G];[.H:.H])" office:value-type="string" office:string-value="Set" calcext:value-type="string">
            <text:p>Set</text:p>
          </table:table-cell>
          <table:table-cell table:formula="of:=YEAR([$dms.$J86])" office:value-type="float" office:value="2026" calcext:value-type="float">
            <text:p>2026</text:p>
          </table:table-cell>
          <table:table-cell table:formula="of:=COM.MICROSOFT.CONCAT([$dms.$L86];&quot; &quot;;[$dms.$M86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06" calcext:value-type="date">
            <text:p>6/9/2026</text:p>
          </table:table-cell>
          <table:table-cell table:formula="of:=MONTH([.J87])" office:value-type="float" office:value="9" calcext:value-type="float">
            <text:p>9</text:p>
          </table:table-cell>
          <table:table-cell table:formula="of:=COM.MICROSOFT.XLOOKUP([$dms.$K87];[.G:.G];[.H:.H])" office:value-type="string" office:string-value="Set" calcext:value-type="string">
            <text:p>Set</text:p>
          </table:table-cell>
          <table:table-cell table:formula="of:=YEAR([$dms.$J87])" office:value-type="float" office:value="2026" calcext:value-type="float">
            <text:p>2026</text:p>
          </table:table-cell>
          <table:table-cell table:formula="of:=COM.MICROSOFT.CONCAT([$dms.$L87];&quot; &quot;;[$dms.$M87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07" calcext:value-type="date">
            <text:p>7/9/2026</text:p>
          </table:table-cell>
          <table:table-cell table:formula="of:=MONTH([.J88])" office:value-type="float" office:value="9" calcext:value-type="float">
            <text:p>9</text:p>
          </table:table-cell>
          <table:table-cell table:formula="of:=COM.MICROSOFT.XLOOKUP([$dms.$K88];[.G:.G];[.H:.H])" office:value-type="string" office:string-value="Set" calcext:value-type="string">
            <text:p>Set</text:p>
          </table:table-cell>
          <table:table-cell table:formula="of:=YEAR([$dms.$J88])" office:value-type="float" office:value="2026" calcext:value-type="float">
            <text:p>2026</text:p>
          </table:table-cell>
          <table:table-cell table:formula="of:=COM.MICROSOFT.CONCAT([$dms.$L88];&quot; &quot;;[$dms.$M88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08" calcext:value-type="date">
            <text:p>8/9/2026</text:p>
          </table:table-cell>
          <table:table-cell table:formula="of:=MONTH([.J89])" office:value-type="float" office:value="9" calcext:value-type="float">
            <text:p>9</text:p>
          </table:table-cell>
          <table:table-cell table:formula="of:=COM.MICROSOFT.XLOOKUP([$dms.$K89];[.G:.G];[.H:.H])" office:value-type="string" office:string-value="Set" calcext:value-type="string">
            <text:p>Set</text:p>
          </table:table-cell>
          <table:table-cell table:formula="of:=YEAR([$dms.$J89])" office:value-type="float" office:value="2026" calcext:value-type="float">
            <text:p>2026</text:p>
          </table:table-cell>
          <table:table-cell table:formula="of:=COM.MICROSOFT.CONCAT([$dms.$L89];&quot; &quot;;[$dms.$M89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09" calcext:value-type="date">
            <text:p>9/9/2026</text:p>
          </table:table-cell>
          <table:table-cell table:formula="of:=MONTH([.J90])" office:value-type="float" office:value="9" calcext:value-type="float">
            <text:p>9</text:p>
          </table:table-cell>
          <table:table-cell table:formula="of:=COM.MICROSOFT.XLOOKUP([$dms.$K90];[.G:.G];[.H:.H])" office:value-type="string" office:string-value="Set" calcext:value-type="string">
            <text:p>Set</text:p>
          </table:table-cell>
          <table:table-cell table:formula="of:=YEAR([$dms.$J90])" office:value-type="float" office:value="2026" calcext:value-type="float">
            <text:p>2026</text:p>
          </table:table-cell>
          <table:table-cell table:formula="of:=COM.MICROSOFT.CONCAT([$dms.$L90];&quot; &quot;;[$dms.$M90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0" calcext:value-type="date">
            <text:p>10/9/2026</text:p>
          </table:table-cell>
          <table:table-cell table:formula="of:=MONTH([.J91])" office:value-type="float" office:value="9" calcext:value-type="float">
            <text:p>9</text:p>
          </table:table-cell>
          <table:table-cell table:formula="of:=COM.MICROSOFT.XLOOKUP([$dms.$K91];[.G:.G];[.H:.H])" office:value-type="string" office:string-value="Set" calcext:value-type="string">
            <text:p>Set</text:p>
          </table:table-cell>
          <table:table-cell table:formula="of:=YEAR([$dms.$J91])" office:value-type="float" office:value="2026" calcext:value-type="float">
            <text:p>2026</text:p>
          </table:table-cell>
          <table:table-cell table:formula="of:=COM.MICROSOFT.CONCAT([$dms.$L91];&quot; &quot;;[$dms.$M91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1" calcext:value-type="date">
            <text:p>11/9/2026</text:p>
          </table:table-cell>
          <table:table-cell table:formula="of:=MONTH([.J92])" office:value-type="float" office:value="9" calcext:value-type="float">
            <text:p>9</text:p>
          </table:table-cell>
          <table:table-cell table:formula="of:=COM.MICROSOFT.XLOOKUP([$dms.$K92];[.G:.G];[.H:.H])" office:value-type="string" office:string-value="Set" calcext:value-type="string">
            <text:p>Set</text:p>
          </table:table-cell>
          <table:table-cell table:formula="of:=YEAR([$dms.$J92])" office:value-type="float" office:value="2026" calcext:value-type="float">
            <text:p>2026</text:p>
          </table:table-cell>
          <table:table-cell table:formula="of:=COM.MICROSOFT.CONCAT([$dms.$L92];&quot; &quot;;[$dms.$M92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2" calcext:value-type="date">
            <text:p>12/9/2026</text:p>
          </table:table-cell>
          <table:table-cell table:formula="of:=MONTH([.J93])" office:value-type="float" office:value="9" calcext:value-type="float">
            <text:p>9</text:p>
          </table:table-cell>
          <table:table-cell table:formula="of:=COM.MICROSOFT.XLOOKUP([$dms.$K93];[.G:.G];[.H:.H])" office:value-type="string" office:string-value="Set" calcext:value-type="string">
            <text:p>Set</text:p>
          </table:table-cell>
          <table:table-cell table:formula="of:=YEAR([$dms.$J93])" office:value-type="float" office:value="2026" calcext:value-type="float">
            <text:p>2026</text:p>
          </table:table-cell>
          <table:table-cell table:formula="of:=COM.MICROSOFT.CONCAT([$dms.$L93];&quot; &quot;;[$dms.$M93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3" calcext:value-type="date">
            <text:p>13/9/2026</text:p>
          </table:table-cell>
          <table:table-cell table:formula="of:=MONTH([.J94])" office:value-type="float" office:value="9" calcext:value-type="float">
            <text:p>9</text:p>
          </table:table-cell>
          <table:table-cell table:formula="of:=COM.MICROSOFT.XLOOKUP([$dms.$K94];[.G:.G];[.H:.H])" office:value-type="string" office:string-value="Set" calcext:value-type="string">
            <text:p>Set</text:p>
          </table:table-cell>
          <table:table-cell table:formula="of:=YEAR([$dms.$J94])" office:value-type="float" office:value="2026" calcext:value-type="float">
            <text:p>2026</text:p>
          </table:table-cell>
          <table:table-cell table:formula="of:=COM.MICROSOFT.CONCAT([$dms.$L94];&quot; &quot;;[$dms.$M94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4" calcext:value-type="date">
            <text:p>14/9/2026</text:p>
          </table:table-cell>
          <table:table-cell table:formula="of:=MONTH([.J95])" office:value-type="float" office:value="9" calcext:value-type="float">
            <text:p>9</text:p>
          </table:table-cell>
          <table:table-cell table:formula="of:=COM.MICROSOFT.XLOOKUP([$dms.$K95];[.G:.G];[.H:.H])" office:value-type="string" office:string-value="Set" calcext:value-type="string">
            <text:p>Set</text:p>
          </table:table-cell>
          <table:table-cell table:formula="of:=YEAR([$dms.$J95])" office:value-type="float" office:value="2026" calcext:value-type="float">
            <text:p>2026</text:p>
          </table:table-cell>
          <table:table-cell table:formula="of:=COM.MICROSOFT.CONCAT([$dms.$L95];&quot; &quot;;[$dms.$M95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5" calcext:value-type="date">
            <text:p>15/9/2026</text:p>
          </table:table-cell>
          <table:table-cell table:formula="of:=MONTH([.J96])" office:value-type="float" office:value="9" calcext:value-type="float">
            <text:p>9</text:p>
          </table:table-cell>
          <table:table-cell table:formula="of:=COM.MICROSOFT.XLOOKUP([$dms.$K96];[.G:.G];[.H:.H])" office:value-type="string" office:string-value="Set" calcext:value-type="string">
            <text:p>Set</text:p>
          </table:table-cell>
          <table:table-cell table:formula="of:=YEAR([$dms.$J96])" office:value-type="float" office:value="2026" calcext:value-type="float">
            <text:p>2026</text:p>
          </table:table-cell>
          <table:table-cell table:formula="of:=COM.MICROSOFT.CONCAT([$dms.$L96];&quot; &quot;;[$dms.$M96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6" calcext:value-type="date">
            <text:p>16/9/2026</text:p>
          </table:table-cell>
          <table:table-cell table:formula="of:=MONTH([.J97])" office:value-type="float" office:value="9" calcext:value-type="float">
            <text:p>9</text:p>
          </table:table-cell>
          <table:table-cell table:formula="of:=COM.MICROSOFT.XLOOKUP([$dms.$K97];[.G:.G];[.H:.H])" office:value-type="string" office:string-value="Set" calcext:value-type="string">
            <text:p>Set</text:p>
          </table:table-cell>
          <table:table-cell table:formula="of:=YEAR([$dms.$J97])" office:value-type="float" office:value="2026" calcext:value-type="float">
            <text:p>2026</text:p>
          </table:table-cell>
          <table:table-cell table:formula="of:=COM.MICROSOFT.CONCAT([$dms.$L97];&quot; &quot;;[$dms.$M97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7" calcext:value-type="date">
            <text:p>17/9/2026</text:p>
          </table:table-cell>
          <table:table-cell table:formula="of:=MONTH([.J98])" office:value-type="float" office:value="9" calcext:value-type="float">
            <text:p>9</text:p>
          </table:table-cell>
          <table:table-cell table:formula="of:=COM.MICROSOFT.XLOOKUP([$dms.$K98];[.G:.G];[.H:.H])" office:value-type="string" office:string-value="Set" calcext:value-type="string">
            <text:p>Set</text:p>
          </table:table-cell>
          <table:table-cell table:formula="of:=YEAR([$dms.$J98])" office:value-type="float" office:value="2026" calcext:value-type="float">
            <text:p>2026</text:p>
          </table:table-cell>
          <table:table-cell table:formula="of:=COM.MICROSOFT.CONCAT([$dms.$L98];&quot; &quot;;[$dms.$M98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8" calcext:value-type="date">
            <text:p>18/9/2026</text:p>
          </table:table-cell>
          <table:table-cell table:formula="of:=MONTH([.J99])" office:value-type="float" office:value="9" calcext:value-type="float">
            <text:p>9</text:p>
          </table:table-cell>
          <table:table-cell table:formula="of:=COM.MICROSOFT.XLOOKUP([$dms.$K99];[.G:.G];[.H:.H])" office:value-type="string" office:string-value="Set" calcext:value-type="string">
            <text:p>Set</text:p>
          </table:table-cell>
          <table:table-cell table:formula="of:=YEAR([$dms.$J99])" office:value-type="float" office:value="2026" calcext:value-type="float">
            <text:p>2026</text:p>
          </table:table-cell>
          <table:table-cell table:formula="of:=COM.MICROSOFT.CONCAT([$dms.$L99];&quot; &quot;;[$dms.$M99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19" calcext:value-type="date">
            <text:p>19/9/2026</text:p>
          </table:table-cell>
          <table:table-cell table:formula="of:=MONTH([.J100])" office:value-type="float" office:value="9" calcext:value-type="float">
            <text:p>9</text:p>
          </table:table-cell>
          <table:table-cell table:formula="of:=COM.MICROSOFT.XLOOKUP([$dms.$K100];[.G:.G];[.H:.H])" office:value-type="string" office:string-value="Set" calcext:value-type="string">
            <text:p>Set</text:p>
          </table:table-cell>
          <table:table-cell table:formula="of:=YEAR([$dms.$J100])" office:value-type="float" office:value="2026" calcext:value-type="float">
            <text:p>2026</text:p>
          </table:table-cell>
          <table:table-cell table:formula="of:=COM.MICROSOFT.CONCAT([$dms.$L100];&quot; &quot;;[$dms.$M100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0" calcext:value-type="date">
            <text:p>20/9/2026</text:p>
          </table:table-cell>
          <table:table-cell table:formula="of:=MONTH([.J101])" office:value-type="float" office:value="9" calcext:value-type="float">
            <text:p>9</text:p>
          </table:table-cell>
          <table:table-cell table:formula="of:=COM.MICROSOFT.XLOOKUP([$dms.$K101];[.G:.G];[.H:.H])" office:value-type="string" office:string-value="Set" calcext:value-type="string">
            <text:p>Set</text:p>
          </table:table-cell>
          <table:table-cell table:formula="of:=YEAR([$dms.$J101])" office:value-type="float" office:value="2026" calcext:value-type="float">
            <text:p>2026</text:p>
          </table:table-cell>
          <table:table-cell table:formula="of:=COM.MICROSOFT.CONCAT([$dms.$L101];&quot; &quot;;[$dms.$M101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1" calcext:value-type="date">
            <text:p>21/9/2026</text:p>
          </table:table-cell>
          <table:table-cell table:formula="of:=MONTH([.J102])" office:value-type="float" office:value="9" calcext:value-type="float">
            <text:p>9</text:p>
          </table:table-cell>
          <table:table-cell table:formula="of:=COM.MICROSOFT.XLOOKUP([$dms.$K102];[.G:.G];[.H:.H])" office:value-type="string" office:string-value="Set" calcext:value-type="string">
            <text:p>Set</text:p>
          </table:table-cell>
          <table:table-cell table:formula="of:=YEAR([$dms.$J102])" office:value-type="float" office:value="2026" calcext:value-type="float">
            <text:p>2026</text:p>
          </table:table-cell>
          <table:table-cell table:formula="of:=COM.MICROSOFT.CONCAT([$dms.$L102];&quot; &quot;;[$dms.$M102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2" calcext:value-type="date">
            <text:p>22/9/2026</text:p>
          </table:table-cell>
          <table:table-cell table:formula="of:=MONTH([.J103])" office:value-type="float" office:value="9" calcext:value-type="float">
            <text:p>9</text:p>
          </table:table-cell>
          <table:table-cell table:formula="of:=COM.MICROSOFT.XLOOKUP([$dms.$K103];[.G:.G];[.H:.H])" office:value-type="string" office:string-value="Set" calcext:value-type="string">
            <text:p>Set</text:p>
          </table:table-cell>
          <table:table-cell table:formula="of:=YEAR([$dms.$J103])" office:value-type="float" office:value="2026" calcext:value-type="float">
            <text:p>2026</text:p>
          </table:table-cell>
          <table:table-cell table:formula="of:=COM.MICROSOFT.CONCAT([$dms.$L103];&quot; &quot;;[$dms.$M103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3" calcext:value-type="date">
            <text:p>23/9/2026</text:p>
          </table:table-cell>
          <table:table-cell table:formula="of:=MONTH([.J104])" office:value-type="float" office:value="9" calcext:value-type="float">
            <text:p>9</text:p>
          </table:table-cell>
          <table:table-cell table:formula="of:=COM.MICROSOFT.XLOOKUP([$dms.$K104];[.G:.G];[.H:.H])" office:value-type="string" office:string-value="Set" calcext:value-type="string">
            <text:p>Set</text:p>
          </table:table-cell>
          <table:table-cell table:formula="of:=YEAR([$dms.$J104])" office:value-type="float" office:value="2026" calcext:value-type="float">
            <text:p>2026</text:p>
          </table:table-cell>
          <table:table-cell table:formula="of:=COM.MICROSOFT.CONCAT([$dms.$L104];&quot; &quot;;[$dms.$M104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4" calcext:value-type="date">
            <text:p>24/9/2026</text:p>
          </table:table-cell>
          <table:table-cell table:formula="of:=MONTH([.J105])" office:value-type="float" office:value="9" calcext:value-type="float">
            <text:p>9</text:p>
          </table:table-cell>
          <table:table-cell table:formula="of:=COM.MICROSOFT.XLOOKUP([$dms.$K105];[.G:.G];[.H:.H])" office:value-type="string" office:string-value="Set" calcext:value-type="string">
            <text:p>Set</text:p>
          </table:table-cell>
          <table:table-cell table:formula="of:=YEAR([$dms.$J105])" office:value-type="float" office:value="2026" calcext:value-type="float">
            <text:p>2026</text:p>
          </table:table-cell>
          <table:table-cell table:formula="of:=COM.MICROSOFT.CONCAT([$dms.$L105];&quot; &quot;;[$dms.$M105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5" calcext:value-type="date">
            <text:p>25/9/2026</text:p>
          </table:table-cell>
          <table:table-cell table:formula="of:=MONTH([.J106])" office:value-type="float" office:value="9" calcext:value-type="float">
            <text:p>9</text:p>
          </table:table-cell>
          <table:table-cell table:formula="of:=COM.MICROSOFT.XLOOKUP([$dms.$K106];[.G:.G];[.H:.H])" office:value-type="string" office:string-value="Set" calcext:value-type="string">
            <text:p>Set</text:p>
          </table:table-cell>
          <table:table-cell table:formula="of:=YEAR([$dms.$J106])" office:value-type="float" office:value="2026" calcext:value-type="float">
            <text:p>2026</text:p>
          </table:table-cell>
          <table:table-cell table:formula="of:=COM.MICROSOFT.CONCAT([$dms.$L106];&quot; &quot;;[$dms.$M106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6" calcext:value-type="date">
            <text:p>26/9/2026</text:p>
          </table:table-cell>
          <table:table-cell table:formula="of:=MONTH([.J107])" office:value-type="float" office:value="9" calcext:value-type="float">
            <text:p>9</text:p>
          </table:table-cell>
          <table:table-cell table:formula="of:=COM.MICROSOFT.XLOOKUP([$dms.$K107];[.G:.G];[.H:.H])" office:value-type="string" office:string-value="Set" calcext:value-type="string">
            <text:p>Set</text:p>
          </table:table-cell>
          <table:table-cell table:formula="of:=YEAR([$dms.$J107])" office:value-type="float" office:value="2026" calcext:value-type="float">
            <text:p>2026</text:p>
          </table:table-cell>
          <table:table-cell table:formula="of:=COM.MICROSOFT.CONCAT([$dms.$L107];&quot; &quot;;[$dms.$M107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7" calcext:value-type="date">
            <text:p>27/9/2026</text:p>
          </table:table-cell>
          <table:table-cell table:formula="of:=MONTH([.J108])" office:value-type="float" office:value="9" calcext:value-type="float">
            <text:p>9</text:p>
          </table:table-cell>
          <table:table-cell table:formula="of:=COM.MICROSOFT.XLOOKUP([$dms.$K108];[.G:.G];[.H:.H])" office:value-type="string" office:string-value="Set" calcext:value-type="string">
            <text:p>Set</text:p>
          </table:table-cell>
          <table:table-cell table:formula="of:=YEAR([$dms.$J108])" office:value-type="float" office:value="2026" calcext:value-type="float">
            <text:p>2026</text:p>
          </table:table-cell>
          <table:table-cell table:formula="of:=COM.MICROSOFT.CONCAT([$dms.$L108];&quot; &quot;;[$dms.$M108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8" calcext:value-type="date">
            <text:p>28/9/2026</text:p>
          </table:table-cell>
          <table:table-cell table:formula="of:=MONTH([.J109])" office:value-type="float" office:value="9" calcext:value-type="float">
            <text:p>9</text:p>
          </table:table-cell>
          <table:table-cell table:formula="of:=COM.MICROSOFT.XLOOKUP([$dms.$K109];[.G:.G];[.H:.H])" office:value-type="string" office:string-value="Set" calcext:value-type="string">
            <text:p>Set</text:p>
          </table:table-cell>
          <table:table-cell table:formula="of:=YEAR([$dms.$J109])" office:value-type="float" office:value="2026" calcext:value-type="float">
            <text:p>2026</text:p>
          </table:table-cell>
          <table:table-cell table:formula="of:=COM.MICROSOFT.CONCAT([$dms.$L109];&quot; &quot;;[$dms.$M109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29" calcext:value-type="date">
            <text:p>29/9/2026</text:p>
          </table:table-cell>
          <table:table-cell table:formula="of:=MONTH([.J110])" office:value-type="float" office:value="9" calcext:value-type="float">
            <text:p>9</text:p>
          </table:table-cell>
          <table:table-cell table:formula="of:=COM.MICROSOFT.XLOOKUP([$dms.$K110];[.G:.G];[.H:.H])" office:value-type="string" office:string-value="Set" calcext:value-type="string">
            <text:p>Set</text:p>
          </table:table-cell>
          <table:table-cell table:formula="of:=YEAR([$dms.$J110])" office:value-type="float" office:value="2026" calcext:value-type="float">
            <text:p>2026</text:p>
          </table:table-cell>
          <table:table-cell table:formula="of:=COM.MICROSOFT.CONCAT([$dms.$L110];&quot; &quot;;[$dms.$M110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09-30" calcext:value-type="date">
            <text:p>30/9/2026</text:p>
          </table:table-cell>
          <table:table-cell table:formula="of:=MONTH([.J111])" office:value-type="float" office:value="9" calcext:value-type="float">
            <text:p>9</text:p>
          </table:table-cell>
          <table:table-cell table:formula="of:=COM.MICROSOFT.XLOOKUP([$dms.$K111];[.G:.G];[.H:.H])" office:value-type="string" office:string-value="Set" calcext:value-type="string">
            <text:p>Set</text:p>
          </table:table-cell>
          <table:table-cell table:formula="of:=YEAR([$dms.$J111])" office:value-type="float" office:value="2026" calcext:value-type="float">
            <text:p>2026</text:p>
          </table:table-cell>
          <table:table-cell table:formula="of:=COM.MICROSOFT.CONCAT([$dms.$L111];&quot; &quot;;[$dms.$M111])" office:value-type="string" office:string-value="Set 2026" calcext:value-type="string">
            <text:p>Se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01" calcext:value-type="date">
            <text:p>1/10/2026</text:p>
          </table:table-cell>
          <table:table-cell table:formula="of:=MONTH([.J112])" office:value-type="float" office:value="10" calcext:value-type="float">
            <text:p>10</text:p>
          </table:table-cell>
          <table:table-cell table:formula="of:=COM.MICROSOFT.XLOOKUP([$dms.$K112];[.G:.G];[.H:.H])" office:value-type="string" office:string-value="Out" calcext:value-type="string">
            <text:p>Out</text:p>
          </table:table-cell>
          <table:table-cell table:formula="of:=YEAR([$dms.$J112])" office:value-type="float" office:value="2026" calcext:value-type="float">
            <text:p>2026</text:p>
          </table:table-cell>
          <table:table-cell table:formula="of:=COM.MICROSOFT.CONCAT([$dms.$L112];&quot; &quot;;[$dms.$M112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02" calcext:value-type="date">
            <text:p>2/10/2026</text:p>
          </table:table-cell>
          <table:table-cell table:formula="of:=MONTH([.J113])" office:value-type="float" office:value="10" calcext:value-type="float">
            <text:p>10</text:p>
          </table:table-cell>
          <table:table-cell table:formula="of:=COM.MICROSOFT.XLOOKUP([$dms.$K113];[.G:.G];[.H:.H])" office:value-type="string" office:string-value="Out" calcext:value-type="string">
            <text:p>Out</text:p>
          </table:table-cell>
          <table:table-cell table:formula="of:=YEAR([$dms.$J113])" office:value-type="float" office:value="2026" calcext:value-type="float">
            <text:p>2026</text:p>
          </table:table-cell>
          <table:table-cell table:formula="of:=COM.MICROSOFT.CONCAT([$dms.$L113];&quot; &quot;;[$dms.$M113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03" calcext:value-type="date">
            <text:p>3/10/2026</text:p>
          </table:table-cell>
          <table:table-cell table:formula="of:=MONTH([.J114])" office:value-type="float" office:value="10" calcext:value-type="float">
            <text:p>10</text:p>
          </table:table-cell>
          <table:table-cell table:formula="of:=COM.MICROSOFT.XLOOKUP([$dms.$K114];[.G:.G];[.H:.H])" office:value-type="string" office:string-value="Out" calcext:value-type="string">
            <text:p>Out</text:p>
          </table:table-cell>
          <table:table-cell table:formula="of:=YEAR([$dms.$J114])" office:value-type="float" office:value="2026" calcext:value-type="float">
            <text:p>2026</text:p>
          </table:table-cell>
          <table:table-cell table:formula="of:=COM.MICROSOFT.CONCAT([$dms.$L114];&quot; &quot;;[$dms.$M114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04" calcext:value-type="date">
            <text:p>4/10/2026</text:p>
          </table:table-cell>
          <table:table-cell table:formula="of:=MONTH([.J115])" office:value-type="float" office:value="10" calcext:value-type="float">
            <text:p>10</text:p>
          </table:table-cell>
          <table:table-cell table:formula="of:=COM.MICROSOFT.XLOOKUP([$dms.$K115];[.G:.G];[.H:.H])" office:value-type="string" office:string-value="Out" calcext:value-type="string">
            <text:p>Out</text:p>
          </table:table-cell>
          <table:table-cell table:formula="of:=YEAR([$dms.$J115])" office:value-type="float" office:value="2026" calcext:value-type="float">
            <text:p>2026</text:p>
          </table:table-cell>
          <table:table-cell table:formula="of:=COM.MICROSOFT.CONCAT([$dms.$L115];&quot; &quot;;[$dms.$M115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05" calcext:value-type="date">
            <text:p>5/10/2026</text:p>
          </table:table-cell>
          <table:table-cell table:formula="of:=MONTH([.J116])" office:value-type="float" office:value="10" calcext:value-type="float">
            <text:p>10</text:p>
          </table:table-cell>
          <table:table-cell table:formula="of:=COM.MICROSOFT.XLOOKUP([$dms.$K116];[.G:.G];[.H:.H])" office:value-type="string" office:string-value="Out" calcext:value-type="string">
            <text:p>Out</text:p>
          </table:table-cell>
          <table:table-cell table:formula="of:=YEAR([$dms.$J116])" office:value-type="float" office:value="2026" calcext:value-type="float">
            <text:p>2026</text:p>
          </table:table-cell>
          <table:table-cell table:formula="of:=COM.MICROSOFT.CONCAT([$dms.$L116];&quot; &quot;;[$dms.$M116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06" calcext:value-type="date">
            <text:p>6/10/2026</text:p>
          </table:table-cell>
          <table:table-cell table:formula="of:=MONTH([.J117])" office:value-type="float" office:value="10" calcext:value-type="float">
            <text:p>10</text:p>
          </table:table-cell>
          <table:table-cell table:formula="of:=COM.MICROSOFT.XLOOKUP([$dms.$K117];[.G:.G];[.H:.H])" office:value-type="string" office:string-value="Out" calcext:value-type="string">
            <text:p>Out</text:p>
          </table:table-cell>
          <table:table-cell table:formula="of:=YEAR([$dms.$J117])" office:value-type="float" office:value="2026" calcext:value-type="float">
            <text:p>2026</text:p>
          </table:table-cell>
          <table:table-cell table:formula="of:=COM.MICROSOFT.CONCAT([$dms.$L117];&quot; &quot;;[$dms.$M117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07" calcext:value-type="date">
            <text:p>7/10/2026</text:p>
          </table:table-cell>
          <table:table-cell table:formula="of:=MONTH([.J118])" office:value-type="float" office:value="10" calcext:value-type="float">
            <text:p>10</text:p>
          </table:table-cell>
          <table:table-cell table:formula="of:=COM.MICROSOFT.XLOOKUP([$dms.$K118];[.G:.G];[.H:.H])" office:value-type="string" office:string-value="Out" calcext:value-type="string">
            <text:p>Out</text:p>
          </table:table-cell>
          <table:table-cell table:formula="of:=YEAR([$dms.$J118])" office:value-type="float" office:value="2026" calcext:value-type="float">
            <text:p>2026</text:p>
          </table:table-cell>
          <table:table-cell table:formula="of:=COM.MICROSOFT.CONCAT([$dms.$L118];&quot; &quot;;[$dms.$M118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08" calcext:value-type="date">
            <text:p>8/10/2026</text:p>
          </table:table-cell>
          <table:table-cell table:formula="of:=MONTH([.J119])" office:value-type="float" office:value="10" calcext:value-type="float">
            <text:p>10</text:p>
          </table:table-cell>
          <table:table-cell table:formula="of:=COM.MICROSOFT.XLOOKUP([$dms.$K119];[.G:.G];[.H:.H])" office:value-type="string" office:string-value="Out" calcext:value-type="string">
            <text:p>Out</text:p>
          </table:table-cell>
          <table:table-cell table:formula="of:=YEAR([$dms.$J119])" office:value-type="float" office:value="2026" calcext:value-type="float">
            <text:p>2026</text:p>
          </table:table-cell>
          <table:table-cell table:formula="of:=COM.MICROSOFT.CONCAT([$dms.$L119];&quot; &quot;;[$dms.$M119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09" calcext:value-type="date">
            <text:p>9/10/2026</text:p>
          </table:table-cell>
          <table:table-cell table:formula="of:=MONTH([.J120])" office:value-type="float" office:value="10" calcext:value-type="float">
            <text:p>10</text:p>
          </table:table-cell>
          <table:table-cell table:formula="of:=COM.MICROSOFT.XLOOKUP([$dms.$K120];[.G:.G];[.H:.H])" office:value-type="string" office:string-value="Out" calcext:value-type="string">
            <text:p>Out</text:p>
          </table:table-cell>
          <table:table-cell table:formula="of:=YEAR([$dms.$J120])" office:value-type="float" office:value="2026" calcext:value-type="float">
            <text:p>2026</text:p>
          </table:table-cell>
          <table:table-cell table:formula="of:=COM.MICROSOFT.CONCAT([$dms.$L120];&quot; &quot;;[$dms.$M120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0" calcext:value-type="date">
            <text:p>10/10/2026</text:p>
          </table:table-cell>
          <table:table-cell table:formula="of:=MONTH([.J121])" office:value-type="float" office:value="10" calcext:value-type="float">
            <text:p>10</text:p>
          </table:table-cell>
          <table:table-cell table:formula="of:=COM.MICROSOFT.XLOOKUP([$dms.$K121];[.G:.G];[.H:.H])" office:value-type="string" office:string-value="Out" calcext:value-type="string">
            <text:p>Out</text:p>
          </table:table-cell>
          <table:table-cell table:formula="of:=YEAR([$dms.$J121])" office:value-type="float" office:value="2026" calcext:value-type="float">
            <text:p>2026</text:p>
          </table:table-cell>
          <table:table-cell table:formula="of:=COM.MICROSOFT.CONCAT([$dms.$L121];&quot; &quot;;[$dms.$M121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1" calcext:value-type="date">
            <text:p>11/10/2026</text:p>
          </table:table-cell>
          <table:table-cell table:formula="of:=MONTH([.J122])" office:value-type="float" office:value="10" calcext:value-type="float">
            <text:p>10</text:p>
          </table:table-cell>
          <table:table-cell table:formula="of:=COM.MICROSOFT.XLOOKUP([$dms.$K122];[.G:.G];[.H:.H])" office:value-type="string" office:string-value="Out" calcext:value-type="string">
            <text:p>Out</text:p>
          </table:table-cell>
          <table:table-cell table:formula="of:=YEAR([$dms.$J122])" office:value-type="float" office:value="2026" calcext:value-type="float">
            <text:p>2026</text:p>
          </table:table-cell>
          <table:table-cell table:formula="of:=COM.MICROSOFT.CONCAT([$dms.$L122];&quot; &quot;;[$dms.$M122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2" calcext:value-type="date">
            <text:p>12/10/2026</text:p>
          </table:table-cell>
          <table:table-cell table:formula="of:=MONTH([.J123])" office:value-type="float" office:value="10" calcext:value-type="float">
            <text:p>10</text:p>
          </table:table-cell>
          <table:table-cell table:formula="of:=COM.MICROSOFT.XLOOKUP([$dms.$K123];[.G:.G];[.H:.H])" office:value-type="string" office:string-value="Out" calcext:value-type="string">
            <text:p>Out</text:p>
          </table:table-cell>
          <table:table-cell table:formula="of:=YEAR([$dms.$J123])" office:value-type="float" office:value="2026" calcext:value-type="float">
            <text:p>2026</text:p>
          </table:table-cell>
          <table:table-cell table:formula="of:=COM.MICROSOFT.CONCAT([$dms.$L123];&quot; &quot;;[$dms.$M123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3" calcext:value-type="date">
            <text:p>13/10/2026</text:p>
          </table:table-cell>
          <table:table-cell table:formula="of:=MONTH([.J124])" office:value-type="float" office:value="10" calcext:value-type="float">
            <text:p>10</text:p>
          </table:table-cell>
          <table:table-cell table:formula="of:=COM.MICROSOFT.XLOOKUP([$dms.$K124];[.G:.G];[.H:.H])" office:value-type="string" office:string-value="Out" calcext:value-type="string">
            <text:p>Out</text:p>
          </table:table-cell>
          <table:table-cell table:formula="of:=YEAR([$dms.$J124])" office:value-type="float" office:value="2026" calcext:value-type="float">
            <text:p>2026</text:p>
          </table:table-cell>
          <table:table-cell table:formula="of:=COM.MICROSOFT.CONCAT([$dms.$L124];&quot; &quot;;[$dms.$M124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4" calcext:value-type="date">
            <text:p>14/10/2026</text:p>
          </table:table-cell>
          <table:table-cell table:formula="of:=MONTH([.J125])" office:value-type="float" office:value="10" calcext:value-type="float">
            <text:p>10</text:p>
          </table:table-cell>
          <table:table-cell table:formula="of:=COM.MICROSOFT.XLOOKUP([$dms.$K125];[.G:.G];[.H:.H])" office:value-type="string" office:string-value="Out" calcext:value-type="string">
            <text:p>Out</text:p>
          </table:table-cell>
          <table:table-cell table:formula="of:=YEAR([$dms.$J125])" office:value-type="float" office:value="2026" calcext:value-type="float">
            <text:p>2026</text:p>
          </table:table-cell>
          <table:table-cell table:formula="of:=COM.MICROSOFT.CONCAT([$dms.$L125];&quot; &quot;;[$dms.$M125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5" calcext:value-type="date">
            <text:p>15/10/2026</text:p>
          </table:table-cell>
          <table:table-cell table:formula="of:=MONTH([.J126])" office:value-type="float" office:value="10" calcext:value-type="float">
            <text:p>10</text:p>
          </table:table-cell>
          <table:table-cell table:formula="of:=COM.MICROSOFT.XLOOKUP([$dms.$K126];[.G:.G];[.H:.H])" office:value-type="string" office:string-value="Out" calcext:value-type="string">
            <text:p>Out</text:p>
          </table:table-cell>
          <table:table-cell table:formula="of:=YEAR([$dms.$J126])" office:value-type="float" office:value="2026" calcext:value-type="float">
            <text:p>2026</text:p>
          </table:table-cell>
          <table:table-cell table:formula="of:=COM.MICROSOFT.CONCAT([$dms.$L126];&quot; &quot;;[$dms.$M126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6" calcext:value-type="date">
            <text:p>16/10/2026</text:p>
          </table:table-cell>
          <table:table-cell table:formula="of:=MONTH([.J127])" office:value-type="float" office:value="10" calcext:value-type="float">
            <text:p>10</text:p>
          </table:table-cell>
          <table:table-cell table:formula="of:=COM.MICROSOFT.XLOOKUP([$dms.$K127];[.G:.G];[.H:.H])" office:value-type="string" office:string-value="Out" calcext:value-type="string">
            <text:p>Out</text:p>
          </table:table-cell>
          <table:table-cell table:formula="of:=YEAR([$dms.$J127])" office:value-type="float" office:value="2026" calcext:value-type="float">
            <text:p>2026</text:p>
          </table:table-cell>
          <table:table-cell table:formula="of:=COM.MICROSOFT.CONCAT([$dms.$L127];&quot; &quot;;[$dms.$M127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7" calcext:value-type="date">
            <text:p>17/10/2026</text:p>
          </table:table-cell>
          <table:table-cell table:formula="of:=MONTH([.J128])" office:value-type="float" office:value="10" calcext:value-type="float">
            <text:p>10</text:p>
          </table:table-cell>
          <table:table-cell table:formula="of:=COM.MICROSOFT.XLOOKUP([$dms.$K128];[.G:.G];[.H:.H])" office:value-type="string" office:string-value="Out" calcext:value-type="string">
            <text:p>Out</text:p>
          </table:table-cell>
          <table:table-cell table:formula="of:=YEAR([$dms.$J128])" office:value-type="float" office:value="2026" calcext:value-type="float">
            <text:p>2026</text:p>
          </table:table-cell>
          <table:table-cell table:formula="of:=COM.MICROSOFT.CONCAT([$dms.$L128];&quot; &quot;;[$dms.$M128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8" calcext:value-type="date">
            <text:p>18/10/2026</text:p>
          </table:table-cell>
          <table:table-cell table:formula="of:=MONTH([.J129])" office:value-type="float" office:value="10" calcext:value-type="float">
            <text:p>10</text:p>
          </table:table-cell>
          <table:table-cell table:formula="of:=COM.MICROSOFT.XLOOKUP([$dms.$K129];[.G:.G];[.H:.H])" office:value-type="string" office:string-value="Out" calcext:value-type="string">
            <text:p>Out</text:p>
          </table:table-cell>
          <table:table-cell table:formula="of:=YEAR([$dms.$J129])" office:value-type="float" office:value="2026" calcext:value-type="float">
            <text:p>2026</text:p>
          </table:table-cell>
          <table:table-cell table:formula="of:=COM.MICROSOFT.CONCAT([$dms.$L129];&quot; &quot;;[$dms.$M129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19" calcext:value-type="date">
            <text:p>19/10/2026</text:p>
          </table:table-cell>
          <table:table-cell table:formula="of:=MONTH([.J130])" office:value-type="float" office:value="10" calcext:value-type="float">
            <text:p>10</text:p>
          </table:table-cell>
          <table:table-cell table:formula="of:=COM.MICROSOFT.XLOOKUP([$dms.$K130];[.G:.G];[.H:.H])" office:value-type="string" office:string-value="Out" calcext:value-type="string">
            <text:p>Out</text:p>
          </table:table-cell>
          <table:table-cell table:formula="of:=YEAR([$dms.$J130])" office:value-type="float" office:value="2026" calcext:value-type="float">
            <text:p>2026</text:p>
          </table:table-cell>
          <table:table-cell table:formula="of:=COM.MICROSOFT.CONCAT([$dms.$L130];&quot; &quot;;[$dms.$M130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0" calcext:value-type="date">
            <text:p>20/10/2026</text:p>
          </table:table-cell>
          <table:table-cell table:formula="of:=MONTH([.J131])" office:value-type="float" office:value="10" calcext:value-type="float">
            <text:p>10</text:p>
          </table:table-cell>
          <table:table-cell table:formula="of:=COM.MICROSOFT.XLOOKUP([$dms.$K131];[.G:.G];[.H:.H])" office:value-type="string" office:string-value="Out" calcext:value-type="string">
            <text:p>Out</text:p>
          </table:table-cell>
          <table:table-cell table:formula="of:=YEAR([$dms.$J131])" office:value-type="float" office:value="2026" calcext:value-type="float">
            <text:p>2026</text:p>
          </table:table-cell>
          <table:table-cell table:formula="of:=COM.MICROSOFT.CONCAT([$dms.$L131];&quot; &quot;;[$dms.$M131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1" calcext:value-type="date">
            <text:p>21/10/2026</text:p>
          </table:table-cell>
          <table:table-cell table:formula="of:=MONTH([.J132])" office:value-type="float" office:value="10" calcext:value-type="float">
            <text:p>10</text:p>
          </table:table-cell>
          <table:table-cell table:formula="of:=COM.MICROSOFT.XLOOKUP([$dms.$K132];[.G:.G];[.H:.H])" office:value-type="string" office:string-value="Out" calcext:value-type="string">
            <text:p>Out</text:p>
          </table:table-cell>
          <table:table-cell table:formula="of:=YEAR([$dms.$J132])" office:value-type="float" office:value="2026" calcext:value-type="float">
            <text:p>2026</text:p>
          </table:table-cell>
          <table:table-cell table:formula="of:=COM.MICROSOFT.CONCAT([$dms.$L132];&quot; &quot;;[$dms.$M132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2" calcext:value-type="date">
            <text:p>22/10/2026</text:p>
          </table:table-cell>
          <table:table-cell table:formula="of:=MONTH([.J133])" office:value-type="float" office:value="10" calcext:value-type="float">
            <text:p>10</text:p>
          </table:table-cell>
          <table:table-cell table:formula="of:=COM.MICROSOFT.XLOOKUP([$dms.$K133];[.G:.G];[.H:.H])" office:value-type="string" office:string-value="Out" calcext:value-type="string">
            <text:p>Out</text:p>
          </table:table-cell>
          <table:table-cell table:formula="of:=YEAR([$dms.$J133])" office:value-type="float" office:value="2026" calcext:value-type="float">
            <text:p>2026</text:p>
          </table:table-cell>
          <table:table-cell table:formula="of:=COM.MICROSOFT.CONCAT([$dms.$L133];&quot; &quot;;[$dms.$M133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3" calcext:value-type="date">
            <text:p>23/10/2026</text:p>
          </table:table-cell>
          <table:table-cell table:formula="of:=MONTH([.J134])" office:value-type="float" office:value="10" calcext:value-type="float">
            <text:p>10</text:p>
          </table:table-cell>
          <table:table-cell table:formula="of:=COM.MICROSOFT.XLOOKUP([$dms.$K134];[.G:.G];[.H:.H])" office:value-type="string" office:string-value="Out" calcext:value-type="string">
            <text:p>Out</text:p>
          </table:table-cell>
          <table:table-cell table:formula="of:=YEAR([$dms.$J134])" office:value-type="float" office:value="2026" calcext:value-type="float">
            <text:p>2026</text:p>
          </table:table-cell>
          <table:table-cell table:formula="of:=COM.MICROSOFT.CONCAT([$dms.$L134];&quot; &quot;;[$dms.$M134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4" calcext:value-type="date">
            <text:p>24/10/2026</text:p>
          </table:table-cell>
          <table:table-cell table:formula="of:=MONTH([.J135])" office:value-type="float" office:value="10" calcext:value-type="float">
            <text:p>10</text:p>
          </table:table-cell>
          <table:table-cell table:formula="of:=COM.MICROSOFT.XLOOKUP([$dms.$K135];[.G:.G];[.H:.H])" office:value-type="string" office:string-value="Out" calcext:value-type="string">
            <text:p>Out</text:p>
          </table:table-cell>
          <table:table-cell table:formula="of:=YEAR([$dms.$J135])" office:value-type="float" office:value="2026" calcext:value-type="float">
            <text:p>2026</text:p>
          </table:table-cell>
          <table:table-cell table:formula="of:=COM.MICROSOFT.CONCAT([$dms.$L135];&quot; &quot;;[$dms.$M135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5" calcext:value-type="date">
            <text:p>25/10/2026</text:p>
          </table:table-cell>
          <table:table-cell table:formula="of:=MONTH([.J136])" office:value-type="float" office:value="10" calcext:value-type="float">
            <text:p>10</text:p>
          </table:table-cell>
          <table:table-cell table:formula="of:=COM.MICROSOFT.XLOOKUP([$dms.$K136];[.G:.G];[.H:.H])" office:value-type="string" office:string-value="Out" calcext:value-type="string">
            <text:p>Out</text:p>
          </table:table-cell>
          <table:table-cell table:formula="of:=YEAR([$dms.$J136])" office:value-type="float" office:value="2026" calcext:value-type="float">
            <text:p>2026</text:p>
          </table:table-cell>
          <table:table-cell table:formula="of:=COM.MICROSOFT.CONCAT([$dms.$L136];&quot; &quot;;[$dms.$M136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6" calcext:value-type="date">
            <text:p>26/10/2026</text:p>
          </table:table-cell>
          <table:table-cell table:formula="of:=MONTH([.J137])" office:value-type="float" office:value="10" calcext:value-type="float">
            <text:p>10</text:p>
          </table:table-cell>
          <table:table-cell table:formula="of:=COM.MICROSOFT.XLOOKUP([$dms.$K137];[.G:.G];[.H:.H])" office:value-type="string" office:string-value="Out" calcext:value-type="string">
            <text:p>Out</text:p>
          </table:table-cell>
          <table:table-cell table:formula="of:=YEAR([$dms.$J137])" office:value-type="float" office:value="2026" calcext:value-type="float">
            <text:p>2026</text:p>
          </table:table-cell>
          <table:table-cell table:formula="of:=COM.MICROSOFT.CONCAT([$dms.$L137];&quot; &quot;;[$dms.$M137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7" calcext:value-type="date">
            <text:p>27/10/2026</text:p>
          </table:table-cell>
          <table:table-cell table:formula="of:=MONTH([.J138])" office:value-type="float" office:value="10" calcext:value-type="float">
            <text:p>10</text:p>
          </table:table-cell>
          <table:table-cell table:formula="of:=COM.MICROSOFT.XLOOKUP([$dms.$K138];[.G:.G];[.H:.H])" office:value-type="string" office:string-value="Out" calcext:value-type="string">
            <text:p>Out</text:p>
          </table:table-cell>
          <table:table-cell table:formula="of:=YEAR([$dms.$J138])" office:value-type="float" office:value="2026" calcext:value-type="float">
            <text:p>2026</text:p>
          </table:table-cell>
          <table:table-cell table:formula="of:=COM.MICROSOFT.CONCAT([$dms.$L138];&quot; &quot;;[$dms.$M138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8" calcext:value-type="date">
            <text:p>28/10/2026</text:p>
          </table:table-cell>
          <table:table-cell table:formula="of:=MONTH([.J139])" office:value-type="float" office:value="10" calcext:value-type="float">
            <text:p>10</text:p>
          </table:table-cell>
          <table:table-cell table:formula="of:=COM.MICROSOFT.XLOOKUP([$dms.$K139];[.G:.G];[.H:.H])" office:value-type="string" office:string-value="Out" calcext:value-type="string">
            <text:p>Out</text:p>
          </table:table-cell>
          <table:table-cell table:formula="of:=YEAR([$dms.$J139])" office:value-type="float" office:value="2026" calcext:value-type="float">
            <text:p>2026</text:p>
          </table:table-cell>
          <table:table-cell table:formula="of:=COM.MICROSOFT.CONCAT([$dms.$L139];&quot; &quot;;[$dms.$M139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29" calcext:value-type="date">
            <text:p>29/10/2026</text:p>
          </table:table-cell>
          <table:table-cell table:formula="of:=MONTH([.J140])" office:value-type="float" office:value="10" calcext:value-type="float">
            <text:p>10</text:p>
          </table:table-cell>
          <table:table-cell table:formula="of:=COM.MICROSOFT.XLOOKUP([$dms.$K140];[.G:.G];[.H:.H])" office:value-type="string" office:string-value="Out" calcext:value-type="string">
            <text:p>Out</text:p>
          </table:table-cell>
          <table:table-cell table:formula="of:=YEAR([$dms.$J140])" office:value-type="float" office:value="2026" calcext:value-type="float">
            <text:p>2026</text:p>
          </table:table-cell>
          <table:table-cell table:formula="of:=COM.MICROSOFT.CONCAT([$dms.$L140];&quot; &quot;;[$dms.$M140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30" calcext:value-type="date">
            <text:p>30/10/2026</text:p>
          </table:table-cell>
          <table:table-cell table:formula="of:=MONTH([.J141])" office:value-type="float" office:value="10" calcext:value-type="float">
            <text:p>10</text:p>
          </table:table-cell>
          <table:table-cell table:formula="of:=COM.MICROSOFT.XLOOKUP([$dms.$K141];[.G:.G];[.H:.H])" office:value-type="string" office:string-value="Out" calcext:value-type="string">
            <text:p>Out</text:p>
          </table:table-cell>
          <table:table-cell table:formula="of:=YEAR([$dms.$J141])" office:value-type="float" office:value="2026" calcext:value-type="float">
            <text:p>2026</text:p>
          </table:table-cell>
          <table:table-cell table:formula="of:=COM.MICROSOFT.CONCAT([$dms.$L141];&quot; &quot;;[$dms.$M141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0-31" calcext:value-type="date">
            <text:p>31/10/2026</text:p>
          </table:table-cell>
          <table:table-cell table:formula="of:=MONTH([.J142])" office:value-type="float" office:value="10" calcext:value-type="float">
            <text:p>10</text:p>
          </table:table-cell>
          <table:table-cell table:formula="of:=COM.MICROSOFT.XLOOKUP([$dms.$K142];[.G:.G];[.H:.H])" office:value-type="string" office:string-value="Out" calcext:value-type="string">
            <text:p>Out</text:p>
          </table:table-cell>
          <table:table-cell table:formula="of:=YEAR([$dms.$J142])" office:value-type="float" office:value="2026" calcext:value-type="float">
            <text:p>2026</text:p>
          </table:table-cell>
          <table:table-cell table:formula="of:=COM.MICROSOFT.CONCAT([$dms.$L142];&quot; &quot;;[$dms.$M142])" office:value-type="string" office:string-value="Out 2026" calcext:value-type="string">
            <text:p>Out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01" calcext:value-type="date">
            <text:p>1/11/2026</text:p>
          </table:table-cell>
          <table:table-cell table:formula="of:=MONTH([.J143])" office:value-type="float" office:value="11" calcext:value-type="float">
            <text:p>11</text:p>
          </table:table-cell>
          <table:table-cell table:formula="of:=COM.MICROSOFT.XLOOKUP([$dms.$K143];[.G:.G];[.H:.H])" office:value-type="string" office:string-value="Nov" calcext:value-type="string">
            <text:p>Nov</text:p>
          </table:table-cell>
          <table:table-cell table:formula="of:=YEAR([$dms.$J143])" office:value-type="float" office:value="2026" calcext:value-type="float">
            <text:p>2026</text:p>
          </table:table-cell>
          <table:table-cell table:formula="of:=COM.MICROSOFT.CONCAT([$dms.$L143];&quot; &quot;;[$dms.$M143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02" calcext:value-type="date">
            <text:p>2/11/2026</text:p>
          </table:table-cell>
          <table:table-cell table:formula="of:=MONTH([.J144])" office:value-type="float" office:value="11" calcext:value-type="float">
            <text:p>11</text:p>
          </table:table-cell>
          <table:table-cell table:formula="of:=COM.MICROSOFT.XLOOKUP([$dms.$K144];[.G:.G];[.H:.H])" office:value-type="string" office:string-value="Nov" calcext:value-type="string">
            <text:p>Nov</text:p>
          </table:table-cell>
          <table:table-cell table:formula="of:=YEAR([$dms.$J144])" office:value-type="float" office:value="2026" calcext:value-type="float">
            <text:p>2026</text:p>
          </table:table-cell>
          <table:table-cell table:formula="of:=COM.MICROSOFT.CONCAT([$dms.$L144];&quot; &quot;;[$dms.$M144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03" calcext:value-type="date">
            <text:p>3/11/2026</text:p>
          </table:table-cell>
          <table:table-cell table:formula="of:=MONTH([.J145])" office:value-type="float" office:value="11" calcext:value-type="float">
            <text:p>11</text:p>
          </table:table-cell>
          <table:table-cell table:formula="of:=COM.MICROSOFT.XLOOKUP([$dms.$K145];[.G:.G];[.H:.H])" office:value-type="string" office:string-value="Nov" calcext:value-type="string">
            <text:p>Nov</text:p>
          </table:table-cell>
          <table:table-cell table:formula="of:=YEAR([$dms.$J145])" office:value-type="float" office:value="2026" calcext:value-type="float">
            <text:p>2026</text:p>
          </table:table-cell>
          <table:table-cell table:formula="of:=COM.MICROSOFT.CONCAT([$dms.$L145];&quot; &quot;;[$dms.$M145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04" calcext:value-type="date">
            <text:p>4/11/2026</text:p>
          </table:table-cell>
          <table:table-cell table:formula="of:=MONTH([.J146])" office:value-type="float" office:value="11" calcext:value-type="float">
            <text:p>11</text:p>
          </table:table-cell>
          <table:table-cell table:formula="of:=COM.MICROSOFT.XLOOKUP([$dms.$K146];[.G:.G];[.H:.H])" office:value-type="string" office:string-value="Nov" calcext:value-type="string">
            <text:p>Nov</text:p>
          </table:table-cell>
          <table:table-cell table:formula="of:=YEAR([$dms.$J146])" office:value-type="float" office:value="2026" calcext:value-type="float">
            <text:p>2026</text:p>
          </table:table-cell>
          <table:table-cell table:formula="of:=COM.MICROSOFT.CONCAT([$dms.$L146];&quot; &quot;;[$dms.$M146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05" calcext:value-type="date">
            <text:p>5/11/2026</text:p>
          </table:table-cell>
          <table:table-cell table:formula="of:=MONTH([.J147])" office:value-type="float" office:value="11" calcext:value-type="float">
            <text:p>11</text:p>
          </table:table-cell>
          <table:table-cell table:formula="of:=COM.MICROSOFT.XLOOKUP([$dms.$K147];[.G:.G];[.H:.H])" office:value-type="string" office:string-value="Nov" calcext:value-type="string">
            <text:p>Nov</text:p>
          </table:table-cell>
          <table:table-cell table:formula="of:=YEAR([$dms.$J147])" office:value-type="float" office:value="2026" calcext:value-type="float">
            <text:p>2026</text:p>
          </table:table-cell>
          <table:table-cell table:formula="of:=COM.MICROSOFT.CONCAT([$dms.$L147];&quot; &quot;;[$dms.$M147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06" calcext:value-type="date">
            <text:p>6/11/2026</text:p>
          </table:table-cell>
          <table:table-cell table:formula="of:=MONTH([.J148])" office:value-type="float" office:value="11" calcext:value-type="float">
            <text:p>11</text:p>
          </table:table-cell>
          <table:table-cell table:formula="of:=COM.MICROSOFT.XLOOKUP([$dms.$K148];[.G:.G];[.H:.H])" office:value-type="string" office:string-value="Nov" calcext:value-type="string">
            <text:p>Nov</text:p>
          </table:table-cell>
          <table:table-cell table:formula="of:=YEAR([$dms.$J148])" office:value-type="float" office:value="2026" calcext:value-type="float">
            <text:p>2026</text:p>
          </table:table-cell>
          <table:table-cell table:formula="of:=COM.MICROSOFT.CONCAT([$dms.$L148];&quot; &quot;;[$dms.$M148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07" calcext:value-type="date">
            <text:p>7/11/2026</text:p>
          </table:table-cell>
          <table:table-cell table:formula="of:=MONTH([.J149])" office:value-type="float" office:value="11" calcext:value-type="float">
            <text:p>11</text:p>
          </table:table-cell>
          <table:table-cell table:formula="of:=COM.MICROSOFT.XLOOKUP([$dms.$K149];[.G:.G];[.H:.H])" office:value-type="string" office:string-value="Nov" calcext:value-type="string">
            <text:p>Nov</text:p>
          </table:table-cell>
          <table:table-cell table:formula="of:=YEAR([$dms.$J149])" office:value-type="float" office:value="2026" calcext:value-type="float">
            <text:p>2026</text:p>
          </table:table-cell>
          <table:table-cell table:formula="of:=COM.MICROSOFT.CONCAT([$dms.$L149];&quot; &quot;;[$dms.$M149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08" calcext:value-type="date">
            <text:p>8/11/2026</text:p>
          </table:table-cell>
          <table:table-cell table:formula="of:=MONTH([.J150])" office:value-type="float" office:value="11" calcext:value-type="float">
            <text:p>11</text:p>
          </table:table-cell>
          <table:table-cell table:formula="of:=COM.MICROSOFT.XLOOKUP([$dms.$K150];[.G:.G];[.H:.H])" office:value-type="string" office:string-value="Nov" calcext:value-type="string">
            <text:p>Nov</text:p>
          </table:table-cell>
          <table:table-cell table:formula="of:=YEAR([$dms.$J150])" office:value-type="float" office:value="2026" calcext:value-type="float">
            <text:p>2026</text:p>
          </table:table-cell>
          <table:table-cell table:formula="of:=COM.MICROSOFT.CONCAT([$dms.$L150];&quot; &quot;;[$dms.$M150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09" calcext:value-type="date">
            <text:p>9/11/2026</text:p>
          </table:table-cell>
          <table:table-cell table:formula="of:=MONTH([.J151])" office:value-type="float" office:value="11" calcext:value-type="float">
            <text:p>11</text:p>
          </table:table-cell>
          <table:table-cell table:formula="of:=COM.MICROSOFT.XLOOKUP([$dms.$K151];[.G:.G];[.H:.H])" office:value-type="string" office:string-value="Nov" calcext:value-type="string">
            <text:p>Nov</text:p>
          </table:table-cell>
          <table:table-cell table:formula="of:=YEAR([$dms.$J151])" office:value-type="float" office:value="2026" calcext:value-type="float">
            <text:p>2026</text:p>
          </table:table-cell>
          <table:table-cell table:formula="of:=COM.MICROSOFT.CONCAT([$dms.$L151];&quot; &quot;;[$dms.$M151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0" calcext:value-type="date">
            <text:p>10/11/2026</text:p>
          </table:table-cell>
          <table:table-cell table:formula="of:=MONTH([.J152])" office:value-type="float" office:value="11" calcext:value-type="float">
            <text:p>11</text:p>
          </table:table-cell>
          <table:table-cell table:formula="of:=COM.MICROSOFT.XLOOKUP([$dms.$K152];[.G:.G];[.H:.H])" office:value-type="string" office:string-value="Nov" calcext:value-type="string">
            <text:p>Nov</text:p>
          </table:table-cell>
          <table:table-cell table:formula="of:=YEAR([$dms.$J152])" office:value-type="float" office:value="2026" calcext:value-type="float">
            <text:p>2026</text:p>
          </table:table-cell>
          <table:table-cell table:formula="of:=COM.MICROSOFT.CONCAT([$dms.$L152];&quot; &quot;;[$dms.$M152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1" calcext:value-type="date">
            <text:p>11/11/2026</text:p>
          </table:table-cell>
          <table:table-cell table:formula="of:=MONTH([.J153])" office:value-type="float" office:value="11" calcext:value-type="float">
            <text:p>11</text:p>
          </table:table-cell>
          <table:table-cell table:formula="of:=COM.MICROSOFT.XLOOKUP([$dms.$K153];[.G:.G];[.H:.H])" office:value-type="string" office:string-value="Nov" calcext:value-type="string">
            <text:p>Nov</text:p>
          </table:table-cell>
          <table:table-cell table:formula="of:=YEAR([$dms.$J153])" office:value-type="float" office:value="2026" calcext:value-type="float">
            <text:p>2026</text:p>
          </table:table-cell>
          <table:table-cell table:formula="of:=COM.MICROSOFT.CONCAT([$dms.$L153];&quot; &quot;;[$dms.$M153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2" calcext:value-type="date">
            <text:p>12/11/2026</text:p>
          </table:table-cell>
          <table:table-cell table:formula="of:=MONTH([.J154])" office:value-type="float" office:value="11" calcext:value-type="float">
            <text:p>11</text:p>
          </table:table-cell>
          <table:table-cell table:formula="of:=COM.MICROSOFT.XLOOKUP([$dms.$K154];[.G:.G];[.H:.H])" office:value-type="string" office:string-value="Nov" calcext:value-type="string">
            <text:p>Nov</text:p>
          </table:table-cell>
          <table:table-cell table:formula="of:=YEAR([$dms.$J154])" office:value-type="float" office:value="2026" calcext:value-type="float">
            <text:p>2026</text:p>
          </table:table-cell>
          <table:table-cell table:formula="of:=COM.MICROSOFT.CONCAT([$dms.$L154];&quot; &quot;;[$dms.$M154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3" calcext:value-type="date">
            <text:p>13/11/2026</text:p>
          </table:table-cell>
          <table:table-cell table:formula="of:=MONTH([.J155])" office:value-type="float" office:value="11" calcext:value-type="float">
            <text:p>11</text:p>
          </table:table-cell>
          <table:table-cell table:formula="of:=COM.MICROSOFT.XLOOKUP([$dms.$K155];[.G:.G];[.H:.H])" office:value-type="string" office:string-value="Nov" calcext:value-type="string">
            <text:p>Nov</text:p>
          </table:table-cell>
          <table:table-cell table:formula="of:=YEAR([$dms.$J155])" office:value-type="float" office:value="2026" calcext:value-type="float">
            <text:p>2026</text:p>
          </table:table-cell>
          <table:table-cell table:formula="of:=COM.MICROSOFT.CONCAT([$dms.$L155];&quot; &quot;;[$dms.$M155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4" calcext:value-type="date">
            <text:p>14/11/2026</text:p>
          </table:table-cell>
          <table:table-cell table:formula="of:=MONTH([.J156])" office:value-type="float" office:value="11" calcext:value-type="float">
            <text:p>11</text:p>
          </table:table-cell>
          <table:table-cell table:formula="of:=COM.MICROSOFT.XLOOKUP([$dms.$K156];[.G:.G];[.H:.H])" office:value-type="string" office:string-value="Nov" calcext:value-type="string">
            <text:p>Nov</text:p>
          </table:table-cell>
          <table:table-cell table:formula="of:=YEAR([$dms.$J156])" office:value-type="float" office:value="2026" calcext:value-type="float">
            <text:p>2026</text:p>
          </table:table-cell>
          <table:table-cell table:formula="of:=COM.MICROSOFT.CONCAT([$dms.$L156];&quot; &quot;;[$dms.$M156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5" calcext:value-type="date">
            <text:p>15/11/2026</text:p>
          </table:table-cell>
          <table:table-cell table:formula="of:=MONTH([.J157])" office:value-type="float" office:value="11" calcext:value-type="float">
            <text:p>11</text:p>
          </table:table-cell>
          <table:table-cell table:formula="of:=COM.MICROSOFT.XLOOKUP([$dms.$K157];[.G:.G];[.H:.H])" office:value-type="string" office:string-value="Nov" calcext:value-type="string">
            <text:p>Nov</text:p>
          </table:table-cell>
          <table:table-cell table:formula="of:=YEAR([$dms.$J157])" office:value-type="float" office:value="2026" calcext:value-type="float">
            <text:p>2026</text:p>
          </table:table-cell>
          <table:table-cell table:formula="of:=COM.MICROSOFT.CONCAT([$dms.$L157];&quot; &quot;;[$dms.$M157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6" calcext:value-type="date">
            <text:p>16/11/2026</text:p>
          </table:table-cell>
          <table:table-cell table:formula="of:=MONTH([.J158])" office:value-type="float" office:value="11" calcext:value-type="float">
            <text:p>11</text:p>
          </table:table-cell>
          <table:table-cell table:formula="of:=COM.MICROSOFT.XLOOKUP([$dms.$K158];[.G:.G];[.H:.H])" office:value-type="string" office:string-value="Nov" calcext:value-type="string">
            <text:p>Nov</text:p>
          </table:table-cell>
          <table:table-cell table:formula="of:=YEAR([$dms.$J158])" office:value-type="float" office:value="2026" calcext:value-type="float">
            <text:p>2026</text:p>
          </table:table-cell>
          <table:table-cell table:formula="of:=COM.MICROSOFT.CONCAT([$dms.$L158];&quot; &quot;;[$dms.$M158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7" calcext:value-type="date">
            <text:p>17/11/2026</text:p>
          </table:table-cell>
          <table:table-cell table:formula="of:=MONTH([.J159])" office:value-type="float" office:value="11" calcext:value-type="float">
            <text:p>11</text:p>
          </table:table-cell>
          <table:table-cell table:formula="of:=COM.MICROSOFT.XLOOKUP([$dms.$K159];[.G:.G];[.H:.H])" office:value-type="string" office:string-value="Nov" calcext:value-type="string">
            <text:p>Nov</text:p>
          </table:table-cell>
          <table:table-cell table:formula="of:=YEAR([$dms.$J159])" office:value-type="float" office:value="2026" calcext:value-type="float">
            <text:p>2026</text:p>
          </table:table-cell>
          <table:table-cell table:formula="of:=COM.MICROSOFT.CONCAT([$dms.$L159];&quot; &quot;;[$dms.$M159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8" calcext:value-type="date">
            <text:p>18/11/2026</text:p>
          </table:table-cell>
          <table:table-cell table:formula="of:=MONTH([.J160])" office:value-type="float" office:value="11" calcext:value-type="float">
            <text:p>11</text:p>
          </table:table-cell>
          <table:table-cell table:formula="of:=COM.MICROSOFT.XLOOKUP([$dms.$K160];[.G:.G];[.H:.H])" office:value-type="string" office:string-value="Nov" calcext:value-type="string">
            <text:p>Nov</text:p>
          </table:table-cell>
          <table:table-cell table:formula="of:=YEAR([$dms.$J160])" office:value-type="float" office:value="2026" calcext:value-type="float">
            <text:p>2026</text:p>
          </table:table-cell>
          <table:table-cell table:formula="of:=COM.MICROSOFT.CONCAT([$dms.$L160];&quot; &quot;;[$dms.$M160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19" calcext:value-type="date">
            <text:p>19/11/2026</text:p>
          </table:table-cell>
          <table:table-cell table:formula="of:=MONTH([.J161])" office:value-type="float" office:value="11" calcext:value-type="float">
            <text:p>11</text:p>
          </table:table-cell>
          <table:table-cell table:formula="of:=COM.MICROSOFT.XLOOKUP([$dms.$K161];[.G:.G];[.H:.H])" office:value-type="string" office:string-value="Nov" calcext:value-type="string">
            <text:p>Nov</text:p>
          </table:table-cell>
          <table:table-cell table:formula="of:=YEAR([$dms.$J161])" office:value-type="float" office:value="2026" calcext:value-type="float">
            <text:p>2026</text:p>
          </table:table-cell>
          <table:table-cell table:formula="of:=COM.MICROSOFT.CONCAT([$dms.$L161];&quot; &quot;;[$dms.$M161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0" calcext:value-type="date">
            <text:p>20/11/2026</text:p>
          </table:table-cell>
          <table:table-cell table:formula="of:=MONTH([.J162])" office:value-type="float" office:value="11" calcext:value-type="float">
            <text:p>11</text:p>
          </table:table-cell>
          <table:table-cell table:formula="of:=COM.MICROSOFT.XLOOKUP([$dms.$K162];[.G:.G];[.H:.H])" office:value-type="string" office:string-value="Nov" calcext:value-type="string">
            <text:p>Nov</text:p>
          </table:table-cell>
          <table:table-cell table:formula="of:=YEAR([$dms.$J162])" office:value-type="float" office:value="2026" calcext:value-type="float">
            <text:p>2026</text:p>
          </table:table-cell>
          <table:table-cell table:formula="of:=COM.MICROSOFT.CONCAT([$dms.$L162];&quot; &quot;;[$dms.$M162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1" calcext:value-type="date">
            <text:p>21/11/2026</text:p>
          </table:table-cell>
          <table:table-cell table:formula="of:=MONTH([.J163])" office:value-type="float" office:value="11" calcext:value-type="float">
            <text:p>11</text:p>
          </table:table-cell>
          <table:table-cell table:formula="of:=COM.MICROSOFT.XLOOKUP([$dms.$K163];[.G:.G];[.H:.H])" office:value-type="string" office:string-value="Nov" calcext:value-type="string">
            <text:p>Nov</text:p>
          </table:table-cell>
          <table:table-cell table:formula="of:=YEAR([$dms.$J163])" office:value-type="float" office:value="2026" calcext:value-type="float">
            <text:p>2026</text:p>
          </table:table-cell>
          <table:table-cell table:formula="of:=COM.MICROSOFT.CONCAT([$dms.$L163];&quot; &quot;;[$dms.$M163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2" calcext:value-type="date">
            <text:p>22/11/2026</text:p>
          </table:table-cell>
          <table:table-cell table:formula="of:=MONTH([.J164])" office:value-type="float" office:value="11" calcext:value-type="float">
            <text:p>11</text:p>
          </table:table-cell>
          <table:table-cell table:formula="of:=COM.MICROSOFT.XLOOKUP([$dms.$K164];[.G:.G];[.H:.H])" office:value-type="string" office:string-value="Nov" calcext:value-type="string">
            <text:p>Nov</text:p>
          </table:table-cell>
          <table:table-cell table:formula="of:=YEAR([$dms.$J164])" office:value-type="float" office:value="2026" calcext:value-type="float">
            <text:p>2026</text:p>
          </table:table-cell>
          <table:table-cell table:formula="of:=COM.MICROSOFT.CONCAT([$dms.$L164];&quot; &quot;;[$dms.$M164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3" calcext:value-type="date">
            <text:p>23/11/2026</text:p>
          </table:table-cell>
          <table:table-cell table:formula="of:=MONTH([.J165])" office:value-type="float" office:value="11" calcext:value-type="float">
            <text:p>11</text:p>
          </table:table-cell>
          <table:table-cell table:formula="of:=COM.MICROSOFT.XLOOKUP([$dms.$K165];[.G:.G];[.H:.H])" office:value-type="string" office:string-value="Nov" calcext:value-type="string">
            <text:p>Nov</text:p>
          </table:table-cell>
          <table:table-cell table:formula="of:=YEAR([$dms.$J165])" office:value-type="float" office:value="2026" calcext:value-type="float">
            <text:p>2026</text:p>
          </table:table-cell>
          <table:table-cell table:formula="of:=COM.MICROSOFT.CONCAT([$dms.$L165];&quot; &quot;;[$dms.$M165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4" calcext:value-type="date">
            <text:p>24/11/2026</text:p>
          </table:table-cell>
          <table:table-cell table:formula="of:=MONTH([.J166])" office:value-type="float" office:value="11" calcext:value-type="float">
            <text:p>11</text:p>
          </table:table-cell>
          <table:table-cell table:formula="of:=COM.MICROSOFT.XLOOKUP([$dms.$K166];[.G:.G];[.H:.H])" office:value-type="string" office:string-value="Nov" calcext:value-type="string">
            <text:p>Nov</text:p>
          </table:table-cell>
          <table:table-cell table:formula="of:=YEAR([$dms.$J166])" office:value-type="float" office:value="2026" calcext:value-type="float">
            <text:p>2026</text:p>
          </table:table-cell>
          <table:table-cell table:formula="of:=COM.MICROSOFT.CONCAT([$dms.$L166];&quot; &quot;;[$dms.$M166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5" calcext:value-type="date">
            <text:p>25/11/2026</text:p>
          </table:table-cell>
          <table:table-cell table:formula="of:=MONTH([.J167])" office:value-type="float" office:value="11" calcext:value-type="float">
            <text:p>11</text:p>
          </table:table-cell>
          <table:table-cell table:formula="of:=COM.MICROSOFT.XLOOKUP([$dms.$K167];[.G:.G];[.H:.H])" office:value-type="string" office:string-value="Nov" calcext:value-type="string">
            <text:p>Nov</text:p>
          </table:table-cell>
          <table:table-cell table:formula="of:=YEAR([$dms.$J167])" office:value-type="float" office:value="2026" calcext:value-type="float">
            <text:p>2026</text:p>
          </table:table-cell>
          <table:table-cell table:formula="of:=COM.MICROSOFT.CONCAT([$dms.$L167];&quot; &quot;;[$dms.$M167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6" calcext:value-type="date">
            <text:p>26/11/2026</text:p>
          </table:table-cell>
          <table:table-cell table:formula="of:=MONTH([.J168])" office:value-type="float" office:value="11" calcext:value-type="float">
            <text:p>11</text:p>
          </table:table-cell>
          <table:table-cell table:formula="of:=COM.MICROSOFT.XLOOKUP([$dms.$K168];[.G:.G];[.H:.H])" office:value-type="string" office:string-value="Nov" calcext:value-type="string">
            <text:p>Nov</text:p>
          </table:table-cell>
          <table:table-cell table:formula="of:=YEAR([$dms.$J168])" office:value-type="float" office:value="2026" calcext:value-type="float">
            <text:p>2026</text:p>
          </table:table-cell>
          <table:table-cell table:formula="of:=COM.MICROSOFT.CONCAT([$dms.$L168];&quot; &quot;;[$dms.$M168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7" calcext:value-type="date">
            <text:p>27/11/2026</text:p>
          </table:table-cell>
          <table:table-cell table:formula="of:=MONTH([.J169])" office:value-type="float" office:value="11" calcext:value-type="float">
            <text:p>11</text:p>
          </table:table-cell>
          <table:table-cell table:formula="of:=COM.MICROSOFT.XLOOKUP([$dms.$K169];[.G:.G];[.H:.H])" office:value-type="string" office:string-value="Nov" calcext:value-type="string">
            <text:p>Nov</text:p>
          </table:table-cell>
          <table:table-cell table:formula="of:=YEAR([$dms.$J169])" office:value-type="float" office:value="2026" calcext:value-type="float">
            <text:p>2026</text:p>
          </table:table-cell>
          <table:table-cell table:formula="of:=COM.MICROSOFT.CONCAT([$dms.$L169];&quot; &quot;;[$dms.$M169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8" calcext:value-type="date">
            <text:p>28/11/2026</text:p>
          </table:table-cell>
          <table:table-cell table:formula="of:=MONTH([.J170])" office:value-type="float" office:value="11" calcext:value-type="float">
            <text:p>11</text:p>
          </table:table-cell>
          <table:table-cell table:formula="of:=COM.MICROSOFT.XLOOKUP([$dms.$K170];[.G:.G];[.H:.H])" office:value-type="string" office:string-value="Nov" calcext:value-type="string">
            <text:p>Nov</text:p>
          </table:table-cell>
          <table:table-cell table:formula="of:=YEAR([$dms.$J170])" office:value-type="float" office:value="2026" calcext:value-type="float">
            <text:p>2026</text:p>
          </table:table-cell>
          <table:table-cell table:formula="of:=COM.MICROSOFT.CONCAT([$dms.$L170];&quot; &quot;;[$dms.$M170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29" calcext:value-type="date">
            <text:p>29/11/2026</text:p>
          </table:table-cell>
          <table:table-cell table:formula="of:=MONTH([.J171])" office:value-type="float" office:value="11" calcext:value-type="float">
            <text:p>11</text:p>
          </table:table-cell>
          <table:table-cell table:formula="of:=COM.MICROSOFT.XLOOKUP([$dms.$K171];[.G:.G];[.H:.H])" office:value-type="string" office:string-value="Nov" calcext:value-type="string">
            <text:p>Nov</text:p>
          </table:table-cell>
          <table:table-cell table:formula="of:=YEAR([$dms.$J171])" office:value-type="float" office:value="2026" calcext:value-type="float">
            <text:p>2026</text:p>
          </table:table-cell>
          <table:table-cell table:formula="of:=COM.MICROSOFT.CONCAT([$dms.$L171];&quot; &quot;;[$dms.$M171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1-30" calcext:value-type="date">
            <text:p>30/11/2026</text:p>
          </table:table-cell>
          <table:table-cell table:formula="of:=MONTH([.J172])" office:value-type="float" office:value="11" calcext:value-type="float">
            <text:p>11</text:p>
          </table:table-cell>
          <table:table-cell table:formula="of:=COM.MICROSOFT.XLOOKUP([$dms.$K172];[.G:.G];[.H:.H])" office:value-type="string" office:string-value="Nov" calcext:value-type="string">
            <text:p>Nov</text:p>
          </table:table-cell>
          <table:table-cell table:formula="of:=YEAR([$dms.$J172])" office:value-type="float" office:value="2026" calcext:value-type="float">
            <text:p>2026</text:p>
          </table:table-cell>
          <table:table-cell table:formula="of:=COM.MICROSOFT.CONCAT([$dms.$L172];&quot; &quot;;[$dms.$M172])" office:value-type="string" office:string-value="Nov 2026" calcext:value-type="string">
            <text:p>Nov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01" calcext:value-type="date">
            <text:p>1/12/2026</text:p>
          </table:table-cell>
          <table:table-cell table:formula="of:=MONTH([.J173])" office:value-type="float" office:value="12" calcext:value-type="float">
            <text:p>12</text:p>
          </table:table-cell>
          <table:table-cell table:formula="of:=COM.MICROSOFT.XLOOKUP([$dms.$K173];[.G:.G];[.H:.H])" office:value-type="string" office:string-value="Dez" calcext:value-type="string">
            <text:p>Dez</text:p>
          </table:table-cell>
          <table:table-cell table:formula="of:=YEAR([$dms.$J173])" office:value-type="float" office:value="2026" calcext:value-type="float">
            <text:p>2026</text:p>
          </table:table-cell>
          <table:table-cell table:formula="of:=COM.MICROSOFT.CONCAT([$dms.$L173];&quot; &quot;;[$dms.$M173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02" calcext:value-type="date">
            <text:p>2/12/2026</text:p>
          </table:table-cell>
          <table:table-cell table:formula="of:=MONTH([.J174])" office:value-type="float" office:value="12" calcext:value-type="float">
            <text:p>12</text:p>
          </table:table-cell>
          <table:table-cell table:formula="of:=COM.MICROSOFT.XLOOKUP([$dms.$K174];[.G:.G];[.H:.H])" office:value-type="string" office:string-value="Dez" calcext:value-type="string">
            <text:p>Dez</text:p>
          </table:table-cell>
          <table:table-cell table:formula="of:=YEAR([$dms.$J174])" office:value-type="float" office:value="2026" calcext:value-type="float">
            <text:p>2026</text:p>
          </table:table-cell>
          <table:table-cell table:formula="of:=COM.MICROSOFT.CONCAT([$dms.$L174];&quot; &quot;;[$dms.$M174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03" calcext:value-type="date">
            <text:p>3/12/2026</text:p>
          </table:table-cell>
          <table:table-cell table:formula="of:=MONTH([.J175])" office:value-type="float" office:value="12" calcext:value-type="float">
            <text:p>12</text:p>
          </table:table-cell>
          <table:table-cell table:formula="of:=COM.MICROSOFT.XLOOKUP([$dms.$K175];[.G:.G];[.H:.H])" office:value-type="string" office:string-value="Dez" calcext:value-type="string">
            <text:p>Dez</text:p>
          </table:table-cell>
          <table:table-cell table:formula="of:=YEAR([$dms.$J175])" office:value-type="float" office:value="2026" calcext:value-type="float">
            <text:p>2026</text:p>
          </table:table-cell>
          <table:table-cell table:formula="of:=COM.MICROSOFT.CONCAT([$dms.$L175];&quot; &quot;;[$dms.$M175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04" calcext:value-type="date">
            <text:p>4/12/2026</text:p>
          </table:table-cell>
          <table:table-cell table:formula="of:=MONTH([.J176])" office:value-type="float" office:value="12" calcext:value-type="float">
            <text:p>12</text:p>
          </table:table-cell>
          <table:table-cell table:formula="of:=COM.MICROSOFT.XLOOKUP([$dms.$K176];[.G:.G];[.H:.H])" office:value-type="string" office:string-value="Dez" calcext:value-type="string">
            <text:p>Dez</text:p>
          </table:table-cell>
          <table:table-cell table:formula="of:=YEAR([$dms.$J176])" office:value-type="float" office:value="2026" calcext:value-type="float">
            <text:p>2026</text:p>
          </table:table-cell>
          <table:table-cell table:formula="of:=COM.MICROSOFT.CONCAT([$dms.$L176];&quot; &quot;;[$dms.$M176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05" calcext:value-type="date">
            <text:p>5/12/2026</text:p>
          </table:table-cell>
          <table:table-cell table:formula="of:=MONTH([.J177])" office:value-type="float" office:value="12" calcext:value-type="float">
            <text:p>12</text:p>
          </table:table-cell>
          <table:table-cell table:formula="of:=COM.MICROSOFT.XLOOKUP([$dms.$K177];[.G:.G];[.H:.H])" office:value-type="string" office:string-value="Dez" calcext:value-type="string">
            <text:p>Dez</text:p>
          </table:table-cell>
          <table:table-cell table:formula="of:=YEAR([$dms.$J177])" office:value-type="float" office:value="2026" calcext:value-type="float">
            <text:p>2026</text:p>
          </table:table-cell>
          <table:table-cell table:formula="of:=COM.MICROSOFT.CONCAT([$dms.$L177];&quot; &quot;;[$dms.$M177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06" calcext:value-type="date">
            <text:p>6/12/2026</text:p>
          </table:table-cell>
          <table:table-cell table:formula="of:=MONTH([.J178])" office:value-type="float" office:value="12" calcext:value-type="float">
            <text:p>12</text:p>
          </table:table-cell>
          <table:table-cell table:formula="of:=COM.MICROSOFT.XLOOKUP([$dms.$K178];[.G:.G];[.H:.H])" office:value-type="string" office:string-value="Dez" calcext:value-type="string">
            <text:p>Dez</text:p>
          </table:table-cell>
          <table:table-cell table:formula="of:=YEAR([$dms.$J178])" office:value-type="float" office:value="2026" calcext:value-type="float">
            <text:p>2026</text:p>
          </table:table-cell>
          <table:table-cell table:formula="of:=COM.MICROSOFT.CONCAT([$dms.$L178];&quot; &quot;;[$dms.$M178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07" calcext:value-type="date">
            <text:p>7/12/2026</text:p>
          </table:table-cell>
          <table:table-cell table:formula="of:=MONTH([.J179])" office:value-type="float" office:value="12" calcext:value-type="float">
            <text:p>12</text:p>
          </table:table-cell>
          <table:table-cell table:formula="of:=COM.MICROSOFT.XLOOKUP([$dms.$K179];[.G:.G];[.H:.H])" office:value-type="string" office:string-value="Dez" calcext:value-type="string">
            <text:p>Dez</text:p>
          </table:table-cell>
          <table:table-cell table:formula="of:=YEAR([$dms.$J179])" office:value-type="float" office:value="2026" calcext:value-type="float">
            <text:p>2026</text:p>
          </table:table-cell>
          <table:table-cell table:formula="of:=COM.MICROSOFT.CONCAT([$dms.$L179];&quot; &quot;;[$dms.$M179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08" calcext:value-type="date">
            <text:p>8/12/2026</text:p>
          </table:table-cell>
          <table:table-cell table:formula="of:=MONTH([.J180])" office:value-type="float" office:value="12" calcext:value-type="float">
            <text:p>12</text:p>
          </table:table-cell>
          <table:table-cell table:formula="of:=COM.MICROSOFT.XLOOKUP([$dms.$K180];[.G:.G];[.H:.H])" office:value-type="string" office:string-value="Dez" calcext:value-type="string">
            <text:p>Dez</text:p>
          </table:table-cell>
          <table:table-cell table:formula="of:=YEAR([$dms.$J180])" office:value-type="float" office:value="2026" calcext:value-type="float">
            <text:p>2026</text:p>
          </table:table-cell>
          <table:table-cell table:formula="of:=COM.MICROSOFT.CONCAT([$dms.$L180];&quot; &quot;;[$dms.$M180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09" calcext:value-type="date">
            <text:p>9/12/2026</text:p>
          </table:table-cell>
          <table:table-cell table:formula="of:=MONTH([.J181])" office:value-type="float" office:value="12" calcext:value-type="float">
            <text:p>12</text:p>
          </table:table-cell>
          <table:table-cell table:formula="of:=COM.MICROSOFT.XLOOKUP([$dms.$K181];[.G:.G];[.H:.H])" office:value-type="string" office:string-value="Dez" calcext:value-type="string">
            <text:p>Dez</text:p>
          </table:table-cell>
          <table:table-cell table:formula="of:=YEAR([$dms.$J181])" office:value-type="float" office:value="2026" calcext:value-type="float">
            <text:p>2026</text:p>
          </table:table-cell>
          <table:table-cell table:formula="of:=COM.MICROSOFT.CONCAT([$dms.$L181];&quot; &quot;;[$dms.$M181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0" calcext:value-type="date">
            <text:p>10/12/2026</text:p>
          </table:table-cell>
          <table:table-cell table:formula="of:=MONTH([.J182])" office:value-type="float" office:value="12" calcext:value-type="float">
            <text:p>12</text:p>
          </table:table-cell>
          <table:table-cell table:formula="of:=COM.MICROSOFT.XLOOKUP([$dms.$K182];[.G:.G];[.H:.H])" office:value-type="string" office:string-value="Dez" calcext:value-type="string">
            <text:p>Dez</text:p>
          </table:table-cell>
          <table:table-cell table:formula="of:=YEAR([$dms.$J182])" office:value-type="float" office:value="2026" calcext:value-type="float">
            <text:p>2026</text:p>
          </table:table-cell>
          <table:table-cell table:formula="of:=COM.MICROSOFT.CONCAT([$dms.$L182];&quot; &quot;;[$dms.$M182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1" calcext:value-type="date">
            <text:p>11/12/2026</text:p>
          </table:table-cell>
          <table:table-cell table:formula="of:=MONTH([.J183])" office:value-type="float" office:value="12" calcext:value-type="float">
            <text:p>12</text:p>
          </table:table-cell>
          <table:table-cell table:formula="of:=COM.MICROSOFT.XLOOKUP([$dms.$K183];[.G:.G];[.H:.H])" office:value-type="string" office:string-value="Dez" calcext:value-type="string">
            <text:p>Dez</text:p>
          </table:table-cell>
          <table:table-cell table:formula="of:=YEAR([$dms.$J183])" office:value-type="float" office:value="2026" calcext:value-type="float">
            <text:p>2026</text:p>
          </table:table-cell>
          <table:table-cell table:formula="of:=COM.MICROSOFT.CONCAT([$dms.$L183];&quot; &quot;;[$dms.$M183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2" calcext:value-type="date">
            <text:p>12/12/2026</text:p>
          </table:table-cell>
          <table:table-cell table:formula="of:=MONTH([.J184])" office:value-type="float" office:value="12" calcext:value-type="float">
            <text:p>12</text:p>
          </table:table-cell>
          <table:table-cell table:formula="of:=COM.MICROSOFT.XLOOKUP([$dms.$K184];[.G:.G];[.H:.H])" office:value-type="string" office:string-value="Dez" calcext:value-type="string">
            <text:p>Dez</text:p>
          </table:table-cell>
          <table:table-cell table:formula="of:=YEAR([$dms.$J184])" office:value-type="float" office:value="2026" calcext:value-type="float">
            <text:p>2026</text:p>
          </table:table-cell>
          <table:table-cell table:formula="of:=COM.MICROSOFT.CONCAT([$dms.$L184];&quot; &quot;;[$dms.$M184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3" calcext:value-type="date">
            <text:p>13/12/2026</text:p>
          </table:table-cell>
          <table:table-cell table:formula="of:=MONTH([.J185])" office:value-type="float" office:value="12" calcext:value-type="float">
            <text:p>12</text:p>
          </table:table-cell>
          <table:table-cell table:formula="of:=COM.MICROSOFT.XLOOKUP([$dms.$K185];[.G:.G];[.H:.H])" office:value-type="string" office:string-value="Dez" calcext:value-type="string">
            <text:p>Dez</text:p>
          </table:table-cell>
          <table:table-cell table:formula="of:=YEAR([$dms.$J185])" office:value-type="float" office:value="2026" calcext:value-type="float">
            <text:p>2026</text:p>
          </table:table-cell>
          <table:table-cell table:formula="of:=COM.MICROSOFT.CONCAT([$dms.$L185];&quot; &quot;;[$dms.$M185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4" calcext:value-type="date">
            <text:p>14/12/2026</text:p>
          </table:table-cell>
          <table:table-cell table:formula="of:=MONTH([.J186])" office:value-type="float" office:value="12" calcext:value-type="float">
            <text:p>12</text:p>
          </table:table-cell>
          <table:table-cell table:formula="of:=COM.MICROSOFT.XLOOKUP([$dms.$K186];[.G:.G];[.H:.H])" office:value-type="string" office:string-value="Dez" calcext:value-type="string">
            <text:p>Dez</text:p>
          </table:table-cell>
          <table:table-cell table:formula="of:=YEAR([$dms.$J186])" office:value-type="float" office:value="2026" calcext:value-type="float">
            <text:p>2026</text:p>
          </table:table-cell>
          <table:table-cell table:formula="of:=COM.MICROSOFT.CONCAT([$dms.$L186];&quot; &quot;;[$dms.$M186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5" calcext:value-type="date">
            <text:p>15/12/2026</text:p>
          </table:table-cell>
          <table:table-cell table:formula="of:=MONTH([.J187])" office:value-type="float" office:value="12" calcext:value-type="float">
            <text:p>12</text:p>
          </table:table-cell>
          <table:table-cell table:formula="of:=COM.MICROSOFT.XLOOKUP([$dms.$K187];[.G:.G];[.H:.H])" office:value-type="string" office:string-value="Dez" calcext:value-type="string">
            <text:p>Dez</text:p>
          </table:table-cell>
          <table:table-cell table:formula="of:=YEAR([$dms.$J187])" office:value-type="float" office:value="2026" calcext:value-type="float">
            <text:p>2026</text:p>
          </table:table-cell>
          <table:table-cell table:formula="of:=COM.MICROSOFT.CONCAT([$dms.$L187];&quot; &quot;;[$dms.$M187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6" calcext:value-type="date">
            <text:p>16/12/2026</text:p>
          </table:table-cell>
          <table:table-cell table:formula="of:=MONTH([.J188])" office:value-type="float" office:value="12" calcext:value-type="float">
            <text:p>12</text:p>
          </table:table-cell>
          <table:table-cell table:formula="of:=COM.MICROSOFT.XLOOKUP([$dms.$K188];[.G:.G];[.H:.H])" office:value-type="string" office:string-value="Dez" calcext:value-type="string">
            <text:p>Dez</text:p>
          </table:table-cell>
          <table:table-cell table:formula="of:=YEAR([$dms.$J188])" office:value-type="float" office:value="2026" calcext:value-type="float">
            <text:p>2026</text:p>
          </table:table-cell>
          <table:table-cell table:formula="of:=COM.MICROSOFT.CONCAT([$dms.$L188];&quot; &quot;;[$dms.$M188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7" calcext:value-type="date">
            <text:p>17/12/2026</text:p>
          </table:table-cell>
          <table:table-cell table:formula="of:=MONTH([.J189])" office:value-type="float" office:value="12" calcext:value-type="float">
            <text:p>12</text:p>
          </table:table-cell>
          <table:table-cell table:formula="of:=COM.MICROSOFT.XLOOKUP([$dms.$K189];[.G:.G];[.H:.H])" office:value-type="string" office:string-value="Dez" calcext:value-type="string">
            <text:p>Dez</text:p>
          </table:table-cell>
          <table:table-cell table:formula="of:=YEAR([$dms.$J189])" office:value-type="float" office:value="2026" calcext:value-type="float">
            <text:p>2026</text:p>
          </table:table-cell>
          <table:table-cell table:formula="of:=COM.MICROSOFT.CONCAT([$dms.$L189];&quot; &quot;;[$dms.$M189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8" calcext:value-type="date">
            <text:p>18/12/2026</text:p>
          </table:table-cell>
          <table:table-cell table:formula="of:=MONTH([.J190])" office:value-type="float" office:value="12" calcext:value-type="float">
            <text:p>12</text:p>
          </table:table-cell>
          <table:table-cell table:formula="of:=COM.MICROSOFT.XLOOKUP([$dms.$K190];[.G:.G];[.H:.H])" office:value-type="string" office:string-value="Dez" calcext:value-type="string">
            <text:p>Dez</text:p>
          </table:table-cell>
          <table:table-cell table:formula="of:=YEAR([$dms.$J190])" office:value-type="float" office:value="2026" calcext:value-type="float">
            <text:p>2026</text:p>
          </table:table-cell>
          <table:table-cell table:formula="of:=COM.MICROSOFT.CONCAT([$dms.$L190];&quot; &quot;;[$dms.$M190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19" calcext:value-type="date">
            <text:p>19/12/2026</text:p>
          </table:table-cell>
          <table:table-cell table:formula="of:=MONTH([.J191])" office:value-type="float" office:value="12" calcext:value-type="float">
            <text:p>12</text:p>
          </table:table-cell>
          <table:table-cell table:formula="of:=COM.MICROSOFT.XLOOKUP([$dms.$K191];[.G:.G];[.H:.H])" office:value-type="string" office:string-value="Dez" calcext:value-type="string">
            <text:p>Dez</text:p>
          </table:table-cell>
          <table:table-cell table:formula="of:=YEAR([$dms.$J191])" office:value-type="float" office:value="2026" calcext:value-type="float">
            <text:p>2026</text:p>
          </table:table-cell>
          <table:table-cell table:formula="of:=COM.MICROSOFT.CONCAT([$dms.$L191];&quot; &quot;;[$dms.$M191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0" calcext:value-type="date">
            <text:p>20/12/2026</text:p>
          </table:table-cell>
          <table:table-cell table:formula="of:=MONTH([.J192])" office:value-type="float" office:value="12" calcext:value-type="float">
            <text:p>12</text:p>
          </table:table-cell>
          <table:table-cell table:formula="of:=COM.MICROSOFT.XLOOKUP([$dms.$K192];[.G:.G];[.H:.H])" office:value-type="string" office:string-value="Dez" calcext:value-type="string">
            <text:p>Dez</text:p>
          </table:table-cell>
          <table:table-cell table:formula="of:=YEAR([$dms.$J192])" office:value-type="float" office:value="2026" calcext:value-type="float">
            <text:p>2026</text:p>
          </table:table-cell>
          <table:table-cell table:formula="of:=COM.MICROSOFT.CONCAT([$dms.$L192];&quot; &quot;;[$dms.$M192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1" calcext:value-type="date">
            <text:p>21/12/2026</text:p>
          </table:table-cell>
          <table:table-cell table:formula="of:=MONTH([.J193])" office:value-type="float" office:value="12" calcext:value-type="float">
            <text:p>12</text:p>
          </table:table-cell>
          <table:table-cell table:formula="of:=COM.MICROSOFT.XLOOKUP([$dms.$K193];[.G:.G];[.H:.H])" office:value-type="string" office:string-value="Dez" calcext:value-type="string">
            <text:p>Dez</text:p>
          </table:table-cell>
          <table:table-cell table:formula="of:=YEAR([$dms.$J193])" office:value-type="float" office:value="2026" calcext:value-type="float">
            <text:p>2026</text:p>
          </table:table-cell>
          <table:table-cell table:formula="of:=COM.MICROSOFT.CONCAT([$dms.$L193];&quot; &quot;;[$dms.$M193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2" calcext:value-type="date">
            <text:p>22/12/2026</text:p>
          </table:table-cell>
          <table:table-cell table:formula="of:=MONTH([.J194])" office:value-type="float" office:value="12" calcext:value-type="float">
            <text:p>12</text:p>
          </table:table-cell>
          <table:table-cell table:formula="of:=COM.MICROSOFT.XLOOKUP([$dms.$K194];[.G:.G];[.H:.H])" office:value-type="string" office:string-value="Dez" calcext:value-type="string">
            <text:p>Dez</text:p>
          </table:table-cell>
          <table:table-cell table:formula="of:=YEAR([$dms.$J194])" office:value-type="float" office:value="2026" calcext:value-type="float">
            <text:p>2026</text:p>
          </table:table-cell>
          <table:table-cell table:formula="of:=COM.MICROSOFT.CONCAT([$dms.$L194];&quot; &quot;;[$dms.$M194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3" calcext:value-type="date">
            <text:p>23/12/2026</text:p>
          </table:table-cell>
          <table:table-cell table:formula="of:=MONTH([.J195])" office:value-type="float" office:value="12" calcext:value-type="float">
            <text:p>12</text:p>
          </table:table-cell>
          <table:table-cell table:formula="of:=COM.MICROSOFT.XLOOKUP([$dms.$K195];[.G:.G];[.H:.H])" office:value-type="string" office:string-value="Dez" calcext:value-type="string">
            <text:p>Dez</text:p>
          </table:table-cell>
          <table:table-cell table:formula="of:=YEAR([$dms.$J195])" office:value-type="float" office:value="2026" calcext:value-type="float">
            <text:p>2026</text:p>
          </table:table-cell>
          <table:table-cell table:formula="of:=COM.MICROSOFT.CONCAT([$dms.$L195];&quot; &quot;;[$dms.$M195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4" calcext:value-type="date">
            <text:p>24/12/2026</text:p>
          </table:table-cell>
          <table:table-cell table:formula="of:=MONTH([.J196])" office:value-type="float" office:value="12" calcext:value-type="float">
            <text:p>12</text:p>
          </table:table-cell>
          <table:table-cell table:formula="of:=COM.MICROSOFT.XLOOKUP([$dms.$K196];[.G:.G];[.H:.H])" office:value-type="string" office:string-value="Dez" calcext:value-type="string">
            <text:p>Dez</text:p>
          </table:table-cell>
          <table:table-cell table:formula="of:=YEAR([$dms.$J196])" office:value-type="float" office:value="2026" calcext:value-type="float">
            <text:p>2026</text:p>
          </table:table-cell>
          <table:table-cell table:formula="of:=COM.MICROSOFT.CONCAT([$dms.$L196];&quot; &quot;;[$dms.$M196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5" calcext:value-type="date">
            <text:p>25/12/2026</text:p>
          </table:table-cell>
          <table:table-cell table:formula="of:=MONTH([.J197])" office:value-type="float" office:value="12" calcext:value-type="float">
            <text:p>12</text:p>
          </table:table-cell>
          <table:table-cell table:formula="of:=COM.MICROSOFT.XLOOKUP([$dms.$K197];[.G:.G];[.H:.H])" office:value-type="string" office:string-value="Dez" calcext:value-type="string">
            <text:p>Dez</text:p>
          </table:table-cell>
          <table:table-cell table:formula="of:=YEAR([$dms.$J197])" office:value-type="float" office:value="2026" calcext:value-type="float">
            <text:p>2026</text:p>
          </table:table-cell>
          <table:table-cell table:formula="of:=COM.MICROSOFT.CONCAT([$dms.$L197];&quot; &quot;;[$dms.$M197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6" calcext:value-type="date">
            <text:p>26/12/2026</text:p>
          </table:table-cell>
          <table:table-cell table:formula="of:=MONTH([.J198])" office:value-type="float" office:value="12" calcext:value-type="float">
            <text:p>12</text:p>
          </table:table-cell>
          <table:table-cell table:formula="of:=COM.MICROSOFT.XLOOKUP([$dms.$K198];[.G:.G];[.H:.H])" office:value-type="string" office:string-value="Dez" calcext:value-type="string">
            <text:p>Dez</text:p>
          </table:table-cell>
          <table:table-cell table:formula="of:=YEAR([$dms.$J198])" office:value-type="float" office:value="2026" calcext:value-type="float">
            <text:p>2026</text:p>
          </table:table-cell>
          <table:table-cell table:formula="of:=COM.MICROSOFT.CONCAT([$dms.$L198];&quot; &quot;;[$dms.$M198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7" calcext:value-type="date">
            <text:p>27/12/2026</text:p>
          </table:table-cell>
          <table:table-cell table:formula="of:=MONTH([.J199])" office:value-type="float" office:value="12" calcext:value-type="float">
            <text:p>12</text:p>
          </table:table-cell>
          <table:table-cell table:formula="of:=COM.MICROSOFT.XLOOKUP([$dms.$K199];[.G:.G];[.H:.H])" office:value-type="string" office:string-value="Dez" calcext:value-type="string">
            <text:p>Dez</text:p>
          </table:table-cell>
          <table:table-cell table:formula="of:=YEAR([$dms.$J199])" office:value-type="float" office:value="2026" calcext:value-type="float">
            <text:p>2026</text:p>
          </table:table-cell>
          <table:table-cell table:formula="of:=COM.MICROSOFT.CONCAT([$dms.$L199];&quot; &quot;;[$dms.$M199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8" calcext:value-type="date">
            <text:p>28/12/2026</text:p>
          </table:table-cell>
          <table:table-cell table:formula="of:=MONTH([.J200])" office:value-type="float" office:value="12" calcext:value-type="float">
            <text:p>12</text:p>
          </table:table-cell>
          <table:table-cell table:formula="of:=COM.MICROSOFT.XLOOKUP([$dms.$K200];[.G:.G];[.H:.H])" office:value-type="string" office:string-value="Dez" calcext:value-type="string">
            <text:p>Dez</text:p>
          </table:table-cell>
          <table:table-cell table:formula="of:=YEAR([$dms.$J200])" office:value-type="float" office:value="2026" calcext:value-type="float">
            <text:p>2026</text:p>
          </table:table-cell>
          <table:table-cell table:formula="of:=COM.MICROSOFT.CONCAT([$dms.$L200];&quot; &quot;;[$dms.$M200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29" calcext:value-type="date">
            <text:p>29/12/2026</text:p>
          </table:table-cell>
          <table:table-cell table:formula="of:=MONTH([.J201])" office:value-type="float" office:value="12" calcext:value-type="float">
            <text:p>12</text:p>
          </table:table-cell>
          <table:table-cell table:formula="of:=COM.MICROSOFT.XLOOKUP([$dms.$K201];[.G:.G];[.H:.H])" office:value-type="string" office:string-value="Dez" calcext:value-type="string">
            <text:p>Dez</text:p>
          </table:table-cell>
          <table:table-cell table:formula="of:=YEAR([$dms.$J201])" office:value-type="float" office:value="2026" calcext:value-type="float">
            <text:p>2026</text:p>
          </table:table-cell>
          <table:table-cell table:formula="of:=COM.MICROSOFT.CONCAT([$dms.$L201];&quot; &quot;;[$dms.$M201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30" calcext:value-type="date">
            <text:p>30/12/2026</text:p>
          </table:table-cell>
          <table:table-cell table:formula="of:=MONTH([.J202])" office:value-type="float" office:value="12" calcext:value-type="float">
            <text:p>12</text:p>
          </table:table-cell>
          <table:table-cell table:formula="of:=COM.MICROSOFT.XLOOKUP([$dms.$K202];[.G:.G];[.H:.H])" office:value-type="string" office:string-value="Dez" calcext:value-type="string">
            <text:p>Dez</text:p>
          </table:table-cell>
          <table:table-cell table:formula="of:=YEAR([$dms.$J202])" office:value-type="float" office:value="2026" calcext:value-type="float">
            <text:p>2026</text:p>
          </table:table-cell>
          <table:table-cell table:formula="of:=COM.MICROSOFT.CONCAT([$dms.$L202];&quot; &quot;;[$dms.$M202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6-12-31" calcext:value-type="date">
            <text:p>31/12/2026</text:p>
          </table:table-cell>
          <table:table-cell table:formula="of:=MONTH([.J203])" office:value-type="float" office:value="12" calcext:value-type="float">
            <text:p>12</text:p>
          </table:table-cell>
          <table:table-cell table:formula="of:=COM.MICROSOFT.XLOOKUP([$dms.$K203];[.G:.G];[.H:.H])" office:value-type="string" office:string-value="Dez" calcext:value-type="string">
            <text:p>Dez</text:p>
          </table:table-cell>
          <table:table-cell table:formula="of:=YEAR([$dms.$J203])" office:value-type="float" office:value="2026" calcext:value-type="float">
            <text:p>2026</text:p>
          </table:table-cell>
          <table:table-cell table:formula="of:=COM.MICROSOFT.CONCAT([$dms.$L203];&quot; &quot;;[$dms.$M203])" office:value-type="string" office:string-value="Dez 2026" calcext:value-type="string">
            <text:p>Dez 202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01" calcext:value-type="date">
            <text:p>1/1/2027</text:p>
          </table:table-cell>
          <table:table-cell table:formula="of:=MONTH([.J204])" office:value-type="float" office:value="1" calcext:value-type="float">
            <text:p>1</text:p>
          </table:table-cell>
          <table:table-cell table:formula="of:=COM.MICROSOFT.XLOOKUP([$dms.$K204];[.G:.G];[.H:.H])" office:value-type="string" office:string-value="Jan" calcext:value-type="string">
            <text:p>Jan</text:p>
          </table:table-cell>
          <table:table-cell table:formula="of:=YEAR([$dms.$J204])" office:value-type="float" office:value="2027" calcext:value-type="float">
            <text:p>2027</text:p>
          </table:table-cell>
          <table:table-cell table:formula="of:=COM.MICROSOFT.CONCAT([$dms.$L204];&quot; &quot;;[$dms.$M204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02" calcext:value-type="date">
            <text:p>2/1/2027</text:p>
          </table:table-cell>
          <table:table-cell table:formula="of:=MONTH([.J205])" office:value-type="float" office:value="1" calcext:value-type="float">
            <text:p>1</text:p>
          </table:table-cell>
          <table:table-cell table:formula="of:=COM.MICROSOFT.XLOOKUP([$dms.$K205];[.G:.G];[.H:.H])" office:value-type="string" office:string-value="Jan" calcext:value-type="string">
            <text:p>Jan</text:p>
          </table:table-cell>
          <table:table-cell table:formula="of:=YEAR([$dms.$J205])" office:value-type="float" office:value="2027" calcext:value-type="float">
            <text:p>2027</text:p>
          </table:table-cell>
          <table:table-cell table:formula="of:=COM.MICROSOFT.CONCAT([$dms.$L205];&quot; &quot;;[$dms.$M205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03" calcext:value-type="date">
            <text:p>3/1/2027</text:p>
          </table:table-cell>
          <table:table-cell table:formula="of:=MONTH([.J206])" office:value-type="float" office:value="1" calcext:value-type="float">
            <text:p>1</text:p>
          </table:table-cell>
          <table:table-cell table:formula="of:=COM.MICROSOFT.XLOOKUP([$dms.$K206];[.G:.G];[.H:.H])" office:value-type="string" office:string-value="Jan" calcext:value-type="string">
            <text:p>Jan</text:p>
          </table:table-cell>
          <table:table-cell table:formula="of:=YEAR([$dms.$J206])" office:value-type="float" office:value="2027" calcext:value-type="float">
            <text:p>2027</text:p>
          </table:table-cell>
          <table:table-cell table:formula="of:=COM.MICROSOFT.CONCAT([$dms.$L206];&quot; &quot;;[$dms.$M206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04" calcext:value-type="date">
            <text:p>4/1/2027</text:p>
          </table:table-cell>
          <table:table-cell table:formula="of:=MONTH([.J207])" office:value-type="float" office:value="1" calcext:value-type="float">
            <text:p>1</text:p>
          </table:table-cell>
          <table:table-cell table:formula="of:=COM.MICROSOFT.XLOOKUP([$dms.$K207];[.G:.G];[.H:.H])" office:value-type="string" office:string-value="Jan" calcext:value-type="string">
            <text:p>Jan</text:p>
          </table:table-cell>
          <table:table-cell table:formula="of:=YEAR([$dms.$J207])" office:value-type="float" office:value="2027" calcext:value-type="float">
            <text:p>2027</text:p>
          </table:table-cell>
          <table:table-cell table:formula="of:=COM.MICROSOFT.CONCAT([$dms.$L207];&quot; &quot;;[$dms.$M207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05" calcext:value-type="date">
            <text:p>5/1/2027</text:p>
          </table:table-cell>
          <table:table-cell table:formula="of:=MONTH([.J208])" office:value-type="float" office:value="1" calcext:value-type="float">
            <text:p>1</text:p>
          </table:table-cell>
          <table:table-cell table:formula="of:=COM.MICROSOFT.XLOOKUP([$dms.$K208];[.G:.G];[.H:.H])" office:value-type="string" office:string-value="Jan" calcext:value-type="string">
            <text:p>Jan</text:p>
          </table:table-cell>
          <table:table-cell table:formula="of:=YEAR([$dms.$J208])" office:value-type="float" office:value="2027" calcext:value-type="float">
            <text:p>2027</text:p>
          </table:table-cell>
          <table:table-cell table:formula="of:=COM.MICROSOFT.CONCAT([$dms.$L208];&quot; &quot;;[$dms.$M208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06" calcext:value-type="date">
            <text:p>6/1/2027</text:p>
          </table:table-cell>
          <table:table-cell table:formula="of:=MONTH([.J209])" office:value-type="float" office:value="1" calcext:value-type="float">
            <text:p>1</text:p>
          </table:table-cell>
          <table:table-cell table:formula="of:=COM.MICROSOFT.XLOOKUP([$dms.$K209];[.G:.G];[.H:.H])" office:value-type="string" office:string-value="Jan" calcext:value-type="string">
            <text:p>Jan</text:p>
          </table:table-cell>
          <table:table-cell table:formula="of:=YEAR([$dms.$J209])" office:value-type="float" office:value="2027" calcext:value-type="float">
            <text:p>2027</text:p>
          </table:table-cell>
          <table:table-cell table:formula="of:=COM.MICROSOFT.CONCAT([$dms.$L209];&quot; &quot;;[$dms.$M209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07" calcext:value-type="date">
            <text:p>7/1/2027</text:p>
          </table:table-cell>
          <table:table-cell table:formula="of:=MONTH([.J210])" office:value-type="float" office:value="1" calcext:value-type="float">
            <text:p>1</text:p>
          </table:table-cell>
          <table:table-cell table:formula="of:=COM.MICROSOFT.XLOOKUP([$dms.$K210];[.G:.G];[.H:.H])" office:value-type="string" office:string-value="Jan" calcext:value-type="string">
            <text:p>Jan</text:p>
          </table:table-cell>
          <table:table-cell table:formula="of:=YEAR([$dms.$J210])" office:value-type="float" office:value="2027" calcext:value-type="float">
            <text:p>2027</text:p>
          </table:table-cell>
          <table:table-cell table:formula="of:=COM.MICROSOFT.CONCAT([$dms.$L210];&quot; &quot;;[$dms.$M210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08" calcext:value-type="date">
            <text:p>8/1/2027</text:p>
          </table:table-cell>
          <table:table-cell table:formula="of:=MONTH([.J211])" office:value-type="float" office:value="1" calcext:value-type="float">
            <text:p>1</text:p>
          </table:table-cell>
          <table:table-cell table:formula="of:=COM.MICROSOFT.XLOOKUP([$dms.$K211];[.G:.G];[.H:.H])" office:value-type="string" office:string-value="Jan" calcext:value-type="string">
            <text:p>Jan</text:p>
          </table:table-cell>
          <table:table-cell table:formula="of:=YEAR([$dms.$J211])" office:value-type="float" office:value="2027" calcext:value-type="float">
            <text:p>2027</text:p>
          </table:table-cell>
          <table:table-cell table:formula="of:=COM.MICROSOFT.CONCAT([$dms.$L211];&quot; &quot;;[$dms.$M211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09" calcext:value-type="date">
            <text:p>9/1/2027</text:p>
          </table:table-cell>
          <table:table-cell table:formula="of:=MONTH([.J212])" office:value-type="float" office:value="1" calcext:value-type="float">
            <text:p>1</text:p>
          </table:table-cell>
          <table:table-cell table:formula="of:=COM.MICROSOFT.XLOOKUP([$dms.$K212];[.G:.G];[.H:.H])" office:value-type="string" office:string-value="Jan" calcext:value-type="string">
            <text:p>Jan</text:p>
          </table:table-cell>
          <table:table-cell table:formula="of:=YEAR([$dms.$J212])" office:value-type="float" office:value="2027" calcext:value-type="float">
            <text:p>2027</text:p>
          </table:table-cell>
          <table:table-cell table:formula="of:=COM.MICROSOFT.CONCAT([$dms.$L212];&quot; &quot;;[$dms.$M212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0" calcext:value-type="date">
            <text:p>10/1/2027</text:p>
          </table:table-cell>
          <table:table-cell table:formula="of:=MONTH([.J213])" office:value-type="float" office:value="1" calcext:value-type="float">
            <text:p>1</text:p>
          </table:table-cell>
          <table:table-cell table:formula="of:=COM.MICROSOFT.XLOOKUP([$dms.$K213];[.G:.G];[.H:.H])" office:value-type="string" office:string-value="Jan" calcext:value-type="string">
            <text:p>Jan</text:p>
          </table:table-cell>
          <table:table-cell table:formula="of:=YEAR([$dms.$J213])" office:value-type="float" office:value="2027" calcext:value-type="float">
            <text:p>2027</text:p>
          </table:table-cell>
          <table:table-cell table:formula="of:=COM.MICROSOFT.CONCAT([$dms.$L213];&quot; &quot;;[$dms.$M213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1" calcext:value-type="date">
            <text:p>11/1/2027</text:p>
          </table:table-cell>
          <table:table-cell table:formula="of:=MONTH([.J214])" office:value-type="float" office:value="1" calcext:value-type="float">
            <text:p>1</text:p>
          </table:table-cell>
          <table:table-cell table:formula="of:=COM.MICROSOFT.XLOOKUP([$dms.$K214];[.G:.G];[.H:.H])" office:value-type="string" office:string-value="Jan" calcext:value-type="string">
            <text:p>Jan</text:p>
          </table:table-cell>
          <table:table-cell table:formula="of:=YEAR([$dms.$J214])" office:value-type="float" office:value="2027" calcext:value-type="float">
            <text:p>2027</text:p>
          </table:table-cell>
          <table:table-cell table:formula="of:=COM.MICROSOFT.CONCAT([$dms.$L214];&quot; &quot;;[$dms.$M214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2" calcext:value-type="date">
            <text:p>12/1/2027</text:p>
          </table:table-cell>
          <table:table-cell table:formula="of:=MONTH([.J215])" office:value-type="float" office:value="1" calcext:value-type="float">
            <text:p>1</text:p>
          </table:table-cell>
          <table:table-cell table:formula="of:=COM.MICROSOFT.XLOOKUP([$dms.$K215];[.G:.G];[.H:.H])" office:value-type="string" office:string-value="Jan" calcext:value-type="string">
            <text:p>Jan</text:p>
          </table:table-cell>
          <table:table-cell table:formula="of:=YEAR([$dms.$J215])" office:value-type="float" office:value="2027" calcext:value-type="float">
            <text:p>2027</text:p>
          </table:table-cell>
          <table:table-cell table:formula="of:=COM.MICROSOFT.CONCAT([$dms.$L215];&quot; &quot;;[$dms.$M215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3" calcext:value-type="date">
            <text:p>13/1/2027</text:p>
          </table:table-cell>
          <table:table-cell table:formula="of:=MONTH([.J216])" office:value-type="float" office:value="1" calcext:value-type="float">
            <text:p>1</text:p>
          </table:table-cell>
          <table:table-cell table:formula="of:=COM.MICROSOFT.XLOOKUP([$dms.$K216];[.G:.G];[.H:.H])" office:value-type="string" office:string-value="Jan" calcext:value-type="string">
            <text:p>Jan</text:p>
          </table:table-cell>
          <table:table-cell table:formula="of:=YEAR([$dms.$J216])" office:value-type="float" office:value="2027" calcext:value-type="float">
            <text:p>2027</text:p>
          </table:table-cell>
          <table:table-cell table:formula="of:=COM.MICROSOFT.CONCAT([$dms.$L216];&quot; &quot;;[$dms.$M216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4" calcext:value-type="date">
            <text:p>14/1/2027</text:p>
          </table:table-cell>
          <table:table-cell table:formula="of:=MONTH([.J217])" office:value-type="float" office:value="1" calcext:value-type="float">
            <text:p>1</text:p>
          </table:table-cell>
          <table:table-cell table:formula="of:=COM.MICROSOFT.XLOOKUP([$dms.$K217];[.G:.G];[.H:.H])" office:value-type="string" office:string-value="Jan" calcext:value-type="string">
            <text:p>Jan</text:p>
          </table:table-cell>
          <table:table-cell table:formula="of:=YEAR([$dms.$J217])" office:value-type="float" office:value="2027" calcext:value-type="float">
            <text:p>2027</text:p>
          </table:table-cell>
          <table:table-cell table:formula="of:=COM.MICROSOFT.CONCAT([$dms.$L217];&quot; &quot;;[$dms.$M217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5" calcext:value-type="date">
            <text:p>15/1/2027</text:p>
          </table:table-cell>
          <table:table-cell table:formula="of:=MONTH([.J218])" office:value-type="float" office:value="1" calcext:value-type="float">
            <text:p>1</text:p>
          </table:table-cell>
          <table:table-cell table:formula="of:=COM.MICROSOFT.XLOOKUP([$dms.$K218];[.G:.G];[.H:.H])" office:value-type="string" office:string-value="Jan" calcext:value-type="string">
            <text:p>Jan</text:p>
          </table:table-cell>
          <table:table-cell table:formula="of:=YEAR([$dms.$J218])" office:value-type="float" office:value="2027" calcext:value-type="float">
            <text:p>2027</text:p>
          </table:table-cell>
          <table:table-cell table:formula="of:=COM.MICROSOFT.CONCAT([$dms.$L218];&quot; &quot;;[$dms.$M218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6" calcext:value-type="date">
            <text:p>16/1/2027</text:p>
          </table:table-cell>
          <table:table-cell table:formula="of:=MONTH([.J219])" office:value-type="float" office:value="1" calcext:value-type="float">
            <text:p>1</text:p>
          </table:table-cell>
          <table:table-cell table:formula="of:=COM.MICROSOFT.XLOOKUP([$dms.$K219];[.G:.G];[.H:.H])" office:value-type="string" office:string-value="Jan" calcext:value-type="string">
            <text:p>Jan</text:p>
          </table:table-cell>
          <table:table-cell table:formula="of:=YEAR([$dms.$J219])" office:value-type="float" office:value="2027" calcext:value-type="float">
            <text:p>2027</text:p>
          </table:table-cell>
          <table:table-cell table:formula="of:=COM.MICROSOFT.CONCAT([$dms.$L219];&quot; &quot;;[$dms.$M219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7" calcext:value-type="date">
            <text:p>17/1/2027</text:p>
          </table:table-cell>
          <table:table-cell table:formula="of:=MONTH([.J220])" office:value-type="float" office:value="1" calcext:value-type="float">
            <text:p>1</text:p>
          </table:table-cell>
          <table:table-cell table:formula="of:=COM.MICROSOFT.XLOOKUP([$dms.$K220];[.G:.G];[.H:.H])" office:value-type="string" office:string-value="Jan" calcext:value-type="string">
            <text:p>Jan</text:p>
          </table:table-cell>
          <table:table-cell table:formula="of:=YEAR([$dms.$J220])" office:value-type="float" office:value="2027" calcext:value-type="float">
            <text:p>2027</text:p>
          </table:table-cell>
          <table:table-cell table:formula="of:=COM.MICROSOFT.CONCAT([$dms.$L220];&quot; &quot;;[$dms.$M220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8" calcext:value-type="date">
            <text:p>18/1/2027</text:p>
          </table:table-cell>
          <table:table-cell table:formula="of:=MONTH([.J221])" office:value-type="float" office:value="1" calcext:value-type="float">
            <text:p>1</text:p>
          </table:table-cell>
          <table:table-cell table:formula="of:=COM.MICROSOFT.XLOOKUP([$dms.$K221];[.G:.G];[.H:.H])" office:value-type="string" office:string-value="Jan" calcext:value-type="string">
            <text:p>Jan</text:p>
          </table:table-cell>
          <table:table-cell table:formula="of:=YEAR([$dms.$J221])" office:value-type="float" office:value="2027" calcext:value-type="float">
            <text:p>2027</text:p>
          </table:table-cell>
          <table:table-cell table:formula="of:=COM.MICROSOFT.CONCAT([$dms.$L221];&quot; &quot;;[$dms.$M221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19" calcext:value-type="date">
            <text:p>19/1/2027</text:p>
          </table:table-cell>
          <table:table-cell table:formula="of:=MONTH([.J222])" office:value-type="float" office:value="1" calcext:value-type="float">
            <text:p>1</text:p>
          </table:table-cell>
          <table:table-cell table:formula="of:=COM.MICROSOFT.XLOOKUP([$dms.$K222];[.G:.G];[.H:.H])" office:value-type="string" office:string-value="Jan" calcext:value-type="string">
            <text:p>Jan</text:p>
          </table:table-cell>
          <table:table-cell table:formula="of:=YEAR([$dms.$J222])" office:value-type="float" office:value="2027" calcext:value-type="float">
            <text:p>2027</text:p>
          </table:table-cell>
          <table:table-cell table:formula="of:=COM.MICROSOFT.CONCAT([$dms.$L222];&quot; &quot;;[$dms.$M222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0" calcext:value-type="date">
            <text:p>20/1/2027</text:p>
          </table:table-cell>
          <table:table-cell table:formula="of:=MONTH([.J223])" office:value-type="float" office:value="1" calcext:value-type="float">
            <text:p>1</text:p>
          </table:table-cell>
          <table:table-cell table:formula="of:=COM.MICROSOFT.XLOOKUP([$dms.$K223];[.G:.G];[.H:.H])" office:value-type="string" office:string-value="Jan" calcext:value-type="string">
            <text:p>Jan</text:p>
          </table:table-cell>
          <table:table-cell table:formula="of:=YEAR([$dms.$J223])" office:value-type="float" office:value="2027" calcext:value-type="float">
            <text:p>2027</text:p>
          </table:table-cell>
          <table:table-cell table:formula="of:=COM.MICROSOFT.CONCAT([$dms.$L223];&quot; &quot;;[$dms.$M223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1" calcext:value-type="date">
            <text:p>21/1/2027</text:p>
          </table:table-cell>
          <table:table-cell table:formula="of:=MONTH([.J224])" office:value-type="float" office:value="1" calcext:value-type="float">
            <text:p>1</text:p>
          </table:table-cell>
          <table:table-cell table:formula="of:=COM.MICROSOFT.XLOOKUP([$dms.$K224];[.G:.G];[.H:.H])" office:value-type="string" office:string-value="Jan" calcext:value-type="string">
            <text:p>Jan</text:p>
          </table:table-cell>
          <table:table-cell table:formula="of:=YEAR([$dms.$J224])" office:value-type="float" office:value="2027" calcext:value-type="float">
            <text:p>2027</text:p>
          </table:table-cell>
          <table:table-cell table:formula="of:=COM.MICROSOFT.CONCAT([$dms.$L224];&quot; &quot;;[$dms.$M224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2" calcext:value-type="date">
            <text:p>22/1/2027</text:p>
          </table:table-cell>
          <table:table-cell table:formula="of:=MONTH([.J225])" office:value-type="float" office:value="1" calcext:value-type="float">
            <text:p>1</text:p>
          </table:table-cell>
          <table:table-cell table:formula="of:=COM.MICROSOFT.XLOOKUP([$dms.$K225];[.G:.G];[.H:.H])" office:value-type="string" office:string-value="Jan" calcext:value-type="string">
            <text:p>Jan</text:p>
          </table:table-cell>
          <table:table-cell table:formula="of:=YEAR([$dms.$J225])" office:value-type="float" office:value="2027" calcext:value-type="float">
            <text:p>2027</text:p>
          </table:table-cell>
          <table:table-cell table:formula="of:=COM.MICROSOFT.CONCAT([$dms.$L225];&quot; &quot;;[$dms.$M225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3" calcext:value-type="date">
            <text:p>23/1/2027</text:p>
          </table:table-cell>
          <table:table-cell table:formula="of:=MONTH([.J226])" office:value-type="float" office:value="1" calcext:value-type="float">
            <text:p>1</text:p>
          </table:table-cell>
          <table:table-cell table:formula="of:=COM.MICROSOFT.XLOOKUP([$dms.$K226];[.G:.G];[.H:.H])" office:value-type="string" office:string-value="Jan" calcext:value-type="string">
            <text:p>Jan</text:p>
          </table:table-cell>
          <table:table-cell table:formula="of:=YEAR([$dms.$J226])" office:value-type="float" office:value="2027" calcext:value-type="float">
            <text:p>2027</text:p>
          </table:table-cell>
          <table:table-cell table:formula="of:=COM.MICROSOFT.CONCAT([$dms.$L226];&quot; &quot;;[$dms.$M226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4" calcext:value-type="date">
            <text:p>24/1/2027</text:p>
          </table:table-cell>
          <table:table-cell table:formula="of:=MONTH([.J227])" office:value-type="float" office:value="1" calcext:value-type="float">
            <text:p>1</text:p>
          </table:table-cell>
          <table:table-cell table:formula="of:=COM.MICROSOFT.XLOOKUP([$dms.$K227];[.G:.G];[.H:.H])" office:value-type="string" office:string-value="Jan" calcext:value-type="string">
            <text:p>Jan</text:p>
          </table:table-cell>
          <table:table-cell table:formula="of:=YEAR([$dms.$J227])" office:value-type="float" office:value="2027" calcext:value-type="float">
            <text:p>2027</text:p>
          </table:table-cell>
          <table:table-cell table:formula="of:=COM.MICROSOFT.CONCAT([$dms.$L227];&quot; &quot;;[$dms.$M227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5" calcext:value-type="date">
            <text:p>25/1/2027</text:p>
          </table:table-cell>
          <table:table-cell table:formula="of:=MONTH([.J228])" office:value-type="float" office:value="1" calcext:value-type="float">
            <text:p>1</text:p>
          </table:table-cell>
          <table:table-cell table:formula="of:=COM.MICROSOFT.XLOOKUP([$dms.$K228];[.G:.G];[.H:.H])" office:value-type="string" office:string-value="Jan" calcext:value-type="string">
            <text:p>Jan</text:p>
          </table:table-cell>
          <table:table-cell table:formula="of:=YEAR([$dms.$J228])" office:value-type="float" office:value="2027" calcext:value-type="float">
            <text:p>2027</text:p>
          </table:table-cell>
          <table:table-cell table:formula="of:=COM.MICROSOFT.CONCAT([$dms.$L228];&quot; &quot;;[$dms.$M228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6" calcext:value-type="date">
            <text:p>26/1/2027</text:p>
          </table:table-cell>
          <table:table-cell table:formula="of:=MONTH([.J229])" office:value-type="float" office:value="1" calcext:value-type="float">
            <text:p>1</text:p>
          </table:table-cell>
          <table:table-cell table:formula="of:=COM.MICROSOFT.XLOOKUP([$dms.$K229];[.G:.G];[.H:.H])" office:value-type="string" office:string-value="Jan" calcext:value-type="string">
            <text:p>Jan</text:p>
          </table:table-cell>
          <table:table-cell table:formula="of:=YEAR([$dms.$J229])" office:value-type="float" office:value="2027" calcext:value-type="float">
            <text:p>2027</text:p>
          </table:table-cell>
          <table:table-cell table:formula="of:=COM.MICROSOFT.CONCAT([$dms.$L229];&quot; &quot;;[$dms.$M229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7" calcext:value-type="date">
            <text:p>27/1/2027</text:p>
          </table:table-cell>
          <table:table-cell table:formula="of:=MONTH([.J230])" office:value-type="float" office:value="1" calcext:value-type="float">
            <text:p>1</text:p>
          </table:table-cell>
          <table:table-cell table:formula="of:=COM.MICROSOFT.XLOOKUP([$dms.$K230];[.G:.G];[.H:.H])" office:value-type="string" office:string-value="Jan" calcext:value-type="string">
            <text:p>Jan</text:p>
          </table:table-cell>
          <table:table-cell table:formula="of:=YEAR([$dms.$J230])" office:value-type="float" office:value="2027" calcext:value-type="float">
            <text:p>2027</text:p>
          </table:table-cell>
          <table:table-cell table:formula="of:=COM.MICROSOFT.CONCAT([$dms.$L230];&quot; &quot;;[$dms.$M230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8" calcext:value-type="date">
            <text:p>28/1/2027</text:p>
          </table:table-cell>
          <table:table-cell table:formula="of:=MONTH([.J231])" office:value-type="float" office:value="1" calcext:value-type="float">
            <text:p>1</text:p>
          </table:table-cell>
          <table:table-cell table:formula="of:=COM.MICROSOFT.XLOOKUP([$dms.$K231];[.G:.G];[.H:.H])" office:value-type="string" office:string-value="Jan" calcext:value-type="string">
            <text:p>Jan</text:p>
          </table:table-cell>
          <table:table-cell table:formula="of:=YEAR([$dms.$J231])" office:value-type="float" office:value="2027" calcext:value-type="float">
            <text:p>2027</text:p>
          </table:table-cell>
          <table:table-cell table:formula="of:=COM.MICROSOFT.CONCAT([$dms.$L231];&quot; &quot;;[$dms.$M231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29" calcext:value-type="date">
            <text:p>29/1/2027</text:p>
          </table:table-cell>
          <table:table-cell table:formula="of:=MONTH([.J232])" office:value-type="float" office:value="1" calcext:value-type="float">
            <text:p>1</text:p>
          </table:table-cell>
          <table:table-cell table:formula="of:=COM.MICROSOFT.XLOOKUP([$dms.$K232];[.G:.G];[.H:.H])" office:value-type="string" office:string-value="Jan" calcext:value-type="string">
            <text:p>Jan</text:p>
          </table:table-cell>
          <table:table-cell table:formula="of:=YEAR([$dms.$J232])" office:value-type="float" office:value="2027" calcext:value-type="float">
            <text:p>2027</text:p>
          </table:table-cell>
          <table:table-cell table:formula="of:=COM.MICROSOFT.CONCAT([$dms.$L232];&quot; &quot;;[$dms.$M232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30" calcext:value-type="date">
            <text:p>30/1/2027</text:p>
          </table:table-cell>
          <table:table-cell table:formula="of:=MONTH([.J233])" office:value-type="float" office:value="1" calcext:value-type="float">
            <text:p>1</text:p>
          </table:table-cell>
          <table:table-cell table:formula="of:=COM.MICROSOFT.XLOOKUP([$dms.$K233];[.G:.G];[.H:.H])" office:value-type="string" office:string-value="Jan" calcext:value-type="string">
            <text:p>Jan</text:p>
          </table:table-cell>
          <table:table-cell table:formula="of:=YEAR([$dms.$J233])" office:value-type="float" office:value="2027" calcext:value-type="float">
            <text:p>2027</text:p>
          </table:table-cell>
          <table:table-cell table:formula="of:=COM.MICROSOFT.CONCAT([$dms.$L233];&quot; &quot;;[$dms.$M233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1-31" calcext:value-type="date">
            <text:p>31/1/2027</text:p>
          </table:table-cell>
          <table:table-cell table:formula="of:=MONTH([.J234])" office:value-type="float" office:value="1" calcext:value-type="float">
            <text:p>1</text:p>
          </table:table-cell>
          <table:table-cell table:formula="of:=COM.MICROSOFT.XLOOKUP([$dms.$K234];[.G:.G];[.H:.H])" office:value-type="string" office:string-value="Jan" calcext:value-type="string">
            <text:p>Jan</text:p>
          </table:table-cell>
          <table:table-cell table:formula="of:=YEAR([$dms.$J234])" office:value-type="float" office:value="2027" calcext:value-type="float">
            <text:p>2027</text:p>
          </table:table-cell>
          <table:table-cell table:formula="of:=COM.MICROSOFT.CONCAT([$dms.$L234];&quot; &quot;;[$dms.$M234])" office:value-type="string" office:string-value="Jan 2027" calcext:value-type="string">
            <text:p>Ja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01" calcext:value-type="date">
            <text:p>1/2/2027</text:p>
          </table:table-cell>
          <table:table-cell table:formula="of:=MONTH([.J235])" office:value-type="float" office:value="2" calcext:value-type="float">
            <text:p>2</text:p>
          </table:table-cell>
          <table:table-cell table:formula="of:=COM.MICROSOFT.XLOOKUP([$dms.$K235];[.G:.G];[.H:.H])" office:value-type="string" office:string-value="Fev" calcext:value-type="string">
            <text:p>Fev</text:p>
          </table:table-cell>
          <table:table-cell table:formula="of:=YEAR([$dms.$J235])" office:value-type="float" office:value="2027" calcext:value-type="float">
            <text:p>2027</text:p>
          </table:table-cell>
          <table:table-cell table:formula="of:=COM.MICROSOFT.CONCAT([$dms.$L235];&quot; &quot;;[$dms.$M235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02" calcext:value-type="date">
            <text:p>2/2/2027</text:p>
          </table:table-cell>
          <table:table-cell table:formula="of:=MONTH([.J236])" office:value-type="float" office:value="2" calcext:value-type="float">
            <text:p>2</text:p>
          </table:table-cell>
          <table:table-cell table:formula="of:=COM.MICROSOFT.XLOOKUP([$dms.$K236];[.G:.G];[.H:.H])" office:value-type="string" office:string-value="Fev" calcext:value-type="string">
            <text:p>Fev</text:p>
          </table:table-cell>
          <table:table-cell table:formula="of:=YEAR([$dms.$J236])" office:value-type="float" office:value="2027" calcext:value-type="float">
            <text:p>2027</text:p>
          </table:table-cell>
          <table:table-cell table:formula="of:=COM.MICROSOFT.CONCAT([$dms.$L236];&quot; &quot;;[$dms.$M236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03" calcext:value-type="date">
            <text:p>3/2/2027</text:p>
          </table:table-cell>
          <table:table-cell table:formula="of:=MONTH([.J237])" office:value-type="float" office:value="2" calcext:value-type="float">
            <text:p>2</text:p>
          </table:table-cell>
          <table:table-cell table:formula="of:=COM.MICROSOFT.XLOOKUP([$dms.$K237];[.G:.G];[.H:.H])" office:value-type="string" office:string-value="Fev" calcext:value-type="string">
            <text:p>Fev</text:p>
          </table:table-cell>
          <table:table-cell table:formula="of:=YEAR([$dms.$J237])" office:value-type="float" office:value="2027" calcext:value-type="float">
            <text:p>2027</text:p>
          </table:table-cell>
          <table:table-cell table:formula="of:=COM.MICROSOFT.CONCAT([$dms.$L237];&quot; &quot;;[$dms.$M237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04" calcext:value-type="date">
            <text:p>4/2/2027</text:p>
          </table:table-cell>
          <table:table-cell table:formula="of:=MONTH([.J238])" office:value-type="float" office:value="2" calcext:value-type="float">
            <text:p>2</text:p>
          </table:table-cell>
          <table:table-cell table:formula="of:=COM.MICROSOFT.XLOOKUP([$dms.$K238];[.G:.G];[.H:.H])" office:value-type="string" office:string-value="Fev" calcext:value-type="string">
            <text:p>Fev</text:p>
          </table:table-cell>
          <table:table-cell table:formula="of:=YEAR([$dms.$J238])" office:value-type="float" office:value="2027" calcext:value-type="float">
            <text:p>2027</text:p>
          </table:table-cell>
          <table:table-cell table:formula="of:=COM.MICROSOFT.CONCAT([$dms.$L238];&quot; &quot;;[$dms.$M238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05" calcext:value-type="date">
            <text:p>5/2/2027</text:p>
          </table:table-cell>
          <table:table-cell table:formula="of:=MONTH([.J239])" office:value-type="float" office:value="2" calcext:value-type="float">
            <text:p>2</text:p>
          </table:table-cell>
          <table:table-cell table:formula="of:=COM.MICROSOFT.XLOOKUP([$dms.$K239];[.G:.G];[.H:.H])" office:value-type="string" office:string-value="Fev" calcext:value-type="string">
            <text:p>Fev</text:p>
          </table:table-cell>
          <table:table-cell table:formula="of:=YEAR([$dms.$J239])" office:value-type="float" office:value="2027" calcext:value-type="float">
            <text:p>2027</text:p>
          </table:table-cell>
          <table:table-cell table:formula="of:=COM.MICROSOFT.CONCAT([$dms.$L239];&quot; &quot;;[$dms.$M239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06" calcext:value-type="date">
            <text:p>6/2/2027</text:p>
          </table:table-cell>
          <table:table-cell table:formula="of:=MONTH([.J240])" office:value-type="float" office:value="2" calcext:value-type="float">
            <text:p>2</text:p>
          </table:table-cell>
          <table:table-cell table:formula="of:=COM.MICROSOFT.XLOOKUP([$dms.$K240];[.G:.G];[.H:.H])" office:value-type="string" office:string-value="Fev" calcext:value-type="string">
            <text:p>Fev</text:p>
          </table:table-cell>
          <table:table-cell table:formula="of:=YEAR([$dms.$J240])" office:value-type="float" office:value="2027" calcext:value-type="float">
            <text:p>2027</text:p>
          </table:table-cell>
          <table:table-cell table:formula="of:=COM.MICROSOFT.CONCAT([$dms.$L240];&quot; &quot;;[$dms.$M240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07" calcext:value-type="date">
            <text:p>7/2/2027</text:p>
          </table:table-cell>
          <table:table-cell table:formula="of:=MONTH([.J241])" office:value-type="float" office:value="2" calcext:value-type="float">
            <text:p>2</text:p>
          </table:table-cell>
          <table:table-cell table:formula="of:=COM.MICROSOFT.XLOOKUP([$dms.$K241];[.G:.G];[.H:.H])" office:value-type="string" office:string-value="Fev" calcext:value-type="string">
            <text:p>Fev</text:p>
          </table:table-cell>
          <table:table-cell table:formula="of:=YEAR([$dms.$J241])" office:value-type="float" office:value="2027" calcext:value-type="float">
            <text:p>2027</text:p>
          </table:table-cell>
          <table:table-cell table:formula="of:=COM.MICROSOFT.CONCAT([$dms.$L241];&quot; &quot;;[$dms.$M241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08" calcext:value-type="date">
            <text:p>8/2/2027</text:p>
          </table:table-cell>
          <table:table-cell table:formula="of:=MONTH([.J242])" office:value-type="float" office:value="2" calcext:value-type="float">
            <text:p>2</text:p>
          </table:table-cell>
          <table:table-cell table:formula="of:=COM.MICROSOFT.XLOOKUP([$dms.$K242];[.G:.G];[.H:.H])" office:value-type="string" office:string-value="Fev" calcext:value-type="string">
            <text:p>Fev</text:p>
          </table:table-cell>
          <table:table-cell table:formula="of:=YEAR([$dms.$J242])" office:value-type="float" office:value="2027" calcext:value-type="float">
            <text:p>2027</text:p>
          </table:table-cell>
          <table:table-cell table:formula="of:=COM.MICROSOFT.CONCAT([$dms.$L242];&quot; &quot;;[$dms.$M242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09" calcext:value-type="date">
            <text:p>9/2/2027</text:p>
          </table:table-cell>
          <table:table-cell table:formula="of:=MONTH([.J243])" office:value-type="float" office:value="2" calcext:value-type="float">
            <text:p>2</text:p>
          </table:table-cell>
          <table:table-cell table:formula="of:=COM.MICROSOFT.XLOOKUP([$dms.$K243];[.G:.G];[.H:.H])" office:value-type="string" office:string-value="Fev" calcext:value-type="string">
            <text:p>Fev</text:p>
          </table:table-cell>
          <table:table-cell table:formula="of:=YEAR([$dms.$J243])" office:value-type="float" office:value="2027" calcext:value-type="float">
            <text:p>2027</text:p>
          </table:table-cell>
          <table:table-cell table:formula="of:=COM.MICROSOFT.CONCAT([$dms.$L243];&quot; &quot;;[$dms.$M243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0" calcext:value-type="date">
            <text:p>10/2/2027</text:p>
          </table:table-cell>
          <table:table-cell table:formula="of:=MONTH([.J244])" office:value-type="float" office:value="2" calcext:value-type="float">
            <text:p>2</text:p>
          </table:table-cell>
          <table:table-cell table:formula="of:=COM.MICROSOFT.XLOOKUP([$dms.$K244];[.G:.G];[.H:.H])" office:value-type="string" office:string-value="Fev" calcext:value-type="string">
            <text:p>Fev</text:p>
          </table:table-cell>
          <table:table-cell table:formula="of:=YEAR([$dms.$J244])" office:value-type="float" office:value="2027" calcext:value-type="float">
            <text:p>2027</text:p>
          </table:table-cell>
          <table:table-cell table:formula="of:=COM.MICROSOFT.CONCAT([$dms.$L244];&quot; &quot;;[$dms.$M244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1" calcext:value-type="date">
            <text:p>11/2/2027</text:p>
          </table:table-cell>
          <table:table-cell table:formula="of:=MONTH([.J245])" office:value-type="float" office:value="2" calcext:value-type="float">
            <text:p>2</text:p>
          </table:table-cell>
          <table:table-cell table:formula="of:=COM.MICROSOFT.XLOOKUP([$dms.$K245];[.G:.G];[.H:.H])" office:value-type="string" office:string-value="Fev" calcext:value-type="string">
            <text:p>Fev</text:p>
          </table:table-cell>
          <table:table-cell table:formula="of:=YEAR([$dms.$J245])" office:value-type="float" office:value="2027" calcext:value-type="float">
            <text:p>2027</text:p>
          </table:table-cell>
          <table:table-cell table:formula="of:=COM.MICROSOFT.CONCAT([$dms.$L245];&quot; &quot;;[$dms.$M245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2" calcext:value-type="date">
            <text:p>12/2/2027</text:p>
          </table:table-cell>
          <table:table-cell table:formula="of:=MONTH([.J246])" office:value-type="float" office:value="2" calcext:value-type="float">
            <text:p>2</text:p>
          </table:table-cell>
          <table:table-cell table:formula="of:=COM.MICROSOFT.XLOOKUP([$dms.$K246];[.G:.G];[.H:.H])" office:value-type="string" office:string-value="Fev" calcext:value-type="string">
            <text:p>Fev</text:p>
          </table:table-cell>
          <table:table-cell table:formula="of:=YEAR([$dms.$J246])" office:value-type="float" office:value="2027" calcext:value-type="float">
            <text:p>2027</text:p>
          </table:table-cell>
          <table:table-cell table:formula="of:=COM.MICROSOFT.CONCAT([$dms.$L246];&quot; &quot;;[$dms.$M246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3" calcext:value-type="date">
            <text:p>13/2/2027</text:p>
          </table:table-cell>
          <table:table-cell table:formula="of:=MONTH([.J247])" office:value-type="float" office:value="2" calcext:value-type="float">
            <text:p>2</text:p>
          </table:table-cell>
          <table:table-cell table:formula="of:=COM.MICROSOFT.XLOOKUP([$dms.$K247];[.G:.G];[.H:.H])" office:value-type="string" office:string-value="Fev" calcext:value-type="string">
            <text:p>Fev</text:p>
          </table:table-cell>
          <table:table-cell table:formula="of:=YEAR([$dms.$J247])" office:value-type="float" office:value="2027" calcext:value-type="float">
            <text:p>2027</text:p>
          </table:table-cell>
          <table:table-cell table:formula="of:=COM.MICROSOFT.CONCAT([$dms.$L247];&quot; &quot;;[$dms.$M247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4" calcext:value-type="date">
            <text:p>14/2/2027</text:p>
          </table:table-cell>
          <table:table-cell table:formula="of:=MONTH([.J248])" office:value-type="float" office:value="2" calcext:value-type="float">
            <text:p>2</text:p>
          </table:table-cell>
          <table:table-cell table:formula="of:=COM.MICROSOFT.XLOOKUP([$dms.$K248];[.G:.G];[.H:.H])" office:value-type="string" office:string-value="Fev" calcext:value-type="string">
            <text:p>Fev</text:p>
          </table:table-cell>
          <table:table-cell table:formula="of:=YEAR([$dms.$J248])" office:value-type="float" office:value="2027" calcext:value-type="float">
            <text:p>2027</text:p>
          </table:table-cell>
          <table:table-cell table:formula="of:=COM.MICROSOFT.CONCAT([$dms.$L248];&quot; &quot;;[$dms.$M248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5" calcext:value-type="date">
            <text:p>15/2/2027</text:p>
          </table:table-cell>
          <table:table-cell table:formula="of:=MONTH([.J249])" office:value-type="float" office:value="2" calcext:value-type="float">
            <text:p>2</text:p>
          </table:table-cell>
          <table:table-cell table:formula="of:=COM.MICROSOFT.XLOOKUP([$dms.$K249];[.G:.G];[.H:.H])" office:value-type="string" office:string-value="Fev" calcext:value-type="string">
            <text:p>Fev</text:p>
          </table:table-cell>
          <table:table-cell table:formula="of:=YEAR([$dms.$J249])" office:value-type="float" office:value="2027" calcext:value-type="float">
            <text:p>2027</text:p>
          </table:table-cell>
          <table:table-cell table:formula="of:=COM.MICROSOFT.CONCAT([$dms.$L249];&quot; &quot;;[$dms.$M249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6" calcext:value-type="date">
            <text:p>16/2/2027</text:p>
          </table:table-cell>
          <table:table-cell table:formula="of:=MONTH([.J250])" office:value-type="float" office:value="2" calcext:value-type="float">
            <text:p>2</text:p>
          </table:table-cell>
          <table:table-cell table:formula="of:=COM.MICROSOFT.XLOOKUP([$dms.$K250];[.G:.G];[.H:.H])" office:value-type="string" office:string-value="Fev" calcext:value-type="string">
            <text:p>Fev</text:p>
          </table:table-cell>
          <table:table-cell table:formula="of:=YEAR([$dms.$J250])" office:value-type="float" office:value="2027" calcext:value-type="float">
            <text:p>2027</text:p>
          </table:table-cell>
          <table:table-cell table:formula="of:=COM.MICROSOFT.CONCAT([$dms.$L250];&quot; &quot;;[$dms.$M250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7" calcext:value-type="date">
            <text:p>17/2/2027</text:p>
          </table:table-cell>
          <table:table-cell table:formula="of:=MONTH([.J251])" office:value-type="float" office:value="2" calcext:value-type="float">
            <text:p>2</text:p>
          </table:table-cell>
          <table:table-cell table:formula="of:=COM.MICROSOFT.XLOOKUP([$dms.$K251];[.G:.G];[.H:.H])" office:value-type="string" office:string-value="Fev" calcext:value-type="string">
            <text:p>Fev</text:p>
          </table:table-cell>
          <table:table-cell table:formula="of:=YEAR([$dms.$J251])" office:value-type="float" office:value="2027" calcext:value-type="float">
            <text:p>2027</text:p>
          </table:table-cell>
          <table:table-cell table:formula="of:=COM.MICROSOFT.CONCAT([$dms.$L251];&quot; &quot;;[$dms.$M251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8" calcext:value-type="date">
            <text:p>18/2/2027</text:p>
          </table:table-cell>
          <table:table-cell table:formula="of:=MONTH([.J252])" office:value-type="float" office:value="2" calcext:value-type="float">
            <text:p>2</text:p>
          </table:table-cell>
          <table:table-cell table:formula="of:=COM.MICROSOFT.XLOOKUP([$dms.$K252];[.G:.G];[.H:.H])" office:value-type="string" office:string-value="Fev" calcext:value-type="string">
            <text:p>Fev</text:p>
          </table:table-cell>
          <table:table-cell table:formula="of:=YEAR([$dms.$J252])" office:value-type="float" office:value="2027" calcext:value-type="float">
            <text:p>2027</text:p>
          </table:table-cell>
          <table:table-cell table:formula="of:=COM.MICROSOFT.CONCAT([$dms.$L252];&quot; &quot;;[$dms.$M252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19" calcext:value-type="date">
            <text:p>19/2/2027</text:p>
          </table:table-cell>
          <table:table-cell table:formula="of:=MONTH([.J253])" office:value-type="float" office:value="2" calcext:value-type="float">
            <text:p>2</text:p>
          </table:table-cell>
          <table:table-cell table:formula="of:=COM.MICROSOFT.XLOOKUP([$dms.$K253];[.G:.G];[.H:.H])" office:value-type="string" office:string-value="Fev" calcext:value-type="string">
            <text:p>Fev</text:p>
          </table:table-cell>
          <table:table-cell table:formula="of:=YEAR([$dms.$J253])" office:value-type="float" office:value="2027" calcext:value-type="float">
            <text:p>2027</text:p>
          </table:table-cell>
          <table:table-cell table:formula="of:=COM.MICROSOFT.CONCAT([$dms.$L253];&quot; &quot;;[$dms.$M253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20" calcext:value-type="date">
            <text:p>20/2/2027</text:p>
          </table:table-cell>
          <table:table-cell table:formula="of:=MONTH([.J254])" office:value-type="float" office:value="2" calcext:value-type="float">
            <text:p>2</text:p>
          </table:table-cell>
          <table:table-cell table:formula="of:=COM.MICROSOFT.XLOOKUP([$dms.$K254];[.G:.G];[.H:.H])" office:value-type="string" office:string-value="Fev" calcext:value-type="string">
            <text:p>Fev</text:p>
          </table:table-cell>
          <table:table-cell table:formula="of:=YEAR([$dms.$J254])" office:value-type="float" office:value="2027" calcext:value-type="float">
            <text:p>2027</text:p>
          </table:table-cell>
          <table:table-cell table:formula="of:=COM.MICROSOFT.CONCAT([$dms.$L254];&quot; &quot;;[$dms.$M254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21" calcext:value-type="date">
            <text:p>21/2/2027</text:p>
          </table:table-cell>
          <table:table-cell table:formula="of:=MONTH([.J255])" office:value-type="float" office:value="2" calcext:value-type="float">
            <text:p>2</text:p>
          </table:table-cell>
          <table:table-cell table:formula="of:=COM.MICROSOFT.XLOOKUP([$dms.$K255];[.G:.G];[.H:.H])" office:value-type="string" office:string-value="Fev" calcext:value-type="string">
            <text:p>Fev</text:p>
          </table:table-cell>
          <table:table-cell table:formula="of:=YEAR([$dms.$J255])" office:value-type="float" office:value="2027" calcext:value-type="float">
            <text:p>2027</text:p>
          </table:table-cell>
          <table:table-cell table:formula="of:=COM.MICROSOFT.CONCAT([$dms.$L255];&quot; &quot;;[$dms.$M255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22" calcext:value-type="date">
            <text:p>22/2/2027</text:p>
          </table:table-cell>
          <table:table-cell table:formula="of:=MONTH([.J256])" office:value-type="float" office:value="2" calcext:value-type="float">
            <text:p>2</text:p>
          </table:table-cell>
          <table:table-cell table:formula="of:=COM.MICROSOFT.XLOOKUP([$dms.$K256];[.G:.G];[.H:.H])" office:value-type="string" office:string-value="Fev" calcext:value-type="string">
            <text:p>Fev</text:p>
          </table:table-cell>
          <table:table-cell table:formula="of:=YEAR([$dms.$J256])" office:value-type="float" office:value="2027" calcext:value-type="float">
            <text:p>2027</text:p>
          </table:table-cell>
          <table:table-cell table:formula="of:=COM.MICROSOFT.CONCAT([$dms.$L256];&quot; &quot;;[$dms.$M256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23" calcext:value-type="date">
            <text:p>23/2/2027</text:p>
          </table:table-cell>
          <table:table-cell table:formula="of:=MONTH([.J257])" office:value-type="float" office:value="2" calcext:value-type="float">
            <text:p>2</text:p>
          </table:table-cell>
          <table:table-cell table:formula="of:=COM.MICROSOFT.XLOOKUP([$dms.$K257];[.G:.G];[.H:.H])" office:value-type="string" office:string-value="Fev" calcext:value-type="string">
            <text:p>Fev</text:p>
          </table:table-cell>
          <table:table-cell table:formula="of:=YEAR([$dms.$J257])" office:value-type="float" office:value="2027" calcext:value-type="float">
            <text:p>2027</text:p>
          </table:table-cell>
          <table:table-cell table:formula="of:=COM.MICROSOFT.CONCAT([$dms.$L257];&quot; &quot;;[$dms.$M257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24" calcext:value-type="date">
            <text:p>24/2/2027</text:p>
          </table:table-cell>
          <table:table-cell table:formula="of:=MONTH([.J258])" office:value-type="float" office:value="2" calcext:value-type="float">
            <text:p>2</text:p>
          </table:table-cell>
          <table:table-cell table:formula="of:=COM.MICROSOFT.XLOOKUP([$dms.$K258];[.G:.G];[.H:.H])" office:value-type="string" office:string-value="Fev" calcext:value-type="string">
            <text:p>Fev</text:p>
          </table:table-cell>
          <table:table-cell table:formula="of:=YEAR([$dms.$J258])" office:value-type="float" office:value="2027" calcext:value-type="float">
            <text:p>2027</text:p>
          </table:table-cell>
          <table:table-cell table:formula="of:=COM.MICROSOFT.CONCAT([$dms.$L258];&quot; &quot;;[$dms.$M258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25" calcext:value-type="date">
            <text:p>25/2/2027</text:p>
          </table:table-cell>
          <table:table-cell table:formula="of:=MONTH([.J259])" office:value-type="float" office:value="2" calcext:value-type="float">
            <text:p>2</text:p>
          </table:table-cell>
          <table:table-cell table:formula="of:=COM.MICROSOFT.XLOOKUP([$dms.$K259];[.G:.G];[.H:.H])" office:value-type="string" office:string-value="Fev" calcext:value-type="string">
            <text:p>Fev</text:p>
          </table:table-cell>
          <table:table-cell table:formula="of:=YEAR([$dms.$J259])" office:value-type="float" office:value="2027" calcext:value-type="float">
            <text:p>2027</text:p>
          </table:table-cell>
          <table:table-cell table:formula="of:=COM.MICROSOFT.CONCAT([$dms.$L259];&quot; &quot;;[$dms.$M259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26" calcext:value-type="date">
            <text:p>26/2/2027</text:p>
          </table:table-cell>
          <table:table-cell table:formula="of:=MONTH([.J260])" office:value-type="float" office:value="2" calcext:value-type="float">
            <text:p>2</text:p>
          </table:table-cell>
          <table:table-cell table:formula="of:=COM.MICROSOFT.XLOOKUP([$dms.$K260];[.G:.G];[.H:.H])" office:value-type="string" office:string-value="Fev" calcext:value-type="string">
            <text:p>Fev</text:p>
          </table:table-cell>
          <table:table-cell table:formula="of:=YEAR([$dms.$J260])" office:value-type="float" office:value="2027" calcext:value-type="float">
            <text:p>2027</text:p>
          </table:table-cell>
          <table:table-cell table:formula="of:=COM.MICROSOFT.CONCAT([$dms.$L260];&quot; &quot;;[$dms.$M260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27" calcext:value-type="date">
            <text:p>27/2/2027</text:p>
          </table:table-cell>
          <table:table-cell table:formula="of:=MONTH([.J261])" office:value-type="float" office:value="2" calcext:value-type="float">
            <text:p>2</text:p>
          </table:table-cell>
          <table:table-cell table:formula="of:=COM.MICROSOFT.XLOOKUP([$dms.$K261];[.G:.G];[.H:.H])" office:value-type="string" office:string-value="Fev" calcext:value-type="string">
            <text:p>Fev</text:p>
          </table:table-cell>
          <table:table-cell table:formula="of:=YEAR([$dms.$J261])" office:value-type="float" office:value="2027" calcext:value-type="float">
            <text:p>2027</text:p>
          </table:table-cell>
          <table:table-cell table:formula="of:=COM.MICROSOFT.CONCAT([$dms.$L261];&quot; &quot;;[$dms.$M261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2-28" calcext:value-type="date">
            <text:p>28/2/2027</text:p>
          </table:table-cell>
          <table:table-cell table:formula="of:=MONTH([.J262])" office:value-type="float" office:value="2" calcext:value-type="float">
            <text:p>2</text:p>
          </table:table-cell>
          <table:table-cell table:formula="of:=COM.MICROSOFT.XLOOKUP([$dms.$K262];[.G:.G];[.H:.H])" office:value-type="string" office:string-value="Fev" calcext:value-type="string">
            <text:p>Fev</text:p>
          </table:table-cell>
          <table:table-cell table:formula="of:=YEAR([$dms.$J262])" office:value-type="float" office:value="2027" calcext:value-type="float">
            <text:p>2027</text:p>
          </table:table-cell>
          <table:table-cell table:formula="of:=COM.MICROSOFT.CONCAT([$dms.$L262];&quot; &quot;;[$dms.$M262])" office:value-type="string" office:string-value="Fev 2027" calcext:value-type="string">
            <text:p>Fe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01" calcext:value-type="date">
            <text:p>1/3/2027</text:p>
          </table:table-cell>
          <table:table-cell table:formula="of:=MONTH([.J263])" office:value-type="float" office:value="3" calcext:value-type="float">
            <text:p>3</text:p>
          </table:table-cell>
          <table:table-cell table:formula="of:=COM.MICROSOFT.XLOOKUP([$dms.$K263];[.G:.G];[.H:.H])" office:value-type="string" office:string-value="Mar" calcext:value-type="string">
            <text:p>Mar</text:p>
          </table:table-cell>
          <table:table-cell table:formula="of:=YEAR([$dms.$J263])" office:value-type="float" office:value="2027" calcext:value-type="float">
            <text:p>2027</text:p>
          </table:table-cell>
          <table:table-cell table:formula="of:=COM.MICROSOFT.CONCAT([$dms.$L263];&quot; &quot;;[$dms.$M263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02" calcext:value-type="date">
            <text:p>2/3/2027</text:p>
          </table:table-cell>
          <table:table-cell table:formula="of:=MONTH([.J264])" office:value-type="float" office:value="3" calcext:value-type="float">
            <text:p>3</text:p>
          </table:table-cell>
          <table:table-cell table:formula="of:=COM.MICROSOFT.XLOOKUP([$dms.$K264];[.G:.G];[.H:.H])" office:value-type="string" office:string-value="Mar" calcext:value-type="string">
            <text:p>Mar</text:p>
          </table:table-cell>
          <table:table-cell table:formula="of:=YEAR([$dms.$J264])" office:value-type="float" office:value="2027" calcext:value-type="float">
            <text:p>2027</text:p>
          </table:table-cell>
          <table:table-cell table:formula="of:=COM.MICROSOFT.CONCAT([$dms.$L264];&quot; &quot;;[$dms.$M264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03" calcext:value-type="date">
            <text:p>3/3/2027</text:p>
          </table:table-cell>
          <table:table-cell table:formula="of:=MONTH([.J265])" office:value-type="float" office:value="3" calcext:value-type="float">
            <text:p>3</text:p>
          </table:table-cell>
          <table:table-cell table:formula="of:=COM.MICROSOFT.XLOOKUP([$dms.$K265];[.G:.G];[.H:.H])" office:value-type="string" office:string-value="Mar" calcext:value-type="string">
            <text:p>Mar</text:p>
          </table:table-cell>
          <table:table-cell table:formula="of:=YEAR([$dms.$J265])" office:value-type="float" office:value="2027" calcext:value-type="float">
            <text:p>2027</text:p>
          </table:table-cell>
          <table:table-cell table:formula="of:=COM.MICROSOFT.CONCAT([$dms.$L265];&quot; &quot;;[$dms.$M265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04" calcext:value-type="date">
            <text:p>4/3/2027</text:p>
          </table:table-cell>
          <table:table-cell table:formula="of:=MONTH([.J266])" office:value-type="float" office:value="3" calcext:value-type="float">
            <text:p>3</text:p>
          </table:table-cell>
          <table:table-cell table:formula="of:=COM.MICROSOFT.XLOOKUP([$dms.$K266];[.G:.G];[.H:.H])" office:value-type="string" office:string-value="Mar" calcext:value-type="string">
            <text:p>Mar</text:p>
          </table:table-cell>
          <table:table-cell table:formula="of:=YEAR([$dms.$J266])" office:value-type="float" office:value="2027" calcext:value-type="float">
            <text:p>2027</text:p>
          </table:table-cell>
          <table:table-cell table:formula="of:=COM.MICROSOFT.CONCAT([$dms.$L266];&quot; &quot;;[$dms.$M266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05" calcext:value-type="date">
            <text:p>5/3/2027</text:p>
          </table:table-cell>
          <table:table-cell table:formula="of:=MONTH([.J267])" office:value-type="float" office:value="3" calcext:value-type="float">
            <text:p>3</text:p>
          </table:table-cell>
          <table:table-cell table:formula="of:=COM.MICROSOFT.XLOOKUP([$dms.$K267];[.G:.G];[.H:.H])" office:value-type="string" office:string-value="Mar" calcext:value-type="string">
            <text:p>Mar</text:p>
          </table:table-cell>
          <table:table-cell table:formula="of:=YEAR([$dms.$J267])" office:value-type="float" office:value="2027" calcext:value-type="float">
            <text:p>2027</text:p>
          </table:table-cell>
          <table:table-cell table:formula="of:=COM.MICROSOFT.CONCAT([$dms.$L267];&quot; &quot;;[$dms.$M267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06" calcext:value-type="date">
            <text:p>6/3/2027</text:p>
          </table:table-cell>
          <table:table-cell table:formula="of:=MONTH([.J268])" office:value-type="float" office:value="3" calcext:value-type="float">
            <text:p>3</text:p>
          </table:table-cell>
          <table:table-cell table:formula="of:=COM.MICROSOFT.XLOOKUP([$dms.$K268];[.G:.G];[.H:.H])" office:value-type="string" office:string-value="Mar" calcext:value-type="string">
            <text:p>Mar</text:p>
          </table:table-cell>
          <table:table-cell table:formula="of:=YEAR([$dms.$J268])" office:value-type="float" office:value="2027" calcext:value-type="float">
            <text:p>2027</text:p>
          </table:table-cell>
          <table:table-cell table:formula="of:=COM.MICROSOFT.CONCAT([$dms.$L268];&quot; &quot;;[$dms.$M268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07" calcext:value-type="date">
            <text:p>7/3/2027</text:p>
          </table:table-cell>
          <table:table-cell table:formula="of:=MONTH([.J269])" office:value-type="float" office:value="3" calcext:value-type="float">
            <text:p>3</text:p>
          </table:table-cell>
          <table:table-cell table:formula="of:=COM.MICROSOFT.XLOOKUP([$dms.$K269];[.G:.G];[.H:.H])" office:value-type="string" office:string-value="Mar" calcext:value-type="string">
            <text:p>Mar</text:p>
          </table:table-cell>
          <table:table-cell table:formula="of:=YEAR([$dms.$J269])" office:value-type="float" office:value="2027" calcext:value-type="float">
            <text:p>2027</text:p>
          </table:table-cell>
          <table:table-cell table:formula="of:=COM.MICROSOFT.CONCAT([$dms.$L269];&quot; &quot;;[$dms.$M269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08" calcext:value-type="date">
            <text:p>8/3/2027</text:p>
          </table:table-cell>
          <table:table-cell table:formula="of:=MONTH([.J270])" office:value-type="float" office:value="3" calcext:value-type="float">
            <text:p>3</text:p>
          </table:table-cell>
          <table:table-cell table:formula="of:=COM.MICROSOFT.XLOOKUP([$dms.$K270];[.G:.G];[.H:.H])" office:value-type="string" office:string-value="Mar" calcext:value-type="string">
            <text:p>Mar</text:p>
          </table:table-cell>
          <table:table-cell table:formula="of:=YEAR([$dms.$J270])" office:value-type="float" office:value="2027" calcext:value-type="float">
            <text:p>2027</text:p>
          </table:table-cell>
          <table:table-cell table:formula="of:=COM.MICROSOFT.CONCAT([$dms.$L270];&quot; &quot;;[$dms.$M270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09" calcext:value-type="date">
            <text:p>9/3/2027</text:p>
          </table:table-cell>
          <table:table-cell table:formula="of:=MONTH([.J271])" office:value-type="float" office:value="3" calcext:value-type="float">
            <text:p>3</text:p>
          </table:table-cell>
          <table:table-cell table:formula="of:=COM.MICROSOFT.XLOOKUP([$dms.$K271];[.G:.G];[.H:.H])" office:value-type="string" office:string-value="Mar" calcext:value-type="string">
            <text:p>Mar</text:p>
          </table:table-cell>
          <table:table-cell table:formula="of:=YEAR([$dms.$J271])" office:value-type="float" office:value="2027" calcext:value-type="float">
            <text:p>2027</text:p>
          </table:table-cell>
          <table:table-cell table:formula="of:=COM.MICROSOFT.CONCAT([$dms.$L271];&quot; &quot;;[$dms.$M271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0" calcext:value-type="date">
            <text:p>10/3/2027</text:p>
          </table:table-cell>
          <table:table-cell table:formula="of:=MONTH([.J272])" office:value-type="float" office:value="3" calcext:value-type="float">
            <text:p>3</text:p>
          </table:table-cell>
          <table:table-cell table:formula="of:=COM.MICROSOFT.XLOOKUP([$dms.$K272];[.G:.G];[.H:.H])" office:value-type="string" office:string-value="Mar" calcext:value-type="string">
            <text:p>Mar</text:p>
          </table:table-cell>
          <table:table-cell table:formula="of:=YEAR([$dms.$J272])" office:value-type="float" office:value="2027" calcext:value-type="float">
            <text:p>2027</text:p>
          </table:table-cell>
          <table:table-cell table:formula="of:=COM.MICROSOFT.CONCAT([$dms.$L272];&quot; &quot;;[$dms.$M272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1" calcext:value-type="date">
            <text:p>11/3/2027</text:p>
          </table:table-cell>
          <table:table-cell table:formula="of:=MONTH([.J273])" office:value-type="float" office:value="3" calcext:value-type="float">
            <text:p>3</text:p>
          </table:table-cell>
          <table:table-cell table:formula="of:=COM.MICROSOFT.XLOOKUP([$dms.$K273];[.G:.G];[.H:.H])" office:value-type="string" office:string-value="Mar" calcext:value-type="string">
            <text:p>Mar</text:p>
          </table:table-cell>
          <table:table-cell table:formula="of:=YEAR([$dms.$J273])" office:value-type="float" office:value="2027" calcext:value-type="float">
            <text:p>2027</text:p>
          </table:table-cell>
          <table:table-cell table:formula="of:=COM.MICROSOFT.CONCAT([$dms.$L273];&quot; &quot;;[$dms.$M273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2" calcext:value-type="date">
            <text:p>12/3/2027</text:p>
          </table:table-cell>
          <table:table-cell table:formula="of:=MONTH([.J274])" office:value-type="float" office:value="3" calcext:value-type="float">
            <text:p>3</text:p>
          </table:table-cell>
          <table:table-cell table:formula="of:=COM.MICROSOFT.XLOOKUP([$dms.$K274];[.G:.G];[.H:.H])" office:value-type="string" office:string-value="Mar" calcext:value-type="string">
            <text:p>Mar</text:p>
          </table:table-cell>
          <table:table-cell table:formula="of:=YEAR([$dms.$J274])" office:value-type="float" office:value="2027" calcext:value-type="float">
            <text:p>2027</text:p>
          </table:table-cell>
          <table:table-cell table:formula="of:=COM.MICROSOFT.CONCAT([$dms.$L274];&quot; &quot;;[$dms.$M274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3" calcext:value-type="date">
            <text:p>13/3/2027</text:p>
          </table:table-cell>
          <table:table-cell table:formula="of:=MONTH([.J275])" office:value-type="float" office:value="3" calcext:value-type="float">
            <text:p>3</text:p>
          </table:table-cell>
          <table:table-cell table:formula="of:=COM.MICROSOFT.XLOOKUP([$dms.$K275];[.G:.G];[.H:.H])" office:value-type="string" office:string-value="Mar" calcext:value-type="string">
            <text:p>Mar</text:p>
          </table:table-cell>
          <table:table-cell table:formula="of:=YEAR([$dms.$J275])" office:value-type="float" office:value="2027" calcext:value-type="float">
            <text:p>2027</text:p>
          </table:table-cell>
          <table:table-cell table:formula="of:=COM.MICROSOFT.CONCAT([$dms.$L275];&quot; &quot;;[$dms.$M275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4" calcext:value-type="date">
            <text:p>14/3/2027</text:p>
          </table:table-cell>
          <table:table-cell table:formula="of:=MONTH([.J276])" office:value-type="float" office:value="3" calcext:value-type="float">
            <text:p>3</text:p>
          </table:table-cell>
          <table:table-cell table:formula="of:=COM.MICROSOFT.XLOOKUP([$dms.$K276];[.G:.G];[.H:.H])" office:value-type="string" office:string-value="Mar" calcext:value-type="string">
            <text:p>Mar</text:p>
          </table:table-cell>
          <table:table-cell table:formula="of:=YEAR([$dms.$J276])" office:value-type="float" office:value="2027" calcext:value-type="float">
            <text:p>2027</text:p>
          </table:table-cell>
          <table:table-cell table:formula="of:=COM.MICROSOFT.CONCAT([$dms.$L276];&quot; &quot;;[$dms.$M276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5" calcext:value-type="date">
            <text:p>15/3/2027</text:p>
          </table:table-cell>
          <table:table-cell table:formula="of:=MONTH([.J277])" office:value-type="float" office:value="3" calcext:value-type="float">
            <text:p>3</text:p>
          </table:table-cell>
          <table:table-cell table:formula="of:=COM.MICROSOFT.XLOOKUP([$dms.$K277];[.G:.G];[.H:.H])" office:value-type="string" office:string-value="Mar" calcext:value-type="string">
            <text:p>Mar</text:p>
          </table:table-cell>
          <table:table-cell table:formula="of:=YEAR([$dms.$J277])" office:value-type="float" office:value="2027" calcext:value-type="float">
            <text:p>2027</text:p>
          </table:table-cell>
          <table:table-cell table:formula="of:=COM.MICROSOFT.CONCAT([$dms.$L277];&quot; &quot;;[$dms.$M277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6" calcext:value-type="date">
            <text:p>16/3/2027</text:p>
          </table:table-cell>
          <table:table-cell table:formula="of:=MONTH([.J278])" office:value-type="float" office:value="3" calcext:value-type="float">
            <text:p>3</text:p>
          </table:table-cell>
          <table:table-cell table:formula="of:=COM.MICROSOFT.XLOOKUP([$dms.$K278];[.G:.G];[.H:.H])" office:value-type="string" office:string-value="Mar" calcext:value-type="string">
            <text:p>Mar</text:p>
          </table:table-cell>
          <table:table-cell table:formula="of:=YEAR([$dms.$J278])" office:value-type="float" office:value="2027" calcext:value-type="float">
            <text:p>2027</text:p>
          </table:table-cell>
          <table:table-cell table:formula="of:=COM.MICROSOFT.CONCAT([$dms.$L278];&quot; &quot;;[$dms.$M278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7" calcext:value-type="date">
            <text:p>17/3/2027</text:p>
          </table:table-cell>
          <table:table-cell table:formula="of:=MONTH([.J279])" office:value-type="float" office:value="3" calcext:value-type="float">
            <text:p>3</text:p>
          </table:table-cell>
          <table:table-cell table:formula="of:=COM.MICROSOFT.XLOOKUP([$dms.$K279];[.G:.G];[.H:.H])" office:value-type="string" office:string-value="Mar" calcext:value-type="string">
            <text:p>Mar</text:p>
          </table:table-cell>
          <table:table-cell table:formula="of:=YEAR([$dms.$J279])" office:value-type="float" office:value="2027" calcext:value-type="float">
            <text:p>2027</text:p>
          </table:table-cell>
          <table:table-cell table:formula="of:=COM.MICROSOFT.CONCAT([$dms.$L279];&quot; &quot;;[$dms.$M279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8" calcext:value-type="date">
            <text:p>18/3/2027</text:p>
          </table:table-cell>
          <table:table-cell table:formula="of:=MONTH([.J280])" office:value-type="float" office:value="3" calcext:value-type="float">
            <text:p>3</text:p>
          </table:table-cell>
          <table:table-cell table:formula="of:=COM.MICROSOFT.XLOOKUP([$dms.$K280];[.G:.G];[.H:.H])" office:value-type="string" office:string-value="Mar" calcext:value-type="string">
            <text:p>Mar</text:p>
          </table:table-cell>
          <table:table-cell table:formula="of:=YEAR([$dms.$J280])" office:value-type="float" office:value="2027" calcext:value-type="float">
            <text:p>2027</text:p>
          </table:table-cell>
          <table:table-cell table:formula="of:=COM.MICROSOFT.CONCAT([$dms.$L280];&quot; &quot;;[$dms.$M280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19" calcext:value-type="date">
            <text:p>19/3/2027</text:p>
          </table:table-cell>
          <table:table-cell table:formula="of:=MONTH([.J281])" office:value-type="float" office:value="3" calcext:value-type="float">
            <text:p>3</text:p>
          </table:table-cell>
          <table:table-cell table:formula="of:=COM.MICROSOFT.XLOOKUP([$dms.$K281];[.G:.G];[.H:.H])" office:value-type="string" office:string-value="Mar" calcext:value-type="string">
            <text:p>Mar</text:p>
          </table:table-cell>
          <table:table-cell table:formula="of:=YEAR([$dms.$J281])" office:value-type="float" office:value="2027" calcext:value-type="float">
            <text:p>2027</text:p>
          </table:table-cell>
          <table:table-cell table:formula="of:=COM.MICROSOFT.CONCAT([$dms.$L281];&quot; &quot;;[$dms.$M281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0" calcext:value-type="date">
            <text:p>20/3/2027</text:p>
          </table:table-cell>
          <table:table-cell table:formula="of:=MONTH([.J282])" office:value-type="float" office:value="3" calcext:value-type="float">
            <text:p>3</text:p>
          </table:table-cell>
          <table:table-cell table:formula="of:=COM.MICROSOFT.XLOOKUP([$dms.$K282];[.G:.G];[.H:.H])" office:value-type="string" office:string-value="Mar" calcext:value-type="string">
            <text:p>Mar</text:p>
          </table:table-cell>
          <table:table-cell table:formula="of:=YEAR([$dms.$J282])" office:value-type="float" office:value="2027" calcext:value-type="float">
            <text:p>2027</text:p>
          </table:table-cell>
          <table:table-cell table:formula="of:=COM.MICROSOFT.CONCAT([$dms.$L282];&quot; &quot;;[$dms.$M282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1" calcext:value-type="date">
            <text:p>21/3/2027</text:p>
          </table:table-cell>
          <table:table-cell table:formula="of:=MONTH([.J283])" office:value-type="float" office:value="3" calcext:value-type="float">
            <text:p>3</text:p>
          </table:table-cell>
          <table:table-cell table:formula="of:=COM.MICROSOFT.XLOOKUP([$dms.$K283];[.G:.G];[.H:.H])" office:value-type="string" office:string-value="Mar" calcext:value-type="string">
            <text:p>Mar</text:p>
          </table:table-cell>
          <table:table-cell table:formula="of:=YEAR([$dms.$J283])" office:value-type="float" office:value="2027" calcext:value-type="float">
            <text:p>2027</text:p>
          </table:table-cell>
          <table:table-cell table:formula="of:=COM.MICROSOFT.CONCAT([$dms.$L283];&quot; &quot;;[$dms.$M283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2" calcext:value-type="date">
            <text:p>22/3/2027</text:p>
          </table:table-cell>
          <table:table-cell table:formula="of:=MONTH([.J284])" office:value-type="float" office:value="3" calcext:value-type="float">
            <text:p>3</text:p>
          </table:table-cell>
          <table:table-cell table:formula="of:=COM.MICROSOFT.XLOOKUP([$dms.$K284];[.G:.G];[.H:.H])" office:value-type="string" office:string-value="Mar" calcext:value-type="string">
            <text:p>Mar</text:p>
          </table:table-cell>
          <table:table-cell table:formula="of:=YEAR([$dms.$J284])" office:value-type="float" office:value="2027" calcext:value-type="float">
            <text:p>2027</text:p>
          </table:table-cell>
          <table:table-cell table:formula="of:=COM.MICROSOFT.CONCAT([$dms.$L284];&quot; &quot;;[$dms.$M284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3" calcext:value-type="date">
            <text:p>23/3/2027</text:p>
          </table:table-cell>
          <table:table-cell table:formula="of:=MONTH([.J285])" office:value-type="float" office:value="3" calcext:value-type="float">
            <text:p>3</text:p>
          </table:table-cell>
          <table:table-cell table:formula="of:=COM.MICROSOFT.XLOOKUP([$dms.$K285];[.G:.G];[.H:.H])" office:value-type="string" office:string-value="Mar" calcext:value-type="string">
            <text:p>Mar</text:p>
          </table:table-cell>
          <table:table-cell table:formula="of:=YEAR([$dms.$J285])" office:value-type="float" office:value="2027" calcext:value-type="float">
            <text:p>2027</text:p>
          </table:table-cell>
          <table:table-cell table:formula="of:=COM.MICROSOFT.CONCAT([$dms.$L285];&quot; &quot;;[$dms.$M285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4" calcext:value-type="date">
            <text:p>24/3/2027</text:p>
          </table:table-cell>
          <table:table-cell table:formula="of:=MONTH([.J286])" office:value-type="float" office:value="3" calcext:value-type="float">
            <text:p>3</text:p>
          </table:table-cell>
          <table:table-cell table:formula="of:=COM.MICROSOFT.XLOOKUP([$dms.$K286];[.G:.G];[.H:.H])" office:value-type="string" office:string-value="Mar" calcext:value-type="string">
            <text:p>Mar</text:p>
          </table:table-cell>
          <table:table-cell table:formula="of:=YEAR([$dms.$J286])" office:value-type="float" office:value="2027" calcext:value-type="float">
            <text:p>2027</text:p>
          </table:table-cell>
          <table:table-cell table:formula="of:=COM.MICROSOFT.CONCAT([$dms.$L286];&quot; &quot;;[$dms.$M286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5" calcext:value-type="date">
            <text:p>25/3/2027</text:p>
          </table:table-cell>
          <table:table-cell table:formula="of:=MONTH([.J287])" office:value-type="float" office:value="3" calcext:value-type="float">
            <text:p>3</text:p>
          </table:table-cell>
          <table:table-cell table:formula="of:=COM.MICROSOFT.XLOOKUP([$dms.$K287];[.G:.G];[.H:.H])" office:value-type="string" office:string-value="Mar" calcext:value-type="string">
            <text:p>Mar</text:p>
          </table:table-cell>
          <table:table-cell table:formula="of:=YEAR([$dms.$J287])" office:value-type="float" office:value="2027" calcext:value-type="float">
            <text:p>2027</text:p>
          </table:table-cell>
          <table:table-cell table:formula="of:=COM.MICROSOFT.CONCAT([$dms.$L287];&quot; &quot;;[$dms.$M287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6" calcext:value-type="date">
            <text:p>26/3/2027</text:p>
          </table:table-cell>
          <table:table-cell table:formula="of:=MONTH([.J288])" office:value-type="float" office:value="3" calcext:value-type="float">
            <text:p>3</text:p>
          </table:table-cell>
          <table:table-cell table:formula="of:=COM.MICROSOFT.XLOOKUP([$dms.$K288];[.G:.G];[.H:.H])" office:value-type="string" office:string-value="Mar" calcext:value-type="string">
            <text:p>Mar</text:p>
          </table:table-cell>
          <table:table-cell table:formula="of:=YEAR([$dms.$J288])" office:value-type="float" office:value="2027" calcext:value-type="float">
            <text:p>2027</text:p>
          </table:table-cell>
          <table:table-cell table:formula="of:=COM.MICROSOFT.CONCAT([$dms.$L288];&quot; &quot;;[$dms.$M288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7" calcext:value-type="date">
            <text:p>27/3/2027</text:p>
          </table:table-cell>
          <table:table-cell table:formula="of:=MONTH([.J289])" office:value-type="float" office:value="3" calcext:value-type="float">
            <text:p>3</text:p>
          </table:table-cell>
          <table:table-cell table:formula="of:=COM.MICROSOFT.XLOOKUP([$dms.$K289];[.G:.G];[.H:.H])" office:value-type="string" office:string-value="Mar" calcext:value-type="string">
            <text:p>Mar</text:p>
          </table:table-cell>
          <table:table-cell table:formula="of:=YEAR([$dms.$J289])" office:value-type="float" office:value="2027" calcext:value-type="float">
            <text:p>2027</text:p>
          </table:table-cell>
          <table:table-cell table:formula="of:=COM.MICROSOFT.CONCAT([$dms.$L289];&quot; &quot;;[$dms.$M289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8" calcext:value-type="date">
            <text:p>28/3/2027</text:p>
          </table:table-cell>
          <table:table-cell table:formula="of:=MONTH([.J290])" office:value-type="float" office:value="3" calcext:value-type="float">
            <text:p>3</text:p>
          </table:table-cell>
          <table:table-cell table:formula="of:=COM.MICROSOFT.XLOOKUP([$dms.$K290];[.G:.G];[.H:.H])" office:value-type="string" office:string-value="Mar" calcext:value-type="string">
            <text:p>Mar</text:p>
          </table:table-cell>
          <table:table-cell table:formula="of:=YEAR([$dms.$J290])" office:value-type="float" office:value="2027" calcext:value-type="float">
            <text:p>2027</text:p>
          </table:table-cell>
          <table:table-cell table:formula="of:=COM.MICROSOFT.CONCAT([$dms.$L290];&quot; &quot;;[$dms.$M290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29" calcext:value-type="date">
            <text:p>29/3/2027</text:p>
          </table:table-cell>
          <table:table-cell table:formula="of:=MONTH([.J291])" office:value-type="float" office:value="3" calcext:value-type="float">
            <text:p>3</text:p>
          </table:table-cell>
          <table:table-cell table:formula="of:=COM.MICROSOFT.XLOOKUP([$dms.$K291];[.G:.G];[.H:.H])" office:value-type="string" office:string-value="Mar" calcext:value-type="string">
            <text:p>Mar</text:p>
          </table:table-cell>
          <table:table-cell table:formula="of:=YEAR([$dms.$J291])" office:value-type="float" office:value="2027" calcext:value-type="float">
            <text:p>2027</text:p>
          </table:table-cell>
          <table:table-cell table:formula="of:=COM.MICROSOFT.CONCAT([$dms.$L291];&quot; &quot;;[$dms.$M291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30" calcext:value-type="date">
            <text:p>30/3/2027</text:p>
          </table:table-cell>
          <table:table-cell table:formula="of:=MONTH([.J292])" office:value-type="float" office:value="3" calcext:value-type="float">
            <text:p>3</text:p>
          </table:table-cell>
          <table:table-cell table:formula="of:=COM.MICROSOFT.XLOOKUP([$dms.$K292];[.G:.G];[.H:.H])" office:value-type="string" office:string-value="Mar" calcext:value-type="string">
            <text:p>Mar</text:p>
          </table:table-cell>
          <table:table-cell table:formula="of:=YEAR([$dms.$J292])" office:value-type="float" office:value="2027" calcext:value-type="float">
            <text:p>2027</text:p>
          </table:table-cell>
          <table:table-cell table:formula="of:=COM.MICROSOFT.CONCAT([$dms.$L292];&quot; &quot;;[$dms.$M292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3-31" calcext:value-type="date">
            <text:p>31/3/2027</text:p>
          </table:table-cell>
          <table:table-cell table:formula="of:=MONTH([.J293])" office:value-type="float" office:value="3" calcext:value-type="float">
            <text:p>3</text:p>
          </table:table-cell>
          <table:table-cell table:formula="of:=COM.MICROSOFT.XLOOKUP([$dms.$K293];[.G:.G];[.H:.H])" office:value-type="string" office:string-value="Mar" calcext:value-type="string">
            <text:p>Mar</text:p>
          </table:table-cell>
          <table:table-cell table:formula="of:=YEAR([$dms.$J293])" office:value-type="float" office:value="2027" calcext:value-type="float">
            <text:p>2027</text:p>
          </table:table-cell>
          <table:table-cell table:formula="of:=COM.MICROSOFT.CONCAT([$dms.$L293];&quot; &quot;;[$dms.$M293])" office:value-type="string" office:string-value="Mar 2027" calcext:value-type="string">
            <text:p>Ma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01" calcext:value-type="date">
            <text:p>1/4/2027</text:p>
          </table:table-cell>
          <table:table-cell table:formula="of:=MONTH([.J294])" office:value-type="float" office:value="4" calcext:value-type="float">
            <text:p>4</text:p>
          </table:table-cell>
          <table:table-cell table:formula="of:=COM.MICROSOFT.XLOOKUP([$dms.$K294];[.G:.G];[.H:.H])" office:value-type="string" office:string-value="Abr" calcext:value-type="string">
            <text:p>Abr</text:p>
          </table:table-cell>
          <table:table-cell table:formula="of:=YEAR([$dms.$J294])" office:value-type="float" office:value="2027" calcext:value-type="float">
            <text:p>2027</text:p>
          </table:table-cell>
          <table:table-cell table:formula="of:=COM.MICROSOFT.CONCAT([$dms.$L294];&quot; &quot;;[$dms.$M294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02" calcext:value-type="date">
            <text:p>2/4/2027</text:p>
          </table:table-cell>
          <table:table-cell table:formula="of:=MONTH([.J295])" office:value-type="float" office:value="4" calcext:value-type="float">
            <text:p>4</text:p>
          </table:table-cell>
          <table:table-cell table:formula="of:=COM.MICROSOFT.XLOOKUP([$dms.$K295];[.G:.G];[.H:.H])" office:value-type="string" office:string-value="Abr" calcext:value-type="string">
            <text:p>Abr</text:p>
          </table:table-cell>
          <table:table-cell table:formula="of:=YEAR([$dms.$J295])" office:value-type="float" office:value="2027" calcext:value-type="float">
            <text:p>2027</text:p>
          </table:table-cell>
          <table:table-cell table:formula="of:=COM.MICROSOFT.CONCAT([$dms.$L295];&quot; &quot;;[$dms.$M295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03" calcext:value-type="date">
            <text:p>3/4/2027</text:p>
          </table:table-cell>
          <table:table-cell table:formula="of:=MONTH([.J296])" office:value-type="float" office:value="4" calcext:value-type="float">
            <text:p>4</text:p>
          </table:table-cell>
          <table:table-cell table:formula="of:=COM.MICROSOFT.XLOOKUP([$dms.$K296];[.G:.G];[.H:.H])" office:value-type="string" office:string-value="Abr" calcext:value-type="string">
            <text:p>Abr</text:p>
          </table:table-cell>
          <table:table-cell table:formula="of:=YEAR([$dms.$J296])" office:value-type="float" office:value="2027" calcext:value-type="float">
            <text:p>2027</text:p>
          </table:table-cell>
          <table:table-cell table:formula="of:=COM.MICROSOFT.CONCAT([$dms.$L296];&quot; &quot;;[$dms.$M296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04" calcext:value-type="date">
            <text:p>4/4/2027</text:p>
          </table:table-cell>
          <table:table-cell table:formula="of:=MONTH([.J297])" office:value-type="float" office:value="4" calcext:value-type="float">
            <text:p>4</text:p>
          </table:table-cell>
          <table:table-cell table:formula="of:=COM.MICROSOFT.XLOOKUP([$dms.$K297];[.G:.G];[.H:.H])" office:value-type="string" office:string-value="Abr" calcext:value-type="string">
            <text:p>Abr</text:p>
          </table:table-cell>
          <table:table-cell table:formula="of:=YEAR([$dms.$J297])" office:value-type="float" office:value="2027" calcext:value-type="float">
            <text:p>2027</text:p>
          </table:table-cell>
          <table:table-cell table:formula="of:=COM.MICROSOFT.CONCAT([$dms.$L297];&quot; &quot;;[$dms.$M297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05" calcext:value-type="date">
            <text:p>5/4/2027</text:p>
          </table:table-cell>
          <table:table-cell table:formula="of:=MONTH([.J298])" office:value-type="float" office:value="4" calcext:value-type="float">
            <text:p>4</text:p>
          </table:table-cell>
          <table:table-cell table:formula="of:=COM.MICROSOFT.XLOOKUP([$dms.$K298];[.G:.G];[.H:.H])" office:value-type="string" office:string-value="Abr" calcext:value-type="string">
            <text:p>Abr</text:p>
          </table:table-cell>
          <table:table-cell table:formula="of:=YEAR([$dms.$J298])" office:value-type="float" office:value="2027" calcext:value-type="float">
            <text:p>2027</text:p>
          </table:table-cell>
          <table:table-cell table:formula="of:=COM.MICROSOFT.CONCAT([$dms.$L298];&quot; &quot;;[$dms.$M298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06" calcext:value-type="date">
            <text:p>6/4/2027</text:p>
          </table:table-cell>
          <table:table-cell table:formula="of:=MONTH([.J299])" office:value-type="float" office:value="4" calcext:value-type="float">
            <text:p>4</text:p>
          </table:table-cell>
          <table:table-cell table:formula="of:=COM.MICROSOFT.XLOOKUP([$dms.$K299];[.G:.G];[.H:.H])" office:value-type="string" office:string-value="Abr" calcext:value-type="string">
            <text:p>Abr</text:p>
          </table:table-cell>
          <table:table-cell table:formula="of:=YEAR([$dms.$J299])" office:value-type="float" office:value="2027" calcext:value-type="float">
            <text:p>2027</text:p>
          </table:table-cell>
          <table:table-cell table:formula="of:=COM.MICROSOFT.CONCAT([$dms.$L299];&quot; &quot;;[$dms.$M299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07" calcext:value-type="date">
            <text:p>7/4/2027</text:p>
          </table:table-cell>
          <table:table-cell table:formula="of:=MONTH([.J300])" office:value-type="float" office:value="4" calcext:value-type="float">
            <text:p>4</text:p>
          </table:table-cell>
          <table:table-cell table:formula="of:=COM.MICROSOFT.XLOOKUP([$dms.$K300];[.G:.G];[.H:.H])" office:value-type="string" office:string-value="Abr" calcext:value-type="string">
            <text:p>Abr</text:p>
          </table:table-cell>
          <table:table-cell table:formula="of:=YEAR([$dms.$J300])" office:value-type="float" office:value="2027" calcext:value-type="float">
            <text:p>2027</text:p>
          </table:table-cell>
          <table:table-cell table:formula="of:=COM.MICROSOFT.CONCAT([$dms.$L300];&quot; &quot;;[$dms.$M300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08" calcext:value-type="date">
            <text:p>8/4/2027</text:p>
          </table:table-cell>
          <table:table-cell table:formula="of:=MONTH([.J301])" office:value-type="float" office:value="4" calcext:value-type="float">
            <text:p>4</text:p>
          </table:table-cell>
          <table:table-cell table:formula="of:=COM.MICROSOFT.XLOOKUP([$dms.$K301];[.G:.G];[.H:.H])" office:value-type="string" office:string-value="Abr" calcext:value-type="string">
            <text:p>Abr</text:p>
          </table:table-cell>
          <table:table-cell table:formula="of:=YEAR([$dms.$J301])" office:value-type="float" office:value="2027" calcext:value-type="float">
            <text:p>2027</text:p>
          </table:table-cell>
          <table:table-cell table:formula="of:=COM.MICROSOFT.CONCAT([$dms.$L301];&quot; &quot;;[$dms.$M301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09" calcext:value-type="date">
            <text:p>9/4/2027</text:p>
          </table:table-cell>
          <table:table-cell table:formula="of:=MONTH([.J302])" office:value-type="float" office:value="4" calcext:value-type="float">
            <text:p>4</text:p>
          </table:table-cell>
          <table:table-cell table:formula="of:=COM.MICROSOFT.XLOOKUP([$dms.$K302];[.G:.G];[.H:.H])" office:value-type="string" office:string-value="Abr" calcext:value-type="string">
            <text:p>Abr</text:p>
          </table:table-cell>
          <table:table-cell table:formula="of:=YEAR([$dms.$J302])" office:value-type="float" office:value="2027" calcext:value-type="float">
            <text:p>2027</text:p>
          </table:table-cell>
          <table:table-cell table:formula="of:=COM.MICROSOFT.CONCAT([$dms.$L302];&quot; &quot;;[$dms.$M302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0" calcext:value-type="date">
            <text:p>10/4/2027</text:p>
          </table:table-cell>
          <table:table-cell table:formula="of:=MONTH([.J303])" office:value-type="float" office:value="4" calcext:value-type="float">
            <text:p>4</text:p>
          </table:table-cell>
          <table:table-cell table:formula="of:=COM.MICROSOFT.XLOOKUP([$dms.$K303];[.G:.G];[.H:.H])" office:value-type="string" office:string-value="Abr" calcext:value-type="string">
            <text:p>Abr</text:p>
          </table:table-cell>
          <table:table-cell table:formula="of:=YEAR([$dms.$J303])" office:value-type="float" office:value="2027" calcext:value-type="float">
            <text:p>2027</text:p>
          </table:table-cell>
          <table:table-cell table:formula="of:=COM.MICROSOFT.CONCAT([$dms.$L303];&quot; &quot;;[$dms.$M303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1" calcext:value-type="date">
            <text:p>11/4/2027</text:p>
          </table:table-cell>
          <table:table-cell table:formula="of:=MONTH([.J304])" office:value-type="float" office:value="4" calcext:value-type="float">
            <text:p>4</text:p>
          </table:table-cell>
          <table:table-cell table:formula="of:=COM.MICROSOFT.XLOOKUP([$dms.$K304];[.G:.G];[.H:.H])" office:value-type="string" office:string-value="Abr" calcext:value-type="string">
            <text:p>Abr</text:p>
          </table:table-cell>
          <table:table-cell table:formula="of:=YEAR([$dms.$J304])" office:value-type="float" office:value="2027" calcext:value-type="float">
            <text:p>2027</text:p>
          </table:table-cell>
          <table:table-cell table:formula="of:=COM.MICROSOFT.CONCAT([$dms.$L304];&quot; &quot;;[$dms.$M304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2" calcext:value-type="date">
            <text:p>12/4/2027</text:p>
          </table:table-cell>
          <table:table-cell table:formula="of:=MONTH([.J305])" office:value-type="float" office:value="4" calcext:value-type="float">
            <text:p>4</text:p>
          </table:table-cell>
          <table:table-cell table:formula="of:=COM.MICROSOFT.XLOOKUP([$dms.$K305];[.G:.G];[.H:.H])" office:value-type="string" office:string-value="Abr" calcext:value-type="string">
            <text:p>Abr</text:p>
          </table:table-cell>
          <table:table-cell table:formula="of:=YEAR([$dms.$J305])" office:value-type="float" office:value="2027" calcext:value-type="float">
            <text:p>2027</text:p>
          </table:table-cell>
          <table:table-cell table:formula="of:=COM.MICROSOFT.CONCAT([$dms.$L305];&quot; &quot;;[$dms.$M305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3" calcext:value-type="date">
            <text:p>13/4/2027</text:p>
          </table:table-cell>
          <table:table-cell table:formula="of:=MONTH([.J306])" office:value-type="float" office:value="4" calcext:value-type="float">
            <text:p>4</text:p>
          </table:table-cell>
          <table:table-cell table:formula="of:=COM.MICROSOFT.XLOOKUP([$dms.$K306];[.G:.G];[.H:.H])" office:value-type="string" office:string-value="Abr" calcext:value-type="string">
            <text:p>Abr</text:p>
          </table:table-cell>
          <table:table-cell table:formula="of:=YEAR([$dms.$J306])" office:value-type="float" office:value="2027" calcext:value-type="float">
            <text:p>2027</text:p>
          </table:table-cell>
          <table:table-cell table:formula="of:=COM.MICROSOFT.CONCAT([$dms.$L306];&quot; &quot;;[$dms.$M306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4" calcext:value-type="date">
            <text:p>14/4/2027</text:p>
          </table:table-cell>
          <table:table-cell table:formula="of:=MONTH([.J307])" office:value-type="float" office:value="4" calcext:value-type="float">
            <text:p>4</text:p>
          </table:table-cell>
          <table:table-cell table:formula="of:=COM.MICROSOFT.XLOOKUP([$dms.$K307];[.G:.G];[.H:.H])" office:value-type="string" office:string-value="Abr" calcext:value-type="string">
            <text:p>Abr</text:p>
          </table:table-cell>
          <table:table-cell table:formula="of:=YEAR([$dms.$J307])" office:value-type="float" office:value="2027" calcext:value-type="float">
            <text:p>2027</text:p>
          </table:table-cell>
          <table:table-cell table:formula="of:=COM.MICROSOFT.CONCAT([$dms.$L307];&quot; &quot;;[$dms.$M307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5" calcext:value-type="date">
            <text:p>15/4/2027</text:p>
          </table:table-cell>
          <table:table-cell table:formula="of:=MONTH([.J308])" office:value-type="float" office:value="4" calcext:value-type="float">
            <text:p>4</text:p>
          </table:table-cell>
          <table:table-cell table:formula="of:=COM.MICROSOFT.XLOOKUP([$dms.$K308];[.G:.G];[.H:.H])" office:value-type="string" office:string-value="Abr" calcext:value-type="string">
            <text:p>Abr</text:p>
          </table:table-cell>
          <table:table-cell table:formula="of:=YEAR([$dms.$J308])" office:value-type="float" office:value="2027" calcext:value-type="float">
            <text:p>2027</text:p>
          </table:table-cell>
          <table:table-cell table:formula="of:=COM.MICROSOFT.CONCAT([$dms.$L308];&quot; &quot;;[$dms.$M308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6" calcext:value-type="date">
            <text:p>16/4/2027</text:p>
          </table:table-cell>
          <table:table-cell table:formula="of:=MONTH([.J309])" office:value-type="float" office:value="4" calcext:value-type="float">
            <text:p>4</text:p>
          </table:table-cell>
          <table:table-cell table:formula="of:=COM.MICROSOFT.XLOOKUP([$dms.$K309];[.G:.G];[.H:.H])" office:value-type="string" office:string-value="Abr" calcext:value-type="string">
            <text:p>Abr</text:p>
          </table:table-cell>
          <table:table-cell table:formula="of:=YEAR([$dms.$J309])" office:value-type="float" office:value="2027" calcext:value-type="float">
            <text:p>2027</text:p>
          </table:table-cell>
          <table:table-cell table:formula="of:=COM.MICROSOFT.CONCAT([$dms.$L309];&quot; &quot;;[$dms.$M309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7" calcext:value-type="date">
            <text:p>17/4/2027</text:p>
          </table:table-cell>
          <table:table-cell table:formula="of:=MONTH([.J310])" office:value-type="float" office:value="4" calcext:value-type="float">
            <text:p>4</text:p>
          </table:table-cell>
          <table:table-cell table:formula="of:=COM.MICROSOFT.XLOOKUP([$dms.$K310];[.G:.G];[.H:.H])" office:value-type="string" office:string-value="Abr" calcext:value-type="string">
            <text:p>Abr</text:p>
          </table:table-cell>
          <table:table-cell table:formula="of:=YEAR([$dms.$J310])" office:value-type="float" office:value="2027" calcext:value-type="float">
            <text:p>2027</text:p>
          </table:table-cell>
          <table:table-cell table:formula="of:=COM.MICROSOFT.CONCAT([$dms.$L310];&quot; &quot;;[$dms.$M310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8" calcext:value-type="date">
            <text:p>18/4/2027</text:p>
          </table:table-cell>
          <table:table-cell table:formula="of:=MONTH([.J311])" office:value-type="float" office:value="4" calcext:value-type="float">
            <text:p>4</text:p>
          </table:table-cell>
          <table:table-cell table:formula="of:=COM.MICROSOFT.XLOOKUP([$dms.$K311];[.G:.G];[.H:.H])" office:value-type="string" office:string-value="Abr" calcext:value-type="string">
            <text:p>Abr</text:p>
          </table:table-cell>
          <table:table-cell table:formula="of:=YEAR([$dms.$J311])" office:value-type="float" office:value="2027" calcext:value-type="float">
            <text:p>2027</text:p>
          </table:table-cell>
          <table:table-cell table:formula="of:=COM.MICROSOFT.CONCAT([$dms.$L311];&quot; &quot;;[$dms.$M311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19" calcext:value-type="date">
            <text:p>19/4/2027</text:p>
          </table:table-cell>
          <table:table-cell table:formula="of:=MONTH([.J312])" office:value-type="float" office:value="4" calcext:value-type="float">
            <text:p>4</text:p>
          </table:table-cell>
          <table:table-cell table:formula="of:=COM.MICROSOFT.XLOOKUP([$dms.$K312];[.G:.G];[.H:.H])" office:value-type="string" office:string-value="Abr" calcext:value-type="string">
            <text:p>Abr</text:p>
          </table:table-cell>
          <table:table-cell table:formula="of:=YEAR([$dms.$J312])" office:value-type="float" office:value="2027" calcext:value-type="float">
            <text:p>2027</text:p>
          </table:table-cell>
          <table:table-cell table:formula="of:=COM.MICROSOFT.CONCAT([$dms.$L312];&quot; &quot;;[$dms.$M312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0" calcext:value-type="date">
            <text:p>20/4/2027</text:p>
          </table:table-cell>
          <table:table-cell table:formula="of:=MONTH([.J313])" office:value-type="float" office:value="4" calcext:value-type="float">
            <text:p>4</text:p>
          </table:table-cell>
          <table:table-cell table:formula="of:=COM.MICROSOFT.XLOOKUP([$dms.$K313];[.G:.G];[.H:.H])" office:value-type="string" office:string-value="Abr" calcext:value-type="string">
            <text:p>Abr</text:p>
          </table:table-cell>
          <table:table-cell table:formula="of:=YEAR([$dms.$J313])" office:value-type="float" office:value="2027" calcext:value-type="float">
            <text:p>2027</text:p>
          </table:table-cell>
          <table:table-cell table:formula="of:=COM.MICROSOFT.CONCAT([$dms.$L313];&quot; &quot;;[$dms.$M313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1" calcext:value-type="date">
            <text:p>21/4/2027</text:p>
          </table:table-cell>
          <table:table-cell table:formula="of:=MONTH([.J314])" office:value-type="float" office:value="4" calcext:value-type="float">
            <text:p>4</text:p>
          </table:table-cell>
          <table:table-cell table:formula="of:=COM.MICROSOFT.XLOOKUP([$dms.$K314];[.G:.G];[.H:.H])" office:value-type="string" office:string-value="Abr" calcext:value-type="string">
            <text:p>Abr</text:p>
          </table:table-cell>
          <table:table-cell table:formula="of:=YEAR([$dms.$J314])" office:value-type="float" office:value="2027" calcext:value-type="float">
            <text:p>2027</text:p>
          </table:table-cell>
          <table:table-cell table:formula="of:=COM.MICROSOFT.CONCAT([$dms.$L314];&quot; &quot;;[$dms.$M314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2" calcext:value-type="date">
            <text:p>22/4/2027</text:p>
          </table:table-cell>
          <table:table-cell table:formula="of:=MONTH([.J315])" office:value-type="float" office:value="4" calcext:value-type="float">
            <text:p>4</text:p>
          </table:table-cell>
          <table:table-cell table:formula="of:=COM.MICROSOFT.XLOOKUP([$dms.$K315];[.G:.G];[.H:.H])" office:value-type="string" office:string-value="Abr" calcext:value-type="string">
            <text:p>Abr</text:p>
          </table:table-cell>
          <table:table-cell table:formula="of:=YEAR([$dms.$J315])" office:value-type="float" office:value="2027" calcext:value-type="float">
            <text:p>2027</text:p>
          </table:table-cell>
          <table:table-cell table:formula="of:=COM.MICROSOFT.CONCAT([$dms.$L315];&quot; &quot;;[$dms.$M315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3" calcext:value-type="date">
            <text:p>23/4/2027</text:p>
          </table:table-cell>
          <table:table-cell table:formula="of:=MONTH([.J316])" office:value-type="float" office:value="4" calcext:value-type="float">
            <text:p>4</text:p>
          </table:table-cell>
          <table:table-cell table:formula="of:=COM.MICROSOFT.XLOOKUP([$dms.$K316];[.G:.G];[.H:.H])" office:value-type="string" office:string-value="Abr" calcext:value-type="string">
            <text:p>Abr</text:p>
          </table:table-cell>
          <table:table-cell table:formula="of:=YEAR([$dms.$J316])" office:value-type="float" office:value="2027" calcext:value-type="float">
            <text:p>2027</text:p>
          </table:table-cell>
          <table:table-cell table:formula="of:=COM.MICROSOFT.CONCAT([$dms.$L316];&quot; &quot;;[$dms.$M316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4" calcext:value-type="date">
            <text:p>24/4/2027</text:p>
          </table:table-cell>
          <table:table-cell table:formula="of:=MONTH([.J317])" office:value-type="float" office:value="4" calcext:value-type="float">
            <text:p>4</text:p>
          </table:table-cell>
          <table:table-cell table:formula="of:=COM.MICROSOFT.XLOOKUP([$dms.$K317];[.G:.G];[.H:.H])" office:value-type="string" office:string-value="Abr" calcext:value-type="string">
            <text:p>Abr</text:p>
          </table:table-cell>
          <table:table-cell table:formula="of:=YEAR([$dms.$J317])" office:value-type="float" office:value="2027" calcext:value-type="float">
            <text:p>2027</text:p>
          </table:table-cell>
          <table:table-cell table:formula="of:=COM.MICROSOFT.CONCAT([$dms.$L317];&quot; &quot;;[$dms.$M317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5" calcext:value-type="date">
            <text:p>25/4/2027</text:p>
          </table:table-cell>
          <table:table-cell table:formula="of:=MONTH([.J318])" office:value-type="float" office:value="4" calcext:value-type="float">
            <text:p>4</text:p>
          </table:table-cell>
          <table:table-cell table:formula="of:=COM.MICROSOFT.XLOOKUP([$dms.$K318];[.G:.G];[.H:.H])" office:value-type="string" office:string-value="Abr" calcext:value-type="string">
            <text:p>Abr</text:p>
          </table:table-cell>
          <table:table-cell table:formula="of:=YEAR([$dms.$J318])" office:value-type="float" office:value="2027" calcext:value-type="float">
            <text:p>2027</text:p>
          </table:table-cell>
          <table:table-cell table:formula="of:=COM.MICROSOFT.CONCAT([$dms.$L318];&quot; &quot;;[$dms.$M318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6" calcext:value-type="date">
            <text:p>26/4/2027</text:p>
          </table:table-cell>
          <table:table-cell table:formula="of:=MONTH([.J319])" office:value-type="float" office:value="4" calcext:value-type="float">
            <text:p>4</text:p>
          </table:table-cell>
          <table:table-cell table:formula="of:=COM.MICROSOFT.XLOOKUP([$dms.$K319];[.G:.G];[.H:.H])" office:value-type="string" office:string-value="Abr" calcext:value-type="string">
            <text:p>Abr</text:p>
          </table:table-cell>
          <table:table-cell table:formula="of:=YEAR([$dms.$J319])" office:value-type="float" office:value="2027" calcext:value-type="float">
            <text:p>2027</text:p>
          </table:table-cell>
          <table:table-cell table:formula="of:=COM.MICROSOFT.CONCAT([$dms.$L319];&quot; &quot;;[$dms.$M319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7" calcext:value-type="date">
            <text:p>27/4/2027</text:p>
          </table:table-cell>
          <table:table-cell table:formula="of:=MONTH([.J320])" office:value-type="float" office:value="4" calcext:value-type="float">
            <text:p>4</text:p>
          </table:table-cell>
          <table:table-cell table:formula="of:=COM.MICROSOFT.XLOOKUP([$dms.$K320];[.G:.G];[.H:.H])" office:value-type="string" office:string-value="Abr" calcext:value-type="string">
            <text:p>Abr</text:p>
          </table:table-cell>
          <table:table-cell table:formula="of:=YEAR([$dms.$J320])" office:value-type="float" office:value="2027" calcext:value-type="float">
            <text:p>2027</text:p>
          </table:table-cell>
          <table:table-cell table:formula="of:=COM.MICROSOFT.CONCAT([$dms.$L320];&quot; &quot;;[$dms.$M320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8" calcext:value-type="date">
            <text:p>28/4/2027</text:p>
          </table:table-cell>
          <table:table-cell table:formula="of:=MONTH([.J321])" office:value-type="float" office:value="4" calcext:value-type="float">
            <text:p>4</text:p>
          </table:table-cell>
          <table:table-cell table:formula="of:=COM.MICROSOFT.XLOOKUP([$dms.$K321];[.G:.G];[.H:.H])" office:value-type="string" office:string-value="Abr" calcext:value-type="string">
            <text:p>Abr</text:p>
          </table:table-cell>
          <table:table-cell table:formula="of:=YEAR([$dms.$J321])" office:value-type="float" office:value="2027" calcext:value-type="float">
            <text:p>2027</text:p>
          </table:table-cell>
          <table:table-cell table:formula="of:=COM.MICROSOFT.CONCAT([$dms.$L321];&quot; &quot;;[$dms.$M321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29" calcext:value-type="date">
            <text:p>29/4/2027</text:p>
          </table:table-cell>
          <table:table-cell table:formula="of:=MONTH([.J322])" office:value-type="float" office:value="4" calcext:value-type="float">
            <text:p>4</text:p>
          </table:table-cell>
          <table:table-cell table:formula="of:=COM.MICROSOFT.XLOOKUP([$dms.$K322];[.G:.G];[.H:.H])" office:value-type="string" office:string-value="Abr" calcext:value-type="string">
            <text:p>Abr</text:p>
          </table:table-cell>
          <table:table-cell table:formula="of:=YEAR([$dms.$J322])" office:value-type="float" office:value="2027" calcext:value-type="float">
            <text:p>2027</text:p>
          </table:table-cell>
          <table:table-cell table:formula="of:=COM.MICROSOFT.CONCAT([$dms.$L322];&quot; &quot;;[$dms.$M322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4-30" calcext:value-type="date">
            <text:p>30/4/2027</text:p>
          </table:table-cell>
          <table:table-cell table:formula="of:=MONTH([.J323])" office:value-type="float" office:value="4" calcext:value-type="float">
            <text:p>4</text:p>
          </table:table-cell>
          <table:table-cell table:formula="of:=COM.MICROSOFT.XLOOKUP([$dms.$K323];[.G:.G];[.H:.H])" office:value-type="string" office:string-value="Abr" calcext:value-type="string">
            <text:p>Abr</text:p>
          </table:table-cell>
          <table:table-cell table:formula="of:=YEAR([$dms.$J323])" office:value-type="float" office:value="2027" calcext:value-type="float">
            <text:p>2027</text:p>
          </table:table-cell>
          <table:table-cell table:formula="of:=COM.MICROSOFT.CONCAT([$dms.$L323];&quot; &quot;;[$dms.$M323])" office:value-type="string" office:string-value="Abr 2027" calcext:value-type="string">
            <text:p>Abr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01" calcext:value-type="date">
            <text:p>1/5/2027</text:p>
          </table:table-cell>
          <table:table-cell table:formula="of:=MONTH([.J324])" office:value-type="float" office:value="5" calcext:value-type="float">
            <text:p>5</text:p>
          </table:table-cell>
          <table:table-cell table:formula="of:=COM.MICROSOFT.XLOOKUP([$dms.$K324];[.G:.G];[.H:.H])" office:value-type="string" office:string-value="Mai" calcext:value-type="string">
            <text:p>Mai</text:p>
          </table:table-cell>
          <table:table-cell table:formula="of:=YEAR([$dms.$J324])" office:value-type="float" office:value="2027" calcext:value-type="float">
            <text:p>2027</text:p>
          </table:table-cell>
          <table:table-cell table:formula="of:=COM.MICROSOFT.CONCAT([$dms.$L324];&quot; &quot;;[$dms.$M324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02" calcext:value-type="date">
            <text:p>2/5/2027</text:p>
          </table:table-cell>
          <table:table-cell table:formula="of:=MONTH([.J325])" office:value-type="float" office:value="5" calcext:value-type="float">
            <text:p>5</text:p>
          </table:table-cell>
          <table:table-cell table:formula="of:=COM.MICROSOFT.XLOOKUP([$dms.$K325];[.G:.G];[.H:.H])" office:value-type="string" office:string-value="Mai" calcext:value-type="string">
            <text:p>Mai</text:p>
          </table:table-cell>
          <table:table-cell table:formula="of:=YEAR([$dms.$J325])" office:value-type="float" office:value="2027" calcext:value-type="float">
            <text:p>2027</text:p>
          </table:table-cell>
          <table:table-cell table:formula="of:=COM.MICROSOFT.CONCAT([$dms.$L325];&quot; &quot;;[$dms.$M325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03" calcext:value-type="date">
            <text:p>3/5/2027</text:p>
          </table:table-cell>
          <table:table-cell table:formula="of:=MONTH([.J326])" office:value-type="float" office:value="5" calcext:value-type="float">
            <text:p>5</text:p>
          </table:table-cell>
          <table:table-cell table:formula="of:=COM.MICROSOFT.XLOOKUP([$dms.$K326];[.G:.G];[.H:.H])" office:value-type="string" office:string-value="Mai" calcext:value-type="string">
            <text:p>Mai</text:p>
          </table:table-cell>
          <table:table-cell table:formula="of:=YEAR([$dms.$J326])" office:value-type="float" office:value="2027" calcext:value-type="float">
            <text:p>2027</text:p>
          </table:table-cell>
          <table:table-cell table:formula="of:=COM.MICROSOFT.CONCAT([$dms.$L326];&quot; &quot;;[$dms.$M326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04" calcext:value-type="date">
            <text:p>4/5/2027</text:p>
          </table:table-cell>
          <table:table-cell table:formula="of:=MONTH([.J327])" office:value-type="float" office:value="5" calcext:value-type="float">
            <text:p>5</text:p>
          </table:table-cell>
          <table:table-cell table:formula="of:=COM.MICROSOFT.XLOOKUP([$dms.$K327];[.G:.G];[.H:.H])" office:value-type="string" office:string-value="Mai" calcext:value-type="string">
            <text:p>Mai</text:p>
          </table:table-cell>
          <table:table-cell table:formula="of:=YEAR([$dms.$J327])" office:value-type="float" office:value="2027" calcext:value-type="float">
            <text:p>2027</text:p>
          </table:table-cell>
          <table:table-cell table:formula="of:=COM.MICROSOFT.CONCAT([$dms.$L327];&quot; &quot;;[$dms.$M327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05" calcext:value-type="date">
            <text:p>5/5/2027</text:p>
          </table:table-cell>
          <table:table-cell table:formula="of:=MONTH([.J328])" office:value-type="float" office:value="5" calcext:value-type="float">
            <text:p>5</text:p>
          </table:table-cell>
          <table:table-cell table:formula="of:=COM.MICROSOFT.XLOOKUP([$dms.$K328];[.G:.G];[.H:.H])" office:value-type="string" office:string-value="Mai" calcext:value-type="string">
            <text:p>Mai</text:p>
          </table:table-cell>
          <table:table-cell table:formula="of:=YEAR([$dms.$J328])" office:value-type="float" office:value="2027" calcext:value-type="float">
            <text:p>2027</text:p>
          </table:table-cell>
          <table:table-cell table:formula="of:=COM.MICROSOFT.CONCAT([$dms.$L328];&quot; &quot;;[$dms.$M328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06" calcext:value-type="date">
            <text:p>6/5/2027</text:p>
          </table:table-cell>
          <table:table-cell table:formula="of:=MONTH([.J329])" office:value-type="float" office:value="5" calcext:value-type="float">
            <text:p>5</text:p>
          </table:table-cell>
          <table:table-cell table:formula="of:=COM.MICROSOFT.XLOOKUP([$dms.$K329];[.G:.G];[.H:.H])" office:value-type="string" office:string-value="Mai" calcext:value-type="string">
            <text:p>Mai</text:p>
          </table:table-cell>
          <table:table-cell table:formula="of:=YEAR([$dms.$J329])" office:value-type="float" office:value="2027" calcext:value-type="float">
            <text:p>2027</text:p>
          </table:table-cell>
          <table:table-cell table:formula="of:=COM.MICROSOFT.CONCAT([$dms.$L329];&quot; &quot;;[$dms.$M329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07" calcext:value-type="date">
            <text:p>7/5/2027</text:p>
          </table:table-cell>
          <table:table-cell table:formula="of:=MONTH([.J330])" office:value-type="float" office:value="5" calcext:value-type="float">
            <text:p>5</text:p>
          </table:table-cell>
          <table:table-cell table:formula="of:=COM.MICROSOFT.XLOOKUP([$dms.$K330];[.G:.G];[.H:.H])" office:value-type="string" office:string-value="Mai" calcext:value-type="string">
            <text:p>Mai</text:p>
          </table:table-cell>
          <table:table-cell table:formula="of:=YEAR([$dms.$J330])" office:value-type="float" office:value="2027" calcext:value-type="float">
            <text:p>2027</text:p>
          </table:table-cell>
          <table:table-cell table:formula="of:=COM.MICROSOFT.CONCAT([$dms.$L330];&quot; &quot;;[$dms.$M330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08" calcext:value-type="date">
            <text:p>8/5/2027</text:p>
          </table:table-cell>
          <table:table-cell table:formula="of:=MONTH([.J331])" office:value-type="float" office:value="5" calcext:value-type="float">
            <text:p>5</text:p>
          </table:table-cell>
          <table:table-cell table:formula="of:=COM.MICROSOFT.XLOOKUP([$dms.$K331];[.G:.G];[.H:.H])" office:value-type="string" office:string-value="Mai" calcext:value-type="string">
            <text:p>Mai</text:p>
          </table:table-cell>
          <table:table-cell table:formula="of:=YEAR([$dms.$J331])" office:value-type="float" office:value="2027" calcext:value-type="float">
            <text:p>2027</text:p>
          </table:table-cell>
          <table:table-cell table:formula="of:=COM.MICROSOFT.CONCAT([$dms.$L331];&quot; &quot;;[$dms.$M331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09" calcext:value-type="date">
            <text:p>9/5/2027</text:p>
          </table:table-cell>
          <table:table-cell table:formula="of:=MONTH([.J332])" office:value-type="float" office:value="5" calcext:value-type="float">
            <text:p>5</text:p>
          </table:table-cell>
          <table:table-cell table:formula="of:=COM.MICROSOFT.XLOOKUP([$dms.$K332];[.G:.G];[.H:.H])" office:value-type="string" office:string-value="Mai" calcext:value-type="string">
            <text:p>Mai</text:p>
          </table:table-cell>
          <table:table-cell table:formula="of:=YEAR([$dms.$J332])" office:value-type="float" office:value="2027" calcext:value-type="float">
            <text:p>2027</text:p>
          </table:table-cell>
          <table:table-cell table:formula="of:=COM.MICROSOFT.CONCAT([$dms.$L332];&quot; &quot;;[$dms.$M332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0" calcext:value-type="date">
            <text:p>10/5/2027</text:p>
          </table:table-cell>
          <table:table-cell table:formula="of:=MONTH([.J333])" office:value-type="float" office:value="5" calcext:value-type="float">
            <text:p>5</text:p>
          </table:table-cell>
          <table:table-cell table:formula="of:=COM.MICROSOFT.XLOOKUP([$dms.$K333];[.G:.G];[.H:.H])" office:value-type="string" office:string-value="Mai" calcext:value-type="string">
            <text:p>Mai</text:p>
          </table:table-cell>
          <table:table-cell table:formula="of:=YEAR([$dms.$J333])" office:value-type="float" office:value="2027" calcext:value-type="float">
            <text:p>2027</text:p>
          </table:table-cell>
          <table:table-cell table:formula="of:=COM.MICROSOFT.CONCAT([$dms.$L333];&quot; &quot;;[$dms.$M333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1" calcext:value-type="date">
            <text:p>11/5/2027</text:p>
          </table:table-cell>
          <table:table-cell table:formula="of:=MONTH([.J334])" office:value-type="float" office:value="5" calcext:value-type="float">
            <text:p>5</text:p>
          </table:table-cell>
          <table:table-cell table:formula="of:=COM.MICROSOFT.XLOOKUP([$dms.$K334];[.G:.G];[.H:.H])" office:value-type="string" office:string-value="Mai" calcext:value-type="string">
            <text:p>Mai</text:p>
          </table:table-cell>
          <table:table-cell table:formula="of:=YEAR([$dms.$J334])" office:value-type="float" office:value="2027" calcext:value-type="float">
            <text:p>2027</text:p>
          </table:table-cell>
          <table:table-cell table:formula="of:=COM.MICROSOFT.CONCAT([$dms.$L334];&quot; &quot;;[$dms.$M334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2" calcext:value-type="date">
            <text:p>12/5/2027</text:p>
          </table:table-cell>
          <table:table-cell table:formula="of:=MONTH([.J335])" office:value-type="float" office:value="5" calcext:value-type="float">
            <text:p>5</text:p>
          </table:table-cell>
          <table:table-cell table:formula="of:=COM.MICROSOFT.XLOOKUP([$dms.$K335];[.G:.G];[.H:.H])" office:value-type="string" office:string-value="Mai" calcext:value-type="string">
            <text:p>Mai</text:p>
          </table:table-cell>
          <table:table-cell table:formula="of:=YEAR([$dms.$J335])" office:value-type="float" office:value="2027" calcext:value-type="float">
            <text:p>2027</text:p>
          </table:table-cell>
          <table:table-cell table:formula="of:=COM.MICROSOFT.CONCAT([$dms.$L335];&quot; &quot;;[$dms.$M335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3" calcext:value-type="date">
            <text:p>13/5/2027</text:p>
          </table:table-cell>
          <table:table-cell table:formula="of:=MONTH([.J336])" office:value-type="float" office:value="5" calcext:value-type="float">
            <text:p>5</text:p>
          </table:table-cell>
          <table:table-cell table:formula="of:=COM.MICROSOFT.XLOOKUP([$dms.$K336];[.G:.G];[.H:.H])" office:value-type="string" office:string-value="Mai" calcext:value-type="string">
            <text:p>Mai</text:p>
          </table:table-cell>
          <table:table-cell table:formula="of:=YEAR([$dms.$J336])" office:value-type="float" office:value="2027" calcext:value-type="float">
            <text:p>2027</text:p>
          </table:table-cell>
          <table:table-cell table:formula="of:=COM.MICROSOFT.CONCAT([$dms.$L336];&quot; &quot;;[$dms.$M336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4" calcext:value-type="date">
            <text:p>14/5/2027</text:p>
          </table:table-cell>
          <table:table-cell table:formula="of:=MONTH([.J337])" office:value-type="float" office:value="5" calcext:value-type="float">
            <text:p>5</text:p>
          </table:table-cell>
          <table:table-cell table:formula="of:=COM.MICROSOFT.XLOOKUP([$dms.$K337];[.G:.G];[.H:.H])" office:value-type="string" office:string-value="Mai" calcext:value-type="string">
            <text:p>Mai</text:p>
          </table:table-cell>
          <table:table-cell table:formula="of:=YEAR([$dms.$J337])" office:value-type="float" office:value="2027" calcext:value-type="float">
            <text:p>2027</text:p>
          </table:table-cell>
          <table:table-cell table:formula="of:=COM.MICROSOFT.CONCAT([$dms.$L337];&quot; &quot;;[$dms.$M337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5" calcext:value-type="date">
            <text:p>15/5/2027</text:p>
          </table:table-cell>
          <table:table-cell table:formula="of:=MONTH([.J338])" office:value-type="float" office:value="5" calcext:value-type="float">
            <text:p>5</text:p>
          </table:table-cell>
          <table:table-cell table:formula="of:=COM.MICROSOFT.XLOOKUP([$dms.$K338];[.G:.G];[.H:.H])" office:value-type="string" office:string-value="Mai" calcext:value-type="string">
            <text:p>Mai</text:p>
          </table:table-cell>
          <table:table-cell table:formula="of:=YEAR([$dms.$J338])" office:value-type="float" office:value="2027" calcext:value-type="float">
            <text:p>2027</text:p>
          </table:table-cell>
          <table:table-cell table:formula="of:=COM.MICROSOFT.CONCAT([$dms.$L338];&quot; &quot;;[$dms.$M338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6" calcext:value-type="date">
            <text:p>16/5/2027</text:p>
          </table:table-cell>
          <table:table-cell table:formula="of:=MONTH([.J339])" office:value-type="float" office:value="5" calcext:value-type="float">
            <text:p>5</text:p>
          </table:table-cell>
          <table:table-cell table:formula="of:=COM.MICROSOFT.XLOOKUP([$dms.$K339];[.G:.G];[.H:.H])" office:value-type="string" office:string-value="Mai" calcext:value-type="string">
            <text:p>Mai</text:p>
          </table:table-cell>
          <table:table-cell table:formula="of:=YEAR([$dms.$J339])" office:value-type="float" office:value="2027" calcext:value-type="float">
            <text:p>2027</text:p>
          </table:table-cell>
          <table:table-cell table:formula="of:=COM.MICROSOFT.CONCAT([$dms.$L339];&quot; &quot;;[$dms.$M339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7" calcext:value-type="date">
            <text:p>17/5/2027</text:p>
          </table:table-cell>
          <table:table-cell table:formula="of:=MONTH([.J340])" office:value-type="float" office:value="5" calcext:value-type="float">
            <text:p>5</text:p>
          </table:table-cell>
          <table:table-cell table:formula="of:=COM.MICROSOFT.XLOOKUP([$dms.$K340];[.G:.G];[.H:.H])" office:value-type="string" office:string-value="Mai" calcext:value-type="string">
            <text:p>Mai</text:p>
          </table:table-cell>
          <table:table-cell table:formula="of:=YEAR([$dms.$J340])" office:value-type="float" office:value="2027" calcext:value-type="float">
            <text:p>2027</text:p>
          </table:table-cell>
          <table:table-cell table:formula="of:=COM.MICROSOFT.CONCAT([$dms.$L340];&quot; &quot;;[$dms.$M340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8" calcext:value-type="date">
            <text:p>18/5/2027</text:p>
          </table:table-cell>
          <table:table-cell table:formula="of:=MONTH([.J341])" office:value-type="float" office:value="5" calcext:value-type="float">
            <text:p>5</text:p>
          </table:table-cell>
          <table:table-cell table:formula="of:=COM.MICROSOFT.XLOOKUP([$dms.$K341];[.G:.G];[.H:.H])" office:value-type="string" office:string-value="Mai" calcext:value-type="string">
            <text:p>Mai</text:p>
          </table:table-cell>
          <table:table-cell table:formula="of:=YEAR([$dms.$J341])" office:value-type="float" office:value="2027" calcext:value-type="float">
            <text:p>2027</text:p>
          </table:table-cell>
          <table:table-cell table:formula="of:=COM.MICROSOFT.CONCAT([$dms.$L341];&quot; &quot;;[$dms.$M341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19" calcext:value-type="date">
            <text:p>19/5/2027</text:p>
          </table:table-cell>
          <table:table-cell table:formula="of:=MONTH([.J342])" office:value-type="float" office:value="5" calcext:value-type="float">
            <text:p>5</text:p>
          </table:table-cell>
          <table:table-cell table:formula="of:=COM.MICROSOFT.XLOOKUP([$dms.$K342];[.G:.G];[.H:.H])" office:value-type="string" office:string-value="Mai" calcext:value-type="string">
            <text:p>Mai</text:p>
          </table:table-cell>
          <table:table-cell table:formula="of:=YEAR([$dms.$J342])" office:value-type="float" office:value="2027" calcext:value-type="float">
            <text:p>2027</text:p>
          </table:table-cell>
          <table:table-cell table:formula="of:=COM.MICROSOFT.CONCAT([$dms.$L342];&quot; &quot;;[$dms.$M342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0" calcext:value-type="date">
            <text:p>20/5/2027</text:p>
          </table:table-cell>
          <table:table-cell table:formula="of:=MONTH([.J343])" office:value-type="float" office:value="5" calcext:value-type="float">
            <text:p>5</text:p>
          </table:table-cell>
          <table:table-cell table:formula="of:=COM.MICROSOFT.XLOOKUP([$dms.$K343];[.G:.G];[.H:.H])" office:value-type="string" office:string-value="Mai" calcext:value-type="string">
            <text:p>Mai</text:p>
          </table:table-cell>
          <table:table-cell table:formula="of:=YEAR([$dms.$J343])" office:value-type="float" office:value="2027" calcext:value-type="float">
            <text:p>2027</text:p>
          </table:table-cell>
          <table:table-cell table:formula="of:=COM.MICROSOFT.CONCAT([$dms.$L343];&quot; &quot;;[$dms.$M343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1" calcext:value-type="date">
            <text:p>21/5/2027</text:p>
          </table:table-cell>
          <table:table-cell table:formula="of:=MONTH([.J344])" office:value-type="float" office:value="5" calcext:value-type="float">
            <text:p>5</text:p>
          </table:table-cell>
          <table:table-cell table:formula="of:=COM.MICROSOFT.XLOOKUP([$dms.$K344];[.G:.G];[.H:.H])" office:value-type="string" office:string-value="Mai" calcext:value-type="string">
            <text:p>Mai</text:p>
          </table:table-cell>
          <table:table-cell table:formula="of:=YEAR([$dms.$J344])" office:value-type="float" office:value="2027" calcext:value-type="float">
            <text:p>2027</text:p>
          </table:table-cell>
          <table:table-cell table:formula="of:=COM.MICROSOFT.CONCAT([$dms.$L344];&quot; &quot;;[$dms.$M344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2" calcext:value-type="date">
            <text:p>22/5/2027</text:p>
          </table:table-cell>
          <table:table-cell table:formula="of:=MONTH([.J345])" office:value-type="float" office:value="5" calcext:value-type="float">
            <text:p>5</text:p>
          </table:table-cell>
          <table:table-cell table:formula="of:=COM.MICROSOFT.XLOOKUP([$dms.$K345];[.G:.G];[.H:.H])" office:value-type="string" office:string-value="Mai" calcext:value-type="string">
            <text:p>Mai</text:p>
          </table:table-cell>
          <table:table-cell table:formula="of:=YEAR([$dms.$J345])" office:value-type="float" office:value="2027" calcext:value-type="float">
            <text:p>2027</text:p>
          </table:table-cell>
          <table:table-cell table:formula="of:=COM.MICROSOFT.CONCAT([$dms.$L345];&quot; &quot;;[$dms.$M345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3" calcext:value-type="date">
            <text:p>23/5/2027</text:p>
          </table:table-cell>
          <table:table-cell table:formula="of:=MONTH([.J346])" office:value-type="float" office:value="5" calcext:value-type="float">
            <text:p>5</text:p>
          </table:table-cell>
          <table:table-cell table:formula="of:=COM.MICROSOFT.XLOOKUP([$dms.$K346];[.G:.G];[.H:.H])" office:value-type="string" office:string-value="Mai" calcext:value-type="string">
            <text:p>Mai</text:p>
          </table:table-cell>
          <table:table-cell table:formula="of:=YEAR([$dms.$J346])" office:value-type="float" office:value="2027" calcext:value-type="float">
            <text:p>2027</text:p>
          </table:table-cell>
          <table:table-cell table:formula="of:=COM.MICROSOFT.CONCAT([$dms.$L346];&quot; &quot;;[$dms.$M346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4" calcext:value-type="date">
            <text:p>24/5/2027</text:p>
          </table:table-cell>
          <table:table-cell table:formula="of:=MONTH([.J347])" office:value-type="float" office:value="5" calcext:value-type="float">
            <text:p>5</text:p>
          </table:table-cell>
          <table:table-cell table:formula="of:=COM.MICROSOFT.XLOOKUP([$dms.$K347];[.G:.G];[.H:.H])" office:value-type="string" office:string-value="Mai" calcext:value-type="string">
            <text:p>Mai</text:p>
          </table:table-cell>
          <table:table-cell table:formula="of:=YEAR([$dms.$J347])" office:value-type="float" office:value="2027" calcext:value-type="float">
            <text:p>2027</text:p>
          </table:table-cell>
          <table:table-cell table:formula="of:=COM.MICROSOFT.CONCAT([$dms.$L347];&quot; &quot;;[$dms.$M347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5" calcext:value-type="date">
            <text:p>25/5/2027</text:p>
          </table:table-cell>
          <table:table-cell table:formula="of:=MONTH([.J348])" office:value-type="float" office:value="5" calcext:value-type="float">
            <text:p>5</text:p>
          </table:table-cell>
          <table:table-cell table:formula="of:=COM.MICROSOFT.XLOOKUP([$dms.$K348];[.G:.G];[.H:.H])" office:value-type="string" office:string-value="Mai" calcext:value-type="string">
            <text:p>Mai</text:p>
          </table:table-cell>
          <table:table-cell table:formula="of:=YEAR([$dms.$J348])" office:value-type="float" office:value="2027" calcext:value-type="float">
            <text:p>2027</text:p>
          </table:table-cell>
          <table:table-cell table:formula="of:=COM.MICROSOFT.CONCAT([$dms.$L348];&quot; &quot;;[$dms.$M348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6" calcext:value-type="date">
            <text:p>26/5/2027</text:p>
          </table:table-cell>
          <table:table-cell table:formula="of:=MONTH([.J349])" office:value-type="float" office:value="5" calcext:value-type="float">
            <text:p>5</text:p>
          </table:table-cell>
          <table:table-cell table:formula="of:=COM.MICROSOFT.XLOOKUP([$dms.$K349];[.G:.G];[.H:.H])" office:value-type="string" office:string-value="Mai" calcext:value-type="string">
            <text:p>Mai</text:p>
          </table:table-cell>
          <table:table-cell table:formula="of:=YEAR([$dms.$J349])" office:value-type="float" office:value="2027" calcext:value-type="float">
            <text:p>2027</text:p>
          </table:table-cell>
          <table:table-cell table:formula="of:=COM.MICROSOFT.CONCAT([$dms.$L349];&quot; &quot;;[$dms.$M349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7" calcext:value-type="date">
            <text:p>27/5/2027</text:p>
          </table:table-cell>
          <table:table-cell table:formula="of:=MONTH([.J350])" office:value-type="float" office:value="5" calcext:value-type="float">
            <text:p>5</text:p>
          </table:table-cell>
          <table:table-cell table:formula="of:=COM.MICROSOFT.XLOOKUP([$dms.$K350];[.G:.G];[.H:.H])" office:value-type="string" office:string-value="Mai" calcext:value-type="string">
            <text:p>Mai</text:p>
          </table:table-cell>
          <table:table-cell table:formula="of:=YEAR([$dms.$J350])" office:value-type="float" office:value="2027" calcext:value-type="float">
            <text:p>2027</text:p>
          </table:table-cell>
          <table:table-cell table:formula="of:=COM.MICROSOFT.CONCAT([$dms.$L350];&quot; &quot;;[$dms.$M350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8" calcext:value-type="date">
            <text:p>28/5/2027</text:p>
          </table:table-cell>
          <table:table-cell table:formula="of:=MONTH([.J351])" office:value-type="float" office:value="5" calcext:value-type="float">
            <text:p>5</text:p>
          </table:table-cell>
          <table:table-cell table:formula="of:=COM.MICROSOFT.XLOOKUP([$dms.$K351];[.G:.G];[.H:.H])" office:value-type="string" office:string-value="Mai" calcext:value-type="string">
            <text:p>Mai</text:p>
          </table:table-cell>
          <table:table-cell table:formula="of:=YEAR([$dms.$J351])" office:value-type="float" office:value="2027" calcext:value-type="float">
            <text:p>2027</text:p>
          </table:table-cell>
          <table:table-cell table:formula="of:=COM.MICROSOFT.CONCAT([$dms.$L351];&quot; &quot;;[$dms.$M351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29" calcext:value-type="date">
            <text:p>29/5/2027</text:p>
          </table:table-cell>
          <table:table-cell table:formula="of:=MONTH([.J352])" office:value-type="float" office:value="5" calcext:value-type="float">
            <text:p>5</text:p>
          </table:table-cell>
          <table:table-cell table:formula="of:=COM.MICROSOFT.XLOOKUP([$dms.$K352];[.G:.G];[.H:.H])" office:value-type="string" office:string-value="Mai" calcext:value-type="string">
            <text:p>Mai</text:p>
          </table:table-cell>
          <table:table-cell table:formula="of:=YEAR([$dms.$J352])" office:value-type="float" office:value="2027" calcext:value-type="float">
            <text:p>2027</text:p>
          </table:table-cell>
          <table:table-cell table:formula="of:=COM.MICROSOFT.CONCAT([$dms.$L352];&quot; &quot;;[$dms.$M352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30" calcext:value-type="date">
            <text:p>30/5/2027</text:p>
          </table:table-cell>
          <table:table-cell table:formula="of:=MONTH([.J353])" office:value-type="float" office:value="5" calcext:value-type="float">
            <text:p>5</text:p>
          </table:table-cell>
          <table:table-cell table:formula="of:=COM.MICROSOFT.XLOOKUP([$dms.$K353];[.G:.G];[.H:.H])" office:value-type="string" office:string-value="Mai" calcext:value-type="string">
            <text:p>Mai</text:p>
          </table:table-cell>
          <table:table-cell table:formula="of:=YEAR([$dms.$J353])" office:value-type="float" office:value="2027" calcext:value-type="float">
            <text:p>2027</text:p>
          </table:table-cell>
          <table:table-cell table:formula="of:=COM.MICROSOFT.CONCAT([$dms.$L353];&quot; &quot;;[$dms.$M353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5-31" calcext:value-type="date">
            <text:p>31/5/2027</text:p>
          </table:table-cell>
          <table:table-cell table:formula="of:=MONTH([.J354])" office:value-type="float" office:value="5" calcext:value-type="float">
            <text:p>5</text:p>
          </table:table-cell>
          <table:table-cell table:formula="of:=COM.MICROSOFT.XLOOKUP([$dms.$K354];[.G:.G];[.H:.H])" office:value-type="string" office:string-value="Mai" calcext:value-type="string">
            <text:p>Mai</text:p>
          </table:table-cell>
          <table:table-cell table:formula="of:=YEAR([$dms.$J354])" office:value-type="float" office:value="2027" calcext:value-type="float">
            <text:p>2027</text:p>
          </table:table-cell>
          <table:table-cell table:formula="of:=COM.MICROSOFT.CONCAT([$dms.$L354];&quot; &quot;;[$dms.$M354])" office:value-type="string" office:string-value="Mai 2027" calcext:value-type="string">
            <text:p>Mai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01" calcext:value-type="date">
            <text:p>1/6/2027</text:p>
          </table:table-cell>
          <table:table-cell table:formula="of:=MONTH([.J355])" office:value-type="float" office:value="6" calcext:value-type="float">
            <text:p>6</text:p>
          </table:table-cell>
          <table:table-cell table:formula="of:=COM.MICROSOFT.XLOOKUP([$dms.$K355];[.G:.G];[.H:.H])" office:value-type="string" office:string-value="Jun" calcext:value-type="string">
            <text:p>Jun</text:p>
          </table:table-cell>
          <table:table-cell table:formula="of:=YEAR([$dms.$J355])" office:value-type="float" office:value="2027" calcext:value-type="float">
            <text:p>2027</text:p>
          </table:table-cell>
          <table:table-cell table:formula="of:=COM.MICROSOFT.CONCAT([$dms.$L355];&quot; &quot;;[$dms.$M355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02" calcext:value-type="date">
            <text:p>2/6/2027</text:p>
          </table:table-cell>
          <table:table-cell table:formula="of:=MONTH([.J356])" office:value-type="float" office:value="6" calcext:value-type="float">
            <text:p>6</text:p>
          </table:table-cell>
          <table:table-cell table:formula="of:=COM.MICROSOFT.XLOOKUP([$dms.$K356];[.G:.G];[.H:.H])" office:value-type="string" office:string-value="Jun" calcext:value-type="string">
            <text:p>Jun</text:p>
          </table:table-cell>
          <table:table-cell table:formula="of:=YEAR([$dms.$J356])" office:value-type="float" office:value="2027" calcext:value-type="float">
            <text:p>2027</text:p>
          </table:table-cell>
          <table:table-cell table:formula="of:=COM.MICROSOFT.CONCAT([$dms.$L356];&quot; &quot;;[$dms.$M356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03" calcext:value-type="date">
            <text:p>3/6/2027</text:p>
          </table:table-cell>
          <table:table-cell table:formula="of:=MONTH([.J357])" office:value-type="float" office:value="6" calcext:value-type="float">
            <text:p>6</text:p>
          </table:table-cell>
          <table:table-cell table:formula="of:=COM.MICROSOFT.XLOOKUP([$dms.$K357];[.G:.G];[.H:.H])" office:value-type="string" office:string-value="Jun" calcext:value-type="string">
            <text:p>Jun</text:p>
          </table:table-cell>
          <table:table-cell table:formula="of:=YEAR([$dms.$J357])" office:value-type="float" office:value="2027" calcext:value-type="float">
            <text:p>2027</text:p>
          </table:table-cell>
          <table:table-cell table:formula="of:=COM.MICROSOFT.CONCAT([$dms.$L357];&quot; &quot;;[$dms.$M357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04" calcext:value-type="date">
            <text:p>4/6/2027</text:p>
          </table:table-cell>
          <table:table-cell table:formula="of:=MONTH([.J358])" office:value-type="float" office:value="6" calcext:value-type="float">
            <text:p>6</text:p>
          </table:table-cell>
          <table:table-cell table:formula="of:=COM.MICROSOFT.XLOOKUP([$dms.$K358];[.G:.G];[.H:.H])" office:value-type="string" office:string-value="Jun" calcext:value-type="string">
            <text:p>Jun</text:p>
          </table:table-cell>
          <table:table-cell table:formula="of:=YEAR([$dms.$J358])" office:value-type="float" office:value="2027" calcext:value-type="float">
            <text:p>2027</text:p>
          </table:table-cell>
          <table:table-cell table:formula="of:=COM.MICROSOFT.CONCAT([$dms.$L358];&quot; &quot;;[$dms.$M358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05" calcext:value-type="date">
            <text:p>5/6/2027</text:p>
          </table:table-cell>
          <table:table-cell table:formula="of:=MONTH([.J359])" office:value-type="float" office:value="6" calcext:value-type="float">
            <text:p>6</text:p>
          </table:table-cell>
          <table:table-cell table:formula="of:=COM.MICROSOFT.XLOOKUP([$dms.$K359];[.G:.G];[.H:.H])" office:value-type="string" office:string-value="Jun" calcext:value-type="string">
            <text:p>Jun</text:p>
          </table:table-cell>
          <table:table-cell table:formula="of:=YEAR([$dms.$J359])" office:value-type="float" office:value="2027" calcext:value-type="float">
            <text:p>2027</text:p>
          </table:table-cell>
          <table:table-cell table:formula="of:=COM.MICROSOFT.CONCAT([$dms.$L359];&quot; &quot;;[$dms.$M359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06" calcext:value-type="date">
            <text:p>6/6/2027</text:p>
          </table:table-cell>
          <table:table-cell table:formula="of:=MONTH([.J360])" office:value-type="float" office:value="6" calcext:value-type="float">
            <text:p>6</text:p>
          </table:table-cell>
          <table:table-cell table:formula="of:=COM.MICROSOFT.XLOOKUP([$dms.$K360];[.G:.G];[.H:.H])" office:value-type="string" office:string-value="Jun" calcext:value-type="string">
            <text:p>Jun</text:p>
          </table:table-cell>
          <table:table-cell table:formula="of:=YEAR([$dms.$J360])" office:value-type="float" office:value="2027" calcext:value-type="float">
            <text:p>2027</text:p>
          </table:table-cell>
          <table:table-cell table:formula="of:=COM.MICROSOFT.CONCAT([$dms.$L360];&quot; &quot;;[$dms.$M360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07" calcext:value-type="date">
            <text:p>7/6/2027</text:p>
          </table:table-cell>
          <table:table-cell table:formula="of:=MONTH([.J361])" office:value-type="float" office:value="6" calcext:value-type="float">
            <text:p>6</text:p>
          </table:table-cell>
          <table:table-cell table:formula="of:=COM.MICROSOFT.XLOOKUP([$dms.$K361];[.G:.G];[.H:.H])" office:value-type="string" office:string-value="Jun" calcext:value-type="string">
            <text:p>Jun</text:p>
          </table:table-cell>
          <table:table-cell table:formula="of:=YEAR([$dms.$J361])" office:value-type="float" office:value="2027" calcext:value-type="float">
            <text:p>2027</text:p>
          </table:table-cell>
          <table:table-cell table:formula="of:=COM.MICROSOFT.CONCAT([$dms.$L361];&quot; &quot;;[$dms.$M361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08" calcext:value-type="date">
            <text:p>8/6/2027</text:p>
          </table:table-cell>
          <table:table-cell table:formula="of:=MONTH([.J362])" office:value-type="float" office:value="6" calcext:value-type="float">
            <text:p>6</text:p>
          </table:table-cell>
          <table:table-cell table:formula="of:=COM.MICROSOFT.XLOOKUP([$dms.$K362];[.G:.G];[.H:.H])" office:value-type="string" office:string-value="Jun" calcext:value-type="string">
            <text:p>Jun</text:p>
          </table:table-cell>
          <table:table-cell table:formula="of:=YEAR([$dms.$J362])" office:value-type="float" office:value="2027" calcext:value-type="float">
            <text:p>2027</text:p>
          </table:table-cell>
          <table:table-cell table:formula="of:=COM.MICROSOFT.CONCAT([$dms.$L362];&quot; &quot;;[$dms.$M362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09" calcext:value-type="date">
            <text:p>9/6/2027</text:p>
          </table:table-cell>
          <table:table-cell table:formula="of:=MONTH([.J363])" office:value-type="float" office:value="6" calcext:value-type="float">
            <text:p>6</text:p>
          </table:table-cell>
          <table:table-cell table:formula="of:=COM.MICROSOFT.XLOOKUP([$dms.$K363];[.G:.G];[.H:.H])" office:value-type="string" office:string-value="Jun" calcext:value-type="string">
            <text:p>Jun</text:p>
          </table:table-cell>
          <table:table-cell table:formula="of:=YEAR([$dms.$J363])" office:value-type="float" office:value="2027" calcext:value-type="float">
            <text:p>2027</text:p>
          </table:table-cell>
          <table:table-cell table:formula="of:=COM.MICROSOFT.CONCAT([$dms.$L363];&quot; &quot;;[$dms.$M363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0" calcext:value-type="date">
            <text:p>10/6/2027</text:p>
          </table:table-cell>
          <table:table-cell table:formula="of:=MONTH([.J364])" office:value-type="float" office:value="6" calcext:value-type="float">
            <text:p>6</text:p>
          </table:table-cell>
          <table:table-cell table:formula="of:=COM.MICROSOFT.XLOOKUP([$dms.$K364];[.G:.G];[.H:.H])" office:value-type="string" office:string-value="Jun" calcext:value-type="string">
            <text:p>Jun</text:p>
          </table:table-cell>
          <table:table-cell table:formula="of:=YEAR([$dms.$J364])" office:value-type="float" office:value="2027" calcext:value-type="float">
            <text:p>2027</text:p>
          </table:table-cell>
          <table:table-cell table:formula="of:=COM.MICROSOFT.CONCAT([$dms.$L364];&quot; &quot;;[$dms.$M364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1" calcext:value-type="date">
            <text:p>11/6/2027</text:p>
          </table:table-cell>
          <table:table-cell table:formula="of:=MONTH([.J365])" office:value-type="float" office:value="6" calcext:value-type="float">
            <text:p>6</text:p>
          </table:table-cell>
          <table:table-cell table:formula="of:=COM.MICROSOFT.XLOOKUP([$dms.$K365];[.G:.G];[.H:.H])" office:value-type="string" office:string-value="Jun" calcext:value-type="string">
            <text:p>Jun</text:p>
          </table:table-cell>
          <table:table-cell table:formula="of:=YEAR([$dms.$J365])" office:value-type="float" office:value="2027" calcext:value-type="float">
            <text:p>2027</text:p>
          </table:table-cell>
          <table:table-cell table:formula="of:=COM.MICROSOFT.CONCAT([$dms.$L365];&quot; &quot;;[$dms.$M365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2" calcext:value-type="date">
            <text:p>12/6/2027</text:p>
          </table:table-cell>
          <table:table-cell table:formula="of:=MONTH([.J366])" office:value-type="float" office:value="6" calcext:value-type="float">
            <text:p>6</text:p>
          </table:table-cell>
          <table:table-cell table:formula="of:=COM.MICROSOFT.XLOOKUP([$dms.$K366];[.G:.G];[.H:.H])" office:value-type="string" office:string-value="Jun" calcext:value-type="string">
            <text:p>Jun</text:p>
          </table:table-cell>
          <table:table-cell table:formula="of:=YEAR([$dms.$J366])" office:value-type="float" office:value="2027" calcext:value-type="float">
            <text:p>2027</text:p>
          </table:table-cell>
          <table:table-cell table:formula="of:=COM.MICROSOFT.CONCAT([$dms.$L366];&quot; &quot;;[$dms.$M366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3" calcext:value-type="date">
            <text:p>13/6/2027</text:p>
          </table:table-cell>
          <table:table-cell table:formula="of:=MONTH([.J367])" office:value-type="float" office:value="6" calcext:value-type="float">
            <text:p>6</text:p>
          </table:table-cell>
          <table:table-cell table:formula="of:=COM.MICROSOFT.XLOOKUP([$dms.$K367];[.G:.G];[.H:.H])" office:value-type="string" office:string-value="Jun" calcext:value-type="string">
            <text:p>Jun</text:p>
          </table:table-cell>
          <table:table-cell table:formula="of:=YEAR([$dms.$J367])" office:value-type="float" office:value="2027" calcext:value-type="float">
            <text:p>2027</text:p>
          </table:table-cell>
          <table:table-cell table:formula="of:=COM.MICROSOFT.CONCAT([$dms.$L367];&quot; &quot;;[$dms.$M367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4" calcext:value-type="date">
            <text:p>14/6/2027</text:p>
          </table:table-cell>
          <table:table-cell table:formula="of:=MONTH([.J368])" office:value-type="float" office:value="6" calcext:value-type="float">
            <text:p>6</text:p>
          </table:table-cell>
          <table:table-cell table:formula="of:=COM.MICROSOFT.XLOOKUP([$dms.$K368];[.G:.G];[.H:.H])" office:value-type="string" office:string-value="Jun" calcext:value-type="string">
            <text:p>Jun</text:p>
          </table:table-cell>
          <table:table-cell table:formula="of:=YEAR([$dms.$J368])" office:value-type="float" office:value="2027" calcext:value-type="float">
            <text:p>2027</text:p>
          </table:table-cell>
          <table:table-cell table:formula="of:=COM.MICROSOFT.CONCAT([$dms.$L368];&quot; &quot;;[$dms.$M368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5" calcext:value-type="date">
            <text:p>15/6/2027</text:p>
          </table:table-cell>
          <table:table-cell table:formula="of:=MONTH([.J369])" office:value-type="float" office:value="6" calcext:value-type="float">
            <text:p>6</text:p>
          </table:table-cell>
          <table:table-cell table:formula="of:=COM.MICROSOFT.XLOOKUP([$dms.$K369];[.G:.G];[.H:.H])" office:value-type="string" office:string-value="Jun" calcext:value-type="string">
            <text:p>Jun</text:p>
          </table:table-cell>
          <table:table-cell table:formula="of:=YEAR([$dms.$J369])" office:value-type="float" office:value="2027" calcext:value-type="float">
            <text:p>2027</text:p>
          </table:table-cell>
          <table:table-cell table:formula="of:=COM.MICROSOFT.CONCAT([$dms.$L369];&quot; &quot;;[$dms.$M369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6" calcext:value-type="date">
            <text:p>16/6/2027</text:p>
          </table:table-cell>
          <table:table-cell table:formula="of:=MONTH([.J370])" office:value-type="float" office:value="6" calcext:value-type="float">
            <text:p>6</text:p>
          </table:table-cell>
          <table:table-cell table:formula="of:=COM.MICROSOFT.XLOOKUP([$dms.$K370];[.G:.G];[.H:.H])" office:value-type="string" office:string-value="Jun" calcext:value-type="string">
            <text:p>Jun</text:p>
          </table:table-cell>
          <table:table-cell table:formula="of:=YEAR([$dms.$J370])" office:value-type="float" office:value="2027" calcext:value-type="float">
            <text:p>2027</text:p>
          </table:table-cell>
          <table:table-cell table:formula="of:=COM.MICROSOFT.CONCAT([$dms.$L370];&quot; &quot;;[$dms.$M370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7" calcext:value-type="date">
            <text:p>17/6/2027</text:p>
          </table:table-cell>
          <table:table-cell table:formula="of:=MONTH([.J371])" office:value-type="float" office:value="6" calcext:value-type="float">
            <text:p>6</text:p>
          </table:table-cell>
          <table:table-cell table:formula="of:=COM.MICROSOFT.XLOOKUP([$dms.$K371];[.G:.G];[.H:.H])" office:value-type="string" office:string-value="Jun" calcext:value-type="string">
            <text:p>Jun</text:p>
          </table:table-cell>
          <table:table-cell table:formula="of:=YEAR([$dms.$J371])" office:value-type="float" office:value="2027" calcext:value-type="float">
            <text:p>2027</text:p>
          </table:table-cell>
          <table:table-cell table:formula="of:=COM.MICROSOFT.CONCAT([$dms.$L371];&quot; &quot;;[$dms.$M371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8" calcext:value-type="date">
            <text:p>18/6/2027</text:p>
          </table:table-cell>
          <table:table-cell table:formula="of:=MONTH([.J372])" office:value-type="float" office:value="6" calcext:value-type="float">
            <text:p>6</text:p>
          </table:table-cell>
          <table:table-cell table:formula="of:=COM.MICROSOFT.XLOOKUP([$dms.$K372];[.G:.G];[.H:.H])" office:value-type="string" office:string-value="Jun" calcext:value-type="string">
            <text:p>Jun</text:p>
          </table:table-cell>
          <table:table-cell table:formula="of:=YEAR([$dms.$J372])" office:value-type="float" office:value="2027" calcext:value-type="float">
            <text:p>2027</text:p>
          </table:table-cell>
          <table:table-cell table:formula="of:=COM.MICROSOFT.CONCAT([$dms.$L372];&quot; &quot;;[$dms.$M372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19" calcext:value-type="date">
            <text:p>19/6/2027</text:p>
          </table:table-cell>
          <table:table-cell table:formula="of:=MONTH([.J373])" office:value-type="float" office:value="6" calcext:value-type="float">
            <text:p>6</text:p>
          </table:table-cell>
          <table:table-cell table:formula="of:=COM.MICROSOFT.XLOOKUP([$dms.$K373];[.G:.G];[.H:.H])" office:value-type="string" office:string-value="Jun" calcext:value-type="string">
            <text:p>Jun</text:p>
          </table:table-cell>
          <table:table-cell table:formula="of:=YEAR([$dms.$J373])" office:value-type="float" office:value="2027" calcext:value-type="float">
            <text:p>2027</text:p>
          </table:table-cell>
          <table:table-cell table:formula="of:=COM.MICROSOFT.CONCAT([$dms.$L373];&quot; &quot;;[$dms.$M373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0" calcext:value-type="date">
            <text:p>20/6/2027</text:p>
          </table:table-cell>
          <table:table-cell table:formula="of:=MONTH([.J374])" office:value-type="float" office:value="6" calcext:value-type="float">
            <text:p>6</text:p>
          </table:table-cell>
          <table:table-cell table:formula="of:=COM.MICROSOFT.XLOOKUP([$dms.$K374];[.G:.G];[.H:.H])" office:value-type="string" office:string-value="Jun" calcext:value-type="string">
            <text:p>Jun</text:p>
          </table:table-cell>
          <table:table-cell table:formula="of:=YEAR([$dms.$J374])" office:value-type="float" office:value="2027" calcext:value-type="float">
            <text:p>2027</text:p>
          </table:table-cell>
          <table:table-cell table:formula="of:=COM.MICROSOFT.CONCAT([$dms.$L374];&quot; &quot;;[$dms.$M374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1" calcext:value-type="date">
            <text:p>21/6/2027</text:p>
          </table:table-cell>
          <table:table-cell table:formula="of:=MONTH([.J375])" office:value-type="float" office:value="6" calcext:value-type="float">
            <text:p>6</text:p>
          </table:table-cell>
          <table:table-cell table:formula="of:=COM.MICROSOFT.XLOOKUP([$dms.$K375];[.G:.G];[.H:.H])" office:value-type="string" office:string-value="Jun" calcext:value-type="string">
            <text:p>Jun</text:p>
          </table:table-cell>
          <table:table-cell table:formula="of:=YEAR([$dms.$J375])" office:value-type="float" office:value="2027" calcext:value-type="float">
            <text:p>2027</text:p>
          </table:table-cell>
          <table:table-cell table:formula="of:=COM.MICROSOFT.CONCAT([$dms.$L375];&quot; &quot;;[$dms.$M375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2" calcext:value-type="date">
            <text:p>22/6/2027</text:p>
          </table:table-cell>
          <table:table-cell table:formula="of:=MONTH([.J376])" office:value-type="float" office:value="6" calcext:value-type="float">
            <text:p>6</text:p>
          </table:table-cell>
          <table:table-cell table:formula="of:=COM.MICROSOFT.XLOOKUP([$dms.$K376];[.G:.G];[.H:.H])" office:value-type="string" office:string-value="Jun" calcext:value-type="string">
            <text:p>Jun</text:p>
          </table:table-cell>
          <table:table-cell table:formula="of:=YEAR([$dms.$J376])" office:value-type="float" office:value="2027" calcext:value-type="float">
            <text:p>2027</text:p>
          </table:table-cell>
          <table:table-cell table:formula="of:=COM.MICROSOFT.CONCAT([$dms.$L376];&quot; &quot;;[$dms.$M376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3" calcext:value-type="date">
            <text:p>23/6/2027</text:p>
          </table:table-cell>
          <table:table-cell table:formula="of:=MONTH([.J377])" office:value-type="float" office:value="6" calcext:value-type="float">
            <text:p>6</text:p>
          </table:table-cell>
          <table:table-cell table:formula="of:=COM.MICROSOFT.XLOOKUP([$dms.$K377];[.G:.G];[.H:.H])" office:value-type="string" office:string-value="Jun" calcext:value-type="string">
            <text:p>Jun</text:p>
          </table:table-cell>
          <table:table-cell table:formula="of:=YEAR([$dms.$J377])" office:value-type="float" office:value="2027" calcext:value-type="float">
            <text:p>2027</text:p>
          </table:table-cell>
          <table:table-cell table:formula="of:=COM.MICROSOFT.CONCAT([$dms.$L377];&quot; &quot;;[$dms.$M377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4" calcext:value-type="date">
            <text:p>24/6/2027</text:p>
          </table:table-cell>
          <table:table-cell table:formula="of:=MONTH([.J378])" office:value-type="float" office:value="6" calcext:value-type="float">
            <text:p>6</text:p>
          </table:table-cell>
          <table:table-cell table:formula="of:=COM.MICROSOFT.XLOOKUP([$dms.$K378];[.G:.G];[.H:.H])" office:value-type="string" office:string-value="Jun" calcext:value-type="string">
            <text:p>Jun</text:p>
          </table:table-cell>
          <table:table-cell table:formula="of:=YEAR([$dms.$J378])" office:value-type="float" office:value="2027" calcext:value-type="float">
            <text:p>2027</text:p>
          </table:table-cell>
          <table:table-cell table:formula="of:=COM.MICROSOFT.CONCAT([$dms.$L378];&quot; &quot;;[$dms.$M378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5" calcext:value-type="date">
            <text:p>25/6/2027</text:p>
          </table:table-cell>
          <table:table-cell table:formula="of:=MONTH([.J379])" office:value-type="float" office:value="6" calcext:value-type="float">
            <text:p>6</text:p>
          </table:table-cell>
          <table:table-cell table:formula="of:=COM.MICROSOFT.XLOOKUP([$dms.$K379];[.G:.G];[.H:.H])" office:value-type="string" office:string-value="Jun" calcext:value-type="string">
            <text:p>Jun</text:p>
          </table:table-cell>
          <table:table-cell table:formula="of:=YEAR([$dms.$J379])" office:value-type="float" office:value="2027" calcext:value-type="float">
            <text:p>2027</text:p>
          </table:table-cell>
          <table:table-cell table:formula="of:=COM.MICROSOFT.CONCAT([$dms.$L379];&quot; &quot;;[$dms.$M379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6" calcext:value-type="date">
            <text:p>26/6/2027</text:p>
          </table:table-cell>
          <table:table-cell table:formula="of:=MONTH([.J380])" office:value-type="float" office:value="6" calcext:value-type="float">
            <text:p>6</text:p>
          </table:table-cell>
          <table:table-cell table:formula="of:=COM.MICROSOFT.XLOOKUP([$dms.$K380];[.G:.G];[.H:.H])" office:value-type="string" office:string-value="Jun" calcext:value-type="string">
            <text:p>Jun</text:p>
          </table:table-cell>
          <table:table-cell table:formula="of:=YEAR([$dms.$J380])" office:value-type="float" office:value="2027" calcext:value-type="float">
            <text:p>2027</text:p>
          </table:table-cell>
          <table:table-cell table:formula="of:=COM.MICROSOFT.CONCAT([$dms.$L380];&quot; &quot;;[$dms.$M380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7" calcext:value-type="date">
            <text:p>27/6/2027</text:p>
          </table:table-cell>
          <table:table-cell table:formula="of:=MONTH([.J381])" office:value-type="float" office:value="6" calcext:value-type="float">
            <text:p>6</text:p>
          </table:table-cell>
          <table:table-cell table:formula="of:=COM.MICROSOFT.XLOOKUP([$dms.$K381];[.G:.G];[.H:.H])" office:value-type="string" office:string-value="Jun" calcext:value-type="string">
            <text:p>Jun</text:p>
          </table:table-cell>
          <table:table-cell table:formula="of:=YEAR([$dms.$J381])" office:value-type="float" office:value="2027" calcext:value-type="float">
            <text:p>2027</text:p>
          </table:table-cell>
          <table:table-cell table:formula="of:=COM.MICROSOFT.CONCAT([$dms.$L381];&quot; &quot;;[$dms.$M381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8" calcext:value-type="date">
            <text:p>28/6/2027</text:p>
          </table:table-cell>
          <table:table-cell table:formula="of:=MONTH([.J382])" office:value-type="float" office:value="6" calcext:value-type="float">
            <text:p>6</text:p>
          </table:table-cell>
          <table:table-cell table:formula="of:=COM.MICROSOFT.XLOOKUP([$dms.$K382];[.G:.G];[.H:.H])" office:value-type="string" office:string-value="Jun" calcext:value-type="string">
            <text:p>Jun</text:p>
          </table:table-cell>
          <table:table-cell table:formula="of:=YEAR([$dms.$J382])" office:value-type="float" office:value="2027" calcext:value-type="float">
            <text:p>2027</text:p>
          </table:table-cell>
          <table:table-cell table:formula="of:=COM.MICROSOFT.CONCAT([$dms.$L382];&quot; &quot;;[$dms.$M382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29" calcext:value-type="date">
            <text:p>29/6/2027</text:p>
          </table:table-cell>
          <table:table-cell table:formula="of:=MONTH([.J383])" office:value-type="float" office:value="6" calcext:value-type="float">
            <text:p>6</text:p>
          </table:table-cell>
          <table:table-cell table:formula="of:=COM.MICROSOFT.XLOOKUP([$dms.$K383];[.G:.G];[.H:.H])" office:value-type="string" office:string-value="Jun" calcext:value-type="string">
            <text:p>Jun</text:p>
          </table:table-cell>
          <table:table-cell table:formula="of:=YEAR([$dms.$J383])" office:value-type="float" office:value="2027" calcext:value-type="float">
            <text:p>2027</text:p>
          </table:table-cell>
          <table:table-cell table:formula="of:=COM.MICROSOFT.CONCAT([$dms.$L383];&quot; &quot;;[$dms.$M383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6-30" calcext:value-type="date">
            <text:p>30/6/2027</text:p>
          </table:table-cell>
          <table:table-cell table:formula="of:=MONTH([.J384])" office:value-type="float" office:value="6" calcext:value-type="float">
            <text:p>6</text:p>
          </table:table-cell>
          <table:table-cell table:formula="of:=COM.MICROSOFT.XLOOKUP([$dms.$K384];[.G:.G];[.H:.H])" office:value-type="string" office:string-value="Jun" calcext:value-type="string">
            <text:p>Jun</text:p>
          </table:table-cell>
          <table:table-cell table:formula="of:=YEAR([$dms.$J384])" office:value-type="float" office:value="2027" calcext:value-type="float">
            <text:p>2027</text:p>
          </table:table-cell>
          <table:table-cell table:formula="of:=COM.MICROSOFT.CONCAT([$dms.$L384];&quot; &quot;;[$dms.$M384])" office:value-type="string" office:string-value="Jun 2027" calcext:value-type="string">
            <text:p>Jun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01" calcext:value-type="date">
            <text:p>1/7/2027</text:p>
          </table:table-cell>
          <table:table-cell table:formula="of:=MONTH([.J385])" office:value-type="float" office:value="7" calcext:value-type="float">
            <text:p>7</text:p>
          </table:table-cell>
          <table:table-cell table:formula="of:=COM.MICROSOFT.XLOOKUP([$dms.$K385];[.G:.G];[.H:.H])" office:value-type="string" office:string-value="Jul" calcext:value-type="string">
            <text:p>Jul</text:p>
          </table:table-cell>
          <table:table-cell table:formula="of:=YEAR([$dms.$J385])" office:value-type="float" office:value="2027" calcext:value-type="float">
            <text:p>2027</text:p>
          </table:table-cell>
          <table:table-cell table:formula="of:=COM.MICROSOFT.CONCAT([$dms.$L385];&quot; &quot;;[$dms.$M385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02" calcext:value-type="date">
            <text:p>2/7/2027</text:p>
          </table:table-cell>
          <table:table-cell table:formula="of:=MONTH([.J386])" office:value-type="float" office:value="7" calcext:value-type="float">
            <text:p>7</text:p>
          </table:table-cell>
          <table:table-cell table:formula="of:=COM.MICROSOFT.XLOOKUP([$dms.$K386];[.G:.G];[.H:.H])" office:value-type="string" office:string-value="Jul" calcext:value-type="string">
            <text:p>Jul</text:p>
          </table:table-cell>
          <table:table-cell table:formula="of:=YEAR([$dms.$J386])" office:value-type="float" office:value="2027" calcext:value-type="float">
            <text:p>2027</text:p>
          </table:table-cell>
          <table:table-cell table:formula="of:=COM.MICROSOFT.CONCAT([$dms.$L386];&quot; &quot;;[$dms.$M386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03" calcext:value-type="date">
            <text:p>3/7/2027</text:p>
          </table:table-cell>
          <table:table-cell table:formula="of:=MONTH([.J387])" office:value-type="float" office:value="7" calcext:value-type="float">
            <text:p>7</text:p>
          </table:table-cell>
          <table:table-cell table:formula="of:=COM.MICROSOFT.XLOOKUP([$dms.$K387];[.G:.G];[.H:.H])" office:value-type="string" office:string-value="Jul" calcext:value-type="string">
            <text:p>Jul</text:p>
          </table:table-cell>
          <table:table-cell table:formula="of:=YEAR([$dms.$J387])" office:value-type="float" office:value="2027" calcext:value-type="float">
            <text:p>2027</text:p>
          </table:table-cell>
          <table:table-cell table:formula="of:=COM.MICROSOFT.CONCAT([$dms.$L387];&quot; &quot;;[$dms.$M387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04" calcext:value-type="date">
            <text:p>4/7/2027</text:p>
          </table:table-cell>
          <table:table-cell table:formula="of:=MONTH([.J388])" office:value-type="float" office:value="7" calcext:value-type="float">
            <text:p>7</text:p>
          </table:table-cell>
          <table:table-cell table:formula="of:=COM.MICROSOFT.XLOOKUP([$dms.$K388];[.G:.G];[.H:.H])" office:value-type="string" office:string-value="Jul" calcext:value-type="string">
            <text:p>Jul</text:p>
          </table:table-cell>
          <table:table-cell table:formula="of:=YEAR([$dms.$J388])" office:value-type="float" office:value="2027" calcext:value-type="float">
            <text:p>2027</text:p>
          </table:table-cell>
          <table:table-cell table:formula="of:=COM.MICROSOFT.CONCAT([$dms.$L388];&quot; &quot;;[$dms.$M388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05" calcext:value-type="date">
            <text:p>5/7/2027</text:p>
          </table:table-cell>
          <table:table-cell table:formula="of:=MONTH([.J389])" office:value-type="float" office:value="7" calcext:value-type="float">
            <text:p>7</text:p>
          </table:table-cell>
          <table:table-cell table:formula="of:=COM.MICROSOFT.XLOOKUP([$dms.$K389];[.G:.G];[.H:.H])" office:value-type="string" office:string-value="Jul" calcext:value-type="string">
            <text:p>Jul</text:p>
          </table:table-cell>
          <table:table-cell table:formula="of:=YEAR([$dms.$J389])" office:value-type="float" office:value="2027" calcext:value-type="float">
            <text:p>2027</text:p>
          </table:table-cell>
          <table:table-cell table:formula="of:=COM.MICROSOFT.CONCAT([$dms.$L389];&quot; &quot;;[$dms.$M389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06" calcext:value-type="date">
            <text:p>6/7/2027</text:p>
          </table:table-cell>
          <table:table-cell table:formula="of:=MONTH([.J390])" office:value-type="float" office:value="7" calcext:value-type="float">
            <text:p>7</text:p>
          </table:table-cell>
          <table:table-cell table:formula="of:=COM.MICROSOFT.XLOOKUP([$dms.$K390];[.G:.G];[.H:.H])" office:value-type="string" office:string-value="Jul" calcext:value-type="string">
            <text:p>Jul</text:p>
          </table:table-cell>
          <table:table-cell table:formula="of:=YEAR([$dms.$J390])" office:value-type="float" office:value="2027" calcext:value-type="float">
            <text:p>2027</text:p>
          </table:table-cell>
          <table:table-cell table:formula="of:=COM.MICROSOFT.CONCAT([$dms.$L390];&quot; &quot;;[$dms.$M390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07" calcext:value-type="date">
            <text:p>7/7/2027</text:p>
          </table:table-cell>
          <table:table-cell table:formula="of:=MONTH([.J391])" office:value-type="float" office:value="7" calcext:value-type="float">
            <text:p>7</text:p>
          </table:table-cell>
          <table:table-cell table:formula="of:=COM.MICROSOFT.XLOOKUP([$dms.$K391];[.G:.G];[.H:.H])" office:value-type="string" office:string-value="Jul" calcext:value-type="string">
            <text:p>Jul</text:p>
          </table:table-cell>
          <table:table-cell table:formula="of:=YEAR([$dms.$J391])" office:value-type="float" office:value="2027" calcext:value-type="float">
            <text:p>2027</text:p>
          </table:table-cell>
          <table:table-cell table:formula="of:=COM.MICROSOFT.CONCAT([$dms.$L391];&quot; &quot;;[$dms.$M391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08" calcext:value-type="date">
            <text:p>8/7/2027</text:p>
          </table:table-cell>
          <table:table-cell table:formula="of:=MONTH([.J392])" office:value-type="float" office:value="7" calcext:value-type="float">
            <text:p>7</text:p>
          </table:table-cell>
          <table:table-cell table:formula="of:=COM.MICROSOFT.XLOOKUP([$dms.$K392];[.G:.G];[.H:.H])" office:value-type="string" office:string-value="Jul" calcext:value-type="string">
            <text:p>Jul</text:p>
          </table:table-cell>
          <table:table-cell table:formula="of:=YEAR([$dms.$J392])" office:value-type="float" office:value="2027" calcext:value-type="float">
            <text:p>2027</text:p>
          </table:table-cell>
          <table:table-cell table:formula="of:=COM.MICROSOFT.CONCAT([$dms.$L392];&quot; &quot;;[$dms.$M392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09" calcext:value-type="date">
            <text:p>9/7/2027</text:p>
          </table:table-cell>
          <table:table-cell table:formula="of:=MONTH([.J393])" office:value-type="float" office:value="7" calcext:value-type="float">
            <text:p>7</text:p>
          </table:table-cell>
          <table:table-cell table:formula="of:=COM.MICROSOFT.XLOOKUP([$dms.$K393];[.G:.G];[.H:.H])" office:value-type="string" office:string-value="Jul" calcext:value-type="string">
            <text:p>Jul</text:p>
          </table:table-cell>
          <table:table-cell table:formula="of:=YEAR([$dms.$J393])" office:value-type="float" office:value="2027" calcext:value-type="float">
            <text:p>2027</text:p>
          </table:table-cell>
          <table:table-cell table:formula="of:=COM.MICROSOFT.CONCAT([$dms.$L393];&quot; &quot;;[$dms.$M393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0" calcext:value-type="date">
            <text:p>10/7/2027</text:p>
          </table:table-cell>
          <table:table-cell table:formula="of:=MONTH([.J394])" office:value-type="float" office:value="7" calcext:value-type="float">
            <text:p>7</text:p>
          </table:table-cell>
          <table:table-cell table:formula="of:=COM.MICROSOFT.XLOOKUP([$dms.$K394];[.G:.G];[.H:.H])" office:value-type="string" office:string-value="Jul" calcext:value-type="string">
            <text:p>Jul</text:p>
          </table:table-cell>
          <table:table-cell table:formula="of:=YEAR([$dms.$J394])" office:value-type="float" office:value="2027" calcext:value-type="float">
            <text:p>2027</text:p>
          </table:table-cell>
          <table:table-cell table:formula="of:=COM.MICROSOFT.CONCAT([$dms.$L394];&quot; &quot;;[$dms.$M394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1" calcext:value-type="date">
            <text:p>11/7/2027</text:p>
          </table:table-cell>
          <table:table-cell table:formula="of:=MONTH([.J395])" office:value-type="float" office:value="7" calcext:value-type="float">
            <text:p>7</text:p>
          </table:table-cell>
          <table:table-cell table:formula="of:=COM.MICROSOFT.XLOOKUP([$dms.$K395];[.G:.G];[.H:.H])" office:value-type="string" office:string-value="Jul" calcext:value-type="string">
            <text:p>Jul</text:p>
          </table:table-cell>
          <table:table-cell table:formula="of:=YEAR([$dms.$J395])" office:value-type="float" office:value="2027" calcext:value-type="float">
            <text:p>2027</text:p>
          </table:table-cell>
          <table:table-cell table:formula="of:=COM.MICROSOFT.CONCAT([$dms.$L395];&quot; &quot;;[$dms.$M395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2" calcext:value-type="date">
            <text:p>12/7/2027</text:p>
          </table:table-cell>
          <table:table-cell table:formula="of:=MONTH([.J396])" office:value-type="float" office:value="7" calcext:value-type="float">
            <text:p>7</text:p>
          </table:table-cell>
          <table:table-cell table:formula="of:=COM.MICROSOFT.XLOOKUP([$dms.$K396];[.G:.G];[.H:.H])" office:value-type="string" office:string-value="Jul" calcext:value-type="string">
            <text:p>Jul</text:p>
          </table:table-cell>
          <table:table-cell table:formula="of:=YEAR([$dms.$J396])" office:value-type="float" office:value="2027" calcext:value-type="float">
            <text:p>2027</text:p>
          </table:table-cell>
          <table:table-cell table:formula="of:=COM.MICROSOFT.CONCAT([$dms.$L396];&quot; &quot;;[$dms.$M396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3" calcext:value-type="date">
            <text:p>13/7/2027</text:p>
          </table:table-cell>
          <table:table-cell table:formula="of:=MONTH([.J397])" office:value-type="float" office:value="7" calcext:value-type="float">
            <text:p>7</text:p>
          </table:table-cell>
          <table:table-cell table:formula="of:=COM.MICROSOFT.XLOOKUP([$dms.$K397];[.G:.G];[.H:.H])" office:value-type="string" office:string-value="Jul" calcext:value-type="string">
            <text:p>Jul</text:p>
          </table:table-cell>
          <table:table-cell table:formula="of:=YEAR([$dms.$J397])" office:value-type="float" office:value="2027" calcext:value-type="float">
            <text:p>2027</text:p>
          </table:table-cell>
          <table:table-cell table:formula="of:=COM.MICROSOFT.CONCAT([$dms.$L397];&quot; &quot;;[$dms.$M397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4" calcext:value-type="date">
            <text:p>14/7/2027</text:p>
          </table:table-cell>
          <table:table-cell table:formula="of:=MONTH([.J398])" office:value-type="float" office:value="7" calcext:value-type="float">
            <text:p>7</text:p>
          </table:table-cell>
          <table:table-cell table:formula="of:=COM.MICROSOFT.XLOOKUP([$dms.$K398];[.G:.G];[.H:.H])" office:value-type="string" office:string-value="Jul" calcext:value-type="string">
            <text:p>Jul</text:p>
          </table:table-cell>
          <table:table-cell table:formula="of:=YEAR([$dms.$J398])" office:value-type="float" office:value="2027" calcext:value-type="float">
            <text:p>2027</text:p>
          </table:table-cell>
          <table:table-cell table:formula="of:=COM.MICROSOFT.CONCAT([$dms.$L398];&quot; &quot;;[$dms.$M398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5" calcext:value-type="date">
            <text:p>15/7/2027</text:p>
          </table:table-cell>
          <table:table-cell table:formula="of:=MONTH([.J399])" office:value-type="float" office:value="7" calcext:value-type="float">
            <text:p>7</text:p>
          </table:table-cell>
          <table:table-cell table:formula="of:=COM.MICROSOFT.XLOOKUP([$dms.$K399];[.G:.G];[.H:.H])" office:value-type="string" office:string-value="Jul" calcext:value-type="string">
            <text:p>Jul</text:p>
          </table:table-cell>
          <table:table-cell table:formula="of:=YEAR([$dms.$J399])" office:value-type="float" office:value="2027" calcext:value-type="float">
            <text:p>2027</text:p>
          </table:table-cell>
          <table:table-cell table:formula="of:=COM.MICROSOFT.CONCAT([$dms.$L399];&quot; &quot;;[$dms.$M399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6" calcext:value-type="date">
            <text:p>16/7/2027</text:p>
          </table:table-cell>
          <table:table-cell table:formula="of:=MONTH([.J400])" office:value-type="float" office:value="7" calcext:value-type="float">
            <text:p>7</text:p>
          </table:table-cell>
          <table:table-cell table:formula="of:=COM.MICROSOFT.XLOOKUP([$dms.$K400];[.G:.G];[.H:.H])" office:value-type="string" office:string-value="Jul" calcext:value-type="string">
            <text:p>Jul</text:p>
          </table:table-cell>
          <table:table-cell table:formula="of:=YEAR([$dms.$J400])" office:value-type="float" office:value="2027" calcext:value-type="float">
            <text:p>2027</text:p>
          </table:table-cell>
          <table:table-cell table:formula="of:=COM.MICROSOFT.CONCAT([$dms.$L400];&quot; &quot;;[$dms.$M400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7" calcext:value-type="date">
            <text:p>17/7/2027</text:p>
          </table:table-cell>
          <table:table-cell table:formula="of:=MONTH([.J401])" office:value-type="float" office:value="7" calcext:value-type="float">
            <text:p>7</text:p>
          </table:table-cell>
          <table:table-cell table:formula="of:=COM.MICROSOFT.XLOOKUP([$dms.$K401];[.G:.G];[.H:.H])" office:value-type="string" office:string-value="Jul" calcext:value-type="string">
            <text:p>Jul</text:p>
          </table:table-cell>
          <table:table-cell table:formula="of:=YEAR([$dms.$J401])" office:value-type="float" office:value="2027" calcext:value-type="float">
            <text:p>2027</text:p>
          </table:table-cell>
          <table:table-cell table:formula="of:=COM.MICROSOFT.CONCAT([$dms.$L401];&quot; &quot;;[$dms.$M401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8" calcext:value-type="date">
            <text:p>18/7/2027</text:p>
          </table:table-cell>
          <table:table-cell table:formula="of:=MONTH([.J402])" office:value-type="float" office:value="7" calcext:value-type="float">
            <text:p>7</text:p>
          </table:table-cell>
          <table:table-cell table:formula="of:=COM.MICROSOFT.XLOOKUP([$dms.$K402];[.G:.G];[.H:.H])" office:value-type="string" office:string-value="Jul" calcext:value-type="string">
            <text:p>Jul</text:p>
          </table:table-cell>
          <table:table-cell table:formula="of:=YEAR([$dms.$J402])" office:value-type="float" office:value="2027" calcext:value-type="float">
            <text:p>2027</text:p>
          </table:table-cell>
          <table:table-cell table:formula="of:=COM.MICROSOFT.CONCAT([$dms.$L402];&quot; &quot;;[$dms.$M402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19" calcext:value-type="date">
            <text:p>19/7/2027</text:p>
          </table:table-cell>
          <table:table-cell table:formula="of:=MONTH([.J403])" office:value-type="float" office:value="7" calcext:value-type="float">
            <text:p>7</text:p>
          </table:table-cell>
          <table:table-cell table:formula="of:=COM.MICROSOFT.XLOOKUP([$dms.$K403];[.G:.G];[.H:.H])" office:value-type="string" office:string-value="Jul" calcext:value-type="string">
            <text:p>Jul</text:p>
          </table:table-cell>
          <table:table-cell table:formula="of:=YEAR([$dms.$J403])" office:value-type="float" office:value="2027" calcext:value-type="float">
            <text:p>2027</text:p>
          </table:table-cell>
          <table:table-cell table:formula="of:=COM.MICROSOFT.CONCAT([$dms.$L403];&quot; &quot;;[$dms.$M403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0" calcext:value-type="date">
            <text:p>20/7/2027</text:p>
          </table:table-cell>
          <table:table-cell table:formula="of:=MONTH([.J404])" office:value-type="float" office:value="7" calcext:value-type="float">
            <text:p>7</text:p>
          </table:table-cell>
          <table:table-cell table:formula="of:=COM.MICROSOFT.XLOOKUP([$dms.$K404];[.G:.G];[.H:.H])" office:value-type="string" office:string-value="Jul" calcext:value-type="string">
            <text:p>Jul</text:p>
          </table:table-cell>
          <table:table-cell table:formula="of:=YEAR([$dms.$J404])" office:value-type="float" office:value="2027" calcext:value-type="float">
            <text:p>2027</text:p>
          </table:table-cell>
          <table:table-cell table:formula="of:=COM.MICROSOFT.CONCAT([$dms.$L404];&quot; &quot;;[$dms.$M404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1" calcext:value-type="date">
            <text:p>21/7/2027</text:p>
          </table:table-cell>
          <table:table-cell table:formula="of:=MONTH([.J405])" office:value-type="float" office:value="7" calcext:value-type="float">
            <text:p>7</text:p>
          </table:table-cell>
          <table:table-cell table:formula="of:=COM.MICROSOFT.XLOOKUP([$dms.$K405];[.G:.G];[.H:.H])" office:value-type="string" office:string-value="Jul" calcext:value-type="string">
            <text:p>Jul</text:p>
          </table:table-cell>
          <table:table-cell table:formula="of:=YEAR([$dms.$J405])" office:value-type="float" office:value="2027" calcext:value-type="float">
            <text:p>2027</text:p>
          </table:table-cell>
          <table:table-cell table:formula="of:=COM.MICROSOFT.CONCAT([$dms.$L405];&quot; &quot;;[$dms.$M405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2" calcext:value-type="date">
            <text:p>22/7/2027</text:p>
          </table:table-cell>
          <table:table-cell table:formula="of:=MONTH([.J406])" office:value-type="float" office:value="7" calcext:value-type="float">
            <text:p>7</text:p>
          </table:table-cell>
          <table:table-cell table:formula="of:=COM.MICROSOFT.XLOOKUP([$dms.$K406];[.G:.G];[.H:.H])" office:value-type="string" office:string-value="Jul" calcext:value-type="string">
            <text:p>Jul</text:p>
          </table:table-cell>
          <table:table-cell table:formula="of:=YEAR([$dms.$J406])" office:value-type="float" office:value="2027" calcext:value-type="float">
            <text:p>2027</text:p>
          </table:table-cell>
          <table:table-cell table:formula="of:=COM.MICROSOFT.CONCAT([$dms.$L406];&quot; &quot;;[$dms.$M406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3" calcext:value-type="date">
            <text:p>23/7/2027</text:p>
          </table:table-cell>
          <table:table-cell table:formula="of:=MONTH([.J407])" office:value-type="float" office:value="7" calcext:value-type="float">
            <text:p>7</text:p>
          </table:table-cell>
          <table:table-cell table:formula="of:=COM.MICROSOFT.XLOOKUP([$dms.$K407];[.G:.G];[.H:.H])" office:value-type="string" office:string-value="Jul" calcext:value-type="string">
            <text:p>Jul</text:p>
          </table:table-cell>
          <table:table-cell table:formula="of:=YEAR([$dms.$J407])" office:value-type="float" office:value="2027" calcext:value-type="float">
            <text:p>2027</text:p>
          </table:table-cell>
          <table:table-cell table:formula="of:=COM.MICROSOFT.CONCAT([$dms.$L407];&quot; &quot;;[$dms.$M407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4" calcext:value-type="date">
            <text:p>24/7/2027</text:p>
          </table:table-cell>
          <table:table-cell table:formula="of:=MONTH([.J408])" office:value-type="float" office:value="7" calcext:value-type="float">
            <text:p>7</text:p>
          </table:table-cell>
          <table:table-cell table:formula="of:=COM.MICROSOFT.XLOOKUP([$dms.$K408];[.G:.G];[.H:.H])" office:value-type="string" office:string-value="Jul" calcext:value-type="string">
            <text:p>Jul</text:p>
          </table:table-cell>
          <table:table-cell table:formula="of:=YEAR([$dms.$J408])" office:value-type="float" office:value="2027" calcext:value-type="float">
            <text:p>2027</text:p>
          </table:table-cell>
          <table:table-cell table:formula="of:=COM.MICROSOFT.CONCAT([$dms.$L408];&quot; &quot;;[$dms.$M408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5" calcext:value-type="date">
            <text:p>25/7/2027</text:p>
          </table:table-cell>
          <table:table-cell table:formula="of:=MONTH([.J409])" office:value-type="float" office:value="7" calcext:value-type="float">
            <text:p>7</text:p>
          </table:table-cell>
          <table:table-cell table:formula="of:=COM.MICROSOFT.XLOOKUP([$dms.$K409];[.G:.G];[.H:.H])" office:value-type="string" office:string-value="Jul" calcext:value-type="string">
            <text:p>Jul</text:p>
          </table:table-cell>
          <table:table-cell table:formula="of:=YEAR([$dms.$J409])" office:value-type="float" office:value="2027" calcext:value-type="float">
            <text:p>2027</text:p>
          </table:table-cell>
          <table:table-cell table:formula="of:=COM.MICROSOFT.CONCAT([$dms.$L409];&quot; &quot;;[$dms.$M409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6" calcext:value-type="date">
            <text:p>26/7/2027</text:p>
          </table:table-cell>
          <table:table-cell table:formula="of:=MONTH([.J410])" office:value-type="float" office:value="7" calcext:value-type="float">
            <text:p>7</text:p>
          </table:table-cell>
          <table:table-cell table:formula="of:=COM.MICROSOFT.XLOOKUP([$dms.$K410];[.G:.G];[.H:.H])" office:value-type="string" office:string-value="Jul" calcext:value-type="string">
            <text:p>Jul</text:p>
          </table:table-cell>
          <table:table-cell table:formula="of:=YEAR([$dms.$J410])" office:value-type="float" office:value="2027" calcext:value-type="float">
            <text:p>2027</text:p>
          </table:table-cell>
          <table:table-cell table:formula="of:=COM.MICROSOFT.CONCAT([$dms.$L410];&quot; &quot;;[$dms.$M410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7" calcext:value-type="date">
            <text:p>27/7/2027</text:p>
          </table:table-cell>
          <table:table-cell table:formula="of:=MONTH([.J411])" office:value-type="float" office:value="7" calcext:value-type="float">
            <text:p>7</text:p>
          </table:table-cell>
          <table:table-cell table:formula="of:=COM.MICROSOFT.XLOOKUP([$dms.$K411];[.G:.G];[.H:.H])" office:value-type="string" office:string-value="Jul" calcext:value-type="string">
            <text:p>Jul</text:p>
          </table:table-cell>
          <table:table-cell table:formula="of:=YEAR([$dms.$J411])" office:value-type="float" office:value="2027" calcext:value-type="float">
            <text:p>2027</text:p>
          </table:table-cell>
          <table:table-cell table:formula="of:=COM.MICROSOFT.CONCAT([$dms.$L411];&quot; &quot;;[$dms.$M411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8" calcext:value-type="date">
            <text:p>28/7/2027</text:p>
          </table:table-cell>
          <table:table-cell table:formula="of:=MONTH([.J412])" office:value-type="float" office:value="7" calcext:value-type="float">
            <text:p>7</text:p>
          </table:table-cell>
          <table:table-cell table:formula="of:=COM.MICROSOFT.XLOOKUP([$dms.$K412];[.G:.G];[.H:.H])" office:value-type="string" office:string-value="Jul" calcext:value-type="string">
            <text:p>Jul</text:p>
          </table:table-cell>
          <table:table-cell table:formula="of:=YEAR([$dms.$J412])" office:value-type="float" office:value="2027" calcext:value-type="float">
            <text:p>2027</text:p>
          </table:table-cell>
          <table:table-cell table:formula="of:=COM.MICROSOFT.CONCAT([$dms.$L412];&quot; &quot;;[$dms.$M412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29" calcext:value-type="date">
            <text:p>29/7/2027</text:p>
          </table:table-cell>
          <table:table-cell table:formula="of:=MONTH([.J413])" office:value-type="float" office:value="7" calcext:value-type="float">
            <text:p>7</text:p>
          </table:table-cell>
          <table:table-cell table:formula="of:=COM.MICROSOFT.XLOOKUP([$dms.$K413];[.G:.G];[.H:.H])" office:value-type="string" office:string-value="Jul" calcext:value-type="string">
            <text:p>Jul</text:p>
          </table:table-cell>
          <table:table-cell table:formula="of:=YEAR([$dms.$J413])" office:value-type="float" office:value="2027" calcext:value-type="float">
            <text:p>2027</text:p>
          </table:table-cell>
          <table:table-cell table:formula="of:=COM.MICROSOFT.CONCAT([$dms.$L413];&quot; &quot;;[$dms.$M413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30" calcext:value-type="date">
            <text:p>30/7/2027</text:p>
          </table:table-cell>
          <table:table-cell table:formula="of:=MONTH([.J414])" office:value-type="float" office:value="7" calcext:value-type="float">
            <text:p>7</text:p>
          </table:table-cell>
          <table:table-cell table:formula="of:=COM.MICROSOFT.XLOOKUP([$dms.$K414];[.G:.G];[.H:.H])" office:value-type="string" office:string-value="Jul" calcext:value-type="string">
            <text:p>Jul</text:p>
          </table:table-cell>
          <table:table-cell table:formula="of:=YEAR([$dms.$J414])" office:value-type="float" office:value="2027" calcext:value-type="float">
            <text:p>2027</text:p>
          </table:table-cell>
          <table:table-cell table:formula="of:=COM.MICROSOFT.CONCAT([$dms.$L414];&quot; &quot;;[$dms.$M414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7-31" calcext:value-type="date">
            <text:p>31/7/2027</text:p>
          </table:table-cell>
          <table:table-cell table:formula="of:=MONTH([.J415])" office:value-type="float" office:value="7" calcext:value-type="float">
            <text:p>7</text:p>
          </table:table-cell>
          <table:table-cell table:formula="of:=COM.MICROSOFT.XLOOKUP([$dms.$K415];[.G:.G];[.H:.H])" office:value-type="string" office:string-value="Jul" calcext:value-type="string">
            <text:p>Jul</text:p>
          </table:table-cell>
          <table:table-cell table:formula="of:=YEAR([$dms.$J415])" office:value-type="float" office:value="2027" calcext:value-type="float">
            <text:p>2027</text:p>
          </table:table-cell>
          <table:table-cell table:formula="of:=COM.MICROSOFT.CONCAT([$dms.$L415];&quot; &quot;;[$dms.$M415])" office:value-type="string" office:string-value="Jul 2027" calcext:value-type="string">
            <text:p>Jul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01" calcext:value-type="date">
            <text:p>1/8/2027</text:p>
          </table:table-cell>
          <table:table-cell table:formula="of:=MONTH([.J416])" office:value-type="float" office:value="8" calcext:value-type="float">
            <text:p>8</text:p>
          </table:table-cell>
          <table:table-cell table:formula="of:=COM.MICROSOFT.XLOOKUP([$dms.$K416];[.G:.G];[.H:.H])" office:value-type="string" office:string-value="Ago" calcext:value-type="string">
            <text:p>Ago</text:p>
          </table:table-cell>
          <table:table-cell table:formula="of:=YEAR([$dms.$J416])" office:value-type="float" office:value="2027" calcext:value-type="float">
            <text:p>2027</text:p>
          </table:table-cell>
          <table:table-cell table:formula="of:=COM.MICROSOFT.CONCAT([$dms.$L416];&quot; &quot;;[$dms.$M416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02" calcext:value-type="date">
            <text:p>2/8/2027</text:p>
          </table:table-cell>
          <table:table-cell table:formula="of:=MONTH([.J417])" office:value-type="float" office:value="8" calcext:value-type="float">
            <text:p>8</text:p>
          </table:table-cell>
          <table:table-cell table:formula="of:=COM.MICROSOFT.XLOOKUP([$dms.$K417];[.G:.G];[.H:.H])" office:value-type="string" office:string-value="Ago" calcext:value-type="string">
            <text:p>Ago</text:p>
          </table:table-cell>
          <table:table-cell table:formula="of:=YEAR([$dms.$J417])" office:value-type="float" office:value="2027" calcext:value-type="float">
            <text:p>2027</text:p>
          </table:table-cell>
          <table:table-cell table:formula="of:=COM.MICROSOFT.CONCAT([$dms.$L417];&quot; &quot;;[$dms.$M417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03" calcext:value-type="date">
            <text:p>3/8/2027</text:p>
          </table:table-cell>
          <table:table-cell table:formula="of:=MONTH([.J418])" office:value-type="float" office:value="8" calcext:value-type="float">
            <text:p>8</text:p>
          </table:table-cell>
          <table:table-cell table:formula="of:=COM.MICROSOFT.XLOOKUP([$dms.$K418];[.G:.G];[.H:.H])" office:value-type="string" office:string-value="Ago" calcext:value-type="string">
            <text:p>Ago</text:p>
          </table:table-cell>
          <table:table-cell table:formula="of:=YEAR([$dms.$J418])" office:value-type="float" office:value="2027" calcext:value-type="float">
            <text:p>2027</text:p>
          </table:table-cell>
          <table:table-cell table:formula="of:=COM.MICROSOFT.CONCAT([$dms.$L418];&quot; &quot;;[$dms.$M418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04" calcext:value-type="date">
            <text:p>4/8/2027</text:p>
          </table:table-cell>
          <table:table-cell table:formula="of:=MONTH([.J419])" office:value-type="float" office:value="8" calcext:value-type="float">
            <text:p>8</text:p>
          </table:table-cell>
          <table:table-cell table:formula="of:=COM.MICROSOFT.XLOOKUP([$dms.$K419];[.G:.G];[.H:.H])" office:value-type="string" office:string-value="Ago" calcext:value-type="string">
            <text:p>Ago</text:p>
          </table:table-cell>
          <table:table-cell table:formula="of:=YEAR([$dms.$J419])" office:value-type="float" office:value="2027" calcext:value-type="float">
            <text:p>2027</text:p>
          </table:table-cell>
          <table:table-cell table:formula="of:=COM.MICROSOFT.CONCAT([$dms.$L419];&quot; &quot;;[$dms.$M419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05" calcext:value-type="date">
            <text:p>5/8/2027</text:p>
          </table:table-cell>
          <table:table-cell table:formula="of:=MONTH([.J420])" office:value-type="float" office:value="8" calcext:value-type="float">
            <text:p>8</text:p>
          </table:table-cell>
          <table:table-cell table:formula="of:=COM.MICROSOFT.XLOOKUP([$dms.$K420];[.G:.G];[.H:.H])" office:value-type="string" office:string-value="Ago" calcext:value-type="string">
            <text:p>Ago</text:p>
          </table:table-cell>
          <table:table-cell table:formula="of:=YEAR([$dms.$J420])" office:value-type="float" office:value="2027" calcext:value-type="float">
            <text:p>2027</text:p>
          </table:table-cell>
          <table:table-cell table:formula="of:=COM.MICROSOFT.CONCAT([$dms.$L420];&quot; &quot;;[$dms.$M420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06" calcext:value-type="date">
            <text:p>6/8/2027</text:p>
          </table:table-cell>
          <table:table-cell table:formula="of:=MONTH([.J421])" office:value-type="float" office:value="8" calcext:value-type="float">
            <text:p>8</text:p>
          </table:table-cell>
          <table:table-cell table:formula="of:=COM.MICROSOFT.XLOOKUP([$dms.$K421];[.G:.G];[.H:.H])" office:value-type="string" office:string-value="Ago" calcext:value-type="string">
            <text:p>Ago</text:p>
          </table:table-cell>
          <table:table-cell table:formula="of:=YEAR([$dms.$J421])" office:value-type="float" office:value="2027" calcext:value-type="float">
            <text:p>2027</text:p>
          </table:table-cell>
          <table:table-cell table:formula="of:=COM.MICROSOFT.CONCAT([$dms.$L421];&quot; &quot;;[$dms.$M421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07" calcext:value-type="date">
            <text:p>7/8/2027</text:p>
          </table:table-cell>
          <table:table-cell table:formula="of:=MONTH([.J422])" office:value-type="float" office:value="8" calcext:value-type="float">
            <text:p>8</text:p>
          </table:table-cell>
          <table:table-cell table:formula="of:=COM.MICROSOFT.XLOOKUP([$dms.$K422];[.G:.G];[.H:.H])" office:value-type="string" office:string-value="Ago" calcext:value-type="string">
            <text:p>Ago</text:p>
          </table:table-cell>
          <table:table-cell table:formula="of:=YEAR([$dms.$J422])" office:value-type="float" office:value="2027" calcext:value-type="float">
            <text:p>2027</text:p>
          </table:table-cell>
          <table:table-cell table:formula="of:=COM.MICROSOFT.CONCAT([$dms.$L422];&quot; &quot;;[$dms.$M422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08" calcext:value-type="date">
            <text:p>8/8/2027</text:p>
          </table:table-cell>
          <table:table-cell table:formula="of:=MONTH([.J423])" office:value-type="float" office:value="8" calcext:value-type="float">
            <text:p>8</text:p>
          </table:table-cell>
          <table:table-cell table:formula="of:=COM.MICROSOFT.XLOOKUP([$dms.$K423];[.G:.G];[.H:.H])" office:value-type="string" office:string-value="Ago" calcext:value-type="string">
            <text:p>Ago</text:p>
          </table:table-cell>
          <table:table-cell table:formula="of:=YEAR([$dms.$J423])" office:value-type="float" office:value="2027" calcext:value-type="float">
            <text:p>2027</text:p>
          </table:table-cell>
          <table:table-cell table:formula="of:=COM.MICROSOFT.CONCAT([$dms.$L423];&quot; &quot;;[$dms.$M423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09" calcext:value-type="date">
            <text:p>9/8/2027</text:p>
          </table:table-cell>
          <table:table-cell table:formula="of:=MONTH([.J424])" office:value-type="float" office:value="8" calcext:value-type="float">
            <text:p>8</text:p>
          </table:table-cell>
          <table:table-cell table:formula="of:=COM.MICROSOFT.XLOOKUP([$dms.$K424];[.G:.G];[.H:.H])" office:value-type="string" office:string-value="Ago" calcext:value-type="string">
            <text:p>Ago</text:p>
          </table:table-cell>
          <table:table-cell table:formula="of:=YEAR([$dms.$J424])" office:value-type="float" office:value="2027" calcext:value-type="float">
            <text:p>2027</text:p>
          </table:table-cell>
          <table:table-cell table:formula="of:=COM.MICROSOFT.CONCAT([$dms.$L424];&quot; &quot;;[$dms.$M424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0" calcext:value-type="date">
            <text:p>10/8/2027</text:p>
          </table:table-cell>
          <table:table-cell table:formula="of:=MONTH([.J425])" office:value-type="float" office:value="8" calcext:value-type="float">
            <text:p>8</text:p>
          </table:table-cell>
          <table:table-cell table:formula="of:=COM.MICROSOFT.XLOOKUP([$dms.$K425];[.G:.G];[.H:.H])" office:value-type="string" office:string-value="Ago" calcext:value-type="string">
            <text:p>Ago</text:p>
          </table:table-cell>
          <table:table-cell table:formula="of:=YEAR([$dms.$J425])" office:value-type="float" office:value="2027" calcext:value-type="float">
            <text:p>2027</text:p>
          </table:table-cell>
          <table:table-cell table:formula="of:=COM.MICROSOFT.CONCAT([$dms.$L425];&quot; &quot;;[$dms.$M425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1" calcext:value-type="date">
            <text:p>11/8/2027</text:p>
          </table:table-cell>
          <table:table-cell table:formula="of:=MONTH([.J426])" office:value-type="float" office:value="8" calcext:value-type="float">
            <text:p>8</text:p>
          </table:table-cell>
          <table:table-cell table:formula="of:=COM.MICROSOFT.XLOOKUP([$dms.$K426];[.G:.G];[.H:.H])" office:value-type="string" office:string-value="Ago" calcext:value-type="string">
            <text:p>Ago</text:p>
          </table:table-cell>
          <table:table-cell table:formula="of:=YEAR([$dms.$J426])" office:value-type="float" office:value="2027" calcext:value-type="float">
            <text:p>2027</text:p>
          </table:table-cell>
          <table:table-cell table:formula="of:=COM.MICROSOFT.CONCAT([$dms.$L426];&quot; &quot;;[$dms.$M426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2" calcext:value-type="date">
            <text:p>12/8/2027</text:p>
          </table:table-cell>
          <table:table-cell table:formula="of:=MONTH([.J427])" office:value-type="float" office:value="8" calcext:value-type="float">
            <text:p>8</text:p>
          </table:table-cell>
          <table:table-cell table:formula="of:=COM.MICROSOFT.XLOOKUP([$dms.$K427];[.G:.G];[.H:.H])" office:value-type="string" office:string-value="Ago" calcext:value-type="string">
            <text:p>Ago</text:p>
          </table:table-cell>
          <table:table-cell table:formula="of:=YEAR([$dms.$J427])" office:value-type="float" office:value="2027" calcext:value-type="float">
            <text:p>2027</text:p>
          </table:table-cell>
          <table:table-cell table:formula="of:=COM.MICROSOFT.CONCAT([$dms.$L427];&quot; &quot;;[$dms.$M427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3" calcext:value-type="date">
            <text:p>13/8/2027</text:p>
          </table:table-cell>
          <table:table-cell table:formula="of:=MONTH([.J428])" office:value-type="float" office:value="8" calcext:value-type="float">
            <text:p>8</text:p>
          </table:table-cell>
          <table:table-cell table:formula="of:=COM.MICROSOFT.XLOOKUP([$dms.$K428];[.G:.G];[.H:.H])" office:value-type="string" office:string-value="Ago" calcext:value-type="string">
            <text:p>Ago</text:p>
          </table:table-cell>
          <table:table-cell table:formula="of:=YEAR([$dms.$J428])" office:value-type="float" office:value="2027" calcext:value-type="float">
            <text:p>2027</text:p>
          </table:table-cell>
          <table:table-cell table:formula="of:=COM.MICROSOFT.CONCAT([$dms.$L428];&quot; &quot;;[$dms.$M428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4" calcext:value-type="date">
            <text:p>14/8/2027</text:p>
          </table:table-cell>
          <table:table-cell table:formula="of:=MONTH([.J429])" office:value-type="float" office:value="8" calcext:value-type="float">
            <text:p>8</text:p>
          </table:table-cell>
          <table:table-cell table:formula="of:=COM.MICROSOFT.XLOOKUP([$dms.$K429];[.G:.G];[.H:.H])" office:value-type="string" office:string-value="Ago" calcext:value-type="string">
            <text:p>Ago</text:p>
          </table:table-cell>
          <table:table-cell table:formula="of:=YEAR([$dms.$J429])" office:value-type="float" office:value="2027" calcext:value-type="float">
            <text:p>2027</text:p>
          </table:table-cell>
          <table:table-cell table:formula="of:=COM.MICROSOFT.CONCAT([$dms.$L429];&quot; &quot;;[$dms.$M429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5" calcext:value-type="date">
            <text:p>15/8/2027</text:p>
          </table:table-cell>
          <table:table-cell table:formula="of:=MONTH([.J430])" office:value-type="float" office:value="8" calcext:value-type="float">
            <text:p>8</text:p>
          </table:table-cell>
          <table:table-cell table:formula="of:=COM.MICROSOFT.XLOOKUP([$dms.$K430];[.G:.G];[.H:.H])" office:value-type="string" office:string-value="Ago" calcext:value-type="string">
            <text:p>Ago</text:p>
          </table:table-cell>
          <table:table-cell table:formula="of:=YEAR([$dms.$J430])" office:value-type="float" office:value="2027" calcext:value-type="float">
            <text:p>2027</text:p>
          </table:table-cell>
          <table:table-cell table:formula="of:=COM.MICROSOFT.CONCAT([$dms.$L430];&quot; &quot;;[$dms.$M430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6" calcext:value-type="date">
            <text:p>16/8/2027</text:p>
          </table:table-cell>
          <table:table-cell table:formula="of:=MONTH([.J431])" office:value-type="float" office:value="8" calcext:value-type="float">
            <text:p>8</text:p>
          </table:table-cell>
          <table:table-cell table:formula="of:=COM.MICROSOFT.XLOOKUP([$dms.$K431];[.G:.G];[.H:.H])" office:value-type="string" office:string-value="Ago" calcext:value-type="string">
            <text:p>Ago</text:p>
          </table:table-cell>
          <table:table-cell table:formula="of:=YEAR([$dms.$J431])" office:value-type="float" office:value="2027" calcext:value-type="float">
            <text:p>2027</text:p>
          </table:table-cell>
          <table:table-cell table:formula="of:=COM.MICROSOFT.CONCAT([$dms.$L431];&quot; &quot;;[$dms.$M431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7" calcext:value-type="date">
            <text:p>17/8/2027</text:p>
          </table:table-cell>
          <table:table-cell table:formula="of:=MONTH([.J432])" office:value-type="float" office:value="8" calcext:value-type="float">
            <text:p>8</text:p>
          </table:table-cell>
          <table:table-cell table:formula="of:=COM.MICROSOFT.XLOOKUP([$dms.$K432];[.G:.G];[.H:.H])" office:value-type="string" office:string-value="Ago" calcext:value-type="string">
            <text:p>Ago</text:p>
          </table:table-cell>
          <table:table-cell table:formula="of:=YEAR([$dms.$J432])" office:value-type="float" office:value="2027" calcext:value-type="float">
            <text:p>2027</text:p>
          </table:table-cell>
          <table:table-cell table:formula="of:=COM.MICROSOFT.CONCAT([$dms.$L432];&quot; &quot;;[$dms.$M432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8" calcext:value-type="date">
            <text:p>18/8/2027</text:p>
          </table:table-cell>
          <table:table-cell table:formula="of:=MONTH([.J433])" office:value-type="float" office:value="8" calcext:value-type="float">
            <text:p>8</text:p>
          </table:table-cell>
          <table:table-cell table:formula="of:=COM.MICROSOFT.XLOOKUP([$dms.$K433];[.G:.G];[.H:.H])" office:value-type="string" office:string-value="Ago" calcext:value-type="string">
            <text:p>Ago</text:p>
          </table:table-cell>
          <table:table-cell table:formula="of:=YEAR([$dms.$J433])" office:value-type="float" office:value="2027" calcext:value-type="float">
            <text:p>2027</text:p>
          </table:table-cell>
          <table:table-cell table:formula="of:=COM.MICROSOFT.CONCAT([$dms.$L433];&quot; &quot;;[$dms.$M433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19" calcext:value-type="date">
            <text:p>19/8/2027</text:p>
          </table:table-cell>
          <table:table-cell table:formula="of:=MONTH([.J434])" office:value-type="float" office:value="8" calcext:value-type="float">
            <text:p>8</text:p>
          </table:table-cell>
          <table:table-cell table:formula="of:=COM.MICROSOFT.XLOOKUP([$dms.$K434];[.G:.G];[.H:.H])" office:value-type="string" office:string-value="Ago" calcext:value-type="string">
            <text:p>Ago</text:p>
          </table:table-cell>
          <table:table-cell table:formula="of:=YEAR([$dms.$J434])" office:value-type="float" office:value="2027" calcext:value-type="float">
            <text:p>2027</text:p>
          </table:table-cell>
          <table:table-cell table:formula="of:=COM.MICROSOFT.CONCAT([$dms.$L434];&quot; &quot;;[$dms.$M434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0" calcext:value-type="date">
            <text:p>20/8/2027</text:p>
          </table:table-cell>
          <table:table-cell table:formula="of:=MONTH([.J435])" office:value-type="float" office:value="8" calcext:value-type="float">
            <text:p>8</text:p>
          </table:table-cell>
          <table:table-cell table:formula="of:=COM.MICROSOFT.XLOOKUP([$dms.$K435];[.G:.G];[.H:.H])" office:value-type="string" office:string-value="Ago" calcext:value-type="string">
            <text:p>Ago</text:p>
          </table:table-cell>
          <table:table-cell table:formula="of:=YEAR([$dms.$J435])" office:value-type="float" office:value="2027" calcext:value-type="float">
            <text:p>2027</text:p>
          </table:table-cell>
          <table:table-cell table:formula="of:=COM.MICROSOFT.CONCAT([$dms.$L435];&quot; &quot;;[$dms.$M435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1" calcext:value-type="date">
            <text:p>21/8/2027</text:p>
          </table:table-cell>
          <table:table-cell table:formula="of:=MONTH([.J436])" office:value-type="float" office:value="8" calcext:value-type="float">
            <text:p>8</text:p>
          </table:table-cell>
          <table:table-cell table:formula="of:=COM.MICROSOFT.XLOOKUP([$dms.$K436];[.G:.G];[.H:.H])" office:value-type="string" office:string-value="Ago" calcext:value-type="string">
            <text:p>Ago</text:p>
          </table:table-cell>
          <table:table-cell table:formula="of:=YEAR([$dms.$J436])" office:value-type="float" office:value="2027" calcext:value-type="float">
            <text:p>2027</text:p>
          </table:table-cell>
          <table:table-cell table:formula="of:=COM.MICROSOFT.CONCAT([$dms.$L436];&quot; &quot;;[$dms.$M436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2" calcext:value-type="date">
            <text:p>22/8/2027</text:p>
          </table:table-cell>
          <table:table-cell table:formula="of:=MONTH([.J437])" office:value-type="float" office:value="8" calcext:value-type="float">
            <text:p>8</text:p>
          </table:table-cell>
          <table:table-cell table:formula="of:=COM.MICROSOFT.XLOOKUP([$dms.$K437];[.G:.G];[.H:.H])" office:value-type="string" office:string-value="Ago" calcext:value-type="string">
            <text:p>Ago</text:p>
          </table:table-cell>
          <table:table-cell table:formula="of:=YEAR([$dms.$J437])" office:value-type="float" office:value="2027" calcext:value-type="float">
            <text:p>2027</text:p>
          </table:table-cell>
          <table:table-cell table:formula="of:=COM.MICROSOFT.CONCAT([$dms.$L437];&quot; &quot;;[$dms.$M437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3" calcext:value-type="date">
            <text:p>23/8/2027</text:p>
          </table:table-cell>
          <table:table-cell table:formula="of:=MONTH([.J438])" office:value-type="float" office:value="8" calcext:value-type="float">
            <text:p>8</text:p>
          </table:table-cell>
          <table:table-cell table:formula="of:=COM.MICROSOFT.XLOOKUP([$dms.$K438];[.G:.G];[.H:.H])" office:value-type="string" office:string-value="Ago" calcext:value-type="string">
            <text:p>Ago</text:p>
          </table:table-cell>
          <table:table-cell table:formula="of:=YEAR([$dms.$J438])" office:value-type="float" office:value="2027" calcext:value-type="float">
            <text:p>2027</text:p>
          </table:table-cell>
          <table:table-cell table:formula="of:=COM.MICROSOFT.CONCAT([$dms.$L438];&quot; &quot;;[$dms.$M438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4" calcext:value-type="date">
            <text:p>24/8/2027</text:p>
          </table:table-cell>
          <table:table-cell table:formula="of:=MONTH([.J439])" office:value-type="float" office:value="8" calcext:value-type="float">
            <text:p>8</text:p>
          </table:table-cell>
          <table:table-cell table:formula="of:=COM.MICROSOFT.XLOOKUP([$dms.$K439];[.G:.G];[.H:.H])" office:value-type="string" office:string-value="Ago" calcext:value-type="string">
            <text:p>Ago</text:p>
          </table:table-cell>
          <table:table-cell table:formula="of:=YEAR([$dms.$J439])" office:value-type="float" office:value="2027" calcext:value-type="float">
            <text:p>2027</text:p>
          </table:table-cell>
          <table:table-cell table:formula="of:=COM.MICROSOFT.CONCAT([$dms.$L439];&quot; &quot;;[$dms.$M439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5" calcext:value-type="date">
            <text:p>25/8/2027</text:p>
          </table:table-cell>
          <table:table-cell table:formula="of:=MONTH([.J440])" office:value-type="float" office:value="8" calcext:value-type="float">
            <text:p>8</text:p>
          </table:table-cell>
          <table:table-cell table:formula="of:=COM.MICROSOFT.XLOOKUP([$dms.$K440];[.G:.G];[.H:.H])" office:value-type="string" office:string-value="Ago" calcext:value-type="string">
            <text:p>Ago</text:p>
          </table:table-cell>
          <table:table-cell table:formula="of:=YEAR([$dms.$J440])" office:value-type="float" office:value="2027" calcext:value-type="float">
            <text:p>2027</text:p>
          </table:table-cell>
          <table:table-cell table:formula="of:=COM.MICROSOFT.CONCAT([$dms.$L440];&quot; &quot;;[$dms.$M440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6" calcext:value-type="date">
            <text:p>26/8/2027</text:p>
          </table:table-cell>
          <table:table-cell table:formula="of:=MONTH([.J441])" office:value-type="float" office:value="8" calcext:value-type="float">
            <text:p>8</text:p>
          </table:table-cell>
          <table:table-cell table:formula="of:=COM.MICROSOFT.XLOOKUP([$dms.$K441];[.G:.G];[.H:.H])" office:value-type="string" office:string-value="Ago" calcext:value-type="string">
            <text:p>Ago</text:p>
          </table:table-cell>
          <table:table-cell table:formula="of:=YEAR([$dms.$J441])" office:value-type="float" office:value="2027" calcext:value-type="float">
            <text:p>2027</text:p>
          </table:table-cell>
          <table:table-cell table:formula="of:=COM.MICROSOFT.CONCAT([$dms.$L441];&quot; &quot;;[$dms.$M441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7" calcext:value-type="date">
            <text:p>27/8/2027</text:p>
          </table:table-cell>
          <table:table-cell table:formula="of:=MONTH([.J442])" office:value-type="float" office:value="8" calcext:value-type="float">
            <text:p>8</text:p>
          </table:table-cell>
          <table:table-cell table:formula="of:=COM.MICROSOFT.XLOOKUP([$dms.$K442];[.G:.G];[.H:.H])" office:value-type="string" office:string-value="Ago" calcext:value-type="string">
            <text:p>Ago</text:p>
          </table:table-cell>
          <table:table-cell table:formula="of:=YEAR([$dms.$J442])" office:value-type="float" office:value="2027" calcext:value-type="float">
            <text:p>2027</text:p>
          </table:table-cell>
          <table:table-cell table:formula="of:=COM.MICROSOFT.CONCAT([$dms.$L442];&quot; &quot;;[$dms.$M442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8" calcext:value-type="date">
            <text:p>28/8/2027</text:p>
          </table:table-cell>
          <table:table-cell table:formula="of:=MONTH([.J443])" office:value-type="float" office:value="8" calcext:value-type="float">
            <text:p>8</text:p>
          </table:table-cell>
          <table:table-cell table:formula="of:=COM.MICROSOFT.XLOOKUP([$dms.$K443];[.G:.G];[.H:.H])" office:value-type="string" office:string-value="Ago" calcext:value-type="string">
            <text:p>Ago</text:p>
          </table:table-cell>
          <table:table-cell table:formula="of:=YEAR([$dms.$J443])" office:value-type="float" office:value="2027" calcext:value-type="float">
            <text:p>2027</text:p>
          </table:table-cell>
          <table:table-cell table:formula="of:=COM.MICROSOFT.CONCAT([$dms.$L443];&quot; &quot;;[$dms.$M443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29" calcext:value-type="date">
            <text:p>29/8/2027</text:p>
          </table:table-cell>
          <table:table-cell table:formula="of:=MONTH([.J444])" office:value-type="float" office:value="8" calcext:value-type="float">
            <text:p>8</text:p>
          </table:table-cell>
          <table:table-cell table:formula="of:=COM.MICROSOFT.XLOOKUP([$dms.$K444];[.G:.G];[.H:.H])" office:value-type="string" office:string-value="Ago" calcext:value-type="string">
            <text:p>Ago</text:p>
          </table:table-cell>
          <table:table-cell table:formula="of:=YEAR([$dms.$J444])" office:value-type="float" office:value="2027" calcext:value-type="float">
            <text:p>2027</text:p>
          </table:table-cell>
          <table:table-cell table:formula="of:=COM.MICROSOFT.CONCAT([$dms.$L444];&quot; &quot;;[$dms.$M444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30" calcext:value-type="date">
            <text:p>30/8/2027</text:p>
          </table:table-cell>
          <table:table-cell table:formula="of:=MONTH([.J445])" office:value-type="float" office:value="8" calcext:value-type="float">
            <text:p>8</text:p>
          </table:table-cell>
          <table:table-cell table:formula="of:=COM.MICROSOFT.XLOOKUP([$dms.$K445];[.G:.G];[.H:.H])" office:value-type="string" office:string-value="Ago" calcext:value-type="string">
            <text:p>Ago</text:p>
          </table:table-cell>
          <table:table-cell table:formula="of:=YEAR([$dms.$J445])" office:value-type="float" office:value="2027" calcext:value-type="float">
            <text:p>2027</text:p>
          </table:table-cell>
          <table:table-cell table:formula="of:=COM.MICROSOFT.CONCAT([$dms.$L445];&quot; &quot;;[$dms.$M445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8-31" calcext:value-type="date">
            <text:p>31/8/2027</text:p>
          </table:table-cell>
          <table:table-cell table:formula="of:=MONTH([.J446])" office:value-type="float" office:value="8" calcext:value-type="float">
            <text:p>8</text:p>
          </table:table-cell>
          <table:table-cell table:formula="of:=COM.MICROSOFT.XLOOKUP([$dms.$K446];[.G:.G];[.H:.H])" office:value-type="string" office:string-value="Ago" calcext:value-type="string">
            <text:p>Ago</text:p>
          </table:table-cell>
          <table:table-cell table:formula="of:=YEAR([$dms.$J446])" office:value-type="float" office:value="2027" calcext:value-type="float">
            <text:p>2027</text:p>
          </table:table-cell>
          <table:table-cell table:formula="of:=COM.MICROSOFT.CONCAT([$dms.$L446];&quot; &quot;;[$dms.$M446])" office:value-type="string" office:string-value="Ago 2027" calcext:value-type="string">
            <text:p>Ago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01" calcext:value-type="date">
            <text:p>1/9/2027</text:p>
          </table:table-cell>
          <table:table-cell table:formula="of:=MONTH([.J447])" office:value-type="float" office:value="9" calcext:value-type="float">
            <text:p>9</text:p>
          </table:table-cell>
          <table:table-cell table:formula="of:=COM.MICROSOFT.XLOOKUP([$dms.$K447];[.G:.G];[.H:.H])" office:value-type="string" office:string-value="Set" calcext:value-type="string">
            <text:p>Set</text:p>
          </table:table-cell>
          <table:table-cell table:formula="of:=YEAR([$dms.$J447])" office:value-type="float" office:value="2027" calcext:value-type="float">
            <text:p>2027</text:p>
          </table:table-cell>
          <table:table-cell table:formula="of:=COM.MICROSOFT.CONCAT([$dms.$L447];&quot; &quot;;[$dms.$M447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02" calcext:value-type="date">
            <text:p>2/9/2027</text:p>
          </table:table-cell>
          <table:table-cell table:formula="of:=MONTH([.J448])" office:value-type="float" office:value="9" calcext:value-type="float">
            <text:p>9</text:p>
          </table:table-cell>
          <table:table-cell table:formula="of:=COM.MICROSOFT.XLOOKUP([$dms.$K448];[.G:.G];[.H:.H])" office:value-type="string" office:string-value="Set" calcext:value-type="string">
            <text:p>Set</text:p>
          </table:table-cell>
          <table:table-cell table:formula="of:=YEAR([$dms.$J448])" office:value-type="float" office:value="2027" calcext:value-type="float">
            <text:p>2027</text:p>
          </table:table-cell>
          <table:table-cell table:formula="of:=COM.MICROSOFT.CONCAT([$dms.$L448];&quot; &quot;;[$dms.$M448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03" calcext:value-type="date">
            <text:p>3/9/2027</text:p>
          </table:table-cell>
          <table:table-cell table:formula="of:=MONTH([.J449])" office:value-type="float" office:value="9" calcext:value-type="float">
            <text:p>9</text:p>
          </table:table-cell>
          <table:table-cell table:formula="of:=COM.MICROSOFT.XLOOKUP([$dms.$K449];[.G:.G];[.H:.H])" office:value-type="string" office:string-value="Set" calcext:value-type="string">
            <text:p>Set</text:p>
          </table:table-cell>
          <table:table-cell table:formula="of:=YEAR([$dms.$J449])" office:value-type="float" office:value="2027" calcext:value-type="float">
            <text:p>2027</text:p>
          </table:table-cell>
          <table:table-cell table:formula="of:=COM.MICROSOFT.CONCAT([$dms.$L449];&quot; &quot;;[$dms.$M449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04" calcext:value-type="date">
            <text:p>4/9/2027</text:p>
          </table:table-cell>
          <table:table-cell table:formula="of:=MONTH([.J450])" office:value-type="float" office:value="9" calcext:value-type="float">
            <text:p>9</text:p>
          </table:table-cell>
          <table:table-cell table:formula="of:=COM.MICROSOFT.XLOOKUP([$dms.$K450];[.G:.G];[.H:.H])" office:value-type="string" office:string-value="Set" calcext:value-type="string">
            <text:p>Set</text:p>
          </table:table-cell>
          <table:table-cell table:formula="of:=YEAR([$dms.$J450])" office:value-type="float" office:value="2027" calcext:value-type="float">
            <text:p>2027</text:p>
          </table:table-cell>
          <table:table-cell table:formula="of:=COM.MICROSOFT.CONCAT([$dms.$L450];&quot; &quot;;[$dms.$M450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05" calcext:value-type="date">
            <text:p>5/9/2027</text:p>
          </table:table-cell>
          <table:table-cell table:formula="of:=MONTH([.J451])" office:value-type="float" office:value="9" calcext:value-type="float">
            <text:p>9</text:p>
          </table:table-cell>
          <table:table-cell table:formula="of:=COM.MICROSOFT.XLOOKUP([$dms.$K451];[.G:.G];[.H:.H])" office:value-type="string" office:string-value="Set" calcext:value-type="string">
            <text:p>Set</text:p>
          </table:table-cell>
          <table:table-cell table:formula="of:=YEAR([$dms.$J451])" office:value-type="float" office:value="2027" calcext:value-type="float">
            <text:p>2027</text:p>
          </table:table-cell>
          <table:table-cell table:formula="of:=COM.MICROSOFT.CONCAT([$dms.$L451];&quot; &quot;;[$dms.$M451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06" calcext:value-type="date">
            <text:p>6/9/2027</text:p>
          </table:table-cell>
          <table:table-cell table:formula="of:=MONTH([.J452])" office:value-type="float" office:value="9" calcext:value-type="float">
            <text:p>9</text:p>
          </table:table-cell>
          <table:table-cell table:formula="of:=COM.MICROSOFT.XLOOKUP([$dms.$K452];[.G:.G];[.H:.H])" office:value-type="string" office:string-value="Set" calcext:value-type="string">
            <text:p>Set</text:p>
          </table:table-cell>
          <table:table-cell table:formula="of:=YEAR([$dms.$J452])" office:value-type="float" office:value="2027" calcext:value-type="float">
            <text:p>2027</text:p>
          </table:table-cell>
          <table:table-cell table:formula="of:=COM.MICROSOFT.CONCAT([$dms.$L452];&quot; &quot;;[$dms.$M452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07" calcext:value-type="date">
            <text:p>7/9/2027</text:p>
          </table:table-cell>
          <table:table-cell table:formula="of:=MONTH([.J453])" office:value-type="float" office:value="9" calcext:value-type="float">
            <text:p>9</text:p>
          </table:table-cell>
          <table:table-cell table:formula="of:=COM.MICROSOFT.XLOOKUP([$dms.$K453];[.G:.G];[.H:.H])" office:value-type="string" office:string-value="Set" calcext:value-type="string">
            <text:p>Set</text:p>
          </table:table-cell>
          <table:table-cell table:formula="of:=YEAR([$dms.$J453])" office:value-type="float" office:value="2027" calcext:value-type="float">
            <text:p>2027</text:p>
          </table:table-cell>
          <table:table-cell table:formula="of:=COM.MICROSOFT.CONCAT([$dms.$L453];&quot; &quot;;[$dms.$M453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08" calcext:value-type="date">
            <text:p>8/9/2027</text:p>
          </table:table-cell>
          <table:table-cell table:formula="of:=MONTH([.J454])" office:value-type="float" office:value="9" calcext:value-type="float">
            <text:p>9</text:p>
          </table:table-cell>
          <table:table-cell table:formula="of:=COM.MICROSOFT.XLOOKUP([$dms.$K454];[.G:.G];[.H:.H])" office:value-type="string" office:string-value="Set" calcext:value-type="string">
            <text:p>Set</text:p>
          </table:table-cell>
          <table:table-cell table:formula="of:=YEAR([$dms.$J454])" office:value-type="float" office:value="2027" calcext:value-type="float">
            <text:p>2027</text:p>
          </table:table-cell>
          <table:table-cell table:formula="of:=COM.MICROSOFT.CONCAT([$dms.$L454];&quot; &quot;;[$dms.$M454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09" calcext:value-type="date">
            <text:p>9/9/2027</text:p>
          </table:table-cell>
          <table:table-cell table:formula="of:=MONTH([.J455])" office:value-type="float" office:value="9" calcext:value-type="float">
            <text:p>9</text:p>
          </table:table-cell>
          <table:table-cell table:formula="of:=COM.MICROSOFT.XLOOKUP([$dms.$K455];[.G:.G];[.H:.H])" office:value-type="string" office:string-value="Set" calcext:value-type="string">
            <text:p>Set</text:p>
          </table:table-cell>
          <table:table-cell table:formula="of:=YEAR([$dms.$J455])" office:value-type="float" office:value="2027" calcext:value-type="float">
            <text:p>2027</text:p>
          </table:table-cell>
          <table:table-cell table:formula="of:=COM.MICROSOFT.CONCAT([$dms.$L455];&quot; &quot;;[$dms.$M455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0" calcext:value-type="date">
            <text:p>10/9/2027</text:p>
          </table:table-cell>
          <table:table-cell table:formula="of:=MONTH([.J456])" office:value-type="float" office:value="9" calcext:value-type="float">
            <text:p>9</text:p>
          </table:table-cell>
          <table:table-cell table:formula="of:=COM.MICROSOFT.XLOOKUP([$dms.$K456];[.G:.G];[.H:.H])" office:value-type="string" office:string-value="Set" calcext:value-type="string">
            <text:p>Set</text:p>
          </table:table-cell>
          <table:table-cell table:formula="of:=YEAR([$dms.$J456])" office:value-type="float" office:value="2027" calcext:value-type="float">
            <text:p>2027</text:p>
          </table:table-cell>
          <table:table-cell table:formula="of:=COM.MICROSOFT.CONCAT([$dms.$L456];&quot; &quot;;[$dms.$M456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1" calcext:value-type="date">
            <text:p>11/9/2027</text:p>
          </table:table-cell>
          <table:table-cell table:formula="of:=MONTH([.J457])" office:value-type="float" office:value="9" calcext:value-type="float">
            <text:p>9</text:p>
          </table:table-cell>
          <table:table-cell table:formula="of:=COM.MICROSOFT.XLOOKUP([$dms.$K457];[.G:.G];[.H:.H])" office:value-type="string" office:string-value="Set" calcext:value-type="string">
            <text:p>Set</text:p>
          </table:table-cell>
          <table:table-cell table:formula="of:=YEAR([$dms.$J457])" office:value-type="float" office:value="2027" calcext:value-type="float">
            <text:p>2027</text:p>
          </table:table-cell>
          <table:table-cell table:formula="of:=COM.MICROSOFT.CONCAT([$dms.$L457];&quot; &quot;;[$dms.$M457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2" calcext:value-type="date">
            <text:p>12/9/2027</text:p>
          </table:table-cell>
          <table:table-cell table:formula="of:=MONTH([.J458])" office:value-type="float" office:value="9" calcext:value-type="float">
            <text:p>9</text:p>
          </table:table-cell>
          <table:table-cell table:formula="of:=COM.MICROSOFT.XLOOKUP([$dms.$K458];[.G:.G];[.H:.H])" office:value-type="string" office:string-value="Set" calcext:value-type="string">
            <text:p>Set</text:p>
          </table:table-cell>
          <table:table-cell table:formula="of:=YEAR([$dms.$J458])" office:value-type="float" office:value="2027" calcext:value-type="float">
            <text:p>2027</text:p>
          </table:table-cell>
          <table:table-cell table:formula="of:=COM.MICROSOFT.CONCAT([$dms.$L458];&quot; &quot;;[$dms.$M458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3" calcext:value-type="date">
            <text:p>13/9/2027</text:p>
          </table:table-cell>
          <table:table-cell table:formula="of:=MONTH([.J459])" office:value-type="float" office:value="9" calcext:value-type="float">
            <text:p>9</text:p>
          </table:table-cell>
          <table:table-cell table:formula="of:=COM.MICROSOFT.XLOOKUP([$dms.$K459];[.G:.G];[.H:.H])" office:value-type="string" office:string-value="Set" calcext:value-type="string">
            <text:p>Set</text:p>
          </table:table-cell>
          <table:table-cell table:formula="of:=YEAR([$dms.$J459])" office:value-type="float" office:value="2027" calcext:value-type="float">
            <text:p>2027</text:p>
          </table:table-cell>
          <table:table-cell table:formula="of:=COM.MICROSOFT.CONCAT([$dms.$L459];&quot; &quot;;[$dms.$M459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4" calcext:value-type="date">
            <text:p>14/9/2027</text:p>
          </table:table-cell>
          <table:table-cell table:formula="of:=MONTH([.J460])" office:value-type="float" office:value="9" calcext:value-type="float">
            <text:p>9</text:p>
          </table:table-cell>
          <table:table-cell table:formula="of:=COM.MICROSOFT.XLOOKUP([$dms.$K460];[.G:.G];[.H:.H])" office:value-type="string" office:string-value="Set" calcext:value-type="string">
            <text:p>Set</text:p>
          </table:table-cell>
          <table:table-cell table:formula="of:=YEAR([$dms.$J460])" office:value-type="float" office:value="2027" calcext:value-type="float">
            <text:p>2027</text:p>
          </table:table-cell>
          <table:table-cell table:formula="of:=COM.MICROSOFT.CONCAT([$dms.$L460];&quot; &quot;;[$dms.$M460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5" calcext:value-type="date">
            <text:p>15/9/2027</text:p>
          </table:table-cell>
          <table:table-cell table:formula="of:=MONTH([.J461])" office:value-type="float" office:value="9" calcext:value-type="float">
            <text:p>9</text:p>
          </table:table-cell>
          <table:table-cell table:formula="of:=COM.MICROSOFT.XLOOKUP([$dms.$K461];[.G:.G];[.H:.H])" office:value-type="string" office:string-value="Set" calcext:value-type="string">
            <text:p>Set</text:p>
          </table:table-cell>
          <table:table-cell table:formula="of:=YEAR([$dms.$J461])" office:value-type="float" office:value="2027" calcext:value-type="float">
            <text:p>2027</text:p>
          </table:table-cell>
          <table:table-cell table:formula="of:=COM.MICROSOFT.CONCAT([$dms.$L461];&quot; &quot;;[$dms.$M461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6" calcext:value-type="date">
            <text:p>16/9/2027</text:p>
          </table:table-cell>
          <table:table-cell table:formula="of:=MONTH([.J462])" office:value-type="float" office:value="9" calcext:value-type="float">
            <text:p>9</text:p>
          </table:table-cell>
          <table:table-cell table:formula="of:=COM.MICROSOFT.XLOOKUP([$dms.$K462];[.G:.G];[.H:.H])" office:value-type="string" office:string-value="Set" calcext:value-type="string">
            <text:p>Set</text:p>
          </table:table-cell>
          <table:table-cell table:formula="of:=YEAR([$dms.$J462])" office:value-type="float" office:value="2027" calcext:value-type="float">
            <text:p>2027</text:p>
          </table:table-cell>
          <table:table-cell table:formula="of:=COM.MICROSOFT.CONCAT([$dms.$L462];&quot; &quot;;[$dms.$M462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7" calcext:value-type="date">
            <text:p>17/9/2027</text:p>
          </table:table-cell>
          <table:table-cell table:formula="of:=MONTH([.J463])" office:value-type="float" office:value="9" calcext:value-type="float">
            <text:p>9</text:p>
          </table:table-cell>
          <table:table-cell table:formula="of:=COM.MICROSOFT.XLOOKUP([$dms.$K463];[.G:.G];[.H:.H])" office:value-type="string" office:string-value="Set" calcext:value-type="string">
            <text:p>Set</text:p>
          </table:table-cell>
          <table:table-cell table:formula="of:=YEAR([$dms.$J463])" office:value-type="float" office:value="2027" calcext:value-type="float">
            <text:p>2027</text:p>
          </table:table-cell>
          <table:table-cell table:formula="of:=COM.MICROSOFT.CONCAT([$dms.$L463];&quot; &quot;;[$dms.$M463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8" calcext:value-type="date">
            <text:p>18/9/2027</text:p>
          </table:table-cell>
          <table:table-cell table:formula="of:=MONTH([.J464])" office:value-type="float" office:value="9" calcext:value-type="float">
            <text:p>9</text:p>
          </table:table-cell>
          <table:table-cell table:formula="of:=COM.MICROSOFT.XLOOKUP([$dms.$K464];[.G:.G];[.H:.H])" office:value-type="string" office:string-value="Set" calcext:value-type="string">
            <text:p>Set</text:p>
          </table:table-cell>
          <table:table-cell table:formula="of:=YEAR([$dms.$J464])" office:value-type="float" office:value="2027" calcext:value-type="float">
            <text:p>2027</text:p>
          </table:table-cell>
          <table:table-cell table:formula="of:=COM.MICROSOFT.CONCAT([$dms.$L464];&quot; &quot;;[$dms.$M464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19" calcext:value-type="date">
            <text:p>19/9/2027</text:p>
          </table:table-cell>
          <table:table-cell table:formula="of:=MONTH([.J465])" office:value-type="float" office:value="9" calcext:value-type="float">
            <text:p>9</text:p>
          </table:table-cell>
          <table:table-cell table:formula="of:=COM.MICROSOFT.XLOOKUP([$dms.$K465];[.G:.G];[.H:.H])" office:value-type="string" office:string-value="Set" calcext:value-type="string">
            <text:p>Set</text:p>
          </table:table-cell>
          <table:table-cell table:formula="of:=YEAR([$dms.$J465])" office:value-type="float" office:value="2027" calcext:value-type="float">
            <text:p>2027</text:p>
          </table:table-cell>
          <table:table-cell table:formula="of:=COM.MICROSOFT.CONCAT([$dms.$L465];&quot; &quot;;[$dms.$M465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0" calcext:value-type="date">
            <text:p>20/9/2027</text:p>
          </table:table-cell>
          <table:table-cell table:formula="of:=MONTH([.J466])" office:value-type="float" office:value="9" calcext:value-type="float">
            <text:p>9</text:p>
          </table:table-cell>
          <table:table-cell table:formula="of:=COM.MICROSOFT.XLOOKUP([$dms.$K466];[.G:.G];[.H:.H])" office:value-type="string" office:string-value="Set" calcext:value-type="string">
            <text:p>Set</text:p>
          </table:table-cell>
          <table:table-cell table:formula="of:=YEAR([$dms.$J466])" office:value-type="float" office:value="2027" calcext:value-type="float">
            <text:p>2027</text:p>
          </table:table-cell>
          <table:table-cell table:formula="of:=COM.MICROSOFT.CONCAT([$dms.$L466];&quot; &quot;;[$dms.$M466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1" calcext:value-type="date">
            <text:p>21/9/2027</text:p>
          </table:table-cell>
          <table:table-cell table:formula="of:=MONTH([.J467])" office:value-type="float" office:value="9" calcext:value-type="float">
            <text:p>9</text:p>
          </table:table-cell>
          <table:table-cell table:formula="of:=COM.MICROSOFT.XLOOKUP([$dms.$K467];[.G:.G];[.H:.H])" office:value-type="string" office:string-value="Set" calcext:value-type="string">
            <text:p>Set</text:p>
          </table:table-cell>
          <table:table-cell table:formula="of:=YEAR([$dms.$J467])" office:value-type="float" office:value="2027" calcext:value-type="float">
            <text:p>2027</text:p>
          </table:table-cell>
          <table:table-cell table:formula="of:=COM.MICROSOFT.CONCAT([$dms.$L467];&quot; &quot;;[$dms.$M467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2" calcext:value-type="date">
            <text:p>22/9/2027</text:p>
          </table:table-cell>
          <table:table-cell table:formula="of:=MONTH([.J468])" office:value-type="float" office:value="9" calcext:value-type="float">
            <text:p>9</text:p>
          </table:table-cell>
          <table:table-cell table:formula="of:=COM.MICROSOFT.XLOOKUP([$dms.$K468];[.G:.G];[.H:.H])" office:value-type="string" office:string-value="Set" calcext:value-type="string">
            <text:p>Set</text:p>
          </table:table-cell>
          <table:table-cell table:formula="of:=YEAR([$dms.$J468])" office:value-type="float" office:value="2027" calcext:value-type="float">
            <text:p>2027</text:p>
          </table:table-cell>
          <table:table-cell table:formula="of:=COM.MICROSOFT.CONCAT([$dms.$L468];&quot; &quot;;[$dms.$M468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3" calcext:value-type="date">
            <text:p>23/9/2027</text:p>
          </table:table-cell>
          <table:table-cell table:formula="of:=MONTH([.J469])" office:value-type="float" office:value="9" calcext:value-type="float">
            <text:p>9</text:p>
          </table:table-cell>
          <table:table-cell table:formula="of:=COM.MICROSOFT.XLOOKUP([$dms.$K469];[.G:.G];[.H:.H])" office:value-type="string" office:string-value="Set" calcext:value-type="string">
            <text:p>Set</text:p>
          </table:table-cell>
          <table:table-cell table:formula="of:=YEAR([$dms.$J469])" office:value-type="float" office:value="2027" calcext:value-type="float">
            <text:p>2027</text:p>
          </table:table-cell>
          <table:table-cell table:formula="of:=COM.MICROSOFT.CONCAT([$dms.$L469];&quot; &quot;;[$dms.$M469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4" calcext:value-type="date">
            <text:p>24/9/2027</text:p>
          </table:table-cell>
          <table:table-cell table:formula="of:=MONTH([.J470])" office:value-type="float" office:value="9" calcext:value-type="float">
            <text:p>9</text:p>
          </table:table-cell>
          <table:table-cell table:formula="of:=COM.MICROSOFT.XLOOKUP([$dms.$K470];[.G:.G];[.H:.H])" office:value-type="string" office:string-value="Set" calcext:value-type="string">
            <text:p>Set</text:p>
          </table:table-cell>
          <table:table-cell table:formula="of:=YEAR([$dms.$J470])" office:value-type="float" office:value="2027" calcext:value-type="float">
            <text:p>2027</text:p>
          </table:table-cell>
          <table:table-cell table:formula="of:=COM.MICROSOFT.CONCAT([$dms.$L470];&quot; &quot;;[$dms.$M470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5" calcext:value-type="date">
            <text:p>25/9/2027</text:p>
          </table:table-cell>
          <table:table-cell table:formula="of:=MONTH([.J471])" office:value-type="float" office:value="9" calcext:value-type="float">
            <text:p>9</text:p>
          </table:table-cell>
          <table:table-cell table:formula="of:=COM.MICROSOFT.XLOOKUP([$dms.$K471];[.G:.G];[.H:.H])" office:value-type="string" office:string-value="Set" calcext:value-type="string">
            <text:p>Set</text:p>
          </table:table-cell>
          <table:table-cell table:formula="of:=YEAR([$dms.$J471])" office:value-type="float" office:value="2027" calcext:value-type="float">
            <text:p>2027</text:p>
          </table:table-cell>
          <table:table-cell table:formula="of:=COM.MICROSOFT.CONCAT([$dms.$L471];&quot; &quot;;[$dms.$M471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6" calcext:value-type="date">
            <text:p>26/9/2027</text:p>
          </table:table-cell>
          <table:table-cell table:formula="of:=MONTH([.J472])" office:value-type="float" office:value="9" calcext:value-type="float">
            <text:p>9</text:p>
          </table:table-cell>
          <table:table-cell table:formula="of:=COM.MICROSOFT.XLOOKUP([$dms.$K472];[.G:.G];[.H:.H])" office:value-type="string" office:string-value="Set" calcext:value-type="string">
            <text:p>Set</text:p>
          </table:table-cell>
          <table:table-cell table:formula="of:=YEAR([$dms.$J472])" office:value-type="float" office:value="2027" calcext:value-type="float">
            <text:p>2027</text:p>
          </table:table-cell>
          <table:table-cell table:formula="of:=COM.MICROSOFT.CONCAT([$dms.$L472];&quot; &quot;;[$dms.$M472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7" calcext:value-type="date">
            <text:p>27/9/2027</text:p>
          </table:table-cell>
          <table:table-cell table:formula="of:=MONTH([.J473])" office:value-type="float" office:value="9" calcext:value-type="float">
            <text:p>9</text:p>
          </table:table-cell>
          <table:table-cell table:formula="of:=COM.MICROSOFT.XLOOKUP([$dms.$K473];[.G:.G];[.H:.H])" office:value-type="string" office:string-value="Set" calcext:value-type="string">
            <text:p>Set</text:p>
          </table:table-cell>
          <table:table-cell table:formula="of:=YEAR([$dms.$J473])" office:value-type="float" office:value="2027" calcext:value-type="float">
            <text:p>2027</text:p>
          </table:table-cell>
          <table:table-cell table:formula="of:=COM.MICROSOFT.CONCAT([$dms.$L473];&quot; &quot;;[$dms.$M473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8" calcext:value-type="date">
            <text:p>28/9/2027</text:p>
          </table:table-cell>
          <table:table-cell table:formula="of:=MONTH([.J474])" office:value-type="float" office:value="9" calcext:value-type="float">
            <text:p>9</text:p>
          </table:table-cell>
          <table:table-cell table:formula="of:=COM.MICROSOFT.XLOOKUP([$dms.$K474];[.G:.G];[.H:.H])" office:value-type="string" office:string-value="Set" calcext:value-type="string">
            <text:p>Set</text:p>
          </table:table-cell>
          <table:table-cell table:formula="of:=YEAR([$dms.$J474])" office:value-type="float" office:value="2027" calcext:value-type="float">
            <text:p>2027</text:p>
          </table:table-cell>
          <table:table-cell table:formula="of:=COM.MICROSOFT.CONCAT([$dms.$L474];&quot; &quot;;[$dms.$M474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29" calcext:value-type="date">
            <text:p>29/9/2027</text:p>
          </table:table-cell>
          <table:table-cell table:formula="of:=MONTH([.J475])" office:value-type="float" office:value="9" calcext:value-type="float">
            <text:p>9</text:p>
          </table:table-cell>
          <table:table-cell table:formula="of:=COM.MICROSOFT.XLOOKUP([$dms.$K475];[.G:.G];[.H:.H])" office:value-type="string" office:string-value="Set" calcext:value-type="string">
            <text:p>Set</text:p>
          </table:table-cell>
          <table:table-cell table:formula="of:=YEAR([$dms.$J475])" office:value-type="float" office:value="2027" calcext:value-type="float">
            <text:p>2027</text:p>
          </table:table-cell>
          <table:table-cell table:formula="of:=COM.MICROSOFT.CONCAT([$dms.$L475];&quot; &quot;;[$dms.$M475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09-30" calcext:value-type="date">
            <text:p>30/9/2027</text:p>
          </table:table-cell>
          <table:table-cell table:formula="of:=MONTH([.J476])" office:value-type="float" office:value="9" calcext:value-type="float">
            <text:p>9</text:p>
          </table:table-cell>
          <table:table-cell table:formula="of:=COM.MICROSOFT.XLOOKUP([$dms.$K476];[.G:.G];[.H:.H])" office:value-type="string" office:string-value="Set" calcext:value-type="string">
            <text:p>Set</text:p>
          </table:table-cell>
          <table:table-cell table:formula="of:=YEAR([$dms.$J476])" office:value-type="float" office:value="2027" calcext:value-type="float">
            <text:p>2027</text:p>
          </table:table-cell>
          <table:table-cell table:formula="of:=COM.MICROSOFT.CONCAT([$dms.$L476];&quot; &quot;;[$dms.$M476])" office:value-type="string" office:string-value="Set 2027" calcext:value-type="string">
            <text:p>Se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01" calcext:value-type="date">
            <text:p>1/10/2027</text:p>
          </table:table-cell>
          <table:table-cell table:formula="of:=MONTH([.J477])" office:value-type="float" office:value="10" calcext:value-type="float">
            <text:p>10</text:p>
          </table:table-cell>
          <table:table-cell table:formula="of:=COM.MICROSOFT.XLOOKUP([$dms.$K477];[.G:.G];[.H:.H])" office:value-type="string" office:string-value="Out" calcext:value-type="string">
            <text:p>Out</text:p>
          </table:table-cell>
          <table:table-cell table:formula="of:=YEAR([$dms.$J477])" office:value-type="float" office:value="2027" calcext:value-type="float">
            <text:p>2027</text:p>
          </table:table-cell>
          <table:table-cell table:formula="of:=COM.MICROSOFT.CONCAT([$dms.$L477];&quot; &quot;;[$dms.$M477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02" calcext:value-type="date">
            <text:p>2/10/2027</text:p>
          </table:table-cell>
          <table:table-cell table:formula="of:=MONTH([.J478])" office:value-type="float" office:value="10" calcext:value-type="float">
            <text:p>10</text:p>
          </table:table-cell>
          <table:table-cell table:formula="of:=COM.MICROSOFT.XLOOKUP([$dms.$K478];[.G:.G];[.H:.H])" office:value-type="string" office:string-value="Out" calcext:value-type="string">
            <text:p>Out</text:p>
          </table:table-cell>
          <table:table-cell table:formula="of:=YEAR([$dms.$J478])" office:value-type="float" office:value="2027" calcext:value-type="float">
            <text:p>2027</text:p>
          </table:table-cell>
          <table:table-cell table:formula="of:=COM.MICROSOFT.CONCAT([$dms.$L478];&quot; &quot;;[$dms.$M478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03" calcext:value-type="date">
            <text:p>3/10/2027</text:p>
          </table:table-cell>
          <table:table-cell table:formula="of:=MONTH([.J479])" office:value-type="float" office:value="10" calcext:value-type="float">
            <text:p>10</text:p>
          </table:table-cell>
          <table:table-cell table:formula="of:=COM.MICROSOFT.XLOOKUP([$dms.$K479];[.G:.G];[.H:.H])" office:value-type="string" office:string-value="Out" calcext:value-type="string">
            <text:p>Out</text:p>
          </table:table-cell>
          <table:table-cell table:formula="of:=YEAR([$dms.$J479])" office:value-type="float" office:value="2027" calcext:value-type="float">
            <text:p>2027</text:p>
          </table:table-cell>
          <table:table-cell table:formula="of:=COM.MICROSOFT.CONCAT([$dms.$L479];&quot; &quot;;[$dms.$M479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04" calcext:value-type="date">
            <text:p>4/10/2027</text:p>
          </table:table-cell>
          <table:table-cell table:formula="of:=MONTH([.J480])" office:value-type="float" office:value="10" calcext:value-type="float">
            <text:p>10</text:p>
          </table:table-cell>
          <table:table-cell table:formula="of:=COM.MICROSOFT.XLOOKUP([$dms.$K480];[.G:.G];[.H:.H])" office:value-type="string" office:string-value="Out" calcext:value-type="string">
            <text:p>Out</text:p>
          </table:table-cell>
          <table:table-cell table:formula="of:=YEAR([$dms.$J480])" office:value-type="float" office:value="2027" calcext:value-type="float">
            <text:p>2027</text:p>
          </table:table-cell>
          <table:table-cell table:formula="of:=COM.MICROSOFT.CONCAT([$dms.$L480];&quot; &quot;;[$dms.$M480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05" calcext:value-type="date">
            <text:p>5/10/2027</text:p>
          </table:table-cell>
          <table:table-cell table:formula="of:=MONTH([.J481])" office:value-type="float" office:value="10" calcext:value-type="float">
            <text:p>10</text:p>
          </table:table-cell>
          <table:table-cell table:formula="of:=COM.MICROSOFT.XLOOKUP([$dms.$K481];[.G:.G];[.H:.H])" office:value-type="string" office:string-value="Out" calcext:value-type="string">
            <text:p>Out</text:p>
          </table:table-cell>
          <table:table-cell table:formula="of:=YEAR([$dms.$J481])" office:value-type="float" office:value="2027" calcext:value-type="float">
            <text:p>2027</text:p>
          </table:table-cell>
          <table:table-cell table:formula="of:=COM.MICROSOFT.CONCAT([$dms.$L481];&quot; &quot;;[$dms.$M481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06" calcext:value-type="date">
            <text:p>6/10/2027</text:p>
          </table:table-cell>
          <table:table-cell table:formula="of:=MONTH([.J482])" office:value-type="float" office:value="10" calcext:value-type="float">
            <text:p>10</text:p>
          </table:table-cell>
          <table:table-cell table:formula="of:=COM.MICROSOFT.XLOOKUP([$dms.$K482];[.G:.G];[.H:.H])" office:value-type="string" office:string-value="Out" calcext:value-type="string">
            <text:p>Out</text:p>
          </table:table-cell>
          <table:table-cell table:formula="of:=YEAR([$dms.$J482])" office:value-type="float" office:value="2027" calcext:value-type="float">
            <text:p>2027</text:p>
          </table:table-cell>
          <table:table-cell table:formula="of:=COM.MICROSOFT.CONCAT([$dms.$L482];&quot; &quot;;[$dms.$M482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07" calcext:value-type="date">
            <text:p>7/10/2027</text:p>
          </table:table-cell>
          <table:table-cell table:formula="of:=MONTH([.J483])" office:value-type="float" office:value="10" calcext:value-type="float">
            <text:p>10</text:p>
          </table:table-cell>
          <table:table-cell table:formula="of:=COM.MICROSOFT.XLOOKUP([$dms.$K483];[.G:.G];[.H:.H])" office:value-type="string" office:string-value="Out" calcext:value-type="string">
            <text:p>Out</text:p>
          </table:table-cell>
          <table:table-cell table:formula="of:=YEAR([$dms.$J483])" office:value-type="float" office:value="2027" calcext:value-type="float">
            <text:p>2027</text:p>
          </table:table-cell>
          <table:table-cell table:formula="of:=COM.MICROSOFT.CONCAT([$dms.$L483];&quot; &quot;;[$dms.$M483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08" calcext:value-type="date">
            <text:p>8/10/2027</text:p>
          </table:table-cell>
          <table:table-cell table:formula="of:=MONTH([.J484])" office:value-type="float" office:value="10" calcext:value-type="float">
            <text:p>10</text:p>
          </table:table-cell>
          <table:table-cell table:formula="of:=COM.MICROSOFT.XLOOKUP([$dms.$K484];[.G:.G];[.H:.H])" office:value-type="string" office:string-value="Out" calcext:value-type="string">
            <text:p>Out</text:p>
          </table:table-cell>
          <table:table-cell table:formula="of:=YEAR([$dms.$J484])" office:value-type="float" office:value="2027" calcext:value-type="float">
            <text:p>2027</text:p>
          </table:table-cell>
          <table:table-cell table:formula="of:=COM.MICROSOFT.CONCAT([$dms.$L484];&quot; &quot;;[$dms.$M484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09" calcext:value-type="date">
            <text:p>9/10/2027</text:p>
          </table:table-cell>
          <table:table-cell table:formula="of:=MONTH([.J485])" office:value-type="float" office:value="10" calcext:value-type="float">
            <text:p>10</text:p>
          </table:table-cell>
          <table:table-cell table:formula="of:=COM.MICROSOFT.XLOOKUP([$dms.$K485];[.G:.G];[.H:.H])" office:value-type="string" office:string-value="Out" calcext:value-type="string">
            <text:p>Out</text:p>
          </table:table-cell>
          <table:table-cell table:formula="of:=YEAR([$dms.$J485])" office:value-type="float" office:value="2027" calcext:value-type="float">
            <text:p>2027</text:p>
          </table:table-cell>
          <table:table-cell table:formula="of:=COM.MICROSOFT.CONCAT([$dms.$L485];&quot; &quot;;[$dms.$M485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0" calcext:value-type="date">
            <text:p>10/10/2027</text:p>
          </table:table-cell>
          <table:table-cell table:formula="of:=MONTH([.J486])" office:value-type="float" office:value="10" calcext:value-type="float">
            <text:p>10</text:p>
          </table:table-cell>
          <table:table-cell table:formula="of:=COM.MICROSOFT.XLOOKUP([$dms.$K486];[.G:.G];[.H:.H])" office:value-type="string" office:string-value="Out" calcext:value-type="string">
            <text:p>Out</text:p>
          </table:table-cell>
          <table:table-cell table:formula="of:=YEAR([$dms.$J486])" office:value-type="float" office:value="2027" calcext:value-type="float">
            <text:p>2027</text:p>
          </table:table-cell>
          <table:table-cell table:formula="of:=COM.MICROSOFT.CONCAT([$dms.$L486];&quot; &quot;;[$dms.$M486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1" calcext:value-type="date">
            <text:p>11/10/2027</text:p>
          </table:table-cell>
          <table:table-cell table:formula="of:=MONTH([.J487])" office:value-type="float" office:value="10" calcext:value-type="float">
            <text:p>10</text:p>
          </table:table-cell>
          <table:table-cell table:formula="of:=COM.MICROSOFT.XLOOKUP([$dms.$K487];[.G:.G];[.H:.H])" office:value-type="string" office:string-value="Out" calcext:value-type="string">
            <text:p>Out</text:p>
          </table:table-cell>
          <table:table-cell table:formula="of:=YEAR([$dms.$J487])" office:value-type="float" office:value="2027" calcext:value-type="float">
            <text:p>2027</text:p>
          </table:table-cell>
          <table:table-cell table:formula="of:=COM.MICROSOFT.CONCAT([$dms.$L487];&quot; &quot;;[$dms.$M487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2" calcext:value-type="date">
            <text:p>12/10/2027</text:p>
          </table:table-cell>
          <table:table-cell table:formula="of:=MONTH([.J488])" office:value-type="float" office:value="10" calcext:value-type="float">
            <text:p>10</text:p>
          </table:table-cell>
          <table:table-cell table:formula="of:=COM.MICROSOFT.XLOOKUP([$dms.$K488];[.G:.G];[.H:.H])" office:value-type="string" office:string-value="Out" calcext:value-type="string">
            <text:p>Out</text:p>
          </table:table-cell>
          <table:table-cell table:formula="of:=YEAR([$dms.$J488])" office:value-type="float" office:value="2027" calcext:value-type="float">
            <text:p>2027</text:p>
          </table:table-cell>
          <table:table-cell table:formula="of:=COM.MICROSOFT.CONCAT([$dms.$L488];&quot; &quot;;[$dms.$M488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3" calcext:value-type="date">
            <text:p>13/10/2027</text:p>
          </table:table-cell>
          <table:table-cell table:formula="of:=MONTH([.J489])" office:value-type="float" office:value="10" calcext:value-type="float">
            <text:p>10</text:p>
          </table:table-cell>
          <table:table-cell table:formula="of:=COM.MICROSOFT.XLOOKUP([$dms.$K489];[.G:.G];[.H:.H])" office:value-type="string" office:string-value="Out" calcext:value-type="string">
            <text:p>Out</text:p>
          </table:table-cell>
          <table:table-cell table:formula="of:=YEAR([$dms.$J489])" office:value-type="float" office:value="2027" calcext:value-type="float">
            <text:p>2027</text:p>
          </table:table-cell>
          <table:table-cell table:formula="of:=COM.MICROSOFT.CONCAT([$dms.$L489];&quot; &quot;;[$dms.$M489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4" calcext:value-type="date">
            <text:p>14/10/2027</text:p>
          </table:table-cell>
          <table:table-cell table:formula="of:=MONTH([.J490])" office:value-type="float" office:value="10" calcext:value-type="float">
            <text:p>10</text:p>
          </table:table-cell>
          <table:table-cell table:formula="of:=COM.MICROSOFT.XLOOKUP([$dms.$K490];[.G:.G];[.H:.H])" office:value-type="string" office:string-value="Out" calcext:value-type="string">
            <text:p>Out</text:p>
          </table:table-cell>
          <table:table-cell table:formula="of:=YEAR([$dms.$J490])" office:value-type="float" office:value="2027" calcext:value-type="float">
            <text:p>2027</text:p>
          </table:table-cell>
          <table:table-cell table:formula="of:=COM.MICROSOFT.CONCAT([$dms.$L490];&quot; &quot;;[$dms.$M490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5" calcext:value-type="date">
            <text:p>15/10/2027</text:p>
          </table:table-cell>
          <table:table-cell table:formula="of:=MONTH([.J491])" office:value-type="float" office:value="10" calcext:value-type="float">
            <text:p>10</text:p>
          </table:table-cell>
          <table:table-cell table:formula="of:=COM.MICROSOFT.XLOOKUP([$dms.$K491];[.G:.G];[.H:.H])" office:value-type="string" office:string-value="Out" calcext:value-type="string">
            <text:p>Out</text:p>
          </table:table-cell>
          <table:table-cell table:formula="of:=YEAR([$dms.$J491])" office:value-type="float" office:value="2027" calcext:value-type="float">
            <text:p>2027</text:p>
          </table:table-cell>
          <table:table-cell table:formula="of:=COM.MICROSOFT.CONCAT([$dms.$L491];&quot; &quot;;[$dms.$M491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6" calcext:value-type="date">
            <text:p>16/10/2027</text:p>
          </table:table-cell>
          <table:table-cell table:formula="of:=MONTH([.J492])" office:value-type="float" office:value="10" calcext:value-type="float">
            <text:p>10</text:p>
          </table:table-cell>
          <table:table-cell table:formula="of:=COM.MICROSOFT.XLOOKUP([$dms.$K492];[.G:.G];[.H:.H])" office:value-type="string" office:string-value="Out" calcext:value-type="string">
            <text:p>Out</text:p>
          </table:table-cell>
          <table:table-cell table:formula="of:=YEAR([$dms.$J492])" office:value-type="float" office:value="2027" calcext:value-type="float">
            <text:p>2027</text:p>
          </table:table-cell>
          <table:table-cell table:formula="of:=COM.MICROSOFT.CONCAT([$dms.$L492];&quot; &quot;;[$dms.$M492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7" calcext:value-type="date">
            <text:p>17/10/2027</text:p>
          </table:table-cell>
          <table:table-cell table:formula="of:=MONTH([.J493])" office:value-type="float" office:value="10" calcext:value-type="float">
            <text:p>10</text:p>
          </table:table-cell>
          <table:table-cell table:formula="of:=COM.MICROSOFT.XLOOKUP([$dms.$K493];[.G:.G];[.H:.H])" office:value-type="string" office:string-value="Out" calcext:value-type="string">
            <text:p>Out</text:p>
          </table:table-cell>
          <table:table-cell table:formula="of:=YEAR([$dms.$J493])" office:value-type="float" office:value="2027" calcext:value-type="float">
            <text:p>2027</text:p>
          </table:table-cell>
          <table:table-cell table:formula="of:=COM.MICROSOFT.CONCAT([$dms.$L493];&quot; &quot;;[$dms.$M493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8" calcext:value-type="date">
            <text:p>18/10/2027</text:p>
          </table:table-cell>
          <table:table-cell table:formula="of:=MONTH([.J494])" office:value-type="float" office:value="10" calcext:value-type="float">
            <text:p>10</text:p>
          </table:table-cell>
          <table:table-cell table:formula="of:=COM.MICROSOFT.XLOOKUP([$dms.$K494];[.G:.G];[.H:.H])" office:value-type="string" office:string-value="Out" calcext:value-type="string">
            <text:p>Out</text:p>
          </table:table-cell>
          <table:table-cell table:formula="of:=YEAR([$dms.$J494])" office:value-type="float" office:value="2027" calcext:value-type="float">
            <text:p>2027</text:p>
          </table:table-cell>
          <table:table-cell table:formula="of:=COM.MICROSOFT.CONCAT([$dms.$L494];&quot; &quot;;[$dms.$M494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19" calcext:value-type="date">
            <text:p>19/10/2027</text:p>
          </table:table-cell>
          <table:table-cell table:formula="of:=MONTH([.J495])" office:value-type="float" office:value="10" calcext:value-type="float">
            <text:p>10</text:p>
          </table:table-cell>
          <table:table-cell table:formula="of:=COM.MICROSOFT.XLOOKUP([$dms.$K495];[.G:.G];[.H:.H])" office:value-type="string" office:string-value="Out" calcext:value-type="string">
            <text:p>Out</text:p>
          </table:table-cell>
          <table:table-cell table:formula="of:=YEAR([$dms.$J495])" office:value-type="float" office:value="2027" calcext:value-type="float">
            <text:p>2027</text:p>
          </table:table-cell>
          <table:table-cell table:formula="of:=COM.MICROSOFT.CONCAT([$dms.$L495];&quot; &quot;;[$dms.$M495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0" calcext:value-type="date">
            <text:p>20/10/2027</text:p>
          </table:table-cell>
          <table:table-cell table:formula="of:=MONTH([.J496])" office:value-type="float" office:value="10" calcext:value-type="float">
            <text:p>10</text:p>
          </table:table-cell>
          <table:table-cell table:formula="of:=COM.MICROSOFT.XLOOKUP([$dms.$K496];[.G:.G];[.H:.H])" office:value-type="string" office:string-value="Out" calcext:value-type="string">
            <text:p>Out</text:p>
          </table:table-cell>
          <table:table-cell table:formula="of:=YEAR([$dms.$J496])" office:value-type="float" office:value="2027" calcext:value-type="float">
            <text:p>2027</text:p>
          </table:table-cell>
          <table:table-cell table:formula="of:=COM.MICROSOFT.CONCAT([$dms.$L496];&quot; &quot;;[$dms.$M496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1" calcext:value-type="date">
            <text:p>21/10/2027</text:p>
          </table:table-cell>
          <table:table-cell table:formula="of:=MONTH([.J497])" office:value-type="float" office:value="10" calcext:value-type="float">
            <text:p>10</text:p>
          </table:table-cell>
          <table:table-cell table:formula="of:=COM.MICROSOFT.XLOOKUP([$dms.$K497];[.G:.G];[.H:.H])" office:value-type="string" office:string-value="Out" calcext:value-type="string">
            <text:p>Out</text:p>
          </table:table-cell>
          <table:table-cell table:formula="of:=YEAR([$dms.$J497])" office:value-type="float" office:value="2027" calcext:value-type="float">
            <text:p>2027</text:p>
          </table:table-cell>
          <table:table-cell table:formula="of:=COM.MICROSOFT.CONCAT([$dms.$L497];&quot; &quot;;[$dms.$M497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2" calcext:value-type="date">
            <text:p>22/10/2027</text:p>
          </table:table-cell>
          <table:table-cell table:formula="of:=MONTH([.J498])" office:value-type="float" office:value="10" calcext:value-type="float">
            <text:p>10</text:p>
          </table:table-cell>
          <table:table-cell table:formula="of:=COM.MICROSOFT.XLOOKUP([$dms.$K498];[.G:.G];[.H:.H])" office:value-type="string" office:string-value="Out" calcext:value-type="string">
            <text:p>Out</text:p>
          </table:table-cell>
          <table:table-cell table:formula="of:=YEAR([$dms.$J498])" office:value-type="float" office:value="2027" calcext:value-type="float">
            <text:p>2027</text:p>
          </table:table-cell>
          <table:table-cell table:formula="of:=COM.MICROSOFT.CONCAT([$dms.$L498];&quot; &quot;;[$dms.$M498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3" calcext:value-type="date">
            <text:p>23/10/2027</text:p>
          </table:table-cell>
          <table:table-cell table:formula="of:=MONTH([.J499])" office:value-type="float" office:value="10" calcext:value-type="float">
            <text:p>10</text:p>
          </table:table-cell>
          <table:table-cell table:formula="of:=COM.MICROSOFT.XLOOKUP([$dms.$K499];[.G:.G];[.H:.H])" office:value-type="string" office:string-value="Out" calcext:value-type="string">
            <text:p>Out</text:p>
          </table:table-cell>
          <table:table-cell table:formula="of:=YEAR([$dms.$J499])" office:value-type="float" office:value="2027" calcext:value-type="float">
            <text:p>2027</text:p>
          </table:table-cell>
          <table:table-cell table:formula="of:=COM.MICROSOFT.CONCAT([$dms.$L499];&quot; &quot;;[$dms.$M499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4" calcext:value-type="date">
            <text:p>24/10/2027</text:p>
          </table:table-cell>
          <table:table-cell table:formula="of:=MONTH([.J500])" office:value-type="float" office:value="10" calcext:value-type="float">
            <text:p>10</text:p>
          </table:table-cell>
          <table:table-cell table:formula="of:=COM.MICROSOFT.XLOOKUP([$dms.$K500];[.G:.G];[.H:.H])" office:value-type="string" office:string-value="Out" calcext:value-type="string">
            <text:p>Out</text:p>
          </table:table-cell>
          <table:table-cell table:formula="of:=YEAR([$dms.$J500])" office:value-type="float" office:value="2027" calcext:value-type="float">
            <text:p>2027</text:p>
          </table:table-cell>
          <table:table-cell table:formula="of:=COM.MICROSOFT.CONCAT([$dms.$L500];&quot; &quot;;[$dms.$M500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5" calcext:value-type="date">
            <text:p>25/10/2027</text:p>
          </table:table-cell>
          <table:table-cell table:formula="of:=MONTH([.J501])" office:value-type="float" office:value="10" calcext:value-type="float">
            <text:p>10</text:p>
          </table:table-cell>
          <table:table-cell table:formula="of:=COM.MICROSOFT.XLOOKUP([$dms.$K501];[.G:.G];[.H:.H])" office:value-type="string" office:string-value="Out" calcext:value-type="string">
            <text:p>Out</text:p>
          </table:table-cell>
          <table:table-cell table:formula="of:=YEAR([$dms.$J501])" office:value-type="float" office:value="2027" calcext:value-type="float">
            <text:p>2027</text:p>
          </table:table-cell>
          <table:table-cell table:formula="of:=COM.MICROSOFT.CONCAT([$dms.$L501];&quot; &quot;;[$dms.$M501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6" calcext:value-type="date">
            <text:p>26/10/2027</text:p>
          </table:table-cell>
          <table:table-cell table:formula="of:=MONTH([.J502])" office:value-type="float" office:value="10" calcext:value-type="float">
            <text:p>10</text:p>
          </table:table-cell>
          <table:table-cell table:formula="of:=COM.MICROSOFT.XLOOKUP([$dms.$K502];[.G:.G];[.H:.H])" office:value-type="string" office:string-value="Out" calcext:value-type="string">
            <text:p>Out</text:p>
          </table:table-cell>
          <table:table-cell table:formula="of:=YEAR([$dms.$J502])" office:value-type="float" office:value="2027" calcext:value-type="float">
            <text:p>2027</text:p>
          </table:table-cell>
          <table:table-cell table:formula="of:=COM.MICROSOFT.CONCAT([$dms.$L502];&quot; &quot;;[$dms.$M502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7" calcext:value-type="date">
            <text:p>27/10/2027</text:p>
          </table:table-cell>
          <table:table-cell table:formula="of:=MONTH([.J503])" office:value-type="float" office:value="10" calcext:value-type="float">
            <text:p>10</text:p>
          </table:table-cell>
          <table:table-cell table:formula="of:=COM.MICROSOFT.XLOOKUP([$dms.$K503];[.G:.G];[.H:.H])" office:value-type="string" office:string-value="Out" calcext:value-type="string">
            <text:p>Out</text:p>
          </table:table-cell>
          <table:table-cell table:formula="of:=YEAR([$dms.$J503])" office:value-type="float" office:value="2027" calcext:value-type="float">
            <text:p>2027</text:p>
          </table:table-cell>
          <table:table-cell table:formula="of:=COM.MICROSOFT.CONCAT([$dms.$L503];&quot; &quot;;[$dms.$M503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8" calcext:value-type="date">
            <text:p>28/10/2027</text:p>
          </table:table-cell>
          <table:table-cell table:formula="of:=MONTH([.J504])" office:value-type="float" office:value="10" calcext:value-type="float">
            <text:p>10</text:p>
          </table:table-cell>
          <table:table-cell table:formula="of:=COM.MICROSOFT.XLOOKUP([$dms.$K504];[.G:.G];[.H:.H])" office:value-type="string" office:string-value="Out" calcext:value-type="string">
            <text:p>Out</text:p>
          </table:table-cell>
          <table:table-cell table:formula="of:=YEAR([$dms.$J504])" office:value-type="float" office:value="2027" calcext:value-type="float">
            <text:p>2027</text:p>
          </table:table-cell>
          <table:table-cell table:formula="of:=COM.MICROSOFT.CONCAT([$dms.$L504];&quot; &quot;;[$dms.$M504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29" calcext:value-type="date">
            <text:p>29/10/2027</text:p>
          </table:table-cell>
          <table:table-cell table:formula="of:=MONTH([.J505])" office:value-type="float" office:value="10" calcext:value-type="float">
            <text:p>10</text:p>
          </table:table-cell>
          <table:table-cell table:formula="of:=COM.MICROSOFT.XLOOKUP([$dms.$K505];[.G:.G];[.H:.H])" office:value-type="string" office:string-value="Out" calcext:value-type="string">
            <text:p>Out</text:p>
          </table:table-cell>
          <table:table-cell table:formula="of:=YEAR([$dms.$J505])" office:value-type="float" office:value="2027" calcext:value-type="float">
            <text:p>2027</text:p>
          </table:table-cell>
          <table:table-cell table:formula="of:=COM.MICROSOFT.CONCAT([$dms.$L505];&quot; &quot;;[$dms.$M505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30" calcext:value-type="date">
            <text:p>30/10/2027</text:p>
          </table:table-cell>
          <table:table-cell table:formula="of:=MONTH([.J506])" office:value-type="float" office:value="10" calcext:value-type="float">
            <text:p>10</text:p>
          </table:table-cell>
          <table:table-cell table:formula="of:=COM.MICROSOFT.XLOOKUP([$dms.$K506];[.G:.G];[.H:.H])" office:value-type="string" office:string-value="Out" calcext:value-type="string">
            <text:p>Out</text:p>
          </table:table-cell>
          <table:table-cell table:formula="of:=YEAR([$dms.$J506])" office:value-type="float" office:value="2027" calcext:value-type="float">
            <text:p>2027</text:p>
          </table:table-cell>
          <table:table-cell table:formula="of:=COM.MICROSOFT.CONCAT([$dms.$L506];&quot; &quot;;[$dms.$M506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0-31" calcext:value-type="date">
            <text:p>31/10/2027</text:p>
          </table:table-cell>
          <table:table-cell table:formula="of:=MONTH([.J507])" office:value-type="float" office:value="10" calcext:value-type="float">
            <text:p>10</text:p>
          </table:table-cell>
          <table:table-cell table:formula="of:=COM.MICROSOFT.XLOOKUP([$dms.$K507];[.G:.G];[.H:.H])" office:value-type="string" office:string-value="Out" calcext:value-type="string">
            <text:p>Out</text:p>
          </table:table-cell>
          <table:table-cell table:formula="of:=YEAR([$dms.$J507])" office:value-type="float" office:value="2027" calcext:value-type="float">
            <text:p>2027</text:p>
          </table:table-cell>
          <table:table-cell table:formula="of:=COM.MICROSOFT.CONCAT([$dms.$L507];&quot; &quot;;[$dms.$M507])" office:value-type="string" office:string-value="Out 2027" calcext:value-type="string">
            <text:p>Out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01" calcext:value-type="date">
            <text:p>1/11/2027</text:p>
          </table:table-cell>
          <table:table-cell table:formula="of:=MONTH([.J508])" office:value-type="float" office:value="11" calcext:value-type="float">
            <text:p>11</text:p>
          </table:table-cell>
          <table:table-cell table:formula="of:=COM.MICROSOFT.XLOOKUP([$dms.$K508];[.G:.G];[.H:.H])" office:value-type="string" office:string-value="Nov" calcext:value-type="string">
            <text:p>Nov</text:p>
          </table:table-cell>
          <table:table-cell table:formula="of:=YEAR([$dms.$J508])" office:value-type="float" office:value="2027" calcext:value-type="float">
            <text:p>2027</text:p>
          </table:table-cell>
          <table:table-cell table:formula="of:=COM.MICROSOFT.CONCAT([$dms.$L508];&quot; &quot;;[$dms.$M508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02" calcext:value-type="date">
            <text:p>2/11/2027</text:p>
          </table:table-cell>
          <table:table-cell table:formula="of:=MONTH([.J509])" office:value-type="float" office:value="11" calcext:value-type="float">
            <text:p>11</text:p>
          </table:table-cell>
          <table:table-cell table:formula="of:=COM.MICROSOFT.XLOOKUP([$dms.$K509];[.G:.G];[.H:.H])" office:value-type="string" office:string-value="Nov" calcext:value-type="string">
            <text:p>Nov</text:p>
          </table:table-cell>
          <table:table-cell table:formula="of:=YEAR([$dms.$J509])" office:value-type="float" office:value="2027" calcext:value-type="float">
            <text:p>2027</text:p>
          </table:table-cell>
          <table:table-cell table:formula="of:=COM.MICROSOFT.CONCAT([$dms.$L509];&quot; &quot;;[$dms.$M509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03" calcext:value-type="date">
            <text:p>3/11/2027</text:p>
          </table:table-cell>
          <table:table-cell table:formula="of:=MONTH([.J510])" office:value-type="float" office:value="11" calcext:value-type="float">
            <text:p>11</text:p>
          </table:table-cell>
          <table:table-cell table:formula="of:=COM.MICROSOFT.XLOOKUP([$dms.$K510];[.G:.G];[.H:.H])" office:value-type="string" office:string-value="Nov" calcext:value-type="string">
            <text:p>Nov</text:p>
          </table:table-cell>
          <table:table-cell table:formula="of:=YEAR([$dms.$J510])" office:value-type="float" office:value="2027" calcext:value-type="float">
            <text:p>2027</text:p>
          </table:table-cell>
          <table:table-cell table:formula="of:=COM.MICROSOFT.CONCAT([$dms.$L510];&quot; &quot;;[$dms.$M510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04" calcext:value-type="date">
            <text:p>4/11/2027</text:p>
          </table:table-cell>
          <table:table-cell table:formula="of:=MONTH([.J511])" office:value-type="float" office:value="11" calcext:value-type="float">
            <text:p>11</text:p>
          </table:table-cell>
          <table:table-cell table:formula="of:=COM.MICROSOFT.XLOOKUP([$dms.$K511];[.G:.G];[.H:.H])" office:value-type="string" office:string-value="Nov" calcext:value-type="string">
            <text:p>Nov</text:p>
          </table:table-cell>
          <table:table-cell table:formula="of:=YEAR([$dms.$J511])" office:value-type="float" office:value="2027" calcext:value-type="float">
            <text:p>2027</text:p>
          </table:table-cell>
          <table:table-cell table:formula="of:=COM.MICROSOFT.CONCAT([$dms.$L511];&quot; &quot;;[$dms.$M511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05" calcext:value-type="date">
            <text:p>5/11/2027</text:p>
          </table:table-cell>
          <table:table-cell table:formula="of:=MONTH([.J512])" office:value-type="float" office:value="11" calcext:value-type="float">
            <text:p>11</text:p>
          </table:table-cell>
          <table:table-cell table:formula="of:=COM.MICROSOFT.XLOOKUP([$dms.$K512];[.G:.G];[.H:.H])" office:value-type="string" office:string-value="Nov" calcext:value-type="string">
            <text:p>Nov</text:p>
          </table:table-cell>
          <table:table-cell table:formula="of:=YEAR([$dms.$J512])" office:value-type="float" office:value="2027" calcext:value-type="float">
            <text:p>2027</text:p>
          </table:table-cell>
          <table:table-cell table:formula="of:=COM.MICROSOFT.CONCAT([$dms.$L512];&quot; &quot;;[$dms.$M512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06" calcext:value-type="date">
            <text:p>6/11/2027</text:p>
          </table:table-cell>
          <table:table-cell table:formula="of:=MONTH([.J513])" office:value-type="float" office:value="11" calcext:value-type="float">
            <text:p>11</text:p>
          </table:table-cell>
          <table:table-cell table:formula="of:=COM.MICROSOFT.XLOOKUP([$dms.$K513];[.G:.G];[.H:.H])" office:value-type="string" office:string-value="Nov" calcext:value-type="string">
            <text:p>Nov</text:p>
          </table:table-cell>
          <table:table-cell table:formula="of:=YEAR([$dms.$J513])" office:value-type="float" office:value="2027" calcext:value-type="float">
            <text:p>2027</text:p>
          </table:table-cell>
          <table:table-cell table:formula="of:=COM.MICROSOFT.CONCAT([$dms.$L513];&quot; &quot;;[$dms.$M513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07" calcext:value-type="date">
            <text:p>7/11/2027</text:p>
          </table:table-cell>
          <table:table-cell table:formula="of:=MONTH([.J514])" office:value-type="float" office:value="11" calcext:value-type="float">
            <text:p>11</text:p>
          </table:table-cell>
          <table:table-cell table:formula="of:=COM.MICROSOFT.XLOOKUP([$dms.$K514];[.G:.G];[.H:.H])" office:value-type="string" office:string-value="Nov" calcext:value-type="string">
            <text:p>Nov</text:p>
          </table:table-cell>
          <table:table-cell table:formula="of:=YEAR([$dms.$J514])" office:value-type="float" office:value="2027" calcext:value-type="float">
            <text:p>2027</text:p>
          </table:table-cell>
          <table:table-cell table:formula="of:=COM.MICROSOFT.CONCAT([$dms.$L514];&quot; &quot;;[$dms.$M514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08" calcext:value-type="date">
            <text:p>8/11/2027</text:p>
          </table:table-cell>
          <table:table-cell table:formula="of:=MONTH([.J515])" office:value-type="float" office:value="11" calcext:value-type="float">
            <text:p>11</text:p>
          </table:table-cell>
          <table:table-cell table:formula="of:=COM.MICROSOFT.XLOOKUP([$dms.$K515];[.G:.G];[.H:.H])" office:value-type="string" office:string-value="Nov" calcext:value-type="string">
            <text:p>Nov</text:p>
          </table:table-cell>
          <table:table-cell table:formula="of:=YEAR([$dms.$J515])" office:value-type="float" office:value="2027" calcext:value-type="float">
            <text:p>2027</text:p>
          </table:table-cell>
          <table:table-cell table:formula="of:=COM.MICROSOFT.CONCAT([$dms.$L515];&quot; &quot;;[$dms.$M515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09" calcext:value-type="date">
            <text:p>9/11/2027</text:p>
          </table:table-cell>
          <table:table-cell table:formula="of:=MONTH([.J516])" office:value-type="float" office:value="11" calcext:value-type="float">
            <text:p>11</text:p>
          </table:table-cell>
          <table:table-cell table:formula="of:=COM.MICROSOFT.XLOOKUP([$dms.$K516];[.G:.G];[.H:.H])" office:value-type="string" office:string-value="Nov" calcext:value-type="string">
            <text:p>Nov</text:p>
          </table:table-cell>
          <table:table-cell table:formula="of:=YEAR([$dms.$J516])" office:value-type="float" office:value="2027" calcext:value-type="float">
            <text:p>2027</text:p>
          </table:table-cell>
          <table:table-cell table:formula="of:=COM.MICROSOFT.CONCAT([$dms.$L516];&quot; &quot;;[$dms.$M516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0" calcext:value-type="date">
            <text:p>10/11/2027</text:p>
          </table:table-cell>
          <table:table-cell table:formula="of:=MONTH([.J517])" office:value-type="float" office:value="11" calcext:value-type="float">
            <text:p>11</text:p>
          </table:table-cell>
          <table:table-cell table:formula="of:=COM.MICROSOFT.XLOOKUP([$dms.$K517];[.G:.G];[.H:.H])" office:value-type="string" office:string-value="Nov" calcext:value-type="string">
            <text:p>Nov</text:p>
          </table:table-cell>
          <table:table-cell table:formula="of:=YEAR([$dms.$J517])" office:value-type="float" office:value="2027" calcext:value-type="float">
            <text:p>2027</text:p>
          </table:table-cell>
          <table:table-cell table:formula="of:=COM.MICROSOFT.CONCAT([$dms.$L517];&quot; &quot;;[$dms.$M517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1" calcext:value-type="date">
            <text:p>11/11/2027</text:p>
          </table:table-cell>
          <table:table-cell table:formula="of:=MONTH([.J518])" office:value-type="float" office:value="11" calcext:value-type="float">
            <text:p>11</text:p>
          </table:table-cell>
          <table:table-cell table:formula="of:=COM.MICROSOFT.XLOOKUP([$dms.$K518];[.G:.G];[.H:.H])" office:value-type="string" office:string-value="Nov" calcext:value-type="string">
            <text:p>Nov</text:p>
          </table:table-cell>
          <table:table-cell table:formula="of:=YEAR([$dms.$J518])" office:value-type="float" office:value="2027" calcext:value-type="float">
            <text:p>2027</text:p>
          </table:table-cell>
          <table:table-cell table:formula="of:=COM.MICROSOFT.CONCAT([$dms.$L518];&quot; &quot;;[$dms.$M518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2" calcext:value-type="date">
            <text:p>12/11/2027</text:p>
          </table:table-cell>
          <table:table-cell table:formula="of:=MONTH([.J519])" office:value-type="float" office:value="11" calcext:value-type="float">
            <text:p>11</text:p>
          </table:table-cell>
          <table:table-cell table:formula="of:=COM.MICROSOFT.XLOOKUP([$dms.$K519];[.G:.G];[.H:.H])" office:value-type="string" office:string-value="Nov" calcext:value-type="string">
            <text:p>Nov</text:p>
          </table:table-cell>
          <table:table-cell table:formula="of:=YEAR([$dms.$J519])" office:value-type="float" office:value="2027" calcext:value-type="float">
            <text:p>2027</text:p>
          </table:table-cell>
          <table:table-cell table:formula="of:=COM.MICROSOFT.CONCAT([$dms.$L519];&quot; &quot;;[$dms.$M519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3" calcext:value-type="date">
            <text:p>13/11/2027</text:p>
          </table:table-cell>
          <table:table-cell table:formula="of:=MONTH([.J520])" office:value-type="float" office:value="11" calcext:value-type="float">
            <text:p>11</text:p>
          </table:table-cell>
          <table:table-cell table:formula="of:=COM.MICROSOFT.XLOOKUP([$dms.$K520];[.G:.G];[.H:.H])" office:value-type="string" office:string-value="Nov" calcext:value-type="string">
            <text:p>Nov</text:p>
          </table:table-cell>
          <table:table-cell table:formula="of:=YEAR([$dms.$J520])" office:value-type="float" office:value="2027" calcext:value-type="float">
            <text:p>2027</text:p>
          </table:table-cell>
          <table:table-cell table:formula="of:=COM.MICROSOFT.CONCAT([$dms.$L520];&quot; &quot;;[$dms.$M520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4" calcext:value-type="date">
            <text:p>14/11/2027</text:p>
          </table:table-cell>
          <table:table-cell table:formula="of:=MONTH([.J521])" office:value-type="float" office:value="11" calcext:value-type="float">
            <text:p>11</text:p>
          </table:table-cell>
          <table:table-cell table:formula="of:=COM.MICROSOFT.XLOOKUP([$dms.$K521];[.G:.G];[.H:.H])" office:value-type="string" office:string-value="Nov" calcext:value-type="string">
            <text:p>Nov</text:p>
          </table:table-cell>
          <table:table-cell table:formula="of:=YEAR([$dms.$J521])" office:value-type="float" office:value="2027" calcext:value-type="float">
            <text:p>2027</text:p>
          </table:table-cell>
          <table:table-cell table:formula="of:=COM.MICROSOFT.CONCAT([$dms.$L521];&quot; &quot;;[$dms.$M521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5" calcext:value-type="date">
            <text:p>15/11/2027</text:p>
          </table:table-cell>
          <table:table-cell table:formula="of:=MONTH([.J522])" office:value-type="float" office:value="11" calcext:value-type="float">
            <text:p>11</text:p>
          </table:table-cell>
          <table:table-cell table:formula="of:=COM.MICROSOFT.XLOOKUP([$dms.$K522];[.G:.G];[.H:.H])" office:value-type="string" office:string-value="Nov" calcext:value-type="string">
            <text:p>Nov</text:p>
          </table:table-cell>
          <table:table-cell table:formula="of:=YEAR([$dms.$J522])" office:value-type="float" office:value="2027" calcext:value-type="float">
            <text:p>2027</text:p>
          </table:table-cell>
          <table:table-cell table:formula="of:=COM.MICROSOFT.CONCAT([$dms.$L522];&quot; &quot;;[$dms.$M522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6" calcext:value-type="date">
            <text:p>16/11/2027</text:p>
          </table:table-cell>
          <table:table-cell table:formula="of:=MONTH([.J523])" office:value-type="float" office:value="11" calcext:value-type="float">
            <text:p>11</text:p>
          </table:table-cell>
          <table:table-cell table:formula="of:=COM.MICROSOFT.XLOOKUP([$dms.$K523];[.G:.G];[.H:.H])" office:value-type="string" office:string-value="Nov" calcext:value-type="string">
            <text:p>Nov</text:p>
          </table:table-cell>
          <table:table-cell table:formula="of:=YEAR([$dms.$J523])" office:value-type="float" office:value="2027" calcext:value-type="float">
            <text:p>2027</text:p>
          </table:table-cell>
          <table:table-cell table:formula="of:=COM.MICROSOFT.CONCAT([$dms.$L523];&quot; &quot;;[$dms.$M523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7" calcext:value-type="date">
            <text:p>17/11/2027</text:p>
          </table:table-cell>
          <table:table-cell table:formula="of:=MONTH([.J524])" office:value-type="float" office:value="11" calcext:value-type="float">
            <text:p>11</text:p>
          </table:table-cell>
          <table:table-cell table:formula="of:=COM.MICROSOFT.XLOOKUP([$dms.$K524];[.G:.G];[.H:.H])" office:value-type="string" office:string-value="Nov" calcext:value-type="string">
            <text:p>Nov</text:p>
          </table:table-cell>
          <table:table-cell table:formula="of:=YEAR([$dms.$J524])" office:value-type="float" office:value="2027" calcext:value-type="float">
            <text:p>2027</text:p>
          </table:table-cell>
          <table:table-cell table:formula="of:=COM.MICROSOFT.CONCAT([$dms.$L524];&quot; &quot;;[$dms.$M524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8" calcext:value-type="date">
            <text:p>18/11/2027</text:p>
          </table:table-cell>
          <table:table-cell table:formula="of:=MONTH([.J525])" office:value-type="float" office:value="11" calcext:value-type="float">
            <text:p>11</text:p>
          </table:table-cell>
          <table:table-cell table:formula="of:=COM.MICROSOFT.XLOOKUP([$dms.$K525];[.G:.G];[.H:.H])" office:value-type="string" office:string-value="Nov" calcext:value-type="string">
            <text:p>Nov</text:p>
          </table:table-cell>
          <table:table-cell table:formula="of:=YEAR([$dms.$J525])" office:value-type="float" office:value="2027" calcext:value-type="float">
            <text:p>2027</text:p>
          </table:table-cell>
          <table:table-cell table:formula="of:=COM.MICROSOFT.CONCAT([$dms.$L525];&quot; &quot;;[$dms.$M525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19" calcext:value-type="date">
            <text:p>19/11/2027</text:p>
          </table:table-cell>
          <table:table-cell table:formula="of:=MONTH([.J526])" office:value-type="float" office:value="11" calcext:value-type="float">
            <text:p>11</text:p>
          </table:table-cell>
          <table:table-cell table:formula="of:=COM.MICROSOFT.XLOOKUP([$dms.$K526];[.G:.G];[.H:.H])" office:value-type="string" office:string-value="Nov" calcext:value-type="string">
            <text:p>Nov</text:p>
          </table:table-cell>
          <table:table-cell table:formula="of:=YEAR([$dms.$J526])" office:value-type="float" office:value="2027" calcext:value-type="float">
            <text:p>2027</text:p>
          </table:table-cell>
          <table:table-cell table:formula="of:=COM.MICROSOFT.CONCAT([$dms.$L526];&quot; &quot;;[$dms.$M526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0" calcext:value-type="date">
            <text:p>20/11/2027</text:p>
          </table:table-cell>
          <table:table-cell table:formula="of:=MONTH([.J527])" office:value-type="float" office:value="11" calcext:value-type="float">
            <text:p>11</text:p>
          </table:table-cell>
          <table:table-cell table:formula="of:=COM.MICROSOFT.XLOOKUP([$dms.$K527];[.G:.G];[.H:.H])" office:value-type="string" office:string-value="Nov" calcext:value-type="string">
            <text:p>Nov</text:p>
          </table:table-cell>
          <table:table-cell table:formula="of:=YEAR([$dms.$J527])" office:value-type="float" office:value="2027" calcext:value-type="float">
            <text:p>2027</text:p>
          </table:table-cell>
          <table:table-cell table:formula="of:=COM.MICROSOFT.CONCAT([$dms.$L527];&quot; &quot;;[$dms.$M527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1" calcext:value-type="date">
            <text:p>21/11/2027</text:p>
          </table:table-cell>
          <table:table-cell table:formula="of:=MONTH([.J528])" office:value-type="float" office:value="11" calcext:value-type="float">
            <text:p>11</text:p>
          </table:table-cell>
          <table:table-cell table:formula="of:=COM.MICROSOFT.XLOOKUP([$dms.$K528];[.G:.G];[.H:.H])" office:value-type="string" office:string-value="Nov" calcext:value-type="string">
            <text:p>Nov</text:p>
          </table:table-cell>
          <table:table-cell table:formula="of:=YEAR([$dms.$J528])" office:value-type="float" office:value="2027" calcext:value-type="float">
            <text:p>2027</text:p>
          </table:table-cell>
          <table:table-cell table:formula="of:=COM.MICROSOFT.CONCAT([$dms.$L528];&quot; &quot;;[$dms.$M528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2" calcext:value-type="date">
            <text:p>22/11/2027</text:p>
          </table:table-cell>
          <table:table-cell table:formula="of:=MONTH([.J529])" office:value-type="float" office:value="11" calcext:value-type="float">
            <text:p>11</text:p>
          </table:table-cell>
          <table:table-cell table:formula="of:=COM.MICROSOFT.XLOOKUP([$dms.$K529];[.G:.G];[.H:.H])" office:value-type="string" office:string-value="Nov" calcext:value-type="string">
            <text:p>Nov</text:p>
          </table:table-cell>
          <table:table-cell table:formula="of:=YEAR([$dms.$J529])" office:value-type="float" office:value="2027" calcext:value-type="float">
            <text:p>2027</text:p>
          </table:table-cell>
          <table:table-cell table:formula="of:=COM.MICROSOFT.CONCAT([$dms.$L529];&quot; &quot;;[$dms.$M529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3" calcext:value-type="date">
            <text:p>23/11/2027</text:p>
          </table:table-cell>
          <table:table-cell table:formula="of:=MONTH([.J530])" office:value-type="float" office:value="11" calcext:value-type="float">
            <text:p>11</text:p>
          </table:table-cell>
          <table:table-cell table:formula="of:=COM.MICROSOFT.XLOOKUP([$dms.$K530];[.G:.G];[.H:.H])" office:value-type="string" office:string-value="Nov" calcext:value-type="string">
            <text:p>Nov</text:p>
          </table:table-cell>
          <table:table-cell table:formula="of:=YEAR([$dms.$J530])" office:value-type="float" office:value="2027" calcext:value-type="float">
            <text:p>2027</text:p>
          </table:table-cell>
          <table:table-cell table:formula="of:=COM.MICROSOFT.CONCAT([$dms.$L530];&quot; &quot;;[$dms.$M530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4" calcext:value-type="date">
            <text:p>24/11/2027</text:p>
          </table:table-cell>
          <table:table-cell table:formula="of:=MONTH([.J531])" office:value-type="float" office:value="11" calcext:value-type="float">
            <text:p>11</text:p>
          </table:table-cell>
          <table:table-cell table:formula="of:=COM.MICROSOFT.XLOOKUP([$dms.$K531];[.G:.G];[.H:.H])" office:value-type="string" office:string-value="Nov" calcext:value-type="string">
            <text:p>Nov</text:p>
          </table:table-cell>
          <table:table-cell table:formula="of:=YEAR([$dms.$J531])" office:value-type="float" office:value="2027" calcext:value-type="float">
            <text:p>2027</text:p>
          </table:table-cell>
          <table:table-cell table:formula="of:=COM.MICROSOFT.CONCAT([$dms.$L531];&quot; &quot;;[$dms.$M531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5" calcext:value-type="date">
            <text:p>25/11/2027</text:p>
          </table:table-cell>
          <table:table-cell table:formula="of:=MONTH([.J532])" office:value-type="float" office:value="11" calcext:value-type="float">
            <text:p>11</text:p>
          </table:table-cell>
          <table:table-cell table:formula="of:=COM.MICROSOFT.XLOOKUP([$dms.$K532];[.G:.G];[.H:.H])" office:value-type="string" office:string-value="Nov" calcext:value-type="string">
            <text:p>Nov</text:p>
          </table:table-cell>
          <table:table-cell table:formula="of:=YEAR([$dms.$J532])" office:value-type="float" office:value="2027" calcext:value-type="float">
            <text:p>2027</text:p>
          </table:table-cell>
          <table:table-cell table:formula="of:=COM.MICROSOFT.CONCAT([$dms.$L532];&quot; &quot;;[$dms.$M532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6" calcext:value-type="date">
            <text:p>26/11/2027</text:p>
          </table:table-cell>
          <table:table-cell table:formula="of:=MONTH([.J533])" office:value-type="float" office:value="11" calcext:value-type="float">
            <text:p>11</text:p>
          </table:table-cell>
          <table:table-cell table:formula="of:=COM.MICROSOFT.XLOOKUP([$dms.$K533];[.G:.G];[.H:.H])" office:value-type="string" office:string-value="Nov" calcext:value-type="string">
            <text:p>Nov</text:p>
          </table:table-cell>
          <table:table-cell table:formula="of:=YEAR([$dms.$J533])" office:value-type="float" office:value="2027" calcext:value-type="float">
            <text:p>2027</text:p>
          </table:table-cell>
          <table:table-cell table:formula="of:=COM.MICROSOFT.CONCAT([$dms.$L533];&quot; &quot;;[$dms.$M533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7" calcext:value-type="date">
            <text:p>27/11/2027</text:p>
          </table:table-cell>
          <table:table-cell table:formula="of:=MONTH([.J534])" office:value-type="float" office:value="11" calcext:value-type="float">
            <text:p>11</text:p>
          </table:table-cell>
          <table:table-cell table:formula="of:=COM.MICROSOFT.XLOOKUP([$dms.$K534];[.G:.G];[.H:.H])" office:value-type="string" office:string-value="Nov" calcext:value-type="string">
            <text:p>Nov</text:p>
          </table:table-cell>
          <table:table-cell table:formula="of:=YEAR([$dms.$J534])" office:value-type="float" office:value="2027" calcext:value-type="float">
            <text:p>2027</text:p>
          </table:table-cell>
          <table:table-cell table:formula="of:=COM.MICROSOFT.CONCAT([$dms.$L534];&quot; &quot;;[$dms.$M534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8" calcext:value-type="date">
            <text:p>28/11/2027</text:p>
          </table:table-cell>
          <table:table-cell table:formula="of:=MONTH([.J535])" office:value-type="float" office:value="11" calcext:value-type="float">
            <text:p>11</text:p>
          </table:table-cell>
          <table:table-cell table:formula="of:=COM.MICROSOFT.XLOOKUP([$dms.$K535];[.G:.G];[.H:.H])" office:value-type="string" office:string-value="Nov" calcext:value-type="string">
            <text:p>Nov</text:p>
          </table:table-cell>
          <table:table-cell table:formula="of:=YEAR([$dms.$J535])" office:value-type="float" office:value="2027" calcext:value-type="float">
            <text:p>2027</text:p>
          </table:table-cell>
          <table:table-cell table:formula="of:=COM.MICROSOFT.CONCAT([$dms.$L535];&quot; &quot;;[$dms.$M535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29" calcext:value-type="date">
            <text:p>29/11/2027</text:p>
          </table:table-cell>
          <table:table-cell table:formula="of:=MONTH([.J536])" office:value-type="float" office:value="11" calcext:value-type="float">
            <text:p>11</text:p>
          </table:table-cell>
          <table:table-cell table:formula="of:=COM.MICROSOFT.XLOOKUP([$dms.$K536];[.G:.G];[.H:.H])" office:value-type="string" office:string-value="Nov" calcext:value-type="string">
            <text:p>Nov</text:p>
          </table:table-cell>
          <table:table-cell table:formula="of:=YEAR([$dms.$J536])" office:value-type="float" office:value="2027" calcext:value-type="float">
            <text:p>2027</text:p>
          </table:table-cell>
          <table:table-cell table:formula="of:=COM.MICROSOFT.CONCAT([$dms.$L536];&quot; &quot;;[$dms.$M536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1-30" calcext:value-type="date">
            <text:p>30/11/2027</text:p>
          </table:table-cell>
          <table:table-cell table:formula="of:=MONTH([.J537])" office:value-type="float" office:value="11" calcext:value-type="float">
            <text:p>11</text:p>
          </table:table-cell>
          <table:table-cell table:formula="of:=COM.MICROSOFT.XLOOKUP([$dms.$K537];[.G:.G];[.H:.H])" office:value-type="string" office:string-value="Nov" calcext:value-type="string">
            <text:p>Nov</text:p>
          </table:table-cell>
          <table:table-cell table:formula="of:=YEAR([$dms.$J537])" office:value-type="float" office:value="2027" calcext:value-type="float">
            <text:p>2027</text:p>
          </table:table-cell>
          <table:table-cell table:formula="of:=COM.MICROSOFT.CONCAT([$dms.$L537];&quot; &quot;;[$dms.$M537])" office:value-type="string" office:string-value="Nov 2027" calcext:value-type="string">
            <text:p>Nov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01" calcext:value-type="date">
            <text:p>1/12/2027</text:p>
          </table:table-cell>
          <table:table-cell table:formula="of:=MONTH([.J538])" office:value-type="float" office:value="12" calcext:value-type="float">
            <text:p>12</text:p>
          </table:table-cell>
          <table:table-cell table:formula="of:=COM.MICROSOFT.XLOOKUP([$dms.$K538];[.G:.G];[.H:.H])" office:value-type="string" office:string-value="Dez" calcext:value-type="string">
            <text:p>Dez</text:p>
          </table:table-cell>
          <table:table-cell table:formula="of:=YEAR([$dms.$J538])" office:value-type="float" office:value="2027" calcext:value-type="float">
            <text:p>2027</text:p>
          </table:table-cell>
          <table:table-cell table:formula="of:=COM.MICROSOFT.CONCAT([$dms.$L538];&quot; &quot;;[$dms.$M538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02" calcext:value-type="date">
            <text:p>2/12/2027</text:p>
          </table:table-cell>
          <table:table-cell table:formula="of:=MONTH([.J539])" office:value-type="float" office:value="12" calcext:value-type="float">
            <text:p>12</text:p>
          </table:table-cell>
          <table:table-cell table:formula="of:=COM.MICROSOFT.XLOOKUP([$dms.$K539];[.G:.G];[.H:.H])" office:value-type="string" office:string-value="Dez" calcext:value-type="string">
            <text:p>Dez</text:p>
          </table:table-cell>
          <table:table-cell table:formula="of:=YEAR([$dms.$J539])" office:value-type="float" office:value="2027" calcext:value-type="float">
            <text:p>2027</text:p>
          </table:table-cell>
          <table:table-cell table:formula="of:=COM.MICROSOFT.CONCAT([$dms.$L539];&quot; &quot;;[$dms.$M539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03" calcext:value-type="date">
            <text:p>3/12/2027</text:p>
          </table:table-cell>
          <table:table-cell table:formula="of:=MONTH([.J540])" office:value-type="float" office:value="12" calcext:value-type="float">
            <text:p>12</text:p>
          </table:table-cell>
          <table:table-cell table:formula="of:=COM.MICROSOFT.XLOOKUP([$dms.$K540];[.G:.G];[.H:.H])" office:value-type="string" office:string-value="Dez" calcext:value-type="string">
            <text:p>Dez</text:p>
          </table:table-cell>
          <table:table-cell table:formula="of:=YEAR([$dms.$J540])" office:value-type="float" office:value="2027" calcext:value-type="float">
            <text:p>2027</text:p>
          </table:table-cell>
          <table:table-cell table:formula="of:=COM.MICROSOFT.CONCAT([$dms.$L540];&quot; &quot;;[$dms.$M540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04" calcext:value-type="date">
            <text:p>4/12/2027</text:p>
          </table:table-cell>
          <table:table-cell table:formula="of:=MONTH([.J541])" office:value-type="float" office:value="12" calcext:value-type="float">
            <text:p>12</text:p>
          </table:table-cell>
          <table:table-cell table:formula="of:=COM.MICROSOFT.XLOOKUP([$dms.$K541];[.G:.G];[.H:.H])" office:value-type="string" office:string-value="Dez" calcext:value-type="string">
            <text:p>Dez</text:p>
          </table:table-cell>
          <table:table-cell table:formula="of:=YEAR([$dms.$J541])" office:value-type="float" office:value="2027" calcext:value-type="float">
            <text:p>2027</text:p>
          </table:table-cell>
          <table:table-cell table:formula="of:=COM.MICROSOFT.CONCAT([$dms.$L541];&quot; &quot;;[$dms.$M541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05" calcext:value-type="date">
            <text:p>5/12/2027</text:p>
          </table:table-cell>
          <table:table-cell table:formula="of:=MONTH([.J542])" office:value-type="float" office:value="12" calcext:value-type="float">
            <text:p>12</text:p>
          </table:table-cell>
          <table:table-cell table:formula="of:=COM.MICROSOFT.XLOOKUP([$dms.$K542];[.G:.G];[.H:.H])" office:value-type="string" office:string-value="Dez" calcext:value-type="string">
            <text:p>Dez</text:p>
          </table:table-cell>
          <table:table-cell table:formula="of:=YEAR([$dms.$J542])" office:value-type="float" office:value="2027" calcext:value-type="float">
            <text:p>2027</text:p>
          </table:table-cell>
          <table:table-cell table:formula="of:=COM.MICROSOFT.CONCAT([$dms.$L542];&quot; &quot;;[$dms.$M542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06" calcext:value-type="date">
            <text:p>6/12/2027</text:p>
          </table:table-cell>
          <table:table-cell table:formula="of:=MONTH([.J543])" office:value-type="float" office:value="12" calcext:value-type="float">
            <text:p>12</text:p>
          </table:table-cell>
          <table:table-cell table:formula="of:=COM.MICROSOFT.XLOOKUP([$dms.$K543];[.G:.G];[.H:.H])" office:value-type="string" office:string-value="Dez" calcext:value-type="string">
            <text:p>Dez</text:p>
          </table:table-cell>
          <table:table-cell table:formula="of:=YEAR([$dms.$J543])" office:value-type="float" office:value="2027" calcext:value-type="float">
            <text:p>2027</text:p>
          </table:table-cell>
          <table:table-cell table:formula="of:=COM.MICROSOFT.CONCAT([$dms.$L543];&quot; &quot;;[$dms.$M543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07" calcext:value-type="date">
            <text:p>7/12/2027</text:p>
          </table:table-cell>
          <table:table-cell table:formula="of:=MONTH([.J544])" office:value-type="float" office:value="12" calcext:value-type="float">
            <text:p>12</text:p>
          </table:table-cell>
          <table:table-cell table:formula="of:=COM.MICROSOFT.XLOOKUP([$dms.$K544];[.G:.G];[.H:.H])" office:value-type="string" office:string-value="Dez" calcext:value-type="string">
            <text:p>Dez</text:p>
          </table:table-cell>
          <table:table-cell table:formula="of:=YEAR([$dms.$J544])" office:value-type="float" office:value="2027" calcext:value-type="float">
            <text:p>2027</text:p>
          </table:table-cell>
          <table:table-cell table:formula="of:=COM.MICROSOFT.CONCAT([$dms.$L544];&quot; &quot;;[$dms.$M544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08" calcext:value-type="date">
            <text:p>8/12/2027</text:p>
          </table:table-cell>
          <table:table-cell table:formula="of:=MONTH([.J545])" office:value-type="float" office:value="12" calcext:value-type="float">
            <text:p>12</text:p>
          </table:table-cell>
          <table:table-cell table:formula="of:=COM.MICROSOFT.XLOOKUP([$dms.$K545];[.G:.G];[.H:.H])" office:value-type="string" office:string-value="Dez" calcext:value-type="string">
            <text:p>Dez</text:p>
          </table:table-cell>
          <table:table-cell table:formula="of:=YEAR([$dms.$J545])" office:value-type="float" office:value="2027" calcext:value-type="float">
            <text:p>2027</text:p>
          </table:table-cell>
          <table:table-cell table:formula="of:=COM.MICROSOFT.CONCAT([$dms.$L545];&quot; &quot;;[$dms.$M545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09" calcext:value-type="date">
            <text:p>9/12/2027</text:p>
          </table:table-cell>
          <table:table-cell table:formula="of:=MONTH([.J546])" office:value-type="float" office:value="12" calcext:value-type="float">
            <text:p>12</text:p>
          </table:table-cell>
          <table:table-cell table:formula="of:=COM.MICROSOFT.XLOOKUP([$dms.$K546];[.G:.G];[.H:.H])" office:value-type="string" office:string-value="Dez" calcext:value-type="string">
            <text:p>Dez</text:p>
          </table:table-cell>
          <table:table-cell table:formula="of:=YEAR([$dms.$J546])" office:value-type="float" office:value="2027" calcext:value-type="float">
            <text:p>2027</text:p>
          </table:table-cell>
          <table:table-cell table:formula="of:=COM.MICROSOFT.CONCAT([$dms.$L546];&quot; &quot;;[$dms.$M546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0" calcext:value-type="date">
            <text:p>10/12/2027</text:p>
          </table:table-cell>
          <table:table-cell table:formula="of:=MONTH([.J547])" office:value-type="float" office:value="12" calcext:value-type="float">
            <text:p>12</text:p>
          </table:table-cell>
          <table:table-cell table:formula="of:=COM.MICROSOFT.XLOOKUP([$dms.$K547];[.G:.G];[.H:.H])" office:value-type="string" office:string-value="Dez" calcext:value-type="string">
            <text:p>Dez</text:p>
          </table:table-cell>
          <table:table-cell table:formula="of:=YEAR([$dms.$J547])" office:value-type="float" office:value="2027" calcext:value-type="float">
            <text:p>2027</text:p>
          </table:table-cell>
          <table:table-cell table:formula="of:=COM.MICROSOFT.CONCAT([$dms.$L547];&quot; &quot;;[$dms.$M547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1" calcext:value-type="date">
            <text:p>11/12/2027</text:p>
          </table:table-cell>
          <table:table-cell table:formula="of:=MONTH([.J548])" office:value-type="float" office:value="12" calcext:value-type="float">
            <text:p>12</text:p>
          </table:table-cell>
          <table:table-cell table:formula="of:=COM.MICROSOFT.XLOOKUP([$dms.$K548];[.G:.G];[.H:.H])" office:value-type="string" office:string-value="Dez" calcext:value-type="string">
            <text:p>Dez</text:p>
          </table:table-cell>
          <table:table-cell table:formula="of:=YEAR([$dms.$J548])" office:value-type="float" office:value="2027" calcext:value-type="float">
            <text:p>2027</text:p>
          </table:table-cell>
          <table:table-cell table:formula="of:=COM.MICROSOFT.CONCAT([$dms.$L548];&quot; &quot;;[$dms.$M548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2" calcext:value-type="date">
            <text:p>12/12/2027</text:p>
          </table:table-cell>
          <table:table-cell table:formula="of:=MONTH([.J549])" office:value-type="float" office:value="12" calcext:value-type="float">
            <text:p>12</text:p>
          </table:table-cell>
          <table:table-cell table:formula="of:=COM.MICROSOFT.XLOOKUP([$dms.$K549];[.G:.G];[.H:.H])" office:value-type="string" office:string-value="Dez" calcext:value-type="string">
            <text:p>Dez</text:p>
          </table:table-cell>
          <table:table-cell table:formula="of:=YEAR([$dms.$J549])" office:value-type="float" office:value="2027" calcext:value-type="float">
            <text:p>2027</text:p>
          </table:table-cell>
          <table:table-cell table:formula="of:=COM.MICROSOFT.CONCAT([$dms.$L549];&quot; &quot;;[$dms.$M549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3" calcext:value-type="date">
            <text:p>13/12/2027</text:p>
          </table:table-cell>
          <table:table-cell table:formula="of:=MONTH([.J550])" office:value-type="float" office:value="12" calcext:value-type="float">
            <text:p>12</text:p>
          </table:table-cell>
          <table:table-cell table:formula="of:=COM.MICROSOFT.XLOOKUP([$dms.$K550];[.G:.G];[.H:.H])" office:value-type="string" office:string-value="Dez" calcext:value-type="string">
            <text:p>Dez</text:p>
          </table:table-cell>
          <table:table-cell table:formula="of:=YEAR([$dms.$J550])" office:value-type="float" office:value="2027" calcext:value-type="float">
            <text:p>2027</text:p>
          </table:table-cell>
          <table:table-cell table:formula="of:=COM.MICROSOFT.CONCAT([$dms.$L550];&quot; &quot;;[$dms.$M550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4" calcext:value-type="date">
            <text:p>14/12/2027</text:p>
          </table:table-cell>
          <table:table-cell table:formula="of:=MONTH([.J551])" office:value-type="float" office:value="12" calcext:value-type="float">
            <text:p>12</text:p>
          </table:table-cell>
          <table:table-cell table:formula="of:=COM.MICROSOFT.XLOOKUP([$dms.$K551];[.G:.G];[.H:.H])" office:value-type="string" office:string-value="Dez" calcext:value-type="string">
            <text:p>Dez</text:p>
          </table:table-cell>
          <table:table-cell table:formula="of:=YEAR([$dms.$J551])" office:value-type="float" office:value="2027" calcext:value-type="float">
            <text:p>2027</text:p>
          </table:table-cell>
          <table:table-cell table:formula="of:=COM.MICROSOFT.CONCAT([$dms.$L551];&quot; &quot;;[$dms.$M551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5" calcext:value-type="date">
            <text:p>15/12/2027</text:p>
          </table:table-cell>
          <table:table-cell table:formula="of:=MONTH([.J552])" office:value-type="float" office:value="12" calcext:value-type="float">
            <text:p>12</text:p>
          </table:table-cell>
          <table:table-cell table:formula="of:=COM.MICROSOFT.XLOOKUP([$dms.$K552];[.G:.G];[.H:.H])" office:value-type="string" office:string-value="Dez" calcext:value-type="string">
            <text:p>Dez</text:p>
          </table:table-cell>
          <table:table-cell table:formula="of:=YEAR([$dms.$J552])" office:value-type="float" office:value="2027" calcext:value-type="float">
            <text:p>2027</text:p>
          </table:table-cell>
          <table:table-cell table:formula="of:=COM.MICROSOFT.CONCAT([$dms.$L552];&quot; &quot;;[$dms.$M552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6" calcext:value-type="date">
            <text:p>16/12/2027</text:p>
          </table:table-cell>
          <table:table-cell table:formula="of:=MONTH([.J553])" office:value-type="float" office:value="12" calcext:value-type="float">
            <text:p>12</text:p>
          </table:table-cell>
          <table:table-cell table:formula="of:=COM.MICROSOFT.XLOOKUP([$dms.$K553];[.G:.G];[.H:.H])" office:value-type="string" office:string-value="Dez" calcext:value-type="string">
            <text:p>Dez</text:p>
          </table:table-cell>
          <table:table-cell table:formula="of:=YEAR([$dms.$J553])" office:value-type="float" office:value="2027" calcext:value-type="float">
            <text:p>2027</text:p>
          </table:table-cell>
          <table:table-cell table:formula="of:=COM.MICROSOFT.CONCAT([$dms.$L553];&quot; &quot;;[$dms.$M553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7" calcext:value-type="date">
            <text:p>17/12/2027</text:p>
          </table:table-cell>
          <table:table-cell table:formula="of:=MONTH([.J554])" office:value-type="float" office:value="12" calcext:value-type="float">
            <text:p>12</text:p>
          </table:table-cell>
          <table:table-cell table:formula="of:=COM.MICROSOFT.XLOOKUP([$dms.$K554];[.G:.G];[.H:.H])" office:value-type="string" office:string-value="Dez" calcext:value-type="string">
            <text:p>Dez</text:p>
          </table:table-cell>
          <table:table-cell table:formula="of:=YEAR([$dms.$J554])" office:value-type="float" office:value="2027" calcext:value-type="float">
            <text:p>2027</text:p>
          </table:table-cell>
          <table:table-cell table:formula="of:=COM.MICROSOFT.CONCAT([$dms.$L554];&quot; &quot;;[$dms.$M554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8" calcext:value-type="date">
            <text:p>18/12/2027</text:p>
          </table:table-cell>
          <table:table-cell table:formula="of:=MONTH([.J555])" office:value-type="float" office:value="12" calcext:value-type="float">
            <text:p>12</text:p>
          </table:table-cell>
          <table:table-cell table:formula="of:=COM.MICROSOFT.XLOOKUP([$dms.$K555];[.G:.G];[.H:.H])" office:value-type="string" office:string-value="Dez" calcext:value-type="string">
            <text:p>Dez</text:p>
          </table:table-cell>
          <table:table-cell table:formula="of:=YEAR([$dms.$J555])" office:value-type="float" office:value="2027" calcext:value-type="float">
            <text:p>2027</text:p>
          </table:table-cell>
          <table:table-cell table:formula="of:=COM.MICROSOFT.CONCAT([$dms.$L555];&quot; &quot;;[$dms.$M555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19" calcext:value-type="date">
            <text:p>19/12/2027</text:p>
          </table:table-cell>
          <table:table-cell table:formula="of:=MONTH([.J556])" office:value-type="float" office:value="12" calcext:value-type="float">
            <text:p>12</text:p>
          </table:table-cell>
          <table:table-cell table:formula="of:=COM.MICROSOFT.XLOOKUP([$dms.$K556];[.G:.G];[.H:.H])" office:value-type="string" office:string-value="Dez" calcext:value-type="string">
            <text:p>Dez</text:p>
          </table:table-cell>
          <table:table-cell table:formula="of:=YEAR([$dms.$J556])" office:value-type="float" office:value="2027" calcext:value-type="float">
            <text:p>2027</text:p>
          </table:table-cell>
          <table:table-cell table:formula="of:=COM.MICROSOFT.CONCAT([$dms.$L556];&quot; &quot;;[$dms.$M556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0" calcext:value-type="date">
            <text:p>20/12/2027</text:p>
          </table:table-cell>
          <table:table-cell table:formula="of:=MONTH([.J557])" office:value-type="float" office:value="12" calcext:value-type="float">
            <text:p>12</text:p>
          </table:table-cell>
          <table:table-cell table:formula="of:=COM.MICROSOFT.XLOOKUP([$dms.$K557];[.G:.G];[.H:.H])" office:value-type="string" office:string-value="Dez" calcext:value-type="string">
            <text:p>Dez</text:p>
          </table:table-cell>
          <table:table-cell table:formula="of:=YEAR([$dms.$J557])" office:value-type="float" office:value="2027" calcext:value-type="float">
            <text:p>2027</text:p>
          </table:table-cell>
          <table:table-cell table:formula="of:=COM.MICROSOFT.CONCAT([$dms.$L557];&quot; &quot;;[$dms.$M557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1" calcext:value-type="date">
            <text:p>21/12/2027</text:p>
          </table:table-cell>
          <table:table-cell table:formula="of:=MONTH([.J558])" office:value-type="float" office:value="12" calcext:value-type="float">
            <text:p>12</text:p>
          </table:table-cell>
          <table:table-cell table:formula="of:=COM.MICROSOFT.XLOOKUP([$dms.$K558];[.G:.G];[.H:.H])" office:value-type="string" office:string-value="Dez" calcext:value-type="string">
            <text:p>Dez</text:p>
          </table:table-cell>
          <table:table-cell table:formula="of:=YEAR([$dms.$J558])" office:value-type="float" office:value="2027" calcext:value-type="float">
            <text:p>2027</text:p>
          </table:table-cell>
          <table:table-cell table:formula="of:=COM.MICROSOFT.CONCAT([$dms.$L558];&quot; &quot;;[$dms.$M558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2" calcext:value-type="date">
            <text:p>22/12/2027</text:p>
          </table:table-cell>
          <table:table-cell table:formula="of:=MONTH([.J559])" office:value-type="float" office:value="12" calcext:value-type="float">
            <text:p>12</text:p>
          </table:table-cell>
          <table:table-cell table:formula="of:=COM.MICROSOFT.XLOOKUP([$dms.$K559];[.G:.G];[.H:.H])" office:value-type="string" office:string-value="Dez" calcext:value-type="string">
            <text:p>Dez</text:p>
          </table:table-cell>
          <table:table-cell table:formula="of:=YEAR([$dms.$J559])" office:value-type="float" office:value="2027" calcext:value-type="float">
            <text:p>2027</text:p>
          </table:table-cell>
          <table:table-cell table:formula="of:=COM.MICROSOFT.CONCAT([$dms.$L559];&quot; &quot;;[$dms.$M559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3" calcext:value-type="date">
            <text:p>23/12/2027</text:p>
          </table:table-cell>
          <table:table-cell table:formula="of:=MONTH([.J560])" office:value-type="float" office:value="12" calcext:value-type="float">
            <text:p>12</text:p>
          </table:table-cell>
          <table:table-cell table:formula="of:=COM.MICROSOFT.XLOOKUP([$dms.$K560];[.G:.G];[.H:.H])" office:value-type="string" office:string-value="Dez" calcext:value-type="string">
            <text:p>Dez</text:p>
          </table:table-cell>
          <table:table-cell table:formula="of:=YEAR([$dms.$J560])" office:value-type="float" office:value="2027" calcext:value-type="float">
            <text:p>2027</text:p>
          </table:table-cell>
          <table:table-cell table:formula="of:=COM.MICROSOFT.CONCAT([$dms.$L560];&quot; &quot;;[$dms.$M560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4" calcext:value-type="date">
            <text:p>24/12/2027</text:p>
          </table:table-cell>
          <table:table-cell table:formula="of:=MONTH([.J561])" office:value-type="float" office:value="12" calcext:value-type="float">
            <text:p>12</text:p>
          </table:table-cell>
          <table:table-cell table:formula="of:=COM.MICROSOFT.XLOOKUP([$dms.$K561];[.G:.G];[.H:.H])" office:value-type="string" office:string-value="Dez" calcext:value-type="string">
            <text:p>Dez</text:p>
          </table:table-cell>
          <table:table-cell table:formula="of:=YEAR([$dms.$J561])" office:value-type="float" office:value="2027" calcext:value-type="float">
            <text:p>2027</text:p>
          </table:table-cell>
          <table:table-cell table:formula="of:=COM.MICROSOFT.CONCAT([$dms.$L561];&quot; &quot;;[$dms.$M561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5" calcext:value-type="date">
            <text:p>25/12/2027</text:p>
          </table:table-cell>
          <table:table-cell table:formula="of:=MONTH([.J562])" office:value-type="float" office:value="12" calcext:value-type="float">
            <text:p>12</text:p>
          </table:table-cell>
          <table:table-cell table:formula="of:=COM.MICROSOFT.XLOOKUP([$dms.$K562];[.G:.G];[.H:.H])" office:value-type="string" office:string-value="Dez" calcext:value-type="string">
            <text:p>Dez</text:p>
          </table:table-cell>
          <table:table-cell table:formula="of:=YEAR([$dms.$J562])" office:value-type="float" office:value="2027" calcext:value-type="float">
            <text:p>2027</text:p>
          </table:table-cell>
          <table:table-cell table:formula="of:=COM.MICROSOFT.CONCAT([$dms.$L562];&quot; &quot;;[$dms.$M562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6" calcext:value-type="date">
            <text:p>26/12/2027</text:p>
          </table:table-cell>
          <table:table-cell table:formula="of:=MONTH([.J563])" office:value-type="float" office:value="12" calcext:value-type="float">
            <text:p>12</text:p>
          </table:table-cell>
          <table:table-cell table:formula="of:=COM.MICROSOFT.XLOOKUP([$dms.$K563];[.G:.G];[.H:.H])" office:value-type="string" office:string-value="Dez" calcext:value-type="string">
            <text:p>Dez</text:p>
          </table:table-cell>
          <table:table-cell table:formula="of:=YEAR([$dms.$J563])" office:value-type="float" office:value="2027" calcext:value-type="float">
            <text:p>2027</text:p>
          </table:table-cell>
          <table:table-cell table:formula="of:=COM.MICROSOFT.CONCAT([$dms.$L563];&quot; &quot;;[$dms.$M563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7" calcext:value-type="date">
            <text:p>27/12/2027</text:p>
          </table:table-cell>
          <table:table-cell table:formula="of:=MONTH([.J564])" office:value-type="float" office:value="12" calcext:value-type="float">
            <text:p>12</text:p>
          </table:table-cell>
          <table:table-cell table:formula="of:=COM.MICROSOFT.XLOOKUP([$dms.$K564];[.G:.G];[.H:.H])" office:value-type="string" office:string-value="Dez" calcext:value-type="string">
            <text:p>Dez</text:p>
          </table:table-cell>
          <table:table-cell table:formula="of:=YEAR([$dms.$J564])" office:value-type="float" office:value="2027" calcext:value-type="float">
            <text:p>2027</text:p>
          </table:table-cell>
          <table:table-cell table:formula="of:=COM.MICROSOFT.CONCAT([$dms.$L564];&quot; &quot;;[$dms.$M564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8" calcext:value-type="date">
            <text:p>28/12/2027</text:p>
          </table:table-cell>
          <table:table-cell table:formula="of:=MONTH([.J565])" office:value-type="float" office:value="12" calcext:value-type="float">
            <text:p>12</text:p>
          </table:table-cell>
          <table:table-cell table:formula="of:=COM.MICROSOFT.XLOOKUP([$dms.$K565];[.G:.G];[.H:.H])" office:value-type="string" office:string-value="Dez" calcext:value-type="string">
            <text:p>Dez</text:p>
          </table:table-cell>
          <table:table-cell table:formula="of:=YEAR([$dms.$J565])" office:value-type="float" office:value="2027" calcext:value-type="float">
            <text:p>2027</text:p>
          </table:table-cell>
          <table:table-cell table:formula="of:=COM.MICROSOFT.CONCAT([$dms.$L565];&quot; &quot;;[$dms.$M565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29" calcext:value-type="date">
            <text:p>29/12/2027</text:p>
          </table:table-cell>
          <table:table-cell table:formula="of:=MONTH([.J566])" office:value-type="float" office:value="12" calcext:value-type="float">
            <text:p>12</text:p>
          </table:table-cell>
          <table:table-cell table:formula="of:=COM.MICROSOFT.XLOOKUP([$dms.$K566];[.G:.G];[.H:.H])" office:value-type="string" office:string-value="Dez" calcext:value-type="string">
            <text:p>Dez</text:p>
          </table:table-cell>
          <table:table-cell table:formula="of:=YEAR([$dms.$J566])" office:value-type="float" office:value="2027" calcext:value-type="float">
            <text:p>2027</text:p>
          </table:table-cell>
          <table:table-cell table:formula="of:=COM.MICROSOFT.CONCAT([$dms.$L566];&quot; &quot;;[$dms.$M566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30" calcext:value-type="date">
            <text:p>30/12/2027</text:p>
          </table:table-cell>
          <table:table-cell table:formula="of:=MONTH([.J567])" office:value-type="float" office:value="12" calcext:value-type="float">
            <text:p>12</text:p>
          </table:table-cell>
          <table:table-cell table:formula="of:=COM.MICROSOFT.XLOOKUP([$dms.$K567];[.G:.G];[.H:.H])" office:value-type="string" office:string-value="Dez" calcext:value-type="string">
            <text:p>Dez</text:p>
          </table:table-cell>
          <table:table-cell table:formula="of:=YEAR([$dms.$J567])" office:value-type="float" office:value="2027" calcext:value-type="float">
            <text:p>2027</text:p>
          </table:table-cell>
          <table:table-cell table:formula="of:=COM.MICROSOFT.CONCAT([$dms.$L567];&quot; &quot;;[$dms.$M567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5" office:value-type="date" office:date-value="2027-12-31" calcext:value-type="date">
            <text:p>31/12/2027</text:p>
          </table:table-cell>
          <table:table-cell table:formula="of:=MONTH([.J568])" office:value-type="float" office:value="12" calcext:value-type="float">
            <text:p>12</text:p>
          </table:table-cell>
          <table:table-cell table:formula="of:=COM.MICROSOFT.XLOOKUP([$dms.$K568];[.G:.G];[.H:.H])" office:value-type="string" office:string-value="Dez" calcext:value-type="string">
            <text:p>Dez</text:p>
          </table:table-cell>
          <table:table-cell table:formula="of:=YEAR([$dms.$J568])" office:value-type="float" office:value="2027" calcext:value-type="float">
            <text:p>2027</text:p>
          </table:table-cell>
          <table:table-cell table:formula="of:=COM.MICROSOFT.CONCAT([$dms.$L568];&quot; &quot;;[$dms.$M568])" office:value-type="string" office:string-value="Dez 2027" calcext:value-type="string">
            <text:p>Dez 2027</text:p>
          </table:table-cell>
          <table:table-cell table:number-columns-repeated="3"/>
          <table:table-cell table:style-name="Default" table:number-columns-repeated="16367"/>
        </table:table-row>
        <table:table-row table:style-name="ro1" table:number-rows-repeated="1048007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</table:table>
      <table:table table:name="Din.MTM_LB" table:style-name="ta2">
        <table:table-column table:style-name="co8" table:default-cell-style-name="Default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" table:number-columns-repeated="16380"/>
        <table:table-row table:style-name="ro1">
          <table:table-cell table:style-name="Pivot_20_Table_20_Field" office:value-type="string" calcext:value-type="string">
            <text:p>Empresa</text:p>
          </table:table-cell>
          <table:table-cell table:style-name="ce11" office:value-type="string" calcext:value-type="string">
            <text:p>- todas -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Pivot_20_Table_20_Field" office:value-type="string" calcext:value-type="string">
            <text:p>Operação Vinculada</text:p>
          </table:table-cell>
          <table:table-cell table:style-name="ce11" office:value-type="string" calcext:value-type="string">
            <text:p>- todas -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Unidade</text:p>
          </table:table-cell>
          <table:table-cell table:style-name="ce12" office:value-type="string" calcext:value-type="string">
            <text:p>(vazio)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8" office:value-type="string" calcext:value-type="string">
            <text:p>Sacramento</text:p>
          </table:table-cell>
          <table:table-cell table:style-name="ce13"/>
          <table:table-cell table:style-name="Default" table:number-columns-repeated="16382"/>
        </table:table-row>
        <table:table-row table:style-name="ro1">
          <table:table-cell table:style-name="ce9" office:value-type="string" calcext:value-type="string">
            <text:p>Matupa</text:p>
          </table:table-cell>
          <table:table-cell table:style-name="ce14"/>
          <table:table-cell table:style-name="Default" table:number-columns-repeated="16382"/>
        </table:table-row>
        <table:table-row table:style-name="ro1">
          <table:table-cell table:style-name="ce10" office:value-type="string" calcext:value-type="string">
            <text:p>Total Resultado</text:p>
          </table:table-cell>
          <table:table-cell table:style-name="ce15"/>
          <table:table-cell table:style-name="Default" table:number-columns-repeated="16382"/>
        </table:table-row>
        <table:table-row table:style-name="ro1">
          <table:table-cell/>
          <table:table-cell table:style-name="Default" table:number-columns-repeated="16383"/>
        </table:table-row>
        <table:table-row table:style-name="ro1" table:number-rows-repeated="1048568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Preços_MTM" table:style-name="ta3">
        <office:forms form:automatic-focus="false" form:apply-design-mode="false"/>
        <table:table-column table:style-name="co2" table:number-columns-repeated="3" table:default-cell-style-name="ce2"/>
        <table:table-column table:style-name="co2" table:default-cell-style-name="ce18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ce2"/>
        <table:table-column table:style-name="co12" table:default-cell-style-name="ce2"/>
        <table:table-column table:style-name="co2" table:default-cell-style-name="ce23"/>
        <table:table-column table:style-name="co2" table:default-cell-style-name="Default"/>
        <table:table-column table:style-name="co1" table:number-columns-repeated="16367"/>
        <table:table-row table:style-name="ro1">
          <table:table-cell>
            <draw:frame draw:z-index="3" draw:name="Imagem 7" draw:style-name="gr3" draw:text-style-name="P1" svg:width="1.606cm" svg:height="0.793cm" svg:x="0.291cm" svg:y="0.132cm">
              <draw:image xlink:href="Pictures/10000001000000B5000000E36FC42639.png" xlink:type="simple" xlink:show="embed" xlink:actuate="onLoad" draw:mime-type="image/png">
                <text:p/>
              </draw:image>
              <svg:desc>Relfer – Estruturas Metálicas</svg:desc>
            </draw:frame>
          </table:table-cell>
          <table:table-cell/>
          <table:table-cell>
            <draw:custom-shape draw:z-index="0" draw:name="CaixaDeTexto 2" draw:style-name="gr2" draw:text-style-name="P3" svg:width="4.659cm" svg:height="0.682cm" svg:x="0.91cm" svg:y="0.339cm">
              <text:p text:style-name="P2"><text:span text:style-name="T1">PREÇOS MTM </text:span><text:span text:style-name="T2">DERIVATIVO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2">
            <draw:frame draw:z-index="4" draw:name="Imagem 8" draw:style-name="gr3" draw:text-style-name="P1" svg:width="1.606cm" svg:height="0.793cm" svg:x="0.238cm" svg:y="0.185cm">
              <draw:image xlink:href="Pictures/10000001000000B5000000E36FC42639.png" xlink:type="simple" xlink:show="embed" xlink:actuate="onLoad" draw:mime-type="image/png">
                <text:p/>
              </draw:image>
              <svg:desc>Relfer – Estruturas Metálicas</svg:desc>
            </draw:frame>
          </table:table-cell>
          <table:table-cell table:style-name="ce2"/>
          <table:table-cell table:style-name="ce2">
            <draw:custom-shape draw:z-index="1" draw:name="CaixaDeTexto 4" draw:style-name="gr2" draw:text-style-name="P3" svg:width="3.949cm" svg:height="0.682cm" svg:x="1.672cm" svg:y="0.339cm">
              <text:p text:style-name="P2"><text:span text:style-name="T1">COTAÇÕES MTM </text:span><text:span text:style-name="T2">NDF'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/>
          <table:table-cell/>
          <table:table-cell>
            <draw:frame draw:z-index="5" draw:name="Imagem 9" draw:style-name="gr3" draw:text-style-name="P1" svg:width="1.606cm" svg:height="0.793cm" svg:x="0.238cm" svg:y="0.185cm">
              <draw:image xlink:href="Pictures/10000001000000B5000000E36FC42639.png" xlink:type="simple" xlink:show="embed" xlink:actuate="onLoad" draw:mime-type="image/png">
                <text:p/>
              </draw:image>
              <svg:desc>Relfer – Estruturas Metálicas</svg:desc>
            </draw:frame>
          </table:table-cell>
          <table:table-cell table:number-columns-repeated="4"/>
          <table:table-cell>
            <draw:custom-shape draw:z-index="2" draw:name="CaixaDeTexto 6" draw:style-name="gr2" draw:text-style-name="P3" svg:width="4.781cm" svg:height="0.682cm" svg:x="0.609cm" svg:y="0.339cm">
              <text:p text:style-name="P2"><text:span text:style-name="T1">COTAÇÕES MERCADO </text:span><text:span text:style-name="T2">FÍSICO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 table:number-columns-repeated="16367"/>
        </table:table-row>
        <table:table-row table:style-name="ro1">
          <table:table-cell table:number-columns-repeated="5"/>
          <table:table-cell table:style-name="ce2" table:number-columns-repeated="3"/>
          <table:table-cell table:style-name="ce18"/>
          <table:table-cell table:number-columns-repeated="8"/>
          <table:table-cell table:style-name="Default" table:number-columns-repeated="16367"/>
        </table:table-row>
        <table:table-row table:style-name="ro1">
          <table:table-cell table:style-name="ce17" office:value-type="string" calcext:value-type="string">
            <text:p>Bolsa</text:p>
          </table:table-cell>
          <table:table-cell table:style-name="ce17" office:value-type="string" calcext:value-type="string">
            <text:p>Commodity</text:p>
          </table:table-cell>
          <table:table-cell table:style-name="ce17" office:value-type="string" calcext:value-type="string">
            <text:p>Ticker</text:p>
          </table:table-cell>
          <table:table-cell table:style-name="ce19" office:value-type="string" calcext:value-type="string">
            <text:p>FV</text:p>
          </table:table-cell>
          <table:table-cell table:style-name="ce20"/>
          <table:table-cell table:style-name="ce21" office:value-type="string" calcext:value-type="string">
            <text:p>Bolsa</text:p>
          </table:table-cell>
          <table:table-cell table:style-name="ce21" office:value-type="string" calcext:value-type="string">
            <text:p>Commodity</text:p>
          </table:table-cell>
          <table:table-cell table:style-name="ce21" office:value-type="string" calcext:value-type="string">
            <text:p>Ticker</text:p>
          </table:table-cell>
          <table:table-cell table:style-name="ce22" office:value-type="string" calcext:value-type="string">
            <text:p>FV</text:p>
          </table:table-cell>
          <table:table-cell table:style-name="ce20"/>
          <table:table-cell table:style-name="ce21" office:value-type="string" calcext:value-type="string">
            <text:p>Commodity</text:p>
          </table:table-cell>
          <table:table-cell table:style-name="ce21" office:value-type="string" calcext:value-type="string">
            <text:p>Safra</text:p>
          </table:table-cell>
          <table:table-cell table:style-name="ce21" office:value-type="string" calcext:value-type="string">
            <text:p>Moeda</text:p>
          </table:table-cell>
          <table:table-cell table:style-name="ce21" office:value-type="string" calcext:value-type="string">
            <text:p>Praça</text:p>
          </table:table-cell>
          <table:table-cell table:style-name="ce21" office:value-type="string" calcext:value-type="string">
            <text:p>Chave</text:p>
          </table:table-cell>
          <table:table-cell table:style-name="ce24" office:value-type="string" calcext:value-type="string">
            <text:p>FV Commodity</text:p>
          </table:table-cell>
          <table:table-cell table:style-name="ce21" office:value-type="string" calcext:value-type="string">
            <text:p>Vcto</text:p>
          </table:table-cell>
          <table:table-cell table:style-name="ce20" table:number-columns-repeated="16367"/>
        </table:table-row>
        <table:table-row table:style-name="ro1">
          <table:table-cell office:value-type="string" calcext:value-type="string">
            <text:p>CBOT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ZSQ6</text:p>
          </table:table-cell>
          <table:table-cell office:value-type="float" office:value="11.225" calcext:value-type="float">
            <text:p>11,2250</text:p>
          </table:table-cell>
          <table:table-cell/>
          <table:table-cell table:style-name="ce2" office:value-type="string" calcext:value-type="string">
            <text:p>BMF</text:p>
          </table:table-cell>
          <table:table-cell table:style-name="ce2" office:value-type="string" calcext:value-type="string">
            <text:p>DOL</text:p>
          </table:table-cell>
          <table:table-cell table:style-name="ce5" table:formula="of:=TODAY()" office:value-type="date" office:date-value="2026-07-14" calcext:value-type="date">
            <text:p>14/7/2026</text:p>
          </table:table-cell>
          <table:table-cell table:style-name="ce18" office:value-type="float" office:value="5.1945" calcext:value-type="float">
            <text:p>5,1945</text:p>
          </table:table-cell>
          <table:table-cell/>
          <table:table-cell office:value-type="string" calcext:value-type="string">
            <text:p>Milho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Matupa</text:p>
          </table:table-cell>
          <table:table-cell table:formula="of:=COM.MICROSOFT.CONCAT([$Preços_MTM.$K4];&quot; &quot;;[$Preços_MTM.$L4];&quot; &quot;;[$Preços_MTM.$M4];&quot; &quot;;[$Preços_MTM.$N4])" office:value-type="string" office:string-value="Milho Safra Atual BRL Matupa" calcext:value-type="string">
            <text:p>Milho Safra Atual BRL Matupa</text:p>
          </table:table-cell>
          <table:table-cell office:value-type="float" office:value="44.4" calcext:value-type="float">
            <text:p>44,40</text:p>
          </table:table-cell>
          <table:table-cell table:style-name="ce5" office:value-type="date" office:date-value="2026-09-03" calcext:value-type="date">
            <text:p>3/9/2026</text:p>
          </table:table-cell>
          <table:table-cell table:style-name="Default" table:number-columns-repeated="16367"/>
        </table:table-row>
        <table:table-row table:style-name="ro1">
          <table:table-cell office:value-type="string" calcext:value-type="string">
            <text:p>BMF</text:p>
          </table:table-cell>
          <table:table-cell office:value-type="string" calcext:value-type="string">
            <text:p>Milho</text:p>
          </table:table-cell>
          <table:table-cell office:value-type="string" calcext:value-type="string">
            <text:p>CCMF27</text:p>
          </table:table-cell>
          <table:table-cell office:value-type="float" office:value="73.57" calcext:value-type="float">
            <text:p>73,5700</text:p>
          </table:table-cell>
          <table:table-cell/>
          <table:table-cell table:style-name="ce2" office:value-type="string" calcext:value-type="string">
            <text:p>BMF</text:p>
          </table:table-cell>
          <table:table-cell table:style-name="ce2" office:value-type="string" calcext:value-type="string">
            <text:p>DOL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8" office:value-type="float" office:value="5.1766" calcext:value-type="float">
            <text:p>5,1766</text:p>
          </table:table-cell>
          <table:table-cell/>
          <table:table-cell office:value-type="string" calcext:value-type="string">
            <text:p>Soja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Confresa</text:p>
          </table:table-cell>
          <table:table-cell table:formula="of:=COM.MICROSOFT.CONCAT([$Preços_MTM.$K5];&quot; &quot;;[$Preços_MTM.$L5];&quot; &quot;;[$Preços_MTM.$M5];&quot; &quot;;[$Preços_MTM.$N5])" office:value-type="string" office:string-value="Soja Safra Atual BRL Confresa" calcext:value-type="string">
            <text:p>Soja Safra Atual BRL Confresa</text:p>
          </table:table-cell>
          <table:table-cell office:value-type="float" office:value="105" calcext:value-type="float">
            <text:p>105,00</text:p>
          </table:table-cell>
          <table:table-cell table:style-name="ce5" office:value-type="date" office:date-value="2026-07-10" calcext:value-type="date">
            <text:p>10/7/2026</text:p>
          </table:table-cell>
          <table:table-cell table:style-name="Default" table:number-columns-repeated="16367"/>
        </table:table-row>
        <table:table-row table:style-name="ro1">
          <table:table-cell table:number-columns-repeated="10"/>
          <table:table-cell office:value-type="string" calcext:value-type="string">
            <text:p>Soja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Matupa</text:p>
          </table:table-cell>
          <table:table-cell table:formula="of:=COM.MICROSOFT.CONCAT([$Preços_MTM.$K6];&quot; &quot;;[$Preços_MTM.$L6];&quot; &quot;;[$Preços_MTM.$M6];&quot; &quot;;[$Preços_MTM.$N6])" office:value-type="string" office:string-value="Soja Safra Atual BRL Matupa" calcext:value-type="string">
            <text:p>Soja Safra Atual BRL Matupa</text:p>
          </table:table-cell>
          <table:table-cell office:value-type="float" office:value="107.6" calcext:value-type="float">
            <text:p>107,60</text:p>
          </table:table-cell>
          <table:table-cell table:style-name="ce5" office:value-type="date" office:date-value="2026-07-10" calcext:value-type="date">
            <text:p>10/7/2026</text:p>
          </table:table-cell>
          <table:table-cell table:style-name="Default" table:number-columns-repeated="16367"/>
        </table:table-row>
        <table:table-row table:style-name="ro1">
          <table:table-cell table:number-columns-repeated="10"/>
          <table:table-cell office:value-type="string" calcext:value-type="string">
            <text:p>Milho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Sacramento</text:p>
          </table:table-cell>
          <table:table-cell table:formula="of:=COM.MICROSOFT.CONCAT([$Preços_MTM.$K7];&quot; &quot;;[$Preços_MTM.$L7];&quot; &quot;;[$Preços_MTM.$M7];&quot; &quot;;[$Preços_MTM.$N7])" office:value-type="string" office:string-value="Milho Safra Atual BRL Sacramento" calcext:value-type="string">
            <text:p>Milho Safra Atual BRL Sacramento</text:p>
          </table:table-cell>
          <table:table-cell office:value-type="float" office:value="58" calcext:value-type="float">
            <text:p>58,00</text:p>
          </table:table-cell>
          <table:table-cell table:style-name="ce5" office:value-type="date" office:date-value="2026-07-15" calcext:value-type="date">
            <text:p>15/7/2026</text:p>
          </table:table-cell>
          <table:table-cell table:style-name="Default" table:number-columns-repeated="16367"/>
        </table:table-row>
        <table:table-row table:style-name="ro1" table:number-rows-repeated="1048568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</table:table>
      <table:table table:name="Op. Long_Basis_Liq" table:style-name="ta4">
        <office:forms form:automatic-focus="false" form:apply-design-mode="false"/>
        <table:table-column table:style-name="co5" table:number-columns-repeated="2" table:default-cell-style-name="ce5"/>
        <table:table-column table:style-name="co5" table:number-columns-repeated="5" table:default-cell-style-name="ce2"/>
        <table:table-column table:style-name="co13" table:number-columns-repeated="2" table:default-cell-style-name="ce2"/>
        <table:table-column table:style-name="co13" table:visibility="collapse" table:default-cell-style-name="ce2"/>
        <table:table-column table:style-name="co5" table:default-cell-style-name="ce2"/>
        <table:table-column table:style-name="co14" table:default-cell-style-name="ce2"/>
        <table:table-column table:style-name="co5" table:default-cell-style-name="ce2"/>
        <table:table-column table:style-name="co5" table:number-columns-repeated="2" table:default-cell-style-name="ce29"/>
        <table:table-column table:style-name="co5" table:number-columns-repeated="2" table:default-cell-style-name="ce2"/>
        <table:table-column table:style-name="co5" table:default-cell-style-name="ce5"/>
        <table:table-column table:style-name="co5" table:default-cell-style-name="ce23"/>
        <table:table-column table:style-name="co5" table:default-cell-style-name="ce5"/>
        <table:table-column table:style-name="co5" table:number-columns-repeated="3" table:default-cell-style-name="Default"/>
        <table:table-column table:style-name="co5" table:default-cell-style-name="ce34"/>
        <table:table-column table:style-name="co15" table:default-cell-style-name="ce35"/>
        <table:table-column table:style-name="co15" table:default-cell-style-name="ce38"/>
        <table:table-column table:style-name="co5" table:default-cell-style-name="ce40"/>
        <table:table-column table:style-name="co15" table:default-cell-style-name="ce35"/>
        <table:table-column table:style-name="co5" table:default-cell-style-name="Default"/>
        <table:table-column table:style-name="co15" table:default-cell-style-name="ce35"/>
        <table:table-column table:style-name="co5" table:default-cell-style-name="ce40"/>
        <table:table-column table:style-name="co5" table:default-cell-style-name="ce34"/>
        <table:table-column table:style-name="co5" table:default-cell-style-name="Default"/>
        <table:table-column table:style-name="co16" table:default-cell-style-name="Default"/>
        <table:table-column table:style-name="co5" table:default-cell-style-name="ce16"/>
        <table:table-column table:style-name="co5" table:number-columns-repeated="2" table:default-cell-style-name="ce40"/>
        <table:table-column table:style-name="co15" table:number-columns-repeated="4" table:default-cell-style-name="ce35"/>
        <table:table-column table:style-name="co15" table:default-cell-style-name="ce45"/>
        <table:table-column table:style-name="co15" table:default-cell-style-name="ce35"/>
        <table:table-column table:style-name="co17" table:number-columns-repeated="4" table:default-cell-style-name="ce48"/>
        <table:table-column table:style-name="co18" table:default-cell-style-name="Default"/>
        <table:table-column table:style-name="co18" table:visibility="collapse" table:number-columns-repeated="3" table:default-cell-style-name="Default"/>
        <table:table-column table:style-name="co18" table:number-columns-repeated="85"/>
        <table:table-column table:style-name="co1" table:number-columns-repeated="16248"/>
        <table:table-row table:style-name="ro1">
          <table:table-cell table:number-columns-repeated="51"/>
          <table:table-cell table:style-name="Default" table:number-columns-repeated="16333"/>
        </table:table-row>
        <table:table-row table:style-name="ro1">
          <table:table-cell>
            <draw:frame draw:z-index="1" draw:name="Imagem 2" draw:style-name="gr4" draw:text-style-name="P1" svg:width="3.301cm" svg:height="1.751cm" svg:x="0.5cm" svg:y="0.029cm">
              <draw:image xlink:href="Pictures/100000010000019600000196CD52D19B.png" xlink:type="simple" xlink:show="embed" xlink:actuate="onLoad" draw:mime-type="image/png">
                <text:p/>
              </draw:image>
              <svg:desc>Relfer – Estruturas Metálicas</svg:desc>
            </draw:frame>
          </table:table-cell>
          <table:table-cell table:number-columns-repeated="50"/>
          <table:table-cell table:style-name="Default" table:number-columns-repeated="16333"/>
        </table:table-row>
        <table:table-row table:style-name="ro1">
          <table:table-cell/>
          <table:table-cell>
            <draw:custom-shape draw:z-index="0" draw:name="CaixaDeTexto 1" draw:style-name="gr2" draw:text-style-name="P3" svg:width="6.828cm" svg:height="0.919cm" svg:x="1.953cm" svg:y="0.162cm">
              <text:p text:style-name="P2"><text:span text:style-name="T3">OPERAÇÃO DE </text:span><text:span text:style-name="T4">LONG BASI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  <table:table-cell table:style-name="Default" table:number-columns-repeated="16333"/>
        </table:table-row>
        <table:table-row table:style-name="ro1">
          <table:table-cell table:number-columns-repeated="51"/>
          <table:table-cell table:style-name="Default" table:number-columns-repeated="16333"/>
        </table:table-row>
        <table:table-row table:style-name="ro1">
          <table:table-cell table:style-name="ce25" table:number-columns-repeated="13"/>
          <table:table-cell table:style-name="ce30" table:formula="of:=SUBTOTAL(9;[$'Op. Long_Basis_Liq'.$N$7:.$N$13])" office:value-type="float" office:value="1426.60000000004" calcext:value-type="float">
            <text:p>1.426,60</text:p>
          </table:table-cell>
          <table:table-cell table:style-name="ce30"/>
          <table:table-cell table:style-name="ce25" table:number-columns-repeated="9"/>
          <table:table-cell table:style-name="ce36" table:formula="of:=SUBTOTAL(9;[$'Op. Long_Basis_Liq'.$Y$7:.$Y$13])" office:value-type="float" office:value="0" calcext:value-type="float">
            <text:p>0,00</text:p>
          </table:table-cell>
          <table:table-cell table:style-name="ce36"/>
          <table:table-cell table:style-name="ce25"/>
          <table:table-cell table:style-name="ce36"/>
          <table:table-cell table:style-name="ce25"/>
          <table:table-cell table:style-name="ce36" table:formula="of:=SUBTOTAL(9;[$'Op. Long_Basis_Liq'.$AD$7:.$AD$13])" office:value-type="float" office:value="0" calcext:value-type="float">
            <text:p>0,00</text:p>
          </table:table-cell>
          <table:table-cell table:style-name="ce25" table:number-columns-repeated="7"/>
          <table:table-cell table:style-name="ce36" table:formula="of:=SUBTOTAL(9;[$'Op. Long_Basis_Liq'.$AL$7:.$AL$13])" office:value-type="float" office:value="28649.768" calcext:value-type="float">
            <text:p>28.649,77</text:p>
          </table:table-cell>
          <table:table-cell table:style-name="ce36" table:formula="of:=SUBTOTAL(9;[$'Op. Long_Basis_Liq'.$AM$7:.$AM$13])" office:value-type="float" office:value="24397.2678749999" calcext:value-type="float">
            <text:p>24.397,27</text:p>
          </table:table-cell>
          <table:table-cell table:style-name="ce36" table:formula="of:=SUBTOTAL(9;[$'Op. Long_Basis_Liq'.$AN$7:.$AN$13])" office:value-type="float" office:value="32738.1851000001" calcext:value-type="float">
            <text:p>32.738,19</text:p>
          </table:table-cell>
          <table:table-cell table:style-name="ce36" table:formula="of:=SUBTOTAL(9;[$'Op. Long_Basis_Liq'.$AO$7:.$AO$13])" office:value-type="float" office:value="85785.220975" calcext:value-type="float">
            <text:p>85.785,22</text:p>
          </table:table-cell>
          <table:table-cell table:style-name="ce46"/>
          <table:table-cell table:style-name="ce36"/>
          <table:table-cell table:style-name="ce49" table:formula="of:=SUBTOTAL(9;[$'Op. Long_Basis_Liq'.$AR$7:.$AR$13])" office:value-type="float" office:value="-44785.4916185398" calcext:value-type="float">
            <text:p>-44.785,49</text:p>
          </table:table-cell>
          <table:table-cell table:style-name="ce49" table:formula="of:=SUBTOTAL(9;[$'Op. Long_Basis_Liq'.$AS$7:.$AS$13])" office:value-type="float" office:value="-27829.1763" calcext:value-type="float">
            <text:p>-27.829,18</text:p>
          </table:table-cell>
          <table:table-cell table:style-name="ce49" table:formula="of:=SUBTOTAL(9;[$'Op. Long_Basis_Liq'.$AT$7:.$AT$13])" office:value-type="float" office:value="-72614.6679185398" calcext:value-type="float">
            <text:p>-72.614,67</text:p>
          </table:table-cell>
          <table:table-cell table:style-name="ce49" table:formula="of:=SUBTOTAL(9;[$'Op. Long_Basis_Liq'.$AU$7:.$AU$13])" office:value-type="float" office:value="13170.5530564601" calcext:value-type="float">
            <text:p>13.170,55</text:p>
          </table:table-cell>
          <table:table-cell table:style-name="ce25" table:number-columns-repeated="16337"/>
        </table:table-row>
        <table:table-row table:style-name="ro2">
          <table:table-cell table:style-name="ce3" office:value-type="string" calcext:value-type="string">
            <text:p>ID Operação</text:p>
          </table:table-cell>
          <table:table-cell table:style-name="ce26" office:value-type="string" calcext:value-type="string">
            <text:p>Data</text:p>
          </table:table-cell>
          <table:table-cell table:style-name="ce3" office:value-type="string" calcext:value-type="string">
            <text:p>Status Comercial</text:p>
          </table:table-cell>
          <table:table-cell table:style-name="ce3" office:value-type="string" calcext:value-type="string">
            <text:p>Movimento</text:p>
          </table:table-cell>
          <table:table-cell table:style-name="ce3" office:value-type="string" calcext:value-type="string">
            <text:p>Vinculo</text:p>
          </table:table-cell>
          <table:table-cell table:style-name="ce3" office:value-type="string" calcext:value-type="string">
            <text:p>Operação</text:p>
          </table:table-cell>
          <table:table-cell table:style-name="ce3" office:value-type="string" calcext:value-type="string">
            <text:p>Empresa</text:p>
          </table:table-cell>
          <table:table-cell table:style-name="ce3" office:value-type="string" calcext:value-type="string">
            <text:p>Unidade</text:p>
          </table:table-cell>
          <table:table-cell table:style-name="ce3" office:value-type="string" calcext:value-type="string">
            <text:p>UF</text:p>
          </table:table-cell>
          <table:table-cell table:style-name="ce28" office:value-type="string" calcext:value-type="string">
            <text:p>Chave Empresa</text:p>
          </table:table-cell>
          <table:table-cell table:style-name="ce3" office:value-type="string" calcext:value-type="string">
            <text:p>N° Contrato</text:p>
          </table:table-cell>
          <table:table-cell table:style-name="ce3" office:value-type="string" calcext:value-type="string">
            <text:p>Contraparte</text:p>
          </table:table-cell>
          <table:table-cell table:style-name="ce3" office:value-type="string" calcext:value-type="string">
            <text:p>Commodity</text:p>
          </table:table-cell>
          <table:table-cell table:style-name="ce31" office:value-type="string" calcext:value-type="string">
            <text:p>Vol Kgs</text:p>
          </table:table-cell>
          <table:table-cell table:style-name="ce31" office:value-type="string" calcext:value-type="string">
            <text:p>Vol Sacas</text:p>
          </table:table-cell>
          <table:table-cell table:style-name="ce3" office:value-type="string" calcext:value-type="string">
            <text:p>Safra</text:p>
          </table:table-cell>
          <table:table-cell table:style-name="ce3" office:value-type="string" calcext:value-type="string">
            <text:p>Moeda</text:p>
          </table:table-cell>
          <table:table-cell table:style-name="ce26" office:value-type="string" calcext:value-type="string">
            <text:p>Posição Entrega</text:p>
          </table:table-cell>
          <table:table-cell table:style-name="ce32" office:value-type="string" calcext:value-type="string">
            <text:p>Preço Negociado</text:p>
          </table:table-cell>
          <table:table-cell table:style-name="ce26" office:value-type="string" calcext:value-type="string">
            <text:p>Vcto</text:p>
          </table:table-cell>
          <table:table-cell table:style-name="ce3" office:value-type="string" calcext:value-type="string">
            <text:p>ID Derivativo Commo</text:p>
          </table:table-cell>
          <table:table-cell table:style-name="ce3" office:value-type="string" calcext:value-type="string">
            <text:p>Bolsa</text:p>
          </table:table-cell>
          <table:table-cell table:style-name="ce3" office:value-type="string" calcext:value-type="string">
            <text:p>Ticker</text:p>
          </table:table-cell>
          <table:table-cell table:style-name="ce26" office:value-type="string" calcext:value-type="string">
            <text:p>Vcto Ticker</text:p>
          </table:table-cell>
          <table:table-cell table:style-name="ce37" office:value-type="string" calcext:value-type="string">
            <text:p>Qtdy Lotes</text:p>
          </table:table-cell>
          <table:table-cell table:style-name="ce39" office:value-type="string" calcext:value-type="string">
            <text:p>Vol Kgs 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Exposição Kgs</text:p>
          </table:table-cell>
          <table:table-cell table:style-name="ce3" office:value-type="string" calcext:value-type="string">
            <text:p>ID NDF</text:p>
          </table:table-cell>
          <table:table-cell table:style-name="ce37" office:value-type="string" calcext:value-type="string">
            <text:p>Notional</text:p>
          </table:table-cell>
          <table:table-cell table:style-name="ce41" office:value-type="string" calcext:value-type="string">
            <text:p>Strike NDF</text:p>
          </table:table-cell>
          <table:table-cell table:style-name="ce26" office:value-type="string" calcext:value-type="string">
            <text:p>Vcto NDF</text:p>
          </table:table-cell>
          <table:table-cell table:style-name="ce3" office:value-type="string" calcext:value-type="string">
            <text:p>Operação Vinculada</text:p>
          </table:table-cell>
          <table:table-cell table:style-name="ce43" office:value-type="string" calcext:value-type="string">
            <text:p>Chave MTM</text:p>
          </table:table-cell>
          <table:table-cell table:style-name="ce32" office:value-type="string" calcext:value-type="string">
            <text:p>FV Commodity</text:p>
          </table:table-cell>
          <table:table-cell table:style-name="ce41" office:value-type="string" calcext:value-type="string">
            <text:p>FV Bolsa</text:p>
          </table:table-cell>
          <table:table-cell table:style-name="ce41" office:value-type="string" calcext:value-type="string">
            <text:p>FV NDF</text:p>
          </table:table-cell>
          <table:table-cell table:style-name="ce37" office:value-type="string" calcext:value-type="string">
            <text:p>MTM Físico</text:p>
          </table:table-cell>
          <table:table-cell table:style-name="ce37" office:value-type="string" calcext:value-type="string">
            <text:p>MTM Bolsa</text:p>
          </table:table-cell>
          <table:table-cell table:style-name="ce37" office:value-type="string" calcext:value-type="string">
            <text:p>MTM Dolar</text:p>
          </table:table-cell>
          <table:table-cell table:style-name="ce44" office:value-type="string" calcext:value-type="string">
            <text:p>MTM Total</text:p>
          </table:table-cell>
          <table:table-cell table:style-name="ce47" office:value-type="string" calcext:value-type="string">
            <text:p>Taxa Juros</text:p>
          </table:table-cell>
          <table:table-cell table:style-name="ce44" office:value-type="string" calcext:value-type="string">
            <text:p>Juros do Período MTM</text:p>
          </table:table-cell>
          <table:table-cell table:style-name="ce50" office:value-type="string" calcext:value-type="string">
            <text:p>Custo Financeiro Estimado</text:p>
          </table:table-cell>
          <table:table-cell table:style-name="ce50" office:value-type="string" calcext:value-type="string">
            <text:p>Outros Custos Estimados</text:p>
          </table:table-cell>
          <table:table-cell table:style-name="ce50" office:value-type="string" calcext:value-type="string">
            <text:p>Custo Total</text:p>
          </table:table-cell>
          <table:table-cell table:style-name="ce50" office:value-type="string" calcext:value-type="string">
            <text:p>MTM Líquido</text:p>
          </table:table-cell>
          <table:table-cell table:style-name="ce3" office:value-type="string" calcext:value-type="string">
            <text:p>Identificação Operação</text:p>
          </table:table-cell>
          <table:table-cell table:style-name="ce43" office:value-type="string" calcext:value-type="string">
            <text:p>Ponderação Preço Físico</text:p>
          </table:table-cell>
          <table:table-cell table:style-name="ce43" office:value-type="string" calcext:value-type="string">
            <text:p>Ponderação Preço Bolsa</text:p>
          </table:table-cell>
          <table:table-cell table:style-name="ce43" office:value-type="string" calcext:value-type="string">
            <text:p>Ponderação Preço Dolar</text:p>
          </table:table-cell>
        </table:table-row>
        <table:table-row table:style-name="ro1">
          <table:table-cell office:value-type="string" calcext:value-type="string">
            <text:p>LB2</text:p>
          </table:table-cell>
          <table:table-cell office:value-type="date" office:date-value="2026-02-12" calcext:value-type="date">
            <text:p>12/2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Compra</text:p>
          </table:table-cell>
          <table:table-cell table:style-name="ce27" office:value-type="string" calcext:value-type="string">
            <text:p>Intergrãos</text:p>
          </table:table-cell>
          <table:table-cell office:value-type="string" calcext:value-type="string">
            <text:p>Confres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Liq'.$G7];&quot; &quot;;[$'Op. Long_Basis_Liq'.$I7])" office:value-type="string" office:string-value="Intergrãos MT" calcext:value-type="string">
            <text:p>Intergrãos MT</text:p>
          </table:table-cell>
          <table:table-cell/>
          <table:table-cell office:value-type="string" calcext:value-type="string">
            <text:p>CLEBER DE ARAÚJO MASSING</text:p>
          </table:table-cell>
          <table:table-cell office:value-type="string" calcext:value-type="string">
            <text:p>Soja</text:p>
          </table:table-cell>
          <table:table-cell office:value-type="float" office:value="120000" calcext:value-type="float">
            <text:p>120.000</text:p>
          </table:table-cell>
          <table:table-cell table:formula="of:=[$'Op. Long_Basis_Liq'.$N7]/60" office:value-type="float" office:value="2000" calcext:value-type="float">
            <text:p>2.000</text:p>
          </table:table-cell>
          <table:table-cell office:value-type="string" calcext:value-type="string">
            <text:p>Safra Atual</text:p>
          </table:table-cell>
          <table:table-cell table:style-name="ce27" office:value-type="string" calcext:value-type="string">
            <text:p>BRL</text:p>
          </table:table-cell>
          <table:table-cell office:value-type="date" office:date-value="2026-02-28" calcext:value-type="date">
            <text:p>28/2/2026</text:p>
          </table:table-cell>
          <table:table-cell office:value-type="float" office:value="105" calcext:value-type="float">
            <text:p>105,00</text:p>
          </table:table-cell>
          <table:table-cell office:value-type="date" office:date-value="2026-03-31" calcext:value-type="date">
            <text:p>31/3/2026</text:p>
          </table:table-cell>
          <table:table-cell table:style-name="ce2" office:value-type="string" calcext:value-type="string">
            <text:p>F2</text:p>
          </table:table-cell>
          <table:table-cell table:style-name="ce33" table:formula="of:=COM.MICROSOFT.XLOOKUP([$'Op. Long_Basis_Liq'.$U7];[$Analítico_Deriv.A:.A];[$Analítico_Deriv.S:.S])" office:value-type="string" office:string-value="CBOT" calcext:value-type="string">
            <text:p>CBOT</text:p>
          </table:table-cell>
          <table:table-cell table:style-name="ce33" table:formula="of:=COM.MICROSOFT.XLOOKUP([$'Op. Long_Basis_Liq'.$U7];[$Analítico_Deriv.A:.A];[$Analítico_Deriv.T:.T])" office:value-type="string" office:string-value="ZSQ6" calcext:value-type="string">
            <text:p>ZSQ6</text:p>
          </table:table-cell>
          <table:table-cell table:style-name="ce5" table:formula="of:=COM.MICROSOFT.XLOOKUP([$'Op. Long_Basis_Liq'.$U7];[$Analítico_Deriv.A:.A];[$Analítico_Deriv.V:.V])" office:value-type="date" office:date-value="2026-08-14" calcext:value-type="date">
            <text:p>14/8/2026</text:p>
          </table:table-cell>
          <table:table-cell table:formula="of:=IF([$'Op. Long_Basis_Liq'.$D7]=&quot;Entrada&quot;;COM.MICROSOFT.XLOOKUP([$'Op. Long_Basis_Liq'.$U7];[$Analítico_Deriv.A:.A];[$Analítico_Deriv.R:.R]);IF([$'Op. Long_Basis_Liq'.$D7]=&quot;Saída&quot;;&quot;PREENCHER&quot;;&quot;VALIDAR&quot;))" office:value-type="float" office:value="-0.88" calcext:value-type="float">
            <text:p>-0,88</text:p>
          </table:table-cell>
          <table:table-cell table:formula="of:=IF([$'Op. Long_Basis_Liq'.$D7]=&quot;Entrada&quot;;COM.MICROSOFT.XLOOKUP([$'Op. Long_Basis_Liq'.$U7];[$Analítico_Deriv.A:.A];[$Analítico_Deriv.AE:.AE]);IF([$'Op. Long_Basis_Liq'.$D7]=&quot;Saída&quot;;&quot;PREENCHER&quot;;&quot;VALIDAR&quot;))" office:value-type="float" office:value="-119748.64" calcext:value-type="float">
            <text:p>-119.749</text:p>
          </table:table-cell>
          <table:table-cell table:style-name="ce18" table:formula="of:=COM.MICROSOFT.XLOOKUP([$'Op. Long_Basis_Liq'.$U7];[$Analítico_Deriv.A:.A];[$Analítico_Deriv.U:.U])" office:value-type="float" office:value="11.477" calcext:value-type="float">
            <text:p>11,4770</text:p>
          </table:table-cell>
          <table:table-cell table:formula="of:=[$'Op. Long_Basis_Liq'.$N7]+[$'Op. Long_Basis_Liq'.$Z7]" office:value-type="float" office:value="251.360000000001" calcext:value-type="float">
            <text:p>251,36</text:p>
          </table:table-cell>
          <table:table-cell table:style-name="ce42" office:value-type="string" calcext:value-type="string">
            <text:p>F10</text:p>
          </table:table-cell>
          <table:table-cell table:formula="of:=IF([$'Op. Long_Basis_Liq'.$D7]=&quot;Entrada&quot;;IFERROR(COM.MICROSOFT.XLOOKUP([$'Op. Long_Basis_Liq'.$AC7];[$Analítico_Deriv.A:.A];[$Analítico_Deriv.X:.X]);0);IF([$'Op. Long_Basis_Liq'.$D7]=&quot;Saída&quot;;&quot;PREENCHER&quot;;&quot;VALIDAR&quot;))" office:value-type="float" office:value="-39330" calcext:value-type="float">
            <text:p>-39.330,00</text:p>
          </table:table-cell>
          <table:table-cell table:style-name="ce18" table:formula="of:=IFERROR(COM.MICROSOFT.XLOOKUP([$'Op. Long_Basis_Liq'.$AC7];[$Analítico_Deriv.A:.A];[$Analítico_Deriv.U:.U]);0)" office:value-type="float" office:value="5.3401" calcext:value-type="float">
            <text:p>5,3401</text:p>
          </table:table-cell>
          <table:table-cell table:style-name="ce5" table:formula="of:=IFERROR(COM.MICROSOFT.XLOOKUP([$'Op. Long_Basis_Liq'.$AC7];[$Analítico_Deriv.A:.A];[$Analítico_Deriv.V:.V]);0)" office:value-type="date" office:date-value="2026-06-30" calcext:value-type="date">
            <text:p>30/6/2026</text:p>
          </table:table-cell>
          <table:table-cell table:style-name="ce42" table:formula="of:=COM.MICROSOFT.XLOOKUP([$'Op. Long_Basis_Liq'.$U7];[$Analítico_Deriv.A:.A];[$Analítico_Deriv.AI:.AI])" office:value-type="string" office:string-value="LB-Soja-26" calcext:value-type="string">
            <text:p>LB-Soja-26</text:p>
          </table:table-cell>
          <table:table-cell table:style-name="ce42" table:formula="of:=COM.MICROSOFT.CONCAT([$'Op. Long_Basis_Liq'.$M7];&quot; &quot;;[$'Op. Long_Basis_Liq'.$P7];&quot; &quot;;[$'Op. Long_Basis_Liq'.$Q7];&quot; &quot;;[$'Op. Long_Basis_Liq'.$H7])" office:value-type="string" office:string-value="Soja Safra Atual BRL Confresa" calcext:value-type="string">
            <text:p>Soja Safra Atual BRL Confresa</text:p>
          </table:table-cell>
          <table:table-cell table:style-name="ce23" table:formula="of:=IFERROR(COM.MICROSOFT.XLOOKUP([$'Op. Long_Basis_Liq'.$AH7];[$Preços_MTM.O:.O];[$Preços_MTM.P:.P]);0)" office:value-type="float" office:value="105" calcext:value-type="float">
            <text:p>105,00</text:p>
          </table:table-cell>
          <table:table-cell table:style-name="ce18" table:formula="of:=IFERROR(COM.MICROSOFT.XLOOKUP([$'Op. Long_Basis_Liq'.$W7];[$Preços_MTM.C:.C];[$Preços_MTM.D:.D]);0)" office:value-type="float" office:value="11.225" calcext:value-type="float">
            <text:p>11,2250</text:p>
          </table:table-cell>
          <table:table-cell table:style-name="ce18" table:formula="of:=IFERROR(COM.MICROSOFT.XLOOKUP([$'Op. Long_Basis_Liq'.$AF7];[$Preços_MTM.H:.H];[$Preços_MTM.I:.I]);0)" office:value-type="float" office:value="5.1766" calcext:value-type="float">
            <text:p>5,1766</text:p>
          </table:table-cell>
          <table:table-cell table:formula="of:=IF([$'Op. Long_Basis_Liq'.$Q7]=&quot;BRL&quot;;([$'Op. Long_Basis_Liq'.$AI7]-[$'Op. Long_Basis_Liq'.$S7])*[$'Op. Long_Basis_Liq'.$O7];IF([$'Op. Long_Basis_Liq'.$Q7]=&quot;USD&quot;;([$'Op. Long_Basis_Liq'.$AI7]-[$'Op. Long_Basis_Liq'.$S7])*[$'Op. Long_Basis_Liq'.$O7]*COM.MICROSOFT.XLOOKUP([$'Op. Long_Basis_Liq'.$T7];[$Preços_MTM.H:.H];[$Preços_MTM.I:.I])))" office:value-type="float" office:value="0" calcext:value-type="float">
            <text:p>0,00</text:p>
          </table:table-cell>
          <table:table-cell table:formula="of:=IF([$'Op. Long_Basis_Liq'.$V7]=&quot;CBOT&quot;;([$'Op. Long_Basis_Liq'.$AJ7]-[$'Op. Long_Basis_Liq'.$AA7])*5000*[$'Op. Long_Basis_Liq'.$Y7]*[$Preços_MTM.$I$4];IF([$'Op. Long_Basis_Liq'.$V7]=&quot;BMF&quot;;([$'Op. Long_Basis_Liq'.$AJ7]-[$'Op. Long_Basis_Liq'.$AA7])*450*[$'Op. Long_Basis_Liq'.$Y7];&quot;VERIFICAR&quot;))" office:value-type="float" office:value="5759.66160000002" calcext:value-type="float">
            <text:p>5.759,66</text:p>
          </table:table-cell>
          <table:table-cell table:formula="of:=([$'Op. Long_Basis_Liq'.$AK7]-[$'Op. Long_Basis_Liq'.$AE7])*[$'Op. Long_Basis_Liq'.$AD7]" office:value-type="float" office:value="6430.455" calcext:value-type="float">
            <text:p>6.430,46</text:p>
          </table:table-cell>
          <table:table-cell table:formula="of:=SUM([$'Op. Long_Basis_Liq'.$AL7:.$AN7])" office:value-type="float" office:value="12190.1166" calcext:value-type="float">
            <text:p>12.190,12</text:p>
          </table:table-cell>
          <table:table-cell office:value-type="percentage" office:value="0.014" calcext:value-type="percentage">
            <text:p>1,40%</text:p>
          </table:table-cell>
          <table:table-cell table:formula="of:=IF([$'Op. Long_Basis_Liq'.$D7]=&quot;Entrada&quot;;([$'Op. Long_Basis_Liq'.$S7]*(1+[$'Op. Long_Basis_Liq'.$AP7])^(((COM.MICROSOFT.XLOOKUP([$'Op. Long_Basis_Liq'.$AH7];[$Preços_MTM.O:.O];[$Preços_MTM.Q:.Q]))-[$'Op. Long_Basis_Liq'.$T7])/30))-[$'Op. Long_Basis_Liq'.$S7];IF([$'Op. Long_Basis_Liq'.$D7]=&quot;Saída&quot;;0;&quot;VALIDAR&quot;))" office:value-type="float" office:value="5.03151200721612" calcext:value-type="float">
            <text:p>5,03</text:p>
          </table:table-cell>
          <table:table-cell table:style-name="ce51" table:formula="of:=[$'Op. Long_Basis_Liq'.$AQ7]*[$'Op. Long_Basis_Liq'.$O7]*-1" office:value-type="float" office:value="-10063.0240144322" calcext:value-type="float">
            <text:p>-10.063,02</text:p>
          </table:table-cell>
          <table:table-cell table:style-name="ce51" table:formula="of:=((3*[$'Op. Long_Basis_Liq'.$O7])+(0.3*[$'Op. Long_Basis_Liq'.$O7])+(0.03*[$'Op. Long_Basis_Liq'.$O7]))*-1" office:value-type="float" office:value="-6660" calcext:value-type="float">
            <text:p>-6.660,00</text:p>
          </table:table-cell>
          <table:table-cell table:style-name="ce51" table:formula="of:=SUM([$'Op. Long_Basis_Liq'.$AR7:.$AS7])" office:value-type="float" office:value="-16723.0240144322" calcext:value-type="float">
            <text:p>-16.723,02</text:p>
          </table:table-cell>
          <table:table-cell table:style-name="ce51" table:formula="of:=SUM([$'Op. Long_Basis_Liq'.$AS7];[$'Op. Long_Basis_Liq'.$AR7];[$'Op. Long_Basis_Liq'.$AO7])" office:value-type="float" office:value="-4532.90741443223" calcext:value-type="float">
            <text:p>-4.532,91</text:p>
          </table:table-cell>
          <table:table-cell table:style-name="ce23" office:value-type="string" calcext:value-type="string">
            <text:p>OP1</text:p>
          </table:table-cell>
          <table:table-cell table:style-name="ce23" table:formula="of:=[$'Op. Long_Basis_Liq'.$S7]*[$'Op. Long_Basis_Liq'.$O7]" office:value-type="float" office:value="210000" calcext:value-type="float">
            <text:p>210.000,00</text:p>
          </table:table-cell>
          <table:table-cell table:style-name="ce23" table:formula="of:=[$'Op. Long_Basis_Liq'.$Y7]*[$'Op. Long_Basis_Liq'.$AA7]" office:value-type="float" office:value="-10.09976" calcext:value-type="float">
            <text:p>-10,10</text:p>
          </table:table-cell>
          <table:table-cell table:style-name="ce23" table:formula="of:=[$'Op. Long_Basis_Liq'.$AE7]*[$'Op. Long_Basis_Liq'.$AD7]" office:value-type="float" office:value="-210026.133" calcext:value-type="float">
            <text:p>-210.026,13</text:p>
          </table:table-cell>
          <table:table-cell table:style-name="Default" table:number-columns-repeated="16333"/>
        </table:table-row>
        <table:table-row table:style-name="ro1">
          <table:table-cell office:value-type="string" calcext:value-type="string">
            <text:p>LB3</text:p>
          </table:table-cell>
          <table:table-cell office:value-type="date" office:date-value="2026-02-13" calcext:value-type="date">
            <text:p>13/2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Compra</text:p>
          </table:table-cell>
          <table:table-cell table:style-name="ce27" office:value-type="string" calcext:value-type="string">
            <text:p>Intergrãos</text:p>
          </table:table-cell>
          <table:table-cell office:value-type="string" calcext:value-type="string">
            <text:p>Confres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Liq'.$G8];&quot; &quot;;[$'Op. Long_Basis_Liq'.$I8])" office:value-type="string" office:string-value="Intergrãos MT" calcext:value-type="string">
            <text:p>Intergrãos MT</text:p>
          </table:table-cell>
          <table:table-cell/>
          <table:table-cell office:value-type="string" calcext:value-type="string">
            <text:p>BUENO AGROMERCANTIL</text:p>
          </table:table-cell>
          <table:table-cell office:value-type="string" calcext:value-type="string">
            <text:p>Soja</text:p>
          </table:table-cell>
          <table:table-cell office:value-type="float" office:value="148126.8" calcext:value-type="float">
            <text:p>148.127</text:p>
          </table:table-cell>
          <table:table-cell table:formula="of:=[$'Op. Long_Basis_Liq'.$N8]/60" office:value-type="float" office:value="2468.78" calcext:value-type="float">
            <text:p>2.469</text:p>
          </table:table-cell>
          <table:table-cell office:value-type="string" calcext:value-type="string">
            <text:p>Safra Atual</text:p>
          </table:table-cell>
          <table:table-cell table:style-name="ce27" office:value-type="string" calcext:value-type="string">
            <text:p>BRL</text:p>
          </table:table-cell>
          <table:table-cell office:value-type="date" office:date-value="2026-02-28" calcext:value-type="date">
            <text:p>28/2/2026</text:p>
          </table:table-cell>
          <table:table-cell office:value-type="float" office:value="101" calcext:value-type="float">
            <text:p>101,00</text:p>
          </table:table-cell>
          <table:table-cell office:value-type="date" office:date-value="2026-02-24" calcext:value-type="date">
            <text:p>24/2/2026</text:p>
          </table:table-cell>
          <table:table-cell table:style-name="ce2" office:value-type="string" calcext:value-type="string">
            <text:p>F3</text:p>
          </table:table-cell>
          <table:table-cell table:style-name="ce33" table:formula="of:=COM.MICROSOFT.XLOOKUP([$'Op. Long_Basis_Liq'.$U8];[$Analítico_Deriv.A:.A];[$Analítico_Deriv.S:.S])" office:value-type="string" office:string-value="CBOT" calcext:value-type="string">
            <text:p>CBOT</text:p>
          </table:table-cell>
          <table:table-cell table:style-name="ce33" table:formula="of:=COM.MICROSOFT.XLOOKUP([$'Op. Long_Basis_Liq'.$U8];[$Analítico_Deriv.A:.A];[$Analítico_Deriv.T:.T])" office:value-type="string" office:string-value="ZSQ6" calcext:value-type="string">
            <text:p>ZSQ6</text:p>
          </table:table-cell>
          <table:table-cell table:style-name="ce5" table:formula="of:=COM.MICROSOFT.XLOOKUP([$'Op. Long_Basis_Liq'.$U8];[$Analítico_Deriv.A:.A];[$Analítico_Deriv.V:.V])" office:value-type="date" office:date-value="2026-08-14" calcext:value-type="date">
            <text:p>14/8/2026</text:p>
          </table:table-cell>
          <table:table-cell table:formula="of:=IF([$'Op. Long_Basis_Liq'.$D8]=&quot;Entrada&quot;;COM.MICROSOFT.XLOOKUP([$'Op. Long_Basis_Liq'.$U8];[$Analítico_Deriv.A:.A];[$Analítico_Deriv.R:.R]);IF([$'Op. Long_Basis_Liq'.$D8]=&quot;Saída&quot;;&quot;PREENCHER&quot;;&quot;VALIDAR&quot;))" office:value-type="float" office:value="-1.09" calcext:value-type="float">
            <text:p>-1,09</text:p>
          </table:table-cell>
          <table:table-cell table:formula="of:=IF([$'Op. Long_Basis_Liq'.$D8]=&quot;Entrada&quot;;COM.MICROSOFT.XLOOKUP([$'Op. Long_Basis_Liq'.$U8];[$Analítico_Deriv.A:.A];[$Analítico_Deriv.AE:.AE]);IF([$'Op. Long_Basis_Liq'.$D8]=&quot;Saída&quot;;&quot;PREENCHER&quot;;&quot;VALIDAR&quot;))" office:value-type="float" office:value="-148325.02" calcext:value-type="float">
            <text:p>-148.325</text:p>
          </table:table-cell>
          <table:table-cell table:style-name="ce18" table:formula="of:=COM.MICROSOFT.XLOOKUP([$'Op. Long_Basis_Liq'.$U8];[$Analítico_Deriv.A:.A];[$Analítico_Deriv.U:.U])" office:value-type="float" office:value="11.487" calcext:value-type="float">
            <text:p>11,4870</text:p>
          </table:table-cell>
          <table:table-cell table:formula="of:=[$'Op. Long_Basis_Liq'.$N8]+[$'Op. Long_Basis_Liq'.$Z8]" office:value-type="float" office:value="-198.220000000001" calcext:value-type="float">
            <text:p>-198,22</text:p>
          </table:table-cell>
          <table:table-cell table:style-name="ce42" office:value-type="string" calcext:value-type="string">
            <text:p>F11</text:p>
          </table:table-cell>
          <table:table-cell table:formula="of:=IF([$'Op. Long_Basis_Liq'.$D8]=&quot;Entrada&quot;;IFERROR(COM.MICROSOFT.XLOOKUP([$'Op. Long_Basis_Liq'.$AC8];[$Analítico_Deriv.A:.A];[$Analítico_Deriv.X:.X]);0);IF([$'Op. Long_Basis_Liq'.$D8]=&quot;Saída&quot;;&quot;PREENCHER&quot;;&quot;VALIDAR&quot;))" office:value-type="float" office:value="-46650" calcext:value-type="float">
            <text:p>-46.650,00</text:p>
          </table:table-cell>
          <table:table-cell table:style-name="ce18" table:formula="of:=IFERROR(COM.MICROSOFT.XLOOKUP([$'Op. Long_Basis_Liq'.$AC8];[$Analítico_Deriv.A:.A];[$Analítico_Deriv.U:.U]);0)" office:value-type="float" office:value="5.3628" calcext:value-type="float">
            <text:p>5,3628</text:p>
          </table:table-cell>
          <table:table-cell table:style-name="ce5" table:formula="of:=IFERROR(COM.MICROSOFT.XLOOKUP([$'Op. Long_Basis_Liq'.$AC8];[$Analítico_Deriv.A:.A];[$Analítico_Deriv.V:.V]);0)" office:value-type="date" office:date-value="2026-06-30" calcext:value-type="date">
            <text:p>30/6/2026</text:p>
          </table:table-cell>
          <table:table-cell table:style-name="ce42" table:formula="of:=COM.MICROSOFT.XLOOKUP([$'Op. Long_Basis_Liq'.$U8];[$Analítico_Deriv.A:.A];[$Analítico_Deriv.AI:.AI])" office:value-type="string" office:string-value="LB-Soja-26" calcext:value-type="string">
            <text:p>LB-Soja-26</text:p>
          </table:table-cell>
          <table:table-cell table:style-name="ce42" table:formula="of:=COM.MICROSOFT.CONCAT([$'Op. Long_Basis_Liq'.$M8];&quot; &quot;;[$'Op. Long_Basis_Liq'.$P8];&quot; &quot;;[$'Op. Long_Basis_Liq'.$Q8];&quot; &quot;;[$'Op. Long_Basis_Liq'.$H8])" office:value-type="string" office:string-value="Soja Safra Atual BRL Confresa" calcext:value-type="string">
            <text:p>Soja Safra Atual BRL Confresa</text:p>
          </table:table-cell>
          <table:table-cell table:style-name="ce23" table:formula="of:=IFERROR(COM.MICROSOFT.XLOOKUP([$'Op. Long_Basis_Liq'.$AH8];[$Preços_MTM.O:.O];[$Preços_MTM.P:.P]);0)" office:value-type="float" office:value="105" calcext:value-type="float">
            <text:p>105,00</text:p>
          </table:table-cell>
          <table:table-cell table:style-name="ce18" table:formula="of:=IFERROR(COM.MICROSOFT.XLOOKUP([$'Op. Long_Basis_Liq'.$W8];[$Preços_MTM.C:.C];[$Preços_MTM.D:.D]);0)" office:value-type="float" office:value="11.225" calcext:value-type="float">
            <text:p>11,2250</text:p>
          </table:table-cell>
          <table:table-cell table:style-name="ce18" table:formula="of:=IFERROR(COM.MICROSOFT.XLOOKUP([$'Op. Long_Basis_Liq'.$AF8];[$Preços_MTM.H:.H];[$Preços_MTM.I:.I]);0)" office:value-type="float" office:value="5.1766" calcext:value-type="float">
            <text:p>5,1766</text:p>
          </table:table-cell>
          <table:table-cell table:formula="of:=IF([$'Op. Long_Basis_Liq'.$Q8]=&quot;BRL&quot;;([$'Op. Long_Basis_Liq'.$AI8]-[$'Op. Long_Basis_Liq'.$S8])*[$'Op. Long_Basis_Liq'.$O8];IF([$'Op. Long_Basis_Liq'.$Q8]=&quot;USD&quot;;([$'Op. Long_Basis_Liq'.$AI8]-[$'Op. Long_Basis_Liq'.$S8])*[$'Op. Long_Basis_Liq'.$O8]*COM.MICROSOFT.XLOOKUP([$'Op. Long_Basis_Liq'.$T8];[$Preços_MTM.H:.H];[$Preços_MTM.I:.I])))" office:value-type="float" office:value="9875.12" calcext:value-type="float">
            <text:p>9.875,12</text:p>
          </table:table-cell>
          <table:table-cell table:formula="of:=IF([$'Op. Long_Basis_Liq'.$V8]=&quot;CBOT&quot;;([$'Op. Long_Basis_Liq'.$AJ8]-[$'Op. Long_Basis_Liq'.$AA8])*5000*[$'Op. Long_Basis_Liq'.$Y8]*[$Preços_MTM.$I$4];IF([$'Op. Long_Basis_Liq'.$V8]=&quot;BMF&quot;;([$'Op. Long_Basis_Liq'.$AJ8]-[$'Op. Long_Basis_Liq'.$AA8])*450*[$'Op. Long_Basis_Liq'.$Y8];&quot;VERIFICAR&quot;))" office:value-type="float" office:value="7417.22655000001" calcext:value-type="float">
            <text:p>7.417,23</text:p>
          </table:table-cell>
          <table:table-cell table:formula="of:=([$'Op. Long_Basis_Liq'.$AK8]-[$'Op. Long_Basis_Liq'.$AE8])*[$'Op. Long_Basis_Liq'.$AD8]" office:value-type="float" office:value="8686.23000000002" calcext:value-type="float">
            <text:p>8.686,23</text:p>
          </table:table-cell>
          <table:table-cell table:formula="of:=SUM([$'Op. Long_Basis_Liq'.$AL8:.$AN8])" office:value-type="float" office:value="25978.57655" calcext:value-type="float">
            <text:p>25.978,58</text:p>
          </table:table-cell>
          <table:table-cell office:value-type="percentage" office:value="0.014" calcext:value-type="percentage">
            <text:p>1,40%</text:p>
          </table:table-cell>
          <table:table-cell table:formula="of:=IF([$'Op. Long_Basis_Liq'.$D8]=&quot;Entrada&quot;;([$'Op. Long_Basis_Liq'.$S8]*(1+[$'Op. Long_Basis_Liq'.$AP8])^(((COM.MICROSOFT.XLOOKUP([$'Op. Long_Basis_Liq'.$AH8];[$Preços_MTM.O:.O];[$Preços_MTM.Q:.Q]))-[$'Op. Long_Basis_Liq'.$T8])/30))-[$'Op. Long_Basis_Liq'.$S8];IF([$'Op. Long_Basis_Liq'.$D8]=&quot;Saída&quot;;0;&quot;VALIDAR&quot;))" office:value-type="float" office:value="6.57056171373114" calcext:value-type="float">
            <text:p>6,57</text:p>
          </table:table-cell>
          <table:table-cell table:style-name="ce51" table:formula="of:=[$'Op. Long_Basis_Liq'.$AQ8]*[$'Op. Long_Basis_Liq'.$O8]*-1" office:value-type="float" office:value="-16221.2713476252" calcext:value-type="float">
            <text:p>-16.221,27</text:p>
          </table:table-cell>
          <table:table-cell table:style-name="ce51" table:formula="of:=((3*[$'Op. Long_Basis_Liq'.$O8])+(0.3*[$'Op. Long_Basis_Liq'.$O8])+(0.03*[$'Op. Long_Basis_Liq'.$O8]))*-1" office:value-type="float" office:value="-8221.0374" calcext:value-type="float">
            <text:p>-8.221,04</text:p>
          </table:table-cell>
          <table:table-cell table:style-name="ce51" table:formula="of:=SUM([$'Op. Long_Basis_Liq'.$AR8:.$AS8])" office:value-type="float" office:value="-24442.3087476252" calcext:value-type="float">
            <text:p>-24.442,31</text:p>
          </table:table-cell>
          <table:table-cell table:style-name="ce51" table:formula="of:=SUM([$'Op. Long_Basis_Liq'.$AS8];[$'Op. Long_Basis_Liq'.$AR8];[$'Op. Long_Basis_Liq'.$AO8])" office:value-type="float" office:value="1536.26780237487" calcext:value-type="float">
            <text:p>1.536,27</text:p>
          </table:table-cell>
          <table:table-cell table:style-name="ce23" office:value-type="string" calcext:value-type="string">
            <text:p>OP1</text:p>
          </table:table-cell>
          <table:table-cell table:style-name="ce23" table:formula="of:=[$'Op. Long_Basis_Liq'.$S8]*[$'Op. Long_Basis_Liq'.$O8]" office:value-type="float" office:value="249346.78" calcext:value-type="float">
            <text:p>249.346,78</text:p>
          </table:table-cell>
          <table:table-cell table:style-name="ce23" table:formula="of:=[$'Op. Long_Basis_Liq'.$Y8]*[$'Op. Long_Basis_Liq'.$AA8]" office:value-type="float" office:value="-12.52083" calcext:value-type="float">
            <text:p>-12,52</text:p>
          </table:table-cell>
          <table:table-cell table:style-name="ce23" table:formula="of:=[$'Op. Long_Basis_Liq'.$AE8]*[$'Op. Long_Basis_Liq'.$AD8]" office:value-type="float" office:value="-250174.62" calcext:value-type="float">
            <text:p>-250.174,62</text:p>
          </table:table-cell>
          <table:table-cell table:style-name="Default" table:number-columns-repeated="16333"/>
        </table:table-row>
        <table:table-row table:style-name="ro1">
          <table:table-cell office:value-type="string" calcext:value-type="string">
            <text:p>LB4</text:p>
          </table:table-cell>
          <table:table-cell office:value-type="date" office:date-value="2026-03-03" calcext:value-type="date">
            <text:p>3/3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Compra</text:p>
          </table:table-cell>
          <table:table-cell table:style-name="ce27" office:value-type="string" calcext:value-type="string">
            <text:p>Intergrãos</text:p>
          </table:table-cell>
          <table:table-cell office:value-type="string" calcext:value-type="string">
            <text:p>Matup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Liq'.$G9];&quot; &quot;;[$'Op. Long_Basis_Liq'.$I9])" office:value-type="string" office:string-value="Intergrãos MT" calcext:value-type="string">
            <text:p>Intergrãos MT</text:p>
          </table:table-cell>
          <table:table-cell/>
          <table:table-cell office:value-type="string" calcext:value-type="string">
            <text:p>THULLIO PUCHPON SANTOS</text:p>
          </table:table-cell>
          <table:table-cell office:value-type="string" calcext:value-type="string">
            <text:p>Soja</text:p>
          </table:table-cell>
          <table:table-cell office:value-type="float" office:value="53299.8" calcext:value-type="float">
            <text:p>53.300</text:p>
          </table:table-cell>
          <table:table-cell table:formula="of:=[$'Op. Long_Basis_Liq'.$N9]/60" office:value-type="float" office:value="888.33" calcext:value-type="float">
            <text:p>888</text:p>
          </table:table-cell>
          <table:table-cell office:value-type="string" calcext:value-type="string">
            <text:p>Safra Atual</text:p>
          </table:table-cell>
          <table:table-cell table:style-name="ce27" office:value-type="string" calcext:value-type="string">
            <text:p>BRL</text:p>
          </table:table-cell>
          <table:table-cell office:value-type="date" office:date-value="2026-02-28" calcext:value-type="date">
            <text:p>28/2/2026</text:p>
          </table:table-cell>
          <table:table-cell office:value-type="float" office:value="102" calcext:value-type="float">
            <text:p>102,00</text:p>
          </table:table-cell>
          <table:table-cell office:value-type="date" office:date-value="2026-03-05" calcext:value-type="date">
            <text:p>5/3/2026</text:p>
          </table:table-cell>
          <table:table-cell table:style-name="ce2" office:value-type="string" calcext:value-type="string">
            <text:p>F4</text:p>
          </table:table-cell>
          <table:table-cell table:style-name="ce33" table:formula="of:=COM.MICROSOFT.XLOOKUP([$'Op. Long_Basis_Liq'.$U9];[$Analítico_Deriv.A:.A];[$Analítico_Deriv.S:.S])" office:value-type="string" office:string-value="CBOT" calcext:value-type="string">
            <text:p>CBOT</text:p>
          </table:table-cell>
          <table:table-cell table:style-name="ce33" table:formula="of:=COM.MICROSOFT.XLOOKUP([$'Op. Long_Basis_Liq'.$U9];[$Analítico_Deriv.A:.A];[$Analítico_Deriv.T:.T])" office:value-type="string" office:string-value="ZSQ6" calcext:value-type="string">
            <text:p>ZSQ6</text:p>
          </table:table-cell>
          <table:table-cell table:style-name="ce5" table:formula="of:=COM.MICROSOFT.XLOOKUP([$'Op. Long_Basis_Liq'.$U9];[$Analítico_Deriv.A:.A];[$Analítico_Deriv.V:.V])" office:value-type="date" office:date-value="2026-08-14" calcext:value-type="date">
            <text:p>14/8/2026</text:p>
          </table:table-cell>
          <table:table-cell table:formula="of:=IF([$'Op. Long_Basis_Liq'.$D9]=&quot;Entrada&quot;;COM.MICROSOFT.XLOOKUP([$'Op. Long_Basis_Liq'.$U9];[$Analítico_Deriv.A:.A];[$Analítico_Deriv.R:.R]);IF([$'Op. Long_Basis_Liq'.$D9]=&quot;Saída&quot;;&quot;PREENCHER&quot;;&quot;VALIDAR&quot;))" office:value-type="float" office:value="-0.39" calcext:value-type="float">
            <text:p>-0,39</text:p>
          </table:table-cell>
          <table:table-cell table:formula="of:=IF([$'Op. Long_Basis_Liq'.$D9]=&quot;Entrada&quot;;COM.MICROSOFT.XLOOKUP([$'Op. Long_Basis_Liq'.$U9];[$Analítico_Deriv.A:.A];[$Analítico_Deriv.AE:.AE]);IF([$'Op. Long_Basis_Liq'.$D9]=&quot;Saída&quot;;&quot;PREENCHER&quot;;&quot;VALIDAR&quot;))" office:value-type="float" office:value="-53070.42" calcext:value-type="float">
            <text:p>-53.070</text:p>
          </table:table-cell>
          <table:table-cell table:style-name="ce18" table:formula="of:=COM.MICROSOFT.XLOOKUP([$'Op. Long_Basis_Liq'.$U9];[$Analítico_Deriv.A:.A];[$Analítico_Deriv.U:.U])" office:value-type="float" office:value="11.76" calcext:value-type="float">
            <text:p>11,7600</text:p>
          </table:table-cell>
          <table:table-cell table:formula="of:=[$'Op. Long_Basis_Liq'.$N9]+[$'Op. Long_Basis_Liq'.$Z9]" office:value-type="float" office:value="229.380000000005" calcext:value-type="float">
            <text:p>229,38</text:p>
          </table:table-cell>
          <table:table-cell table:style-name="ce42" office:value-type="string" calcext:value-type="string">
            <text:p>F12</text:p>
          </table:table-cell>
          <table:table-cell table:formula="of:=IF([$'Op. Long_Basis_Liq'.$D9]=&quot;Entrada&quot;;IFERROR(COM.MICROSOFT.XLOOKUP([$'Op. Long_Basis_Liq'.$AC9];[$Analítico_Deriv.A:.A];[$Analítico_Deriv.X:.X]);0);IF([$'Op. Long_Basis_Liq'.$D9]=&quot;Saída&quot;;&quot;PREENCHER&quot;;&quot;VALIDAR&quot;))" office:value-type="float" office:value="-16721" calcext:value-type="float">
            <text:p>-16.721,00</text:p>
          </table:table-cell>
          <table:table-cell table:style-name="ce18" table:formula="of:=IFERROR(COM.MICROSOFT.XLOOKUP([$'Op. Long_Basis_Liq'.$AC9];[$Analítico_Deriv.A:.A];[$Analítico_Deriv.U:.U]);0)" office:value-type="float" office:value="5.4201" calcext:value-type="float">
            <text:p>5,4201</text:p>
          </table:table-cell>
          <table:table-cell table:style-name="ce5" table:formula="of:=IFERROR(COM.MICROSOFT.XLOOKUP([$'Op. Long_Basis_Liq'.$AC9];[$Analítico_Deriv.A:.A];[$Analítico_Deriv.V:.V]);0)" office:value-type="date" office:date-value="2026-06-30" calcext:value-type="date">
            <text:p>30/6/2026</text:p>
          </table:table-cell>
          <table:table-cell table:style-name="ce42" table:formula="of:=COM.MICROSOFT.XLOOKUP([$'Op. Long_Basis_Liq'.$U9];[$Analítico_Deriv.A:.A];[$Analítico_Deriv.AI:.AI])" office:value-type="string" office:string-value="LB-Soja-26" calcext:value-type="string">
            <text:p>LB-Soja-26</text:p>
          </table:table-cell>
          <table:table-cell table:style-name="ce42" table:formula="of:=COM.MICROSOFT.CONCAT([$'Op. Long_Basis_Liq'.$M9];&quot; &quot;;[$'Op. Long_Basis_Liq'.$P9];&quot; &quot;;[$'Op. Long_Basis_Liq'.$Q9];&quot; &quot;;[$'Op. Long_Basis_Liq'.$H9])" office:value-type="string" office:string-value="Soja Safra Atual BRL Matupa" calcext:value-type="string">
            <text:p>Soja Safra Atual BRL Matupa</text:p>
          </table:table-cell>
          <table:table-cell table:style-name="ce23" table:formula="of:=IFERROR(COM.MICROSOFT.XLOOKUP([$'Op. Long_Basis_Liq'.$AH9];[$Preços_MTM.O:.O];[$Preços_MTM.P:.P]);0)" office:value-type="float" office:value="107.6" calcext:value-type="float">
            <text:p>107,60</text:p>
          </table:table-cell>
          <table:table-cell table:style-name="ce18" table:formula="of:=IFERROR(COM.MICROSOFT.XLOOKUP([$'Op. Long_Basis_Liq'.$W9];[$Preços_MTM.C:.C];[$Preços_MTM.D:.D]);0)" office:value-type="float" office:value="11.225" calcext:value-type="float">
            <text:p>11,2250</text:p>
          </table:table-cell>
          <table:table-cell table:style-name="ce18" table:formula="of:=IFERROR(COM.MICROSOFT.XLOOKUP([$'Op. Long_Basis_Liq'.$AF9];[$Preços_MTM.H:.H];[$Preços_MTM.I:.I]);0)" office:value-type="float" office:value="5.1766" calcext:value-type="float">
            <text:p>5,1766</text:p>
          </table:table-cell>
          <table:table-cell table:formula="of:=IF([$'Op. Long_Basis_Liq'.$Q9]=&quot;BRL&quot;;([$'Op. Long_Basis_Liq'.$AI9]-[$'Op. Long_Basis_Liq'.$S9])*[$'Op. Long_Basis_Liq'.$O9];IF([$'Op. Long_Basis_Liq'.$Q9]=&quot;USD&quot;;([$'Op. Long_Basis_Liq'.$AI9]-[$'Op. Long_Basis_Liq'.$S9])*[$'Op. Long_Basis_Liq'.$O9]*COM.MICROSOFT.XLOOKUP([$'Op. Long_Basis_Liq'.$T9];[$Preços_MTM.H:.H];[$Preços_MTM.I:.I])))" office:value-type="float" office:value="4974.648" calcext:value-type="float">
            <text:p>4.974,65</text:p>
          </table:table-cell>
          <table:table-cell table:formula="of:=IF([$'Op. Long_Basis_Liq'.$V9]=&quot;CBOT&quot;;([$'Op. Long_Basis_Liq'.$AJ9]-[$'Op. Long_Basis_Liq'.$AA9])*5000*[$'Op. Long_Basis_Liq'.$Y9]*[$Preços_MTM.$I$4];IF([$'Op. Long_Basis_Liq'.$V9]=&quot;BMF&quot;;([$'Op. Long_Basis_Liq'.$AJ9]-[$'Op. Long_Basis_Liq'.$AA9])*450*[$'Op. Long_Basis_Liq'.$Y9];&quot;VERIFICAR&quot;))" office:value-type="float" office:value="5419.162125" calcext:value-type="float">
            <text:p>5.419,16</text:p>
          </table:table-cell>
          <table:table-cell table:formula="of:=([$'Op. Long_Basis_Liq'.$AK9]-[$'Op. Long_Basis_Liq'.$AE9])*[$'Op. Long_Basis_Liq'.$AD9]" office:value-type="float" office:value="4071.5635" calcext:value-type="float">
            <text:p>4.071,56</text:p>
          </table:table-cell>
          <table:table-cell table:formula="of:=SUM([$'Op. Long_Basis_Liq'.$AL9:.$AN9])" office:value-type="float" office:value="14465.373625" calcext:value-type="float">
            <text:p>14.465,37</text:p>
          </table:table-cell>
          <table:table-cell office:value-type="percentage" office:value="0.014" calcext:value-type="percentage">
            <text:p>1,40%</text:p>
          </table:table-cell>
          <table:table-cell table:formula="of:=IF([$'Op. Long_Basis_Liq'.$D9]=&quot;Entrada&quot;;([$'Op. Long_Basis_Liq'.$S9]*(1+[$'Op. Long_Basis_Liq'.$AP9])^(((COM.MICROSOFT.XLOOKUP([$'Op. Long_Basis_Liq'.$AH9];[$Preços_MTM.O:.O];[$Preços_MTM.Q:.Q]))-[$'Op. Long_Basis_Liq'.$T9])/30))-[$'Op. Long_Basis_Liq'.$S9];IF([$'Op. Long_Basis_Liq'.$D9]=&quot;Saída&quot;;0;&quot;VALIDAR&quot;))" office:value-type="float" office:value="6.1834551862368" calcext:value-type="float">
            <text:p>6,18</text:p>
          </table:table-cell>
          <table:table-cell table:style-name="ce51" table:formula="of:=[$'Op. Long_Basis_Liq'.$AQ9]*[$'Op. Long_Basis_Liq'.$O9]*-1" office:value-type="float" office:value="-5492.94874558974" calcext:value-type="float">
            <text:p>-5.492,95</text:p>
          </table:table-cell>
          <table:table-cell table:style-name="ce51" table:formula="of:=((3*[$'Op. Long_Basis_Liq'.$O9])+(0.3*[$'Op. Long_Basis_Liq'.$O9])+(0.03*[$'Op. Long_Basis_Liq'.$O9]))*-1" office:value-type="float" office:value="-2958.1389" calcext:value-type="float">
            <text:p>-2.958,14</text:p>
          </table:table-cell>
          <table:table-cell table:style-name="ce51" table:formula="of:=SUM([$'Op. Long_Basis_Liq'.$AR9:.$AS9])" office:value-type="float" office:value="-8451.08764558974" calcext:value-type="float">
            <text:p>-8.451,09</text:p>
          </table:table-cell>
          <table:table-cell table:style-name="ce51" table:formula="of:=SUM([$'Op. Long_Basis_Liq'.$AS9];[$'Op. Long_Basis_Liq'.$AR9];[$'Op. Long_Basis_Liq'.$AO9])" office:value-type="float" office:value="6014.28597941026" calcext:value-type="float">
            <text:p>6.014,29</text:p>
          </table:table-cell>
          <table:table-cell table:style-name="ce23" office:value-type="string" calcext:value-type="string">
            <text:p>OP1</text:p>
          </table:table-cell>
          <table:table-cell table:style-name="ce23" table:formula="of:=[$'Op. Long_Basis_Liq'.$S9]*[$'Op. Long_Basis_Liq'.$O9]" office:value-type="float" office:value="90609.66" calcext:value-type="float">
            <text:p>90.609,66</text:p>
          </table:table-cell>
          <table:table-cell table:style-name="ce23" table:formula="of:=[$'Op. Long_Basis_Liq'.$Y9]*[$'Op. Long_Basis_Liq'.$AA9]" office:value-type="float" office:value="-4.5864" calcext:value-type="float">
            <text:p>-4,59</text:p>
          </table:table-cell>
          <table:table-cell table:style-name="ce23" table:formula="of:=[$'Op. Long_Basis_Liq'.$AE9]*[$'Op. Long_Basis_Liq'.$AD9]" office:value-type="float" office:value="-90629.4921" calcext:value-type="float">
            <text:p>-90.629,49</text:p>
          </table:table-cell>
          <table:table-cell table:style-name="Default" table:number-columns-repeated="16333"/>
        </table:table-row>
        <table:table-row table:style-name="ro1">
          <table:table-cell office:value-type="string" calcext:value-type="string">
            <text:p>LB5</text:p>
          </table:table-cell>
          <table:table-cell office:value-type="date" office:date-value="2026-03-03" calcext:value-type="date">
            <text:p>3/3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Compra</text:p>
          </table:table-cell>
          <table:table-cell table:style-name="ce27" office:value-type="string" calcext:value-type="string">
            <text:p>Intergrãos</text:p>
          </table:table-cell>
          <table:table-cell office:value-type="string" calcext:value-type="string">
            <text:p>Matup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Liq'.$G10];&quot; &quot;;[$'Op. Long_Basis_Liq'.$I10])" office:value-type="string" office:string-value="Intergrãos MT" calcext:value-type="string">
            <text:p>Intergrãos MT</text:p>
          </table:table-cell>
          <table:table-cell/>
          <table:table-cell office:value-type="string" calcext:value-type="string">
            <text:p>MARCIO EIDT</text:p>
          </table:table-cell>
          <table:table-cell office:value-type="string" calcext:value-type="string">
            <text:p>Soja</text:p>
          </table:table-cell>
          <table:table-cell office:value-type="float" office:value="120000" calcext:value-type="float">
            <text:p>120.000</text:p>
          </table:table-cell>
          <table:table-cell table:formula="of:=[$'Op. Long_Basis_Liq'.$N10]/60" office:value-type="float" office:value="2000" calcext:value-type="float">
            <text:p>2.000</text:p>
          </table:table-cell>
          <table:table-cell office:value-type="string" calcext:value-type="string">
            <text:p>Safra Atual</text:p>
          </table:table-cell>
          <table:table-cell table:style-name="ce27" office:value-type="string" calcext:value-type="string">
            <text:p>BRL</text:p>
          </table:table-cell>
          <table:table-cell office:value-type="date" office:date-value="2026-02-28" calcext:value-type="date">
            <text:p>28/2/2026</text:p>
          </table:table-cell>
          <table:table-cell office:value-type="float" office:value="104.5" calcext:value-type="float">
            <text:p>104,50</text:p>
          </table:table-cell>
          <table:table-cell office:value-type="date" office:date-value="2026-04-28" calcext:value-type="date">
            <text:p>28/4/2026</text:p>
          </table:table-cell>
          <table:table-cell table:style-name="ce2" office:value-type="string" calcext:value-type="string">
            <text:p>F5</text:p>
          </table:table-cell>
          <table:table-cell table:style-name="ce33" table:formula="of:=COM.MICROSOFT.XLOOKUP([$'Op. Long_Basis_Liq'.$U10];[$Analítico_Deriv.A:.A];[$Analítico_Deriv.S:.S])" office:value-type="string" office:string-value="CBOT" calcext:value-type="string">
            <text:p>CBOT</text:p>
          </table:table-cell>
          <table:table-cell table:style-name="ce33" table:formula="of:=COM.MICROSOFT.XLOOKUP([$'Op. Long_Basis_Liq'.$U10];[$Analítico_Deriv.A:.A];[$Analítico_Deriv.T:.T])" office:value-type="string" office:string-value="ZSQ6" calcext:value-type="string">
            <text:p>ZSQ6</text:p>
          </table:table-cell>
          <table:table-cell table:style-name="ce5" table:formula="of:=COM.MICROSOFT.XLOOKUP([$'Op. Long_Basis_Liq'.$U10];[$Analítico_Deriv.A:.A];[$Analítico_Deriv.V:.V])" office:value-type="date" office:date-value="2026-08-14" calcext:value-type="date">
            <text:p>14/8/2026</text:p>
          </table:table-cell>
          <table:table-cell table:formula="of:=IF([$'Op. Long_Basis_Liq'.$D10]=&quot;Entrada&quot;;COM.MICROSOFT.XLOOKUP([$'Op. Long_Basis_Liq'.$U10];[$Analítico_Deriv.A:.A];[$Analítico_Deriv.R:.R]);IF([$'Op. Long_Basis_Liq'.$D10]=&quot;Saída&quot;;&quot;PREENCHER&quot;;&quot;VALIDAR&quot;))" office:value-type="float" office:value="-0.88" calcext:value-type="float">
            <text:p>-0,88</text:p>
          </table:table-cell>
          <table:table-cell table:formula="of:=IF([$'Op. Long_Basis_Liq'.$D10]=&quot;Entrada&quot;;COM.MICROSOFT.XLOOKUP([$'Op. Long_Basis_Liq'.$U10];[$Analítico_Deriv.A:.A];[$Analítico_Deriv.AE:.AE]);IF([$'Op. Long_Basis_Liq'.$D10]=&quot;Saída&quot;;&quot;PREENCHER&quot;;&quot;VALIDAR&quot;))" office:value-type="float" office:value="-119748.64" calcext:value-type="float">
            <text:p>-119.749</text:p>
          </table:table-cell>
          <table:table-cell table:style-name="ce18" table:formula="of:=COM.MICROSOFT.XLOOKUP([$'Op. Long_Basis_Liq'.$U10];[$Analítico_Deriv.A:.A];[$Analítico_Deriv.U:.U])" office:value-type="float" office:value="11.6825" calcext:value-type="float">
            <text:p>11,6825</text:p>
          </table:table-cell>
          <table:table-cell table:formula="of:=[$'Op. Long_Basis_Liq'.$N10]+[$'Op. Long_Basis_Liq'.$Z10]" office:value-type="float" office:value="251.360000000001" calcext:value-type="float">
            <text:p>251,36</text:p>
          </table:table-cell>
          <table:table-cell table:style-name="ce42" office:value-type="string" calcext:value-type="string">
            <text:p>F13</text:p>
          </table:table-cell>
          <table:table-cell table:formula="of:=IF([$'Op. Long_Basis_Liq'.$D10]=&quot;Entrada&quot;;IFERROR(COM.MICROSOFT.XLOOKUP([$'Op. Long_Basis_Liq'.$AC10];[$Analítico_Deriv.A:.A];[$Analítico_Deriv.X:.X]);0);IF([$'Op. Long_Basis_Liq'.$D10]=&quot;Saída&quot;;&quot;PREENCHER&quot;;&quot;VALIDAR&quot;))" office:value-type="float" office:value="-38584" calcext:value-type="float">
            <text:p>-38.584,00</text:p>
          </table:table-cell>
          <table:table-cell table:style-name="ce18" table:formula="of:=IFERROR(COM.MICROSOFT.XLOOKUP([$'Op. Long_Basis_Liq'.$AC10];[$Analítico_Deriv.A:.A];[$Analítico_Deriv.U:.U]);0)" office:value-type="float" office:value="5.4428" calcext:value-type="float">
            <text:p>5,4428</text:p>
          </table:table-cell>
          <table:table-cell table:style-name="ce5" table:formula="of:=IFERROR(COM.MICROSOFT.XLOOKUP([$'Op. Long_Basis_Liq'.$AC10];[$Analítico_Deriv.A:.A];[$Analítico_Deriv.V:.V]);0)" office:value-type="date" office:date-value="2026-06-30" calcext:value-type="date">
            <text:p>30/6/2026</text:p>
          </table:table-cell>
          <table:table-cell table:style-name="ce42" table:formula="of:=COM.MICROSOFT.XLOOKUP([$'Op. Long_Basis_Liq'.$U10];[$Analítico_Deriv.A:.A];[$Analítico_Deriv.AI:.AI])" office:value-type="string" office:string-value="LB-Soja-26" calcext:value-type="string">
            <text:p>LB-Soja-26</text:p>
          </table:table-cell>
          <table:table-cell table:style-name="ce42" table:formula="of:=COM.MICROSOFT.CONCAT([$'Op. Long_Basis_Liq'.$M10];&quot; &quot;;[$'Op. Long_Basis_Liq'.$P10];&quot; &quot;;[$'Op. Long_Basis_Liq'.$Q10];&quot; &quot;;[$'Op. Long_Basis_Liq'.$H10])" office:value-type="string" office:string-value="Soja Safra Atual BRL Matupa" calcext:value-type="string">
            <text:p>Soja Safra Atual BRL Matupa</text:p>
          </table:table-cell>
          <table:table-cell table:style-name="ce23" table:formula="of:=IFERROR(COM.MICROSOFT.XLOOKUP([$'Op. Long_Basis_Liq'.$AH10];[$Preços_MTM.O:.O];[$Preços_MTM.P:.P]);0)" office:value-type="float" office:value="107.6" calcext:value-type="float">
            <text:p>107,60</text:p>
          </table:table-cell>
          <table:table-cell table:style-name="ce18" table:formula="of:=IFERROR(COM.MICROSOFT.XLOOKUP([$'Op. Long_Basis_Liq'.$W10];[$Preços_MTM.C:.C];[$Preços_MTM.D:.D]);0)" office:value-type="float" office:value="11.225" calcext:value-type="float">
            <text:p>11,2250</text:p>
          </table:table-cell>
          <table:table-cell table:style-name="ce18" table:formula="of:=IFERROR(COM.MICROSOFT.XLOOKUP([$'Op. Long_Basis_Liq'.$AF10];[$Preços_MTM.H:.H];[$Preços_MTM.I:.I]);0)" office:value-type="float" office:value="5.1766" calcext:value-type="float">
            <text:p>5,1766</text:p>
          </table:table-cell>
          <table:table-cell table:formula="of:=IF([$'Op. Long_Basis_Liq'.$Q10]=&quot;BRL&quot;;([$'Op. Long_Basis_Liq'.$AI10]-[$'Op. Long_Basis_Liq'.$S10])*[$'Op. Long_Basis_Liq'.$O10];IF([$'Op. Long_Basis_Liq'.$Q10]=&quot;USD&quot;;([$'Op. Long_Basis_Liq'.$AI10]-[$'Op. Long_Basis_Liq'.$S10])*[$'Op. Long_Basis_Liq'.$O10]*COM.MICROSOFT.XLOOKUP([$'Op. Long_Basis_Liq'.$T10];[$Preços_MTM.H:.H];[$Preços_MTM.I:.I])))" office:value-type="float" office:value="6199.99999999999" calcext:value-type="float">
            <text:p>6.200,00</text:p>
          </table:table-cell>
          <table:table-cell table:formula="of:=IF([$'Op. Long_Basis_Liq'.$V10]=&quot;CBOT&quot;;([$'Op. Long_Basis_Liq'.$AJ10]-[$'Op. Long_Basis_Liq'.$AA10])*5000*[$'Op. Long_Basis_Liq'.$Y10]*[$Preços_MTM.$I$4];IF([$'Op. Long_Basis_Liq'.$V10]=&quot;BMF&quot;;([$'Op. Long_Basis_Liq'.$AJ10]-[$'Op. Long_Basis_Liq'.$AA10])*450*[$'Op. Long_Basis_Liq'.$Y10];&quot;VERIFICAR&quot;))" office:value-type="float" office:value="10456.5285" calcext:value-type="float">
            <text:p>10.456,53</text:p>
          </table:table-cell>
          <table:table-cell table:formula="of:=([$'Op. Long_Basis_Liq'.$AK10]-[$'Op. Long_Basis_Liq'.$AE10])*[$'Op. Long_Basis_Liq'.$AD10]" office:value-type="float" office:value="10271.0608" calcext:value-type="float">
            <text:p>10.271,06</text:p>
          </table:table-cell>
          <table:table-cell table:formula="of:=SUM([$'Op. Long_Basis_Liq'.$AL10:.$AN10])" office:value-type="float" office:value="26927.5893" calcext:value-type="float">
            <text:p>26.927,59</text:p>
          </table:table-cell>
          <table:table-cell office:value-type="percentage" office:value="0.014" calcext:value-type="percentage">
            <text:p>1,40%</text:p>
          </table:table-cell>
          <table:table-cell table:formula="of:=IF([$'Op. Long_Basis_Liq'.$D10]=&quot;Entrada&quot;;([$'Op. Long_Basis_Liq'.$S10]*(1+[$'Op. Long_Basis_Liq'.$AP10])^(((COM.MICROSOFT.XLOOKUP([$'Op. Long_Basis_Liq'.$AH10];[$Preços_MTM.O:.O];[$Preços_MTM.Q:.Q]))-[$'Op. Long_Basis_Liq'.$T10])/30))-[$'Op. Long_Basis_Liq'.$S10];IF([$'Op. Long_Basis_Liq'.$D10]=&quot;Saída&quot;;0;&quot;VALIDAR&quot;))" office:value-type="float" office:value="3.59575708666176" calcext:value-type="float">
            <text:p>3,60</text:p>
          </table:table-cell>
          <table:table-cell table:style-name="ce51" table:formula="of:=[$'Op. Long_Basis_Liq'.$AQ10]*[$'Op. Long_Basis_Liq'.$O10]*-1" office:value-type="float" office:value="-7191.51417332353" calcext:value-type="float">
            <text:p>-7.191,51</text:p>
          </table:table-cell>
          <table:table-cell table:style-name="ce51" table:formula="of:=((3*[$'Op. Long_Basis_Liq'.$O10])+(0.3*[$'Op. Long_Basis_Liq'.$O10])+(0.03*[$'Op. Long_Basis_Liq'.$O10]))*-1" office:value-type="float" office:value="-6660" calcext:value-type="float">
            <text:p>-6.660,00</text:p>
          </table:table-cell>
          <table:table-cell table:style-name="ce51" table:formula="of:=SUM([$'Op. Long_Basis_Liq'.$AR10:.$AS10])" office:value-type="float" office:value="-13851.5141733235" calcext:value-type="float">
            <text:p>-13.851,51</text:p>
          </table:table-cell>
          <table:table-cell table:style-name="ce51" table:formula="of:=SUM([$'Op. Long_Basis_Liq'.$AS10];[$'Op. Long_Basis_Liq'.$AR10];[$'Op. Long_Basis_Liq'.$AO10])" office:value-type="float" office:value="13076.0751266765" calcext:value-type="float">
            <text:p>13.076,08</text:p>
          </table:table-cell>
          <table:table-cell table:style-name="ce23" office:value-type="string" calcext:value-type="string">
            <text:p>OP1</text:p>
          </table:table-cell>
          <table:table-cell table:style-name="ce23" table:formula="of:=[$'Op. Long_Basis_Liq'.$S10]*[$'Op. Long_Basis_Liq'.$O10]" office:value-type="float" office:value="209000" calcext:value-type="float">
            <text:p>209.000,00</text:p>
          </table:table-cell>
          <table:table-cell table:style-name="ce23" table:formula="of:=[$'Op. Long_Basis_Liq'.$Y10]*[$'Op. Long_Basis_Liq'.$AA10]" office:value-type="float" office:value="-10.2806" calcext:value-type="float">
            <text:p>-10,28</text:p>
          </table:table-cell>
          <table:table-cell table:style-name="ce23" table:formula="of:=[$'Op. Long_Basis_Liq'.$AE10]*[$'Op. Long_Basis_Liq'.$AD10]" office:value-type="float" office:value="-210004.9952" calcext:value-type="float">
            <text:p>-210.005,00</text:p>
          </table:table-cell>
          <table:table-cell table:style-name="Default" table:number-columns-repeated="16333"/>
        </table:table-row>
        <table:table-row table:style-name="ro1">
          <table:table-cell office:value-type="string" calcext:value-type="string">
            <text:p>LB6</text:p>
          </table:table-cell>
          <table:table-cell office:value-type="date" office:date-value="2026-03-04" calcext:value-type="date">
            <text:p>4/3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Compra</text:p>
          </table:table-cell>
          <table:table-cell table:style-name="ce27" office:value-type="string" calcext:value-type="string">
            <text:p>Intergrãos</text:p>
          </table:table-cell>
          <table:table-cell office:value-type="string" calcext:value-type="string">
            <text:p>Matup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Liq'.$G11];&quot; &quot;;[$'Op. Long_Basis_Liq'.$I11])" office:value-type="string" office:string-value="Intergrãos MT" calcext:value-type="string">
            <text:p>Intergrãos MT</text:p>
          </table:table-cell>
          <table:table-cell/>
          <table:table-cell office:value-type="string" calcext:value-type="string">
            <text:p>JOAO PEDRO MENDES SIQUEIRA E OUTRO</text:p>
          </table:table-cell>
          <table:table-cell office:value-type="string" calcext:value-type="string">
            <text:p>Soja</text:p>
          </table:table-cell>
          <table:table-cell office:value-type="float" office:value="60000" calcext:value-type="float">
            <text:p>60.000</text:p>
          </table:table-cell>
          <table:table-cell table:formula="of:=[$'Op. Long_Basis_Liq'.$N11]/60" office:value-type="float" office:value="1000" calcext:value-type="float">
            <text:p>1.000</text:p>
          </table:table-cell>
          <table:table-cell office:value-type="string" calcext:value-type="string">
            <text:p>Safra Atual</text:p>
          </table:table-cell>
          <table:table-cell table:style-name="ce27" office:value-type="string" calcext:value-type="string">
            <text:p>BRL</text:p>
          </table:table-cell>
          <table:table-cell office:value-type="date" office:date-value="2026-02-28" calcext:value-type="date">
            <text:p>28/2/2026</text:p>
          </table:table-cell>
          <table:table-cell office:value-type="float" office:value="100" calcext:value-type="float">
            <text:p>100,00</text:p>
          </table:table-cell>
          <table:table-cell office:value-type="date" office:date-value="2026-03-10" calcext:value-type="date">
            <text:p>10/3/2026</text:p>
          </table:table-cell>
          <table:table-cell table:style-name="ce2" office:value-type="string" calcext:value-type="string">
            <text:p>F6</text:p>
          </table:table-cell>
          <table:table-cell table:style-name="ce33" table:formula="of:=COM.MICROSOFT.XLOOKUP([$'Op. Long_Basis_Liq'.$U11];[$Analítico_Deriv.A:.A];[$Analítico_Deriv.S:.S])" office:value-type="string" office:string-value="CBOT" calcext:value-type="string">
            <text:p>CBOT</text:p>
          </table:table-cell>
          <table:table-cell table:style-name="ce33" table:formula="of:=COM.MICROSOFT.XLOOKUP([$'Op. Long_Basis_Liq'.$U11];[$Analítico_Deriv.A:.A];[$Analítico_Deriv.T:.T])" office:value-type="string" office:string-value="ZSQ6" calcext:value-type="string">
            <text:p>ZSQ6</text:p>
          </table:table-cell>
          <table:table-cell table:style-name="ce5" table:formula="of:=COM.MICROSOFT.XLOOKUP([$'Op. Long_Basis_Liq'.$U11];[$Analítico_Deriv.A:.A];[$Analítico_Deriv.V:.V])" office:value-type="date" office:date-value="2026-08-14" calcext:value-type="date">
            <text:p>14/8/2026</text:p>
          </table:table-cell>
          <table:table-cell table:formula="of:=IF([$'Op. Long_Basis_Liq'.$D11]=&quot;Entrada&quot;;COM.MICROSOFT.XLOOKUP([$'Op. Long_Basis_Liq'.$U11];[$Analítico_Deriv.A:.A];[$Analítico_Deriv.R:.R]);IF([$'Op. Long_Basis_Liq'.$D11]=&quot;Saída&quot;;&quot;PREENCHER&quot;;&quot;VALIDAR&quot;))" office:value-type="float" office:value="-0.44" calcext:value-type="float">
            <text:p>-0,44</text:p>
          </table:table-cell>
          <table:table-cell table:formula="of:=IF([$'Op. Long_Basis_Liq'.$D11]=&quot;Entrada&quot;;COM.MICROSOFT.XLOOKUP([$'Op. Long_Basis_Liq'.$U11];[$Analítico_Deriv.A:.A];[$Analítico_Deriv.AE:.AE]);IF([$'Op. Long_Basis_Liq'.$D11]=&quot;Saída&quot;;&quot;PREENCHER&quot;;&quot;VALIDAR&quot;))" office:value-type="float" office:value="-59874.32" calcext:value-type="float">
            <text:p>-59.874</text:p>
          </table:table-cell>
          <table:table-cell table:style-name="ce18" table:formula="of:=COM.MICROSOFT.XLOOKUP([$'Op. Long_Basis_Liq'.$U11];[$Analítico_Deriv.A:.A];[$Analítico_Deriv.U:.U])" office:value-type="float" office:value="11.7" calcext:value-type="float">
            <text:p>11,7000</text:p>
          </table:table-cell>
          <table:table-cell table:formula="of:=[$'Op. Long_Basis_Liq'.$N11]+[$'Op. Long_Basis_Liq'.$Z11]" office:value-type="float" office:value="125.68" calcext:value-type="float">
            <text:p>125,68</text:p>
          </table:table-cell>
          <table:table-cell table:style-name="ce42" office:value-type="string" calcext:value-type="string">
            <text:p>F14</text:p>
          </table:table-cell>
          <table:table-cell table:formula="of:=IF([$'Op. Long_Basis_Liq'.$D11]=&quot;Entrada&quot;;IFERROR(COM.MICROSOFT.XLOOKUP([$'Op. Long_Basis_Liq'.$AC11];[$Analítico_Deriv.A:.A];[$Analítico_Deriv.X:.X]);0);IF([$'Op. Long_Basis_Liq'.$D11]=&quot;Saída&quot;;&quot;PREENCHER&quot;;&quot;VALIDAR&quot;))" office:value-type="float" office:value="-18635" calcext:value-type="float">
            <text:p>-18.635,00</text:p>
          </table:table-cell>
          <table:table-cell table:style-name="ce18" table:formula="of:=IFERROR(COM.MICROSOFT.XLOOKUP([$'Op. Long_Basis_Liq'.$AC11];[$Analítico_Deriv.A:.A];[$Analítico_Deriv.U:.U]);0)" office:value-type="float" office:value="5.33968" calcext:value-type="float">
            <text:p>5,3397</text:p>
          </table:table-cell>
          <table:table-cell table:style-name="ce5" table:formula="of:=IFERROR(COM.MICROSOFT.XLOOKUP([$'Op. Long_Basis_Liq'.$AC11];[$Analítico_Deriv.A:.A];[$Analítico_Deriv.V:.V]);0)" office:value-type="date" office:date-value="2026-06-30" calcext:value-type="date">
            <text:p>30/6/2026</text:p>
          </table:table-cell>
          <table:table-cell table:style-name="ce42" table:formula="of:=COM.MICROSOFT.XLOOKUP([$'Op. Long_Basis_Liq'.$U11];[$Analítico_Deriv.A:.A];[$Analítico_Deriv.AI:.AI])" office:value-type="string" office:string-value="LB-Soja-26" calcext:value-type="string">
            <text:p>LB-Soja-26</text:p>
          </table:table-cell>
          <table:table-cell table:style-name="ce42" table:formula="of:=COM.MICROSOFT.CONCAT([$'Op. Long_Basis_Liq'.$M11];&quot; &quot;;[$'Op. Long_Basis_Liq'.$P11];&quot; &quot;;[$'Op. Long_Basis_Liq'.$Q11];&quot; &quot;;[$'Op. Long_Basis_Liq'.$H11])" office:value-type="string" office:string-value="Soja Safra Atual BRL Matupa" calcext:value-type="string">
            <text:p>Soja Safra Atual BRL Matupa</text:p>
          </table:table-cell>
          <table:table-cell table:style-name="ce23" table:formula="of:=IFERROR(COM.MICROSOFT.XLOOKUP([$'Op. Long_Basis_Liq'.$AH11];[$Preços_MTM.O:.O];[$Preços_MTM.P:.P]);0)" office:value-type="float" office:value="107.6" calcext:value-type="float">
            <text:p>107,60</text:p>
          </table:table-cell>
          <table:table-cell table:style-name="ce18" table:formula="of:=IFERROR(COM.MICROSOFT.XLOOKUP([$'Op. Long_Basis_Liq'.$W11];[$Preços_MTM.C:.C];[$Preços_MTM.D:.D]);0)" office:value-type="float" office:value="11.225" calcext:value-type="float">
            <text:p>11,2250</text:p>
          </table:table-cell>
          <table:table-cell table:style-name="ce18" table:formula="of:=IFERROR(COM.MICROSOFT.XLOOKUP([$'Op. Long_Basis_Liq'.$AF11];[$Preços_MTM.H:.H];[$Preços_MTM.I:.I]);0)" office:value-type="float" office:value="5.1766" calcext:value-type="float">
            <text:p>5,1766</text:p>
          </table:table-cell>
          <table:table-cell table:formula="of:=IF([$'Op. Long_Basis_Liq'.$Q11]=&quot;BRL&quot;;([$'Op. Long_Basis_Liq'.$AI11]-[$'Op. Long_Basis_Liq'.$S11])*[$'Op. Long_Basis_Liq'.$O11];IF([$'Op. Long_Basis_Liq'.$Q11]=&quot;USD&quot;;([$'Op. Long_Basis_Liq'.$AI11]-[$'Op. Long_Basis_Liq'.$S11])*[$'Op. Long_Basis_Liq'.$O11]*COM.MICROSOFT.XLOOKUP([$'Op. Long_Basis_Liq'.$T11];[$Preços_MTM.H:.H];[$Preços_MTM.I:.I])))" office:value-type="float" office:value="7599.99999999999" calcext:value-type="float">
            <text:p>7.600,00</text:p>
          </table:table-cell>
          <table:table-cell table:formula="of:=IF([$'Op. Long_Basis_Liq'.$V11]=&quot;CBOT&quot;;([$'Op. Long_Basis_Liq'.$AJ11]-[$'Op. Long_Basis_Liq'.$AA11])*5000*[$'Op. Long_Basis_Liq'.$Y11]*[$Preços_MTM.$I$4];IF([$'Op. Long_Basis_Liq'.$V11]=&quot;BMF&quot;;([$'Op. Long_Basis_Liq'.$AJ11]-[$'Op. Long_Basis_Liq'.$AA11])*450*[$'Op. Long_Basis_Liq'.$Y11];&quot;VERIFICAR&quot;))" office:value-type="float" office:value="5428.2525" calcext:value-type="float">
            <text:p>5.428,25</text:p>
          </table:table-cell>
          <table:table-cell table:formula="of:=([$'Op. Long_Basis_Liq'.$AK11]-[$'Op. Long_Basis_Liq'.$AE11])*[$'Op. Long_Basis_Liq'.$AD11]" office:value-type="float" office:value="3038.99580000001" calcext:value-type="float">
            <text:p>3.039,00</text:p>
          </table:table-cell>
          <table:table-cell table:formula="of:=SUM([$'Op. Long_Basis_Liq'.$AL11:.$AN11])" office:value-type="float" office:value="16067.2483" calcext:value-type="float">
            <text:p>16.067,25</text:p>
          </table:table-cell>
          <table:table-cell office:value-type="percentage" office:value="0.014" calcext:value-type="percentage">
            <text:p>1,40%</text:p>
          </table:table-cell>
          <table:table-cell table:formula="of:=IF([$'Op. Long_Basis_Liq'.$D11]=&quot;Entrada&quot;;([$'Op. Long_Basis_Liq'.$S11]*(1+[$'Op. Long_Basis_Liq'.$AP11])^(((COM.MICROSOFT.XLOOKUP([$'Op. Long_Basis_Liq'.$AH11];[$Preços_MTM.O:.O];[$Preços_MTM.Q:.Q]))-[$'Op. Long_Basis_Liq'.$T11])/30))-[$'Op. Long_Basis_Liq'.$S11];IF([$'Op. Long_Basis_Liq'.$D11]=&quot;Saída&quot;;0;&quot;VALIDAR&quot;))" office:value-type="float" office:value="5.81673333756918" calcext:value-type="float">
            <text:p>5,82</text:p>
          </table:table-cell>
          <table:table-cell table:style-name="ce51" table:formula="of:=[$'Op. Long_Basis_Liq'.$AQ11]*[$'Op. Long_Basis_Liq'.$O11]*-1" office:value-type="float" office:value="-5816.73333756918" calcext:value-type="float">
            <text:p>-5.816,73</text:p>
          </table:table-cell>
          <table:table-cell table:style-name="ce51" table:formula="of:=((3*[$'Op. Long_Basis_Liq'.$O11])+(0.3*[$'Op. Long_Basis_Liq'.$O11])+(0.03*[$'Op. Long_Basis_Liq'.$O11]))*-1" office:value-type="float" office:value="-3330" calcext:value-type="float">
            <text:p>-3.330,00</text:p>
          </table:table-cell>
          <table:table-cell table:style-name="ce51" table:formula="of:=SUM([$'Op. Long_Basis_Liq'.$AR11:.$AS11])" office:value-type="float" office:value="-9146.73333756917" calcext:value-type="float">
            <text:p>-9.146,73</text:p>
          </table:table-cell>
          <table:table-cell table:style-name="ce51" table:formula="of:=SUM([$'Op. Long_Basis_Liq'.$AS11];[$'Op. Long_Basis_Liq'.$AR11];[$'Op. Long_Basis_Liq'.$AO11])" office:value-type="float" office:value="6920.51496243083" calcext:value-type="float">
            <text:p>6.920,51</text:p>
          </table:table-cell>
          <table:table-cell table:style-name="ce23" office:value-type="string" calcext:value-type="string">
            <text:p>OP1</text:p>
          </table:table-cell>
          <table:table-cell table:style-name="ce23" table:formula="of:=[$'Op. Long_Basis_Liq'.$S11]*[$'Op. Long_Basis_Liq'.$O11]" office:value-type="float" office:value="100000" calcext:value-type="float">
            <text:p>100.000,00</text:p>
          </table:table-cell>
          <table:table-cell table:style-name="ce23" table:formula="of:=[$'Op. Long_Basis_Liq'.$Y11]*[$'Op. Long_Basis_Liq'.$AA11]" office:value-type="float" office:value="-5.148" calcext:value-type="float">
            <text:p>-5,15</text:p>
          </table:table-cell>
          <table:table-cell table:style-name="ce23" table:formula="of:=[$'Op. Long_Basis_Liq'.$AE11]*[$'Op. Long_Basis_Liq'.$AD11]" office:value-type="float" office:value="-99504.9368" calcext:value-type="float">
            <text:p>-99.504,94</text:p>
          </table:table-cell>
          <table:table-cell table:style-name="Default" table:number-columns-repeated="16333"/>
        </table:table-row>
        <table:table-row table:style-name="ro1">
          <table:table-cell office:value-type="string" calcext:value-type="string">
            <text:p>LB7</text:p>
          </table:table-cell>
          <table:table-cell office:value-type="date" office:date-value="2026-06-05" calcext:value-type="date">
            <text:p>5/6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LB4; LB5; LB6</text:p>
          </table:table-cell>
          <table:table-cell office:value-type="string" calcext:value-type="string">
            <text:p>Venda</text:p>
          </table:table-cell>
          <table:table-cell table:style-name="ce27" office:value-type="string" calcext:value-type="string">
            <text:p>Intergrãos</text:p>
          </table:table-cell>
          <table:table-cell office:value-type="string" calcext:value-type="string">
            <text:p>Confres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Liq'.$G12];&quot; &quot;;[$'Op. Long_Basis_Liq'.$I12])" office:value-type="string" office:string-value="Intergrãos MT" calcext:value-type="string">
            <text:p>Intergrãos MT</text:p>
          </table:table-cell>
          <table:table-cell/>
          <table:table-cell office:value-type="string" calcext:value-type="string">
            <text:p>LDC</text:p>
          </table:table-cell>
          <table:table-cell office:value-type="string" calcext:value-type="string">
            <text:p>Soja</text:p>
          </table:table-cell>
          <table:table-cell office:value-type="float" office:value="-260000" calcext:value-type="float">
            <text:p>-260.000</text:p>
          </table:table-cell>
          <table:table-cell table:formula="of:=[$'Op. Long_Basis_Liq'.$N12]/60" office:value-type="float" office:value="-4333.33333333333" calcext:value-type="float">
            <text:p>-4.333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BRL</text:p>
          </table:table-cell>
          <table:table-cell office:value-type="date" office:date-value="2026-06-30" calcext:value-type="date">
            <text:p>30/6/2026</text:p>
          </table:table-cell>
          <table:table-cell office:value-type="float" office:value="105" calcext:value-type="float">
            <text:p>105,00</text:p>
          </table:table-cell>
          <table:table-cell office:value-type="date" office:date-value="2026-07-10" calcext:value-type="date">
            <text:p>10/7/2026</text:p>
          </table:table-cell>
          <table:table-cell table:style-name="ce2" office:value-type="string" calcext:value-type="string">
            <text:p>F8</text:p>
          </table:table-cell>
          <table:table-cell table:style-name="ce33" table:formula="of:=COM.MICROSOFT.XLOOKUP([$'Op. Long_Basis_Liq'.$U12];[$Analítico_Deriv.A:.A];[$Analítico_Deriv.S:.S])" office:value-type="string" office:string-value="CBOT" calcext:value-type="string">
            <text:p>CBOT</text:p>
          </table:table-cell>
          <table:table-cell table:style-name="ce33" table:formula="of:=COM.MICROSOFT.XLOOKUP([$'Op. Long_Basis_Liq'.$U12];[$Analítico_Deriv.A:.A];[$Analítico_Deriv.T:.T])" office:value-type="string" office:string-value="ZSQ6" calcext:value-type="string">
            <text:p>ZSQ6</text:p>
          </table:table-cell>
          <table:table-cell table:style-name="ce5" table:formula="of:=COM.MICROSOFT.XLOOKUP([$'Op. Long_Basis_Liq'.$U12];[$Analítico_Deriv.A:.A];[$Analítico_Deriv.V:.V])" office:value-type="date" office:date-value="2026-08-14" calcext:value-type="date">
            <text:p>14/8/2026</text:p>
          </table:table-cell>
          <table:table-cell office:value-type="float" office:value="1.97" calcext:value-type="float">
            <text:p>1,97</text:p>
          </table:table-cell>
          <table:table-cell office:value-type="float" office:value="268078" calcext:value-type="float">
            <text:p>268.078</text:p>
          </table:table-cell>
          <table:table-cell table:style-name="ce18" table:formula="of:=COM.MICROSOFT.XLOOKUP([$'Op. Long_Basis_Liq'.$U12];[$Analítico_Deriv.A:.A];[$Analítico_Deriv.U:.U])" office:value-type="float" office:value="11.3305" calcext:value-type="float">
            <text:p>11,3305</text:p>
          </table:table-cell>
          <table:table-cell table:formula="of:=[$'Op. Long_Basis_Liq'.$N12]+[$'Op. Long_Basis_Liq'.$Z12]" office:value-type="float" office:value="8078" calcext:value-type="float">
            <text:p>8.078,00</text:p>
          </table:table-cell>
          <table:table-cell table:style-name="ce42" office:value-type="string" calcext:value-type="string">
            <text:p>F17</text:p>
          </table:table-cell>
          <table:table-cell office:value-type="float" office:value="85980" calcext:value-type="float">
            <text:p>85.980,00</text:p>
          </table:table-cell>
          <table:table-cell table:style-name="ce18" table:formula="of:=IFERROR(COM.MICROSOFT.XLOOKUP([$'Op. Long_Basis_Liq'.$AC12];[$Analítico_Deriv.A:.A];[$Analítico_Deriv.U:.U]);0)" office:value-type="float" office:value="5.1751" calcext:value-type="float">
            <text:p>5,1751</text:p>
          </table:table-cell>
          <table:table-cell table:style-name="ce5" table:formula="of:=IFERROR(COM.MICROSOFT.XLOOKUP([$'Op. Long_Basis_Liq'.$AC12];[$Analítico_Deriv.A:.A];[$Analítico_Deriv.V:.V]);0)" office:value-type="date" office:date-value="2026-06-30" calcext:value-type="date">
            <text:p>30/6/2026</text:p>
          </table:table-cell>
          <table:table-cell table:style-name="ce42" table:formula="of:=COM.MICROSOFT.XLOOKUP([$'Op. Long_Basis_Liq'.$U12];[$Analítico_Deriv.A:.A];[$Analítico_Deriv.AI:.AI])" office:value-type="string" office:string-value="LB-Soja-26" calcext:value-type="string">
            <text:p>LB-Soja-26</text:p>
          </table:table-cell>
          <table:table-cell table:style-name="ce42" table:formula="of:=COM.MICROSOFT.CONCAT([$'Op. Long_Basis_Liq'.$M12];&quot; &quot;;[$'Op. Long_Basis_Liq'.$P12];&quot; &quot;;[$'Op. Long_Basis_Liq'.$Q12];&quot; &quot;;[$'Op. Long_Basis_Liq'.$H12])" office:value-type="string" office:string-value="Soja Safra Atual BRL Confresa" calcext:value-type="string">
            <text:p>Soja Safra Atual BRL Confresa</text:p>
          </table:table-cell>
          <table:table-cell table:style-name="ce23" table:formula="of:=IFERROR(COM.MICROSOFT.XLOOKUP([$'Op. Long_Basis_Liq'.$AH12];[$Preços_MTM.O:.O];[$Preços_MTM.P:.P]);0)" office:value-type="float" office:value="105" calcext:value-type="float">
            <text:p>105,00</text:p>
          </table:table-cell>
          <table:table-cell table:style-name="ce18" table:formula="of:=IFERROR(COM.MICROSOFT.XLOOKUP([$'Op. Long_Basis_Liq'.$W12];[$Preços_MTM.C:.C];[$Preços_MTM.D:.D]);0)" office:value-type="float" office:value="11.225" calcext:value-type="float">
            <text:p>11,2250</text:p>
          </table:table-cell>
          <table:table-cell table:style-name="ce18" table:formula="of:=IFERROR(COM.MICROSOFT.XLOOKUP([$'Op. Long_Basis_Liq'.$AF12];[$Preços_MTM.H:.H];[$Preços_MTM.I:.I]);0)" office:value-type="float" office:value="5.1766" calcext:value-type="float">
            <text:p>5,1766</text:p>
          </table:table-cell>
          <table:table-cell table:formula="of:=IF([$'Op. Long_Basis_Liq'.$Q12]=&quot;BRL&quot;;([$'Op. Long_Basis_Liq'.$AI12]-[$'Op. Long_Basis_Liq'.$S12])*[$'Op. Long_Basis_Liq'.$O12];IF([$'Op. Long_Basis_Liq'.$Q12]=&quot;USD&quot;;([$'Op. Long_Basis_Liq'.$AI12]-[$'Op. Long_Basis_Liq'.$S12])*[$'Op. Long_Basis_Liq'.$O12]*COM.MICROSOFT.XLOOKUP([$'Op. Long_Basis_Liq'.$T12];[$Preços_MTM.H:.H];[$Preços_MTM.I:.I])))" office:value-type="float" office:value="-0" calcext:value-type="float">
            <text:p>0,00</text:p>
          </table:table-cell>
          <table:table-cell table:formula="of:=IF([$'Op. Long_Basis_Liq'.$V12]=&quot;CBOT&quot;;([$'Op. Long_Basis_Liq'.$AJ12]-[$'Op. Long_Basis_Liq'.$AA12])*5000*[$'Op. Long_Basis_Liq'.$Y12]*[$Preços_MTM.$I$4];IF([$'Op. Long_Basis_Liq'.$V12]=&quot;BMF&quot;;([$'Op. Long_Basis_Liq'.$AJ12]-[$'Op. Long_Basis_Liq'.$AA12])*450*[$'Op. Long_Basis_Liq'.$Y12];&quot;VERIFICAR&quot;))" office:value-type="float" office:value="-5397.99453750005" calcext:value-type="float">
            <text:p>-5.397,99</text:p>
          </table:table-cell>
          <table:table-cell table:formula="of:=([$'Op. Long_Basis_Liq'.$AK12]-[$'Op. Long_Basis_Liq'.$AE12])*[$'Op. Long_Basis_Liq'.$AD12]" office:value-type="float" office:value="128.970000000005" calcext:value-type="float">
            <text:p>128,97</text:p>
          </table:table-cell>
          <table:table-cell table:formula="of:=SUM([$'Op. Long_Basis_Liq'.$AL12:.$AN12])" office:value-type="float" office:value="-5269.02453750005" calcext:value-type="float">
            <text:p>-5.269,02</text:p>
          </table:table-cell>
          <table:table-cell office:value-type="percentage" office:value="0.014" calcext:value-type="percentage">
            <text:p>1,40%</text:p>
          </table:table-cell>
          <table:table-cell table:formula="of:=IF([$'Op. Long_Basis_Liq'.$D12]=&quot;Entrada&quot;;([$'Op. Long_Basis_Liq'.$S12]*(1+[$'Op. Long_Basis_Liq'.$AP12])^(((COM.MICROSOFT.XLOOKUP([$'Op. Long_Basis_Liq'.$AH12];[$Preços_MTM.O:.O];[$Preços_MTM.Q:.Q]))-[$'Op. Long_Basis_Liq'.$T12])/30))-[$'Op. Long_Basis_Liq'.$S12];IF([$'Op. Long_Basis_Liq'.$D12]=&quot;Saída&quot;;0;&quot;VALIDAR&quot;))" office:value-type="float" office:value="0" calcext:value-type="float">
            <text:p>0,00</text:p>
          </table:table-cell>
          <table:table-cell table:style-name="ce51" table:formula="of:=[$'Op. Long_Basis_Liq'.$AQ12]*[$'Op. Long_Basis_Liq'.$O12]*-1" office:value-type="float" office:value="0" calcext:value-type="float">
            <text:p>0,00</text:p>
          </table:table-cell>
          <table:table-cell table:style-name="ce51" office:value-type="float" office:value="0" calcext:value-type="float">
            <text:p>0,00</text:p>
          </table:table-cell>
          <table:table-cell table:style-name="ce51" table:formula="of:=SUM([$'Op. Long_Basis_Liq'.$AR12:.$AS12])" office:value-type="float" office:value="0" calcext:value-type="float">
            <text:p>0,00</text:p>
          </table:table-cell>
          <table:table-cell table:style-name="ce51" table:formula="of:=SUM([$'Op. Long_Basis_Liq'.$AS12];[$'Op. Long_Basis_Liq'.$AR12];[$'Op. Long_Basis_Liq'.$AO12])" office:value-type="float" office:value="-5269.02453750005" calcext:value-type="float">
            <text:p>-5.269,02</text:p>
          </table:table-cell>
          <table:table-cell table:style-name="ce23" office:value-type="string" calcext:value-type="string">
            <text:p>OP1</text:p>
          </table:table-cell>
          <table:table-cell table:style-name="ce23" table:formula="of:=[$'Op. Long_Basis_Liq'.$S12]*[$'Op. Long_Basis_Liq'.$O12]" office:value-type="float" office:value="-455000" calcext:value-type="float">
            <text:p>-455.000,00</text:p>
          </table:table-cell>
          <table:table-cell table:style-name="ce23" table:formula="of:=[$'Op. Long_Basis_Liq'.$Y12]*[$'Op. Long_Basis_Liq'.$AA12]" office:value-type="float" office:value="22.321085" calcext:value-type="float">
            <text:p>22,32</text:p>
          </table:table-cell>
          <table:table-cell table:style-name="ce23" table:formula="of:=[$'Op. Long_Basis_Liq'.$AE12]*[$'Op. Long_Basis_Liq'.$AD12]" office:value-type="float" office:value="444955.098" calcext:value-type="float">
            <text:p>444.955,10</text:p>
          </table:table-cell>
          <table:table-cell table:style-name="Default" table:number-columns-repeated="16333"/>
        </table:table-row>
        <table:table-row table:style-name="ro1">
          <table:table-cell office:value-type="string" calcext:value-type="string">
            <text:p>LB8</text:p>
          </table:table-cell>
          <table:table-cell office:value-type="date" office:date-value="2026-06-05" calcext:value-type="date">
            <text:p>5/6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LB2; LB3</text:p>
          </table:table-cell>
          <table:table-cell office:value-type="string" calcext:value-type="string">
            <text:p>Venda</text:p>
          </table:table-cell>
          <table:table-cell table:style-name="ce27" office:value-type="string" calcext:value-type="string">
            <text:p>Intergrãos</text:p>
          </table:table-cell>
          <table:table-cell office:value-type="string" calcext:value-type="string">
            <text:p>Matup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Liq'.$G13];&quot; &quot;;[$'Op. Long_Basis_Liq'.$I13])" office:value-type="string" office:string-value="Intergrãos MT" calcext:value-type="string">
            <text:p>Intergrãos MT</text:p>
          </table:table-cell>
          <table:table-cell/>
          <table:table-cell office:value-type="string" calcext:value-type="string">
            <text:p>LDC</text:p>
          </table:table-cell>
          <table:table-cell office:value-type="string" calcext:value-type="string">
            <text:p>Soja</text:p>
          </table:table-cell>
          <table:table-cell office:value-type="float" office:value="-240000" calcext:value-type="float">
            <text:p>-240.000</text:p>
          </table:table-cell>
          <table:table-cell table:formula="of:=[$'Op. Long_Basis_Liq'.$N13]/60" office:value-type="float" office:value="-4000" calcext:value-type="float">
            <text:p>-4.000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BRL</text:p>
          </table:table-cell>
          <table:table-cell office:value-type="date" office:date-value="2026-06-30" calcext:value-type="date">
            <text:p>30/6/2026</text:p>
          </table:table-cell>
          <table:table-cell office:value-type="float" office:value="107.6" calcext:value-type="float">
            <text:p>107,60</text:p>
          </table:table-cell>
          <table:table-cell office:value-type="date" office:date-value="2026-07-10" calcext:value-type="date">
            <text:p>10/7/2026</text:p>
          </table:table-cell>
          <table:table-cell table:style-name="ce2" office:value-type="string" calcext:value-type="string">
            <text:p>F8</text:p>
          </table:table-cell>
          <table:table-cell table:style-name="ce33" table:formula="of:=COM.MICROSOFT.XLOOKUP([$'Op. Long_Basis_Liq'.$U13];[$Analítico_Deriv.A:.A];[$Analítico_Deriv.S:.S])" office:value-type="string" office:string-value="CBOT" calcext:value-type="string">
            <text:p>CBOT</text:p>
          </table:table-cell>
          <table:table-cell table:style-name="ce33" table:formula="of:=COM.MICROSOFT.XLOOKUP([$'Op. Long_Basis_Liq'.$U13];[$Analítico_Deriv.A:.A];[$Analítico_Deriv.T:.T])" office:value-type="string" office:string-value="ZSQ6" calcext:value-type="string">
            <text:p>ZSQ6</text:p>
          </table:table-cell>
          <table:table-cell table:style-name="ce5" table:formula="of:=COM.MICROSOFT.XLOOKUP([$'Op. Long_Basis_Liq'.$U13];[$Analítico_Deriv.A:.A];[$Analítico_Deriv.V:.V])" office:value-type="date" office:date-value="2026-08-14" calcext:value-type="date">
            <text:p>14/8/2026</text:p>
          </table:table-cell>
          <table:table-cell office:value-type="float" office:value="1.71" calcext:value-type="float">
            <text:p>1,71</text:p>
          </table:table-cell>
          <table:table-cell office:value-type="float" office:value="232697" calcext:value-type="float">
            <text:p>232.697</text:p>
          </table:table-cell>
          <table:table-cell table:style-name="ce18" table:formula="of:=COM.MICROSOFT.XLOOKUP([$'Op. Long_Basis_Liq'.$U13];[$Analítico_Deriv.A:.A];[$Analítico_Deriv.U:.U])" office:value-type="float" office:value="11.3305" calcext:value-type="float">
            <text:p>11,3305</text:p>
          </table:table-cell>
          <table:table-cell table:formula="of:=[$'Op. Long_Basis_Liq'.$N13]+[$'Op. Long_Basis_Liq'.$Z13]" office:value-type="float" office:value="-7303" calcext:value-type="float">
            <text:p>-7.303,00</text:p>
          </table:table-cell>
          <table:table-cell table:style-name="ce42" office:value-type="string" calcext:value-type="string">
            <text:p>F17</text:p>
          </table:table-cell>
          <table:table-cell office:value-type="float" office:value="73940" calcext:value-type="float">
            <text:p>73.940,00</text:p>
          </table:table-cell>
          <table:table-cell table:style-name="ce18" table:formula="of:=IFERROR(COM.MICROSOFT.XLOOKUP([$'Op. Long_Basis_Liq'.$AC13];[$Analítico_Deriv.A:.A];[$Analítico_Deriv.U:.U]);0)" office:value-type="float" office:value="5.1751" calcext:value-type="float">
            <text:p>5,1751</text:p>
          </table:table-cell>
          <table:table-cell table:style-name="ce5" table:formula="of:=IFERROR(COM.MICROSOFT.XLOOKUP([$'Op. Long_Basis_Liq'.$AC13];[$Analítico_Deriv.A:.A];[$Analítico_Deriv.V:.V]);0)" office:value-type="date" office:date-value="2026-06-30" calcext:value-type="date">
            <text:p>30/6/2026</text:p>
          </table:table-cell>
          <table:table-cell table:style-name="ce42" table:formula="of:=COM.MICROSOFT.XLOOKUP([$'Op. Long_Basis_Liq'.$U13];[$Analítico_Deriv.A:.A];[$Analítico_Deriv.AI:.AI])" office:value-type="string" office:string-value="LB-Soja-26" calcext:value-type="string">
            <text:p>LB-Soja-26</text:p>
          </table:table-cell>
          <table:table-cell table:style-name="ce42" table:formula="of:=COM.MICROSOFT.CONCAT([$'Op. Long_Basis_Liq'.$M13];&quot; &quot;;[$'Op. Long_Basis_Liq'.$P13];&quot; &quot;;[$'Op. Long_Basis_Liq'.$Q13];&quot; &quot;;[$'Op. Long_Basis_Liq'.$H13])" office:value-type="string" office:string-value="Soja Safra Atual BRL Matupa" calcext:value-type="string">
            <text:p>Soja Safra Atual BRL Matupa</text:p>
          </table:table-cell>
          <table:table-cell table:style-name="ce23" table:formula="of:=IFERROR(COM.MICROSOFT.XLOOKUP([$'Op. Long_Basis_Liq'.$AH13];[$Preços_MTM.O:.O];[$Preços_MTM.P:.P]);0)" office:value-type="float" office:value="107.6" calcext:value-type="float">
            <text:p>107,60</text:p>
          </table:table-cell>
          <table:table-cell table:style-name="ce18" table:formula="of:=IFERROR(COM.MICROSOFT.XLOOKUP([$'Op. Long_Basis_Liq'.$W13];[$Preços_MTM.C:.C];[$Preços_MTM.D:.D]);0)" office:value-type="float" office:value="11.225" calcext:value-type="float">
            <text:p>11,2250</text:p>
          </table:table-cell>
          <table:table-cell table:style-name="ce18" table:formula="of:=IFERROR(COM.MICROSOFT.XLOOKUP([$'Op. Long_Basis_Liq'.$AF13];[$Preços_MTM.H:.H];[$Preços_MTM.I:.I]);0)" office:value-type="float" office:value="5.1766" calcext:value-type="float">
            <text:p>5,1766</text:p>
          </table:table-cell>
          <table:table-cell table:formula="of:=IF([$'Op. Long_Basis_Liq'.$Q13]=&quot;BRL&quot;;([$'Op. Long_Basis_Liq'.$AI13]-[$'Op. Long_Basis_Liq'.$S13])*[$'Op. Long_Basis_Liq'.$O13];IF([$'Op. Long_Basis_Liq'.$Q13]=&quot;USD&quot;;([$'Op. Long_Basis_Liq'.$AI13]-[$'Op. Long_Basis_Liq'.$S13])*[$'Op. Long_Basis_Liq'.$O13]*COM.MICROSOFT.XLOOKUP([$'Op. Long_Basis_Liq'.$T13];[$Preços_MTM.H:.H];[$Preços_MTM.I:.I])))" office:value-type="float" office:value="-0" calcext:value-type="float">
            <text:p>0,00</text:p>
          </table:table-cell>
          <table:table-cell table:formula="of:=IF([$'Op. Long_Basis_Liq'.$V13]=&quot;CBOT&quot;;([$'Op. Long_Basis_Liq'.$AJ13]-[$'Op. Long_Basis_Liq'.$AA13])*5000*[$'Op. Long_Basis_Liq'.$Y13]*[$Preços_MTM.$I$4];IF([$'Op. Long_Basis_Liq'.$V13]=&quot;BMF&quot;;([$'Op. Long_Basis_Liq'.$AJ13]-[$'Op. Long_Basis_Liq'.$AA13])*450*[$'Op. Long_Basis_Liq'.$Y13];&quot;VERIFICAR&quot;))" office:value-type="float" office:value="-4685.56886250005" calcext:value-type="float">
            <text:p>-4.685,57</text:p>
          </table:table-cell>
          <table:table-cell table:formula="of:=([$'Op. Long_Basis_Liq'.$AK13]-[$'Op. Long_Basis_Liq'.$AE13])*[$'Op. Long_Basis_Liq'.$AD13]" office:value-type="float" office:value="110.910000000004" calcext:value-type="float">
            <text:p>110,91</text:p>
          </table:table-cell>
          <table:table-cell table:formula="of:=SUM([$'Op. Long_Basis_Liq'.$AL13:.$AN13])" office:value-type="float" office:value="-4574.65886250004" calcext:value-type="float">
            <text:p>-4.574,66</text:p>
          </table:table-cell>
          <table:table-cell office:value-type="percentage" office:value="0.014" calcext:value-type="percentage">
            <text:p>1,40%</text:p>
          </table:table-cell>
          <table:table-cell table:formula="of:=IF([$'Op. Long_Basis_Liq'.$D13]=&quot;Entrada&quot;;([$'Op. Long_Basis_Liq'.$S13]*(1+[$'Op. Long_Basis_Liq'.$AP13])^(((COM.MICROSOFT.XLOOKUP([$'Op. Long_Basis_Liq'.$AH13];[$Preços_MTM.O:.O];[$Preços_MTM.Q:.Q]))-[$'Op. Long_Basis_Liq'.$T13])/30))-[$'Op. Long_Basis_Liq'.$S13];IF([$'Op. Long_Basis_Liq'.$D13]=&quot;Saída&quot;;0;&quot;VALIDAR&quot;))" office:value-type="float" office:value="0" calcext:value-type="float">
            <text:p>0,00</text:p>
          </table:table-cell>
          <table:table-cell table:style-name="ce51" table:formula="of:=[$'Op. Long_Basis_Liq'.$AQ13]*[$'Op. Long_Basis_Liq'.$O13]*-1" office:value-type="float" office:value="0" calcext:value-type="float">
            <text:p>0,00</text:p>
          </table:table-cell>
          <table:table-cell table:style-name="ce51" office:value-type="float" office:value="0" calcext:value-type="float">
            <text:p>0,00</text:p>
          </table:table-cell>
          <table:table-cell table:style-name="ce51" table:formula="of:=SUM([$'Op. Long_Basis_Liq'.$AR13:.$AS13])" office:value-type="float" office:value="0" calcext:value-type="float">
            <text:p>0,00</text:p>
          </table:table-cell>
          <table:table-cell table:style-name="ce51" table:formula="of:=SUM([$'Op. Long_Basis_Liq'.$AS13];[$'Op. Long_Basis_Liq'.$AR13];[$'Op. Long_Basis_Liq'.$AO13])" office:value-type="float" office:value="-4574.65886250004" calcext:value-type="float">
            <text:p>-4.574,66</text:p>
          </table:table-cell>
          <table:table-cell table:style-name="ce23" office:value-type="string" calcext:value-type="string">
            <text:p>OP1</text:p>
          </table:table-cell>
          <table:table-cell table:style-name="ce23" table:formula="of:=[$'Op. Long_Basis_Liq'.$S13]*[$'Op. Long_Basis_Liq'.$O13]" office:value-type="float" office:value="-430400" calcext:value-type="float">
            <text:p>-430.400,00</text:p>
          </table:table-cell>
          <table:table-cell table:style-name="ce23" table:formula="of:=[$'Op. Long_Basis_Liq'.$Y13]*[$'Op. Long_Basis_Liq'.$AA13]" office:value-type="float" office:value="19.375155" calcext:value-type="float">
            <text:p>19,38</text:p>
          </table:table-cell>
          <table:table-cell table:style-name="ce23" table:formula="of:=[$'Op. Long_Basis_Liq'.$AE13]*[$'Op. Long_Basis_Liq'.$AD13]" office:value-type="float" office:value="382646.894" calcext:value-type="float">
            <text:p>382.646,89</text:p>
          </table:table-cell>
          <table:table-cell table:style-name="Default" table:number-columns-repeated="16333"/>
        </table:table-row>
        <table:table-row table:style-name="ro1" table:number-rows-repeated="1048562">
          <table:table-cell table:number-columns-repeated="51"/>
          <table:table-cell table:style-name="Default" table:number-columns-repeated="16333"/>
        </table:table-row>
        <table:table-row table:style-name="ro1">
          <table:table-cell table:number-columns-repeated="51"/>
          <table:table-cell table:style-name="Default" table:number-columns-repeated="16333"/>
        </table:table-row>
        <calcext:conditional-formats>
          <calcext:conditional-format calcext:target-range-address="'Op. Long_Basis_Liq'.AR1:'Op. Long_Basis_Liq'.AU1048576">
            <calcext:condition calcext:apply-style-name="ConditionalStyle_42" calcext:value="between(-0.000000000001,-9.99999999999999E+021)" calcext:base-cell-address="'Op. Long_Basis_Liq'.AR1"/>
          </calcext:conditional-format>
          <calcext:conditional-format calcext:target-range-address="'Op. Long_Basis_Liq'.N1:'Op. Long_Basis_Liq'.O1048576">
            <calcext:condition calcext:apply-style-name="ConditionalStyle_44" calcext:value="between(-0.00000001,-9.99999999999999E+018)" calcext:base-cell-address="'Op. Long_Basis_Liq'.N1"/>
          </calcext:conditional-format>
          <calcext:conditional-format calcext:target-range-address="'Op. Long_Basis_Liq'.Y1:'Op. Long_Basis_Liq'.Z1048576 'Op. Long_Basis_Liq'.AB1:'Op. Long_Basis_Liq'.AB1048576 'Op. Long_Basis_Liq'.AD1:'Op. Long_Basis_Liq'.AD1048576 'Op. Long_Basis_Liq'.AL1:'Op. Long_Basis_Liq'.AQ1048576">
            <calcext:condition calcext:apply-style-name="ConditionalStyle_43" calcext:value="between(-1E-017,-9.99999999999999E+047)" calcext:base-cell-address="'Op. Long_Basis_Liq'.Y1"/>
          </calcext:conditional-format>
        </calcext:conditional-formats>
      </table:table>
      <table:table table:name="Reporte_Liq" table:style-name="ta5" table:print-ranges="Reporte_Liq.B1:Reporte_Liq.L38">
        <office:forms form:automatic-focus="false" form:apply-design-mode="false"/>
        <table:table-column table:style-name="co1" table:default-cell-style-name="Default"/>
        <table:table-column table:style-name="co19" table:number-columns-repeated="3" table:default-cell-style-name="ce2"/>
        <table:table-column table:style-name="co19" table:default-cell-style-name="ce42"/>
        <table:table-column table:style-name="co19" table:default-cell-style-name="ce23"/>
        <table:table-column table:style-name="co19" table:number-columns-repeated="6" table:default-cell-style-name="ce2"/>
        <table:table-column table:style-name="co20" table:number-columns-repeated="1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16359"/>
        <table:table-row table:style-name="ro1">
          <table:table-cell table:number-columns-repeated="25"/>
          <table:table-cell table:style-name="Default" table:number-columns-repeated="16359"/>
        </table:table-row>
        <table:table-row table:style-name="ro1">
          <table:table-cell/>
          <table:table-cell>
            <draw:custom-shape table:end-cell-address="Reporte_Liq.L5" table:end-x="2.248cm" table:end-y="0.338cm" draw:z-index="1" draw:name="Retângulo 3" draw:style-name="gr5" draw:text-style-name="P4" svg:width="24.738cm" svg:height="1.608cm" svg:x="0cm" svg:y="0.318cm">
              <text:p text:style-name="P2"><text:span text:style-name="T5"/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z-index="3" draw:name="Imagem 1" draw:style-name="gr6" draw:text-style-name="P1" svg:width="2.274cm" svg:height="1.277cm" svg:x="0.285cm" svg:y="0.493cm">
              <draw:image xlink:href="Pictures/100000010000011C000001643C71A785.png" xlink:type="simple" xlink:show="embed" xlink:actuate="onLoad" draw:mime-type="image/png">
                <text:p/>
              </draw:image>
              <svg:desc>Relfer – Estruturas Metálicas</svg:desc>
            </draw:frame>
          </table:table-cell>
          <table:table-cell table:number-columns-repeated="23"/>
          <table:table-cell table:style-name="Default" table:number-columns-repeated="16359"/>
        </table:table-row>
        <table:table-row table:style-name="ro1">
          <table:table-cell table:number-columns-repeated="3"/>
          <table:table-cell>
            <draw:custom-shape draw:z-index="0" draw:name="CaixaDeTexto 2" draw:style-name="gr2" draw:text-style-name="P3" svg:width="14.854cm" svg:height="1.108cm" svg:x="1.906cm" svg:y="0.07cm">
              <text:p text:style-name="P2"><text:span text:style-name="T6">RESULTADO DE LIQUIDAÇÃO DE OP. </text:span><text:span text:style-name="T7">LONG BASI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1"/>
          <table:table-cell table:style-name="Default" table:number-columns-repeated="16359"/>
        </table:table-row>
        <table:table-row table:style-name="ro1" table:number-rows-repeated="3">
          <table:table-cell table:number-columns-repeated="25"/>
          <table:table-cell table:style-name="Default" table:number-columns-repeated="16359"/>
        </table:table-row>
        <table:table-row table:style-name="ro1">
          <table:table-cell/>
          <table:table-cell table:style-name="ce52" office:value-type="string" calcext:value-type="string">
            <text:p>Data</text:p>
          </table:table-cell>
          <table:table-cell table:style-name="ce63" office:value-type="date" office:date-value="2026-06-05" calcext:value-type="date">
            <text:p>5/6/2026</text:p>
          </table:table-cell>
          <table:table-cell/>
          <table:table-cell table:style-name="ce53" office:value-type="string" calcext:value-type="string">
            <text:p>Commod</text:p>
          </table:table-cell>
          <table:table-cell table:style-name="ce64" office:value-type="string" calcext:value-type="string">
            <text:p>Soja</text:p>
          </table:table-cell>
          <table:table-cell table:style-name="ce87" table:formula="of:=COM.MICROSOFT.CONCAT([.F7];&quot; &quot;;[.F8])" office:value-type="string" office:string-value="Soja CBOT" calcext:value-type="string">
            <text:p>Soja CBOT</text:p>
          </table:table-cell>
          <table:table-cell table:number-columns-repeated="18"/>
          <table:table-cell table:style-name="Default" table:number-columns-repeated="16359"/>
        </table:table-row>
        <table:table-row table:style-name="ro1">
          <table:table-cell/>
          <table:table-cell table:style-name="ce52" office:value-type="string" calcext:value-type="string">
            <text:p>Operação</text:p>
          </table:table-cell>
          <table:table-cell table:style-name="ce63" office:value-type="string" calcext:value-type="string">
            <text:p>OP1</text:p>
          </table:table-cell>
          <table:table-cell/>
          <table:table-cell table:style-name="ce53" office:value-type="string" calcext:value-type="string">
            <text:p>Bolsa</text:p>
          </table:table-cell>
          <table:table-cell table:style-name="ce64" office:value-type="string" calcext:value-type="string">
            <text:p>CBOT</text:p>
          </table:table-cell>
          <table:table-cell table:number-columns-repeated="19"/>
          <table:table-cell table:style-name="Default" table:number-columns-repeated="16359"/>
        </table:table-row>
        <table:table-row table:style-name="ro1">
          <table:table-cell/>
          <table:table-cell table:style-name="ce53" office:value-type="string" calcext:value-type="string">
            <text:p>Filial</text:p>
          </table:table-cell>
          <table:table-cell table:style-name="ce64" office:value-type="string" calcext:value-type="string">
            <text:p>Várias</text:p>
          </table:table-cell>
          <table:table-cell table:number-columns-repeated="22"/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  <table:table-row table:style-name="ro1">
          <table:table-cell table:number-columns-repeated="23"/>
          <table:table-cell table:style-name="ce90" office:value-type="string" calcext:value-type="string" table:number-columns-spanned="2" table:number-rows-spanned="1">
            <text:p>GRÁFICO</text:p>
          </table:table-cell>
          <table:covered-table-cell table:style-name="ce90"/>
          <table:table-cell table:style-name="Default" table:number-columns-repeated="16359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3" table:number-rows-spanned="1">
            <text:p>Físico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1">
            <text:p>Bolsa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Dólar</text:p>
          </table:table-cell>
          <table:covered-table-cell table:number-columns-repeated="2" table:style-name="ce54"/>
          <table:table-cell table:number-columns-repeated="11"/>
          <table:table-cell table:style-name="ce91" office:value-type="string" calcext:value-type="string">
            <text:p>Físico</text:p>
          </table:table-cell>
          <table:table-cell table:style-name="ce92" table:formula="of:=[.F16]" office:value-type="float" office:value="28969.7832800002" calcext:value-type="float">
            <text:p>28.969,78 </text:p>
          </table:table-cell>
          <table:table-cell table:style-name="Default" table:number-columns-repeated="16359"/>
        </table:table-row>
        <table:table-row table:style-name="ro1">
          <table:table-cell/>
          <table:table-cell table:style-name="ce54" office:value-type="string" calcext:value-type="string">
            <text:p>Movimento</text:p>
          </table:table-cell>
          <table:table-cell table:style-name="ce54" office:value-type="string" calcext:value-type="string">
            <text:p>ID Operação</text:p>
          </table:table-cell>
          <table:table-cell table:style-name="ce54" office:value-type="string" calcext:value-type="string">
            <text:p>Op</text:p>
          </table:table-cell>
          <table:table-cell table:style-name="ce77" office:value-type="string" calcext:value-type="string">
            <text:p>Vol (scs)</text:p>
          </table:table-cell>
          <table:table-cell table:style-name="ce81" office:value-type="string" calcext:value-type="string">
            <text:p>Preço (R$/sc)</text:p>
          </table:table-cell>
          <table:table-cell table:style-name="ce54" office:value-type="string" calcext:value-type="string">
            <text:p>Op</text:p>
          </table:table-cell>
          <table:table-cell table:style-name="ce77" office:value-type="string" calcext:value-type="string">
            <text:p>Vol (Lotes)</text:p>
          </table:table-cell>
          <table:table-cell table:style-name="ce81" office:value-type="string" calcext:value-type="string">
            <text:p>Preço (U$/bu)</text:p>
          </table:table-cell>
          <table:table-cell table:style-name="ce54" office:value-type="string" calcext:value-type="string">
            <text:p>Op</text:p>
          </table:table-cell>
          <table:table-cell table:style-name="ce77" office:value-type="string" calcext:value-type="string">
            <text:p>Notional</text:p>
          </table:table-cell>
          <table:table-cell table:style-name="ce81" office:value-type="string" calcext:value-type="string">
            <text:p>Real/Dólar</text:p>
          </table:table-cell>
          <table:table-cell table:number-columns-repeated="11"/>
          <table:table-cell table:style-name="ce91" office:value-type="string" calcext:value-type="string">
            <text:p>Bolsa</text:p>
          </table:table-cell>
          <table:table-cell table:style-name="ce92" table:formula="of:=[.I16]" office:value-type="float" office:value="24397.2678749996" calcext:value-type="float">
            <text:p>24.397,27 </text:p>
          </table:table-cell>
          <table:table-cell table:style-name="Default" table:number-columns-repeated="16359"/>
        </table:table-row>
        <table:table-row table:style-name="ro1">
          <table:table-cell/>
          <table:table-cell table:style-name="ce55" office:value-type="string" calcext:value-type="string">
            <text:p>Entrada</text:p>
          </table:table-cell>
          <table:table-cell table:style-name="ce65" table:formula="of:=[.C8]" office:value-type="string" office:string-value="OP1" calcext:value-type="string">
            <text:p>OP1</text:p>
          </table:table-cell>
          <table:table-cell table:style-name="ce55" office:value-type="string" calcext:value-type="string">
            <text:p>Compra</text:p>
          </table:table-cell>
          <table:table-cell table:style-name="ce78" table:formula="of:=SUMIFS([$'Op. Long_Basis_Liq'.O:.O];[$'Op. Long_Basis_Liq'.D:.D];[$Reporte_Liq.B14];[$'Op. Long_Basis_Liq'.AV:.AV];[$Reporte_Liq.C8])" office:value-type="float" office:value="8357.11" calcext:value-type="float">
            <text:p>8.357</text:p>
          </table:table-cell>
          <table:table-cell table:style-name="ce82" table:formula="of:=SUMIFS([$'Op. Long_Basis_Liq'.AW:.AW];[$'Op. Long_Basis_Liq'.D:.D];[$Reporte_Liq.B14];[$'Op. Long_Basis_Liq'.AV:.AV];[$Reporte_Liq.C8])/(SUMIFS([$'Op. Long_Basis_Liq'.O:.O];[$'Op. Long_Basis_Liq'.D:.D];[$Reporte_Liq.B14];[$'Op. Long_Basis_Liq'.AV:.AV];[$Reporte_Liq.C8]))" office:value-type="float" office:value="102.781516576903" calcext:value-type="float">
            <text:p>102,78</text:p>
          </table:table-cell>
          <table:table-cell table:style-name="ce55" office:value-type="string" calcext:value-type="string">
            <text:p>Venda</text:p>
          </table:table-cell>
          <table:table-cell table:style-name="ce55" table:formula="of:=SUMIFS([$'Op. Long_Basis_Liq'.Y:.Y];[$'Op. Long_Basis_Liq'.D:.D];[$Reporte_Liq.B14];[$'Op. Long_Basis_Liq'.AV:.AV];[$Reporte_Liq.C8])" office:value-type="float" office:value="-3.68" calcext:value-type="float">
            <text:p>-3,68</text:p>
          </table:table-cell>
          <table:table-cell table:style-name="ce88" table:formula="of:=SUMIFS([$'Op. Long_Basis_Liq'.AX:.AX];[$'Op. Long_Basis_Liq'.D:.D];[$Reporte_Liq.B14];[$'Op. Long_Basis_Liq'.AV:.AV];[$Reporte_Liq.C8])/(SUMIFS([$'Op. Long_Basis_Liq'.Y:.Y];[$'Op. Long_Basis_Liq'.D:.D];[$Reporte_Liq.B14];[$'Op. Long_Basis_Liq'.AV:.AV];[$Reporte_Liq.C8]))" office:value-type="float" office:value="11.5857581521739" calcext:value-type="float">
            <text:p>11,5858</text:p>
          </table:table-cell>
          <table:table-cell table:style-name="ce55" table:formula="of:=[.G14]" office:value-type="string" office:string-value="Venda" calcext:value-type="string">
            <text:p>Venda</text:p>
          </table:table-cell>
          <table:table-cell table:style-name="ce82" table:formula="of:=SUMIFS([$'Op. Long_Basis_Liq'.AD:.AD];[$'Op. Long_Basis_Liq'.D:.D];[$Reporte_Liq.B14];[$'Op. Long_Basis_Liq'.AV:.AV];[$Reporte_Liq.C8])" office:value-type="float" office:value="-159920" calcext:value-type="float">
            <text:p>-159.920,00</text:p>
          </table:table-cell>
          <table:table-cell table:style-name="ce88" table:formula="of:=SUMIFS([$'Op. Long_Basis_Liq'.AY:.AY];[$'Op. Long_Basis_Liq'.D:.D];[$Reporte_Liq.B14];[$'Op. Long_Basis_Liq'.AV:.AV];[$Reporte_Liq.C8])/(SUMIFS([$'Op. Long_Basis_Liq'.AD:.AD];[$'Op. Long_Basis_Liq'.D:.D];[$Reporte_Liq.B14];[$'Op. Long_Basis_Liq'.AV:.AV];[$Reporte_Liq.C8]))" office:value-type="float" office:value="5.37981601488244" calcext:value-type="float">
            <text:p>5,3798</text:p>
          </table:table-cell>
          <table:table-cell table:number-columns-repeated="11"/>
          <table:table-cell table:style-name="ce91" office:value-type="string" calcext:value-type="string">
            <text:p>Dólar</text:p>
          </table:table-cell>
          <table:table-cell table:style-name="ce92" table:formula="of:=[.L16]" office:value-type="float" office:value="32738.1851000002" calcext:value-type="float">
            <text:p>32.738,19 </text:p>
          </table:table-cell>
          <table:table-cell table:style-name="Default" table:number-columns-repeated="16359"/>
        </table:table-row>
        <table:table-row table:style-name="ro1">
          <table:table-cell/>
          <table:table-cell table:style-name="ce56" office:value-type="string" calcext:value-type="string">
            <text:p>Saída</text:p>
          </table:table-cell>
          <table:table-cell table:style-name="ce66" table:formula="of:=[.C8]" office:value-type="string" office:string-value="OP1" calcext:value-type="string">
            <text:p>OP1</text:p>
          </table:table-cell>
          <table:table-cell table:style-name="ce56" office:value-type="string" calcext:value-type="string">
            <text:p>Venda</text:p>
          </table:table-cell>
          <table:table-cell table:style-name="ce79" table:formula="of:=SUMIFS([$'Op. Long_Basis_Liq'.O:.O];[$'Op. Long_Basis_Liq'.D:.D];[$Reporte_Liq.B15];[$'Op. Long_Basis_Liq'.AV:.AV];[$Reporte_Liq.C8])" office:value-type="float" office:value="-8333.33333333333" calcext:value-type="float">
            <text:p>-8.333</text:p>
          </table:table-cell>
          <table:table-cell table:style-name="ce83" table:formula="of:=SUMIFS([$'Op. Long_Basis_Liq'.AW:.AW];[$'Op. Long_Basis_Liq'.D:.D];[$Reporte_Liq.B15];[$'Op. Long_Basis_Liq'.AV:.AV];[$Reporte_Liq.C8])/(SUMIFS([$'Op. Long_Basis_Liq'.O:.O];[$'Op. Long_Basis_Liq'.D:.D];[$Reporte_Liq.B15];[$'Op. Long_Basis_Liq'.AV:.AV];[$Reporte_Liq.C8]))" office:value-type="float" office:value="106.248" calcext:value-type="float">
            <text:p>106,25</text:p>
          </table:table-cell>
          <table:table-cell table:style-name="ce56" office:value-type="string" calcext:value-type="string">
            <text:p>Compra</text:p>
          </table:table-cell>
          <table:table-cell table:style-name="ce56" table:formula="of:=SUMIFS([$'Op. Long_Basis_Liq'.Y:.Y];[$'Op. Long_Basis_Liq'.D:.D];[$Reporte_Liq.B15];[$'Op. Long_Basis_Liq'.AV:.AV];[$Reporte_Liq.C8])" office:value-type="float" office:value="3.68" calcext:value-type="float">
            <text:p>3,68</text:p>
          </table:table-cell>
          <table:table-cell table:style-name="ce89" table:formula="of:=SUMIFS([$'Op. Long_Basis_Liq'.AX:.AX];[$'Op. Long_Basis_Liq'.D:.D];[$Reporte_Liq.B15];[$'Op. Long_Basis_Liq'.AV:.AV];[$Reporte_Liq.C8])/(SUMIFS([$'Op. Long_Basis_Liq'.Y:.Y];[$'Op. Long_Basis_Liq'.D:.D];[$Reporte_Liq.B15];[$'Op. Long_Basis_Liq'.AV:.AV];[$Reporte_Liq.C8]))" office:value-type="float" office:value="11.3305" calcext:value-type="float">
            <text:p>11,3305</text:p>
          </table:table-cell>
          <table:table-cell table:style-name="ce56" table:formula="of:=[.G15]" office:value-type="string" office:string-value="Compra" calcext:value-type="string">
            <text:p>Compra</text:p>
          </table:table-cell>
          <table:table-cell table:style-name="ce83" table:formula="of:=SUMIFS([$'Op. Long_Basis_Liq'.AD:.AD];[$'Op. Long_Basis_Liq'.D:.D];[$Reporte_Liq.B15];[$'Op. Long_Basis_Liq'.AV:.AV];[$Reporte_Liq.C8])" office:value-type="float" office:value="159920" calcext:value-type="float">
            <text:p>159.920,00</text:p>
          </table:table-cell>
          <table:table-cell table:style-name="ce89" table:formula="of:=SUMIFS([$'Op. Long_Basis_Liq'.AY:.AY];[$'Op. Long_Basis_Liq'.D:.D];[$Reporte_Liq.B15];[$'Op. Long_Basis_Liq'.AV:.AV];[$Reporte_Liq.C8])/(SUMIFS([$'Op. Long_Basis_Liq'.AD:.AD];[$'Op. Long_Basis_Liq'.D:.D];[$Reporte_Liq.B15];[$'Op. Long_Basis_Liq'.AV:.AV];[$Reporte_Liq.C8]))" office:value-type="float" office:value="5.1751" calcext:value-type="float">
            <text:p>5,1751</text:p>
          </table:table-cell>
          <table:table-cell table:number-columns-repeated="11"/>
          <table:table-cell table:style-name="ce91" office:value-type="string" calcext:value-type="string">
            <text:p>Financeiro</text:p>
          </table:table-cell>
          <table:table-cell table:style-name="ce92" table:formula="of:=[.D20]" office:value-type="float" office:value="-44785.4916185398" calcext:value-type="float">
            <text:p>-44.785,49 </text:p>
          </table:table-cell>
          <table:table-cell table:style-name="Default" table:number-columns-repeated="16359"/>
        </table:table-row>
        <table:table-row table:style-name="ro1">
          <table:table-cell/>
          <table:table-cell table:style-name="ce57" office:value-type="string" calcext:value-type="string" table:number-columns-spanned="2" table:number-rows-spanned="1">
            <text:p>Liquidação</text:p>
          </table:table-cell>
          <table:covered-table-cell table:style-name="ce67"/>
          <table:table-cell table:style-name="ce72" office:value-type="string" calcext:value-type="string">
            <text:p>Resultado</text:p>
          </table:table-cell>
          <table:table-cell table:style-name="ce80" table:formula="of:=SUM([.E14:.E15])" office:value-type="float" office:value="23.7766666666685" calcext:value-type="float">
            <text:p>24</text:p>
          </table:table-cell>
          <table:table-cell table:style-name="ce84" table:formula="of:=([.F15]-[.F14])*[.E14]" office:value-type="float" office:value="28969.7832800002" calcext:value-type="float">
            <text:p>28.969,78 </text:p>
          </table:table-cell>
          <table:table-cell table:style-name="ce72" office:value-type="string" calcext:value-type="string">
            <text:p>Resultado</text:p>
          </table:table-cell>
          <table:table-cell table:style-name="ce72" table:formula="of:=SUM([.H14:.H15])" office:value-type="float" office:value="0" calcext:value-type="float">
            <text:p>0</text:p>
          </table:table-cell>
          <table:table-cell table:style-name="ce84" table:formula="of:=IF([.G7]=&quot;Soja CBOT&quot;;([.I14]-[.I15])*5000*[.H15]*[$Preços_MTM.$I$4];IF([.G7]=&quot;Milho CBOT&quot;;([.I14]-[.I15])*5000*[.H15]*[$Preços_MTM.$I$4];IF([.G7]=&quot;Milho BMF&quot;;([.I14]-[.I15])*[.H15]*450;&quot;verificar&quot;)))" office:value-type="float" office:value="24397.2678749996" calcext:value-type="float">
            <text:p>24.397,27 </text:p>
          </table:table-cell>
          <table:table-cell table:style-name="ce72" office:value-type="string" calcext:value-type="string">
            <text:p>Resultado</text:p>
          </table:table-cell>
          <table:table-cell table:style-name="ce72" table:formula="of:=SUM([.K14:.K15])" office:value-type="float" office:value="0" calcext:value-type="float">
            <text:p>0</text:p>
          </table:table-cell>
          <table:table-cell table:style-name="ce84" table:formula="of:=([.L14]-[.L15])*[.K15]" office:value-type="float" office:value="32738.1851000002" calcext:value-type="float">
            <text:p>32.738,19 </text:p>
          </table:table-cell>
          <table:table-cell table:number-columns-repeated="11"/>
          <table:table-cell table:style-name="ce91" office:value-type="string" calcext:value-type="string">
            <text:p>Outros Custos</text:p>
          </table:table-cell>
          <table:table-cell table:style-name="ce92" table:formula="of:=[.D21]" office:value-type="float" office:value="-27829.1763" calcext:value-type="float">
            <text:p>-27.829,18 </text:p>
          </table:table-cell>
          <table:table-cell table:style-name="Default" table:number-columns-repeated="16359"/>
        </table:table-row>
        <table:table-row table:style-name="ro1">
          <table:table-cell table:number-columns-repeated="23"/>
          <table:table-cell table:style-name="ce91" office:value-type="string" calcext:value-type="string">
            <text:p>Resultado</text:p>
          </table:table-cell>
          <table:table-cell table:style-name="ce92" table:formula="of:=SUM([.Y12:.Y16])" office:value-type="float" office:value="13490.5683364601" calcext:value-type="float">
            <text:p>13.490,57 </text:p>
          </table:table-cell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  <table:table-row table:style-name="ro1">
          <table:table-cell/>
          <table:table-cell table:style-name="ce54" office:value-type="string" calcext:value-type="string" table:number-columns-spanned="3" table:number-rows-spanned="1">
            <text:p>PARÂMETROS DE RESULTADO</text:p>
          </table:table-cell>
          <table:covered-table-cell table:number-columns-repeated="2" table:style-name="ce54"/>
          <table:table-cell/>
          <table:table-cell table:style-name="ce85" office:value-type="string" calcext:value-type="string" table:number-columns-spanned="7" table:number-rows-spanned="2">
            <text:p>RESULTADO DE LIQUIDAÇÃO POR <text:span text:style-name="T12">COMPONENTE</text:span></text:p>
          </table:table-cell>
          <table:covered-table-cell table:number-columns-repeated="6" table:style-name="ce86"/>
          <table:table-cell table:number-columns-repeated="13"/>
          <table:table-cell table:style-name="Default" table:number-columns-repeated="16359"/>
        </table:table-row>
        <table:table-row table:style-name="ro1">
          <table:table-cell/>
          <table:table-cell table:style-name="ce58" office:value-type="string" calcext:value-type="string" table:number-columns-spanned="2" table:number-rows-spanned="1">
            <text:p>Custo Financeiro</text:p>
          </table:table-cell>
          <table:covered-table-cell table:style-name="ce68"/>
          <table:table-cell table:style-name="ce73" table:formula="of:=SUMIFS([$'Op. Long_Basis_Liq'.AR:.AR];[$'Op. Long_Basis_Liq'.D:.D];[$Reporte_Liq.B14];[$'Op. Long_Basis_Liq'.AV:.AV];[$Reporte_Liq.C8])" office:value-type="float" office:value="-44785.4916185398" calcext:value-type="float">
            <text:p>-44.785,49 </text:p>
          </table:table-cell>
          <table:table-cell/>
          <table:covered-table-cell table:number-columns-repeated="7" table:style-name="ce86"/>
          <table:table-cell table:number-columns-repeated="13"/>
          <table:table-cell table:style-name="Default" table:number-columns-repeated="16359"/>
        </table:table-row>
        <table:table-row table:style-name="ro1">
          <table:table-cell/>
          <table:table-cell table:style-name="ce58" office:value-type="string" calcext:value-type="string" table:number-columns-spanned="2" table:number-rows-spanned="1">
            <text:p>Outros Custos</text:p>
          </table:table-cell>
          <table:covered-table-cell table:style-name="ce68"/>
          <table:table-cell table:style-name="ce73" table:formula="of:=SUMIFS([$'Op. Long_Basis_Liq'.AS:.AS];[$'Op. Long_Basis_Liq'.D:.D];[$Reporte_Liq.B14];[$'Op. Long_Basis_Liq'.AV:.AV];[$Reporte_Liq.C8])" office:value-type="float" office:value="-27829.1763" calcext:value-type="float">
            <text:p>-27.829,18 </text:p>
          </table:table-cell>
          <table:table-cell/>
          <table:table-cell>
            <draw:custom-shape table:end-cell-address="Reporte_Liq.L35" table:end-x="2.248cm" table:end-y="0.528cm" draw:z-index="2" draw:style-name="gr7" draw:text-style-name="P5" svg:width="15.736cm" svg:height="7.905cm" svg:x="0.006cm" svg:y="0.032cm">
              <text:p><text:span text:style-name="T8">Este gráfico não está disponível na sua versão de Excel.</text:span></text:p>
              <text:p><text:span text:style-name="T8"/></text:p>
              <text:p text:style-name="P2"><text:span text:style-name="T8">Editar esta forma ou salvar esta pasta de trabalho em um formato de arquivo diferente quebrará o gráfico permanentemente.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9"/>
          <table:table-cell table:style-name="Default" table:number-columns-repeated="16359"/>
        </table:table-row>
        <table:table-row table:style-name="ro1">
          <table:table-cell/>
          <table:table-cell table:style-name="ce58" office:value-type="string" calcext:value-type="string" table:number-columns-spanned="2" table:number-rows-spanned="1">
            <text:p>Custo Total Operação</text:p>
          </table:table-cell>
          <table:covered-table-cell table:style-name="ce68"/>
          <table:table-cell table:style-name="ce74" table:formula="of:=SUM([.D20];[.D21])" office:value-type="float" office:value="-72614.6679185398" calcext:value-type="float">
            <text:p>-72.614,67 </text:p>
          </table:table-cell>
          <table:table-cell table:number-columns-repeated="21"/>
          <table:table-cell table:style-name="Default" table:number-columns-repeated="16359"/>
        </table:table-row>
        <table:table-row table:style-name="ro1">
          <table:table-cell/>
          <table:table-cell table:style-name="ce59" office:value-type="string" office:string-value="Basis Entrada" calcext:value-type="string" table:number-columns-spanned="2" table:number-rows-spanned="1">
            <text:p><text:s/>Basis Entrada </text:p>
          </table:table-cell>
          <table:covered-table-cell table:style-name="ce69"/>
          <table:table-cell table:style-name="ce75" table:formula="of:=IF([.G7]=&quot;Soja CBOT&quot;;[.F14]-([.I14]*[.L14]*2.204);IF([.G7]=&quot;Milho CBOT&quot;;[.F14]-([.I14]*[.L14]*2.3621);IF([.G7]=&quot;Milho BMF&quot;;[.F14]-[.I14];&quot;VALIDAR&quot;)))" office:value-type="float" office:value="-34.5921443656677" calcext:value-type="float">
            <text:p>-34,59 </text:p>
          </table:table-cell>
          <table:table-cell table:number-columns-repeated="21"/>
          <table:table-cell table:style-name="Default" table:number-columns-repeated="16359"/>
        </table:table-row>
        <table:table-row table:style-name="ro1">
          <table:table-cell/>
          <table:table-cell table:style-name="ce60" office:value-type="string" office:string-value="Basis Saída" calcext:value-type="string" table:number-columns-spanned="2" table:number-rows-spanned="1">
            <text:p><text:s/>Basis Saída </text:p>
          </table:table-cell>
          <table:covered-table-cell table:style-name="ce70"/>
          <table:table-cell table:style-name="ce73" table:formula="of:=IF([.G7]=&quot;Soja CBOT&quot;;[.F15]-([.I15]*[.L15]*2.204);IF([.G7]=&quot;Milho CBOT&quot;;[.F15]-([.I15]*[.L15]*2.3621);IF([.G7]=&quot;Milho BMF&quot;;[.F15]-[.I15];&quot;VALIDAR&quot;)))" office:value-type="float" office:value="-22.9867810922" calcext:value-type="float">
            <text:p>-22,99 </text:p>
          </table:table-cell>
          <table:table-cell table:number-columns-repeated="21"/>
          <table:table-cell table:style-name="Default" table:number-columns-repeated="16359"/>
        </table:table-row>
        <table:table-row table:style-name="ro1">
          <table:table-cell/>
          <table:table-cell table:style-name="ce58" office:value-type="string" calcext:value-type="string" table:number-columns-spanned="2" table:number-rows-spanned="1">
            <text:p>Evolução Basis</text:p>
          </table:table-cell>
          <table:covered-table-cell table:style-name="ce68"/>
          <table:table-cell table:style-name="ce76" table:formula="of:=([.D23]-[.D24])*-1" office:value-type="float" office:value="11.6053632734677" calcext:value-type="float">
            <text:p>11,61</text:p>
          </table:table-cell>
          <table:table-cell table:number-columns-repeated="21"/>
          <table:table-cell table:style-name="Default" table:number-columns-repeated="16359"/>
        </table:table-row>
        <table:table-row table:style-name="ro1">
          <table:table-cell/>
          <table:table-cell table:style-name="ce58" office:value-type="string" calcext:value-type="string" table:number-columns-spanned="2" table:number-rows-spanned="1">
            <text:p>Resultado Liquidação Total</text:p>
          </table:table-cell>
          <table:covered-table-cell table:style-name="ce68"/>
          <table:table-cell table:style-name="ce74" table:formula="of:=[.F16]+[.I16]+[.L16]+[.D22]" office:value-type="float" office:value="13490.5683364601" calcext:value-type="float">
            <text:p>13.490,57 </text:p>
          </table:table-cell>
          <table:table-cell table:number-columns-repeated="21"/>
          <table:table-cell table:style-name="Default" table:number-columns-repeated="16359"/>
        </table:table-row>
        <table:table-row table:style-name="ro1">
          <table:table-cell/>
          <table:table-cell table:style-name="ce58" office:value-type="string" calcext:value-type="string" table:number-columns-spanned="2" table:number-rows-spanned="1">
            <text:p>Resultado Liquidação R$/sc</text:p>
          </table:table-cell>
          <table:covered-table-cell table:style-name="ce68"/>
          <table:table-cell table:style-name="ce76" table:formula="of:=[.D26]/[.E14]" office:value-type="float" office:value="1.61426238693282" calcext:value-type="float">
            <text:p>1,61</text:p>
          </table:table-cell>
          <table:table-cell table:number-columns-repeated="21"/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  <table:table-row table:style-name="ro1">
          <table:table-cell/>
          <table:table-cell table:style-name="ce61" table:number-columns-spanned="7" table:number-rows-spanned="2"/>
          <table:covered-table-cell table:number-columns-repeated="6" table:style-name="ce62"/>
          <table:table-cell table:number-columns-repeated="17"/>
          <table:table-cell table:style-name="Default" table:number-columns-repeated="16359"/>
        </table:table-row>
        <table:table-row table:style-name="ro1">
          <table:table-cell/>
          <table:covered-table-cell table:number-columns-repeated="7" table:style-name="ce62"/>
          <table:table-cell table:number-columns-repeated="17"/>
          <table:table-cell table:style-name="Default" table:number-columns-repeated="16359"/>
        </table:table-row>
        <table:table-row table:style-name="ro1" table:number-rows-repeated="1048545">
          <table:table-cell table:number-columns-repeated="25"/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  <table:named-expressions>
          <table:named-range table:name="_xlnm.Print_Area" table:base-cell-address="$dms.$A$1" table:cell-range-address="$Reporte_Liq.$B$1:.$L$38" table:range-usable-as="print-range"/>
        </table:named-expressions>
        <calcext:conditional-formats>
          <calcext:conditional-format calcext:target-range-address="Reporte_Liq.D25:Reporte_Liq.D25 Reporte_Liq.D27:Reporte_Liq.D27">
            <calcext:condition calcext:apply-style-name="ConditionalStyle_41" calcext:value="between(0.0000001,9.99999999999999E+034)" calcext:base-cell-address="Reporte_Liq.D25"/>
            <calcext:condition calcext:apply-style-name="ConditionalStyle_40" calcext:value="between(-0.000000000001,-99999999999999)" calcext:base-cell-address="Reporte_Liq.D25"/>
          </calcext:conditional-format>
        </calcext:conditional-formats>
      </table:table>
      <table:table table:name="Op. Long_Basis_Vig" table:style-name="ta6">
        <table:table-column table:style-name="co5" table:number-columns-repeated="2" table:default-cell-style-name="ce5"/>
        <table:table-column table:style-name="co5" table:number-columns-repeated="3" table:default-cell-style-name="ce2"/>
        <table:table-column table:style-name="co13" table:number-columns-repeated="2" table:default-cell-style-name="ce2"/>
        <table:table-column table:style-name="co13" table:visibility="collapse" table:default-cell-style-name="ce2"/>
        <table:table-column table:style-name="co5" table:default-cell-style-name="ce2"/>
        <table:table-column table:style-name="co22" table:default-cell-style-name="ce2"/>
        <table:table-column table:style-name="co5" table:default-cell-style-name="ce2"/>
        <table:table-column table:style-name="co5" table:number-columns-repeated="2" table:default-cell-style-name="ce97"/>
        <table:table-column table:style-name="co5" table:number-columns-repeated="2" table:default-cell-style-name="ce2"/>
        <table:table-column table:style-name="co5" table:default-cell-style-name="ce5"/>
        <table:table-column table:style-name="co5" table:default-cell-style-name="ce23"/>
        <table:table-column table:style-name="co5" table:default-cell-style-name="ce5"/>
        <table:table-column table:style-name="co5" table:number-columns-repeated="3" table:default-cell-style-name="Default"/>
        <table:table-column table:style-name="co5" table:default-cell-style-name="ce34"/>
        <table:table-column table:style-name="co15" table:default-cell-style-name="ce102"/>
        <table:table-column table:style-name="co15" table:default-cell-style-name="ce104"/>
        <table:table-column table:style-name="co5" table:default-cell-style-name="ce40"/>
        <table:table-column table:style-name="co15" table:default-cell-style-name="ce104"/>
        <table:table-column table:style-name="co5" table:default-cell-style-name="Default"/>
        <table:table-column table:style-name="co15" table:default-cell-style-name="ce102"/>
        <table:table-column table:style-name="co5" table:default-cell-style-name="ce40"/>
        <table:table-column table:style-name="co5" table:default-cell-style-name="ce3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16"/>
        <table:table-column table:style-name="co5" table:number-columns-repeated="2" table:default-cell-style-name="ce40"/>
        <table:table-column table:style-name="co15" table:number-columns-repeated="4" table:default-cell-style-name="ce102"/>
        <table:table-column table:style-name="co15" table:default-cell-style-name="ce110"/>
        <table:table-column table:style-name="co15" table:default-cell-style-name="ce102"/>
        <table:table-column table:style-name="co17" table:number-columns-repeated="4" table:default-cell-style-name="ce112"/>
        <table:table-column table:style-name="co17" table:visibility="collapse" table:default-cell-style-name="ce112"/>
        <table:table-column table:style-name="co17" table:number-columns-repeated="5" table:default-cell-style-name="ce112"/>
        <table:table-column table:style-name="co23" table:visibility="collapse" table:number-columns-repeated="3" table:default-cell-style-name="Default"/>
        <table:table-column table:style-name="co18" table:number-columns-repeated="89"/>
        <table:table-column table:style-name="co1" table:number-columns-repeated="16241"/>
        <table:table-row table:style-name="ro1">
          <table:table-cell table:number-columns-repeated="54"/>
          <table:table-cell table:style-name="Default" table:number-columns-repeated="16330"/>
        </table:table-row>
        <table:table-row table:style-name="ro1">
          <table:table-cell>
            <draw:frame draw:z-index="1" draw:name="Imagem 3" draw:style-name="gr4" draw:text-style-name="P1" svg:width="3.301cm" svg:height="1.751cm" svg:x="0.5cm" svg:y="0.029cm">
              <draw:image xlink:href="Pictures/100000010000019600000196CD52D19B.png" xlink:type="simple" xlink:show="embed" xlink:actuate="onLoad" draw:mime-type="image/png">
                <text:p/>
              </draw:image>
              <svg:desc>Relfer – Estruturas Metálicas</svg:desc>
            </draw:frame>
          </table:table-cell>
          <table:table-cell table:number-columns-repeated="53"/>
          <table:table-cell table:style-name="Default" table:number-columns-repeated="16330"/>
        </table:table-row>
        <table:table-row table:style-name="ro1">
          <table:table-cell/>
          <table:table-cell>
            <draw:custom-shape draw:z-index="0" draw:name="CaixaDeTexto 1" draw:style-name="gr2" draw:text-style-name="P3" svg:width="6.828cm" svg:height="0.919cm" svg:x="1.953cm" svg:y="0.162cm">
              <text:p text:style-name="P2"><text:span text:style-name="T3">OPERAÇÃO DE </text:span><text:span text:style-name="T4">LONG BASI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2"/>
          <table:table-cell table:style-name="Default" table:number-columns-repeated="16330"/>
        </table:table-row>
        <table:table-row table:style-name="ro1" table:number-rows-repeated="2">
          <table:table-cell table:number-columns-repeated="54"/>
          <table:table-cell table:style-name="Default" table:number-columns-repeated="16330"/>
        </table:table-row>
        <table:table-row table:style-name="ro2">
          <table:table-cell table:style-name="ce93" office:value-type="string" calcext:value-type="string">
            <text:p>ID Operação</text:p>
          </table:table-cell>
          <table:table-cell table:style-name="ce94" office:value-type="string" calcext:value-type="string">
            <text:p>Data</text:p>
          </table:table-cell>
          <table:table-cell table:style-name="ce93" office:value-type="string" calcext:value-type="string">
            <text:p>Status Comercial</text:p>
          </table:table-cell>
          <table:table-cell table:style-name="ce93" office:value-type="string" calcext:value-type="string">
            <text:p>Operação</text:p>
          </table:table-cell>
          <table:table-cell table:style-name="ce93" office:value-type="string" calcext:value-type="string">
            <text:p>Empresa</text:p>
          </table:table-cell>
          <table:table-cell table:style-name="ce93" office:value-type="string" calcext:value-type="string">
            <text:p>Unidade</text:p>
          </table:table-cell>
          <table:table-cell table:style-name="ce93" office:value-type="string" calcext:value-type="string">
            <text:p>UF</text:p>
          </table:table-cell>
          <table:table-cell table:style-name="ce96" office:value-type="string" calcext:value-type="string">
            <text:p>Chave Empresa</text:p>
          </table:table-cell>
          <table:table-cell table:style-name="ce93" office:value-type="string" calcext:value-type="string">
            <text:p>N° Contrato</text:p>
          </table:table-cell>
          <table:table-cell table:style-name="ce93" office:value-type="string" calcext:value-type="string">
            <text:p>Contraparte</text:p>
          </table:table-cell>
          <table:table-cell table:style-name="ce93" office:value-type="string" calcext:value-type="string">
            <text:p>Commodity</text:p>
          </table:table-cell>
          <table:table-cell table:style-name="ce98" office:value-type="string" calcext:value-type="string">
            <text:p>Vol Kgs</text:p>
          </table:table-cell>
          <table:table-cell table:style-name="ce98" office:value-type="string" calcext:value-type="string">
            <text:p>Vol Sacas</text:p>
          </table:table-cell>
          <table:table-cell table:style-name="ce93" office:value-type="string" calcext:value-type="string">
            <text:p>Safra</text:p>
          </table:table-cell>
          <table:table-cell table:style-name="ce93" office:value-type="string" calcext:value-type="string">
            <text:p>Moeda</text:p>
          </table:table-cell>
          <table:table-cell table:style-name="ce94" office:value-type="string" calcext:value-type="string">
            <text:p>Posição Entrega</text:p>
          </table:table-cell>
          <table:table-cell table:style-name="ce100" office:value-type="string" calcext:value-type="string">
            <text:p>Preço Negociado</text:p>
          </table:table-cell>
          <table:table-cell table:style-name="ce94" office:value-type="string" calcext:value-type="string">
            <text:p>Vcto</text:p>
          </table:table-cell>
          <table:table-cell table:style-name="ce93" office:value-type="string" calcext:value-type="string">
            <text:p>ID Derivativo Commo</text:p>
          </table:table-cell>
          <table:table-cell table:style-name="ce93" office:value-type="string" calcext:value-type="string">
            <text:p>Bolsa</text:p>
          </table:table-cell>
          <table:table-cell table:style-name="ce93" office:value-type="string" calcext:value-type="string">
            <text:p>Ticker</text:p>
          </table:table-cell>
          <table:table-cell table:style-name="ce94" office:value-type="string" calcext:value-type="string">
            <text:p>Vcto Ticker</text:p>
          </table:table-cell>
          <table:table-cell table:style-name="ce103" office:value-type="string" calcext:value-type="string">
            <text:p>Qtdy Lotes</text:p>
          </table:table-cell>
          <table:table-cell table:style-name="ce105" office:value-type="string" calcext:value-type="string">
            <text:p>Vol Kgs </text:p>
          </table:table-cell>
          <table:table-cell table:style-name="ce106" office:value-type="string" calcext:value-type="string">
            <text:p>Strike</text:p>
          </table:table-cell>
          <table:table-cell table:style-name="ce105" office:value-type="string" calcext:value-type="string">
            <text:p>Exposição Kgs</text:p>
          </table:table-cell>
          <table:table-cell table:style-name="ce93" office:value-type="string" calcext:value-type="string">
            <text:p>ID NDF</text:p>
          </table:table-cell>
          <table:table-cell table:style-name="ce103" office:value-type="string" calcext:value-type="string">
            <text:p>Notional</text:p>
          </table:table-cell>
          <table:table-cell table:style-name="ce106" office:value-type="string" calcext:value-type="string">
            <text:p>Strike NDF</text:p>
          </table:table-cell>
          <table:table-cell table:style-name="ce94" office:value-type="string" calcext:value-type="string">
            <text:p>Vcto NDF</text:p>
          </table:table-cell>
          <table:table-cell table:style-name="ce93" office:value-type="string" calcext:value-type="string">
            <text:p>Operação Vinculada</text:p>
          </table:table-cell>
          <table:table-cell table:style-name="ce108" office:value-type="string" calcext:value-type="string">
            <text:p>Chave MTM</text:p>
          </table:table-cell>
          <table:table-cell table:style-name="ce100" office:value-type="string" calcext:value-type="string">
            <text:p>FV Commodity</text:p>
          </table:table-cell>
          <table:table-cell table:style-name="ce106" office:value-type="string" calcext:value-type="string">
            <text:p>FV Bolsa</text:p>
          </table:table-cell>
          <table:table-cell table:style-name="ce106" office:value-type="string" calcext:value-type="string">
            <text:p>FV NDF</text:p>
          </table:table-cell>
          <table:table-cell table:style-name="ce103" office:value-type="string" calcext:value-type="string">
            <text:p>MTM Físico</text:p>
          </table:table-cell>
          <table:table-cell table:style-name="ce103" office:value-type="string" calcext:value-type="string">
            <text:p>MTM Bolsa</text:p>
          </table:table-cell>
          <table:table-cell table:style-name="ce103" office:value-type="string" calcext:value-type="string">
            <text:p>MTM Dolar</text:p>
          </table:table-cell>
          <table:table-cell table:style-name="ce109" office:value-type="string" calcext:value-type="string">
            <text:p>MTM Total</text:p>
          </table:table-cell>
          <table:table-cell table:style-name="ce111" office:value-type="string" calcext:value-type="string">
            <text:p>Taxa Juros</text:p>
          </table:table-cell>
          <table:table-cell table:style-name="ce109" office:value-type="string" calcext:value-type="string">
            <text:p>Juros do Período MTM</text:p>
          </table:table-cell>
          <table:table-cell table:style-name="ce113" office:value-type="string" calcext:value-type="string">
            <text:p>Custo Financeiro Estimado</text:p>
          </table:table-cell>
          <table:table-cell table:style-name="ce113" office:value-type="string" calcext:value-type="string">
            <text:p>Outros Custos Estimados</text:p>
          </table:table-cell>
          <table:table-cell table:style-name="ce113" office:value-type="string" calcext:value-type="string">
            <text:p>Custo Total</text:p>
          </table:table-cell>
          <table:table-cell table:style-name="ce113" office:value-type="string" calcext:value-type="string">
            <text:p>MTM Líquido</text:p>
          </table:table-cell>
          <table:table-cell table:style-name="ce108" office:value-type="string" calcext:value-type="string">
            <text:p>Chave Basis</text:p>
          </table:table-cell>
          <table:table-cell table:style-name="ce113" office:value-type="string" calcext:value-type="string">
            <text:p>Basis Entrada</text:p>
          </table:table-cell>
          <table:table-cell table:style-name="ce113" office:value-type="string" calcext:value-type="string">
            <text:p>Basis Atual</text:p>
          </table:table-cell>
          <table:table-cell table:style-name="ce113" office:value-type="string" calcext:value-type="string">
            <text:p>MTM por saca</text:p>
          </table:table-cell>
          <table:table-cell table:style-name="ce113" office:value-type="string" calcext:value-type="string">
            <text:p>Custo por saca</text:p>
          </table:table-cell>
          <table:table-cell table:style-name="ce113" office:value-type="string" calcext:value-type="string">
            <text:p>MTM liquido por saca</text:p>
          </table:table-cell>
          <table:table-cell table:style-name="ce108" office:value-type="string" calcext:value-type="string">
            <text:p>MTM por saca grafico</text:p>
          </table:table-cell>
          <table:table-cell table:style-name="ce108" office:value-type="string" calcext:value-type="string">
            <text:p>Custo por saca grafico</text:p>
          </table:table-cell>
          <table:table-cell table:style-name="ce108" office:value-type="string" calcext:value-type="string">
            <text:p>MTM liquido por saca grafico</text:p>
          </table:table-cell>
          <table:table-cell table:style-name="ce27" table:number-columns-repeated="16330"/>
        </table:table-row>
        <table:table-row table:style-name="ro3">
          <table:table-cell office:value-type="string" calcext:value-type="string">
            <text:p>LB1</text:p>
          </table:table-cell>
          <table:table-cell table:style-name="ce95" office:value-type="date" office:date-value="2026-04-27" calcext:value-type="date">
            <text:p>27/4/2026</text:p>
          </table:table-cell>
          <table:table-cell table:style-name="ce27" office:value-type="string" calcext:value-type="string">
            <text:p>Vigente</text:p>
          </table:table-cell>
          <table:table-cell table:style-name="ce27" office:value-type="string" calcext:value-type="string">
            <text:p>Compra</text:p>
          </table:table-cell>
          <table:table-cell table:style-name="ce27" office:value-type="string" calcext:value-type="string">
            <text:p>Intergrãos</text:p>
          </table:table-cell>
          <table:table-cell table:style-name="ce27" office:value-type="string" calcext:value-type="string">
            <text:p>Matup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Vig'.$E7];&quot; &quot;;[$'Op. Long_Basis_Vig'.$G7])" office:value-type="string" office:string-value="Intergrãos MT" calcext:value-type="string">
            <text:p>Intergrãos MT</text:p>
          </table:table-cell>
          <table:table-cell table:style-name="ce27"/>
          <table:table-cell table:style-name="ce27" office:value-type="string" calcext:value-type="string">
            <text:p>Maik Antonio de Souza Genereso</text:p>
          </table:table-cell>
          <table:table-cell table:style-name="ce27" office:value-type="string" calcext:value-type="string">
            <text:p>Milho</text:p>
          </table:table-cell>
          <table:table-cell table:style-name="ce99" office:value-type="float" office:value="600000" calcext:value-type="float">
            <text:p>600.000</text:p>
          </table:table-cell>
          <table:table-cell table:style-name="ce99" table:formula="of:=[$'Op. Long_Basis_Vig'.$L7]/60" office:value-type="float" office:value="10000" calcext:value-type="float">
            <text:p>10.000</text:p>
          </table:table-cell>
          <table:table-cell office:value-type="string" calcext:value-type="string">
            <text:p>Safra Atual</text:p>
          </table:table-cell>
          <table:table-cell table:style-name="ce27" office:value-type="string" calcext:value-type="string">
            <text:p>BRL</text:p>
          </table:table-cell>
          <table:table-cell office:value-type="date" office:date-value="2026-07-01" calcext:value-type="date">
            <text:p>1/7/2026</text:p>
          </table:table-cell>
          <table:table-cell table:style-name="ce101" office:value-type="float" office:value="40" calcext:value-type="float">
            <text:p>40,00</text:p>
          </table:table-cell>
          <table:table-cell table:style-name="ce95" office:value-type="date" office:date-value="2026-07-28" calcext:value-type="date">
            <text:p>28/7/2026</text:p>
          </table:table-cell>
          <table:table-cell table:style-name="ce27" office:value-type="string" calcext:value-type="string">
            <text:p>F15</text:p>
          </table:table-cell>
          <table:table-cell table:style-name="ce27" table:formula="of:=COM.MICROSOFT.XLOOKUP([$'Op. Long_Basis_Vig'.$S7];[$Analítico_Deriv.A:.A];[$Analítico_Deriv.S:.S])" office:value-type="string" office:string-value="BMF" calcext:value-type="string">
            <text:p>BMF</text:p>
          </table:table-cell>
          <table:table-cell table:style-name="ce27" table:formula="of:=COM.MICROSOFT.XLOOKUP([$'Op. Long_Basis_Vig'.$S7];[$Analítico_Deriv.A:.A];[$Analítico_Deriv.T:.T])" office:value-type="string" office:string-value="CCMF27" calcext:value-type="string">
            <text:p>CCMF27</text:p>
          </table:table-cell>
          <table:table-cell table:style-name="ce95" table:formula="of:=COM.MICROSOFT.XLOOKUP([$'Op. Long_Basis_Vig'.$S7];[$Analítico_Deriv.A:.A];[$Analítico_Deriv.V:.V])" office:value-type="date" office:date-value="2027-01-15" calcext:value-type="date">
            <text:p>15/1/2027</text:p>
          </table:table-cell>
          <table:table-cell table:formula="of:=COM.MICROSOFT.XLOOKUP([$'Op. Long_Basis_Vig'.$S7];[$Analítico_Deriv.A:.A];[$Analítico_Deriv.R:.R])" office:value-type="float" office:value="-22.22" calcext:value-type="float">
            <text:p>-22,22</text:p>
          </table:table-cell>
          <table:table-cell table:formula="of:=COM.MICROSOFT.XLOOKUP([$'Op. Long_Basis_Vig'.$S7];[$Analítico_Deriv.A:.A];[$Analítico_Deriv.AE:.AE])" office:value-type="float" office:value="-599940" calcext:value-type="float">
            <text:p>-599.940</text:p>
          </table:table-cell>
          <table:table-cell table:style-name="ce107" table:formula="of:=COM.MICROSOFT.XLOOKUP([$'Op. Long_Basis_Vig'.$S7];[$Analítico_Deriv.A:.A];[$Analítico_Deriv.U:.U])" office:value-type="float" office:value="74.32955" calcext:value-type="float">
            <text:p>74,3296</text:p>
          </table:table-cell>
          <table:table-cell table:formula="of:=SUM([$'Op. Long_Basis_Vig'.$L7]+[$'Op. Long_Basis_Vig'.$X7])" office:value-type="float" office:value="60" calcext:value-type="float">
            <text:p>60</text:p>
          </table:table-cell>
          <table:table-cell table:style-name="ce42" office:value-type="string" calcext:value-type="string">
            <text:p>-</text:p>
          </table:table-cell>
          <table:table-cell table:formula="of:=IFERROR(COM.MICROSOFT.XLOOKUP([$'Op. Long_Basis_Vig'.$AA7];[$Analítico_Deriv.A:.A];[$Analítico_Deriv.X:.X]);0)" office:value-type="float" office:value="0" calcext:value-type="float">
            <text:p>0,00</text:p>
          </table:table-cell>
          <table:table-cell table:style-name="ce18" table:formula="of:=IFERROR(COM.MICROSOFT.XLOOKUP([$'Op. Long_Basis_Vig'.$AA7];[$Analítico_Deriv.A:.A];[$Analítico_Deriv.U:.U]);0)" office:value-type="float" office:value="0" calcext:value-type="float">
            <text:p>0,0000</text:p>
          </table:table-cell>
          <table:table-cell table:style-name="ce5" table:formula="of:=IFERROR(COM.MICROSOFT.XLOOKUP([$'Op. Long_Basis_Vig'.$AA7];[$Analítico_Deriv.A:.A];[$Analítico_Deriv.V:.V]);0)" office:value-type="date" office:date-value="1899-12-30" calcext:value-type="date">
            <text:p>30/12/1899</text:p>
          </table:table-cell>
          <table:table-cell table:style-name="ce42" table:formula="of:=COM.MICROSOFT.XLOOKUP([$'Op. Long_Basis_Vig'.$S7];[$Analítico_Deriv.A:.A];[$Analítico_Deriv.AI:.AI])" office:value-type="string" office:string-value="LB-Milho-26" calcext:value-type="string">
            <text:p>LB-Milho-26</text:p>
          </table:table-cell>
          <table:table-cell table:style-name="ce42" table:formula="of:=COM.MICROSOFT.CONCAT([$'Op. Long_Basis_Vig'.$K7];&quot; &quot;;[$'Op. Long_Basis_Vig'.$N7];&quot; &quot;;[$'Op. Long_Basis_Vig'.$O7];&quot; &quot;;[$'Op. Long_Basis_Vig'.$F7])" office:value-type="string" office:string-value="Milho Safra Atual BRL Matupa" calcext:value-type="string">
            <text:p>Milho Safra Atual BRL Matupa</text:p>
          </table:table-cell>
          <table:table-cell table:style-name="ce23" table:formula="of:=IFERROR(COM.MICROSOFT.XLOOKUP([$'Op. Long_Basis_Vig'.$AF7];[$Preços_MTM.O:.O];[$Preços_MTM.P:.P]);0)" office:value-type="float" office:value="44.4" calcext:value-type="float">
            <text:p>44,40</text:p>
          </table:table-cell>
          <table:table-cell table:style-name="ce18" table:formula="of:=IFERROR(COM.MICROSOFT.XLOOKUP([$'Op. Long_Basis_Vig'.$U7];[$Preços_MTM.C:.C];[$Preços_MTM.D:.D]);0)" office:value-type="float" office:value="73.57" calcext:value-type="float">
            <text:p>73,5700</text:p>
          </table:table-cell>
          <table:table-cell table:style-name="ce18" table:formula="of:=IFERROR(COM.MICROSOFT.XLOOKUP([$'Op. Long_Basis_Vig'.$AD7];[$Preços_MTM.H:.H];[$Preços_MTM.I:.I]);0)" office:value-type="float" office:value="0" calcext:value-type="float">
            <text:p>0,0000</text:p>
          </table:table-cell>
          <table:table-cell table:formula="of:=IF([$'Op. Long_Basis_Vig'.$O7]=&quot;BRL&quot;;([$'Op. Long_Basis_Vig'.$AG7]-[$'Op. Long_Basis_Vig'.$Q7])*[$'Op. Long_Basis_Vig'.$M7];IF([$'Op. Long_Basis_Vig'.$O7]=&quot;USD&quot;;([$'Op. Long_Basis_Vig'.$AG7]-[$'Op. Long_Basis_Vig'.$Q7])*[$'Op. Long_Basis_Vig'.$M7]*COM.MICROSOFT.XLOOKUP([$'Op. Long_Basis_Vig'.$R7];[$Preços_MTM.H:.H];[$Preços_MTM.I:.I])))" office:value-type="float" office:value="44000" calcext:value-type="float">
            <text:p>44.000,00</text:p>
          </table:table-cell>
          <table:table-cell table:formula="of:=IF([$'Op. Long_Basis_Vig'.$T7]=&quot;CBOT&quot;;([$'Op. Long_Basis_Vig'.$AH7]-[$'Op. Long_Basis_Vig'.$Y7])*5000*[$'Op. Long_Basis_Vig'.$W7]*[$Preços_MTM.$I$4];IF([$'Op. Long_Basis_Vig'.$T7]=&quot;BMF&quot;;([$'Op. Long_Basis_Vig'.$AH7]-[$'Op. Long_Basis_Vig'.$Y7])*450*[$'Op. Long_Basis_Vig'.$W7];&quot;VERIFICAR&quot;))" office:value-type="float" office:value="7594.74045000004" calcext:value-type="float">
            <text:p>7.594,74</text:p>
          </table:table-cell>
          <table:table-cell table:formula="of:=([$'Op. Long_Basis_Vig'.$AI7]-[$'Op. Long_Basis_Vig'.$AC7])*[$'Op. Long_Basis_Vig'.$AB7]" office:value-type="float" office:value="0" calcext:value-type="float">
            <text:p>0,00</text:p>
          </table:table-cell>
          <table:table-cell table:formula="of:=SUM([$'Op. Long_Basis_Vig'.$AJ7:.$AL7])" office:value-type="float" office:value="51594.74045" calcext:value-type="float">
            <text:p>51.594,74</text:p>
          </table:table-cell>
          <table:table-cell office:value-type="percentage" office:value="0.014" calcext:value-type="percentage">
            <text:p>1,40%</text:p>
          </table:table-cell>
          <table:table-cell table:formula="of:=([$'Op. Long_Basis_Vig'.$Q7]*(1+[$'Op. Long_Basis_Vig'.$AN7])^(((COM.MICROSOFT.XLOOKUP([$'Op. Long_Basis_Vig'.$AF7];[$Preços_MTM.O:.O];[$Preços_MTM.Q:.Q]))-[$'Op. Long_Basis_Vig'.$R7])/30))-[$'Op. Long_Basis_Vig'.$Q7]" office:value-type="float" office:value="0.691790744268808" calcext:value-type="float">
            <text:p>0,69</text:p>
          </table:table-cell>
          <table:table-cell table:style-name="ce114" table:formula="of:=[$'Op. Long_Basis_Vig'.$AO7]*[$'Op. Long_Basis_Vig'.$M7]*-1" office:value-type="float" office:value="-6917.90744268808" calcext:value-type="float">
            <text:p>-6.917,91</text:p>
          </table:table-cell>
          <table:table-cell table:style-name="ce114" table:formula="of:=((4*[$'Op. Long_Basis_Vig'.$M7])+(0.3*[$'Op. Long_Basis_Vig'.$M7])+(0.03*[$'Op. Long_Basis_Vig'.$M7]))*-1" office:value-type="float" office:value="-43300" calcext:value-type="float">
            <text:p>-43.300,00</text:p>
          </table:table-cell>
          <table:table-cell table:style-name="ce114" table:formula="of:=SUM([$'Op. Long_Basis_Vig'.$AP7:.$AQ7])" office:value-type="float" office:value="-50217.9074426881" calcext:value-type="float">
            <text:p>-50.217,91</text:p>
          </table:table-cell>
          <table:table-cell table:style-name="ce114" table:formula="of:=SUM([$'Op. Long_Basis_Vig'.$AQ7];[$'Op. Long_Basis_Vig'.$AP7];[$'Op. Long_Basis_Vig'.$AM7])" office:value-type="float" office:value="1376.83300731195" calcext:value-type="float">
            <text:p>1.376,83</text:p>
          </table:table-cell>
          <table:table-cell table:style-name="ce114" table:formula="of:=COM.MICROSOFT.CONCAT([$'Op. Long_Basis_Vig'.$K7];&quot; &quot;;[$'Op. Long_Basis_Vig'.$T7])" office:value-type="string" office:string-value="Milho BMF" calcext:value-type="string">
            <text:p>Milho BMF</text:p>
          </table:table-cell>
          <table:table-cell table:style-name="ce114" table:formula="of:=IF([$'Op. Long_Basis_Vig'.$AT7]=&quot;Milho BMF&quot;;[$'Op. Long_Basis_Vig'.$Q7]-[$'Op. Long_Basis_Vig'.$Y7];&quot;CALMA&quot;)" office:value-type="float" office:value="-34.32955" calcext:value-type="float">
            <text:p>-34,33</text:p>
          </table:table-cell>
          <table:table-cell table:style-name="ce114" table:formula="of:=IF([$'Op. Long_Basis_Vig'.$AT7]=&quot;Milho BMF&quot;;[$'Op. Long_Basis_Vig'.$AG7]-[$'Op. Long_Basis_Vig'.$AH7])" office:value-type="float" office:value="-29.17" calcext:value-type="float">
            <text:p>-29,17</text:p>
          </table:table-cell>
          <table:table-cell table:style-name="ce114" table:formula="of:=[$'Op. Long_Basis_Vig'.$AM7]/[$'Op. Long_Basis_Vig'.$M7]" office:value-type="float" office:value="5.159474045" calcext:value-type="float">
            <text:p>5,16</text:p>
          </table:table-cell>
          <table:table-cell table:style-name="ce114" table:formula="of:=[$'Op. Long_Basis_Vig'.$AR7]/[$'Op. Long_Basis_Vig'.$M7]" office:value-type="float" office:value="-5.02179074426881" calcext:value-type="float">
            <text:p>-5,02</text:p>
          </table:table-cell>
          <table:table-cell table:style-name="ce114" table:formula="of:=[$'Op. Long_Basis_Vig'.$AS7]/[$'Op. Long_Basis_Vig'.$M7]" office:value-type="float" office:value="0.137683300731195" calcext:value-type="float">
            <text:p>0,14</text:p>
          </table:table-cell>
          <table:table-cell table:style-name="ce23" table:formula="of:=[$'Op. Long_Basis_Vig'.$AW7]*[$'Op. Long_Basis_Vig'.$M7]" office:value-type="float" office:value="51594.74045" calcext:value-type="float">
            <text:p>51.594,74</text:p>
          </table:table-cell>
          <table:table-cell table:style-name="ce23" table:formula="of:=[$'Op. Long_Basis_Vig'.$AX7]*[$'Op. Long_Basis_Vig'.$M7]" office:value-type="float" office:value="-50217.9074426881" calcext:value-type="float">
            <text:p>-50.217,91</text:p>
          </table:table-cell>
          <table:table-cell table:style-name="ce23" table:formula="of:=[$'Op. Long_Basis_Vig'.$AY7]*[$'Op. Long_Basis_Vig'.$M7]" office:value-type="float" office:value="1376.83300731195" calcext:value-type="float">
            <text:p>1.376,83</text:p>
          </table:table-cell>
          <table:table-cell table:style-name="ce27" table:number-columns-repeated="16330"/>
        </table:table-row>
        <table:table-row table:style-name="ro1">
          <table:table-cell office:value-type="string" calcext:value-type="string">
            <text:p>LB9</text:p>
          </table:table-cell>
          <table:table-cell office:value-type="date" office:date-value="2026-06-19" calcext:value-type="date">
            <text:p>19/6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Intergrãos</text:p>
          </table:table-cell>
          <table:table-cell office:value-type="string" calcext:value-type="string">
            <text:p>Sacramento</text:p>
          </table:table-cell>
          <table:table-cell table:style-name="ce27" office:value-type="string" calcext:value-type="string">
            <text:p>MG</text:p>
          </table:table-cell>
          <table:table-cell table:style-name="ce27" table:formula="of:=COM.MICROSOFT.CONCAT([$'Op. Long_Basis_Vig'.$E8];&quot; &quot;;[$'Op. Long_Basis_Vig'.$G8])" office:value-type="string" office:string-value="Intergrãos MG" calcext:value-type="string">
            <text:p>Intergrãos MG</text:p>
          </table:table-cell>
          <table:table-cell/>
          <table:table-cell office:value-type="string" calcext:value-type="string">
            <text:p>Andre Copasi Neto</text:p>
          </table:table-cell>
          <table:table-cell office:value-type="string" calcext:value-type="string">
            <text:p>Milho</text:p>
          </table:table-cell>
          <table:table-cell office:value-type="float" office:value="1179657" calcext:value-type="float">
            <text:p>1.179.657</text:p>
          </table:table-cell>
          <table:table-cell table:formula="of:=[$'Op. Long_Basis_Vig'.$L8]/60" office:value-type="float" office:value="19660.95" calcext:value-type="float">
            <text:p>19.661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BRL</text:p>
          </table:table-cell>
          <table:table-cell office:value-type="date" office:date-value="2026-06-30" calcext:value-type="date">
            <text:p>30/6/2026</text:p>
          </table:table-cell>
          <table:table-cell office:value-type="float" office:value="55" calcext:value-type="float">
            <text:p>55,00</text:p>
          </table:table-cell>
          <table:table-cell office:value-type="date" office:date-value="2026-06-30" calcext:value-type="date">
            <text:p>30/6/2026</text:p>
          </table:table-cell>
          <table:table-cell table:style-name="ce2" office:value-type="string" calcext:value-type="string">
            <text:p>F19</text:p>
          </table:table-cell>
          <table:table-cell table:style-name="ce33" table:formula="of:=COM.MICROSOFT.XLOOKUP([$'Op. Long_Basis_Vig'.$S8];[$Analítico_Deriv.A:.A];[$Analítico_Deriv.S:.S])" office:value-type="string" office:string-value="BMF" calcext:value-type="string">
            <text:p>BMF</text:p>
          </table:table-cell>
          <table:table-cell table:style-name="ce33" table:formula="of:=COM.MICROSOFT.XLOOKUP([$'Op. Long_Basis_Vig'.$S8];[$Analítico_Deriv.A:.A];[$Analítico_Deriv.T:.T])" office:value-type="string" office:string-value="CCMF27" calcext:value-type="string">
            <text:p>CCMF27</text:p>
          </table:table-cell>
          <table:table-cell table:style-name="ce5" table:formula="of:=COM.MICROSOFT.XLOOKUP([$'Op. Long_Basis_Vig'.$S8];[$Analítico_Deriv.A:.A];[$Analítico_Deriv.V:.V])" office:value-type="date" office:date-value="2027-01-15" calcext:value-type="date">
            <text:p>15/1/2027</text:p>
          </table:table-cell>
          <table:table-cell office:value-type="float" office:value="-43.7" calcext:value-type="float">
            <text:p>-43,70</text:p>
          </table:table-cell>
          <table:table-cell office:value-type="float" office:value="-1179900" calcext:value-type="float">
            <text:p>-1.179.900</text:p>
          </table:table-cell>
          <table:table-cell table:style-name="ce18" table:formula="of:=COM.MICROSOFT.XLOOKUP([$'Op. Long_Basis_Vig'.$S8];[$Analítico_Deriv.A:.A];[$Analítico_Deriv.U:.U])" office:value-type="float" office:value="73.29" calcext:value-type="float">
            <text:p>73,2900</text:p>
          </table:table-cell>
          <table:table-cell table:formula="of:=SUM([$'Op. Long_Basis_Vig'.$L8]+[$'Op. Long_Basis_Vig'.$X8])" office:value-type="float" office:value="-243" calcext:value-type="float">
            <text:p>-243</text:p>
          </table:table-cell>
          <table:table-cell table:style-name="ce42" office:value-type="string" calcext:value-type="string">
            <text:p>-</text:p>
          </table:table-cell>
          <table:table-cell table:formula="of:=IFERROR(COM.MICROSOFT.XLOOKUP([$'Op. Long_Basis_Vig'.$AA8];[$Analítico_Deriv.A:.A];[$Analítico_Deriv.X:.X]);0)" office:value-type="float" office:value="0" calcext:value-type="float">
            <text:p>0,00</text:p>
          </table:table-cell>
          <table:table-cell table:style-name="ce18" table:formula="of:=IFERROR(COM.MICROSOFT.XLOOKUP([$'Op. Long_Basis_Vig'.$AA8];[$Analítico_Deriv.A:.A];[$Analítico_Deriv.U:.U]);0)" office:value-type="float" office:value="0" calcext:value-type="float">
            <text:p>0,0000</text:p>
          </table:table-cell>
          <table:table-cell table:style-name="ce5" table:formula="of:=IFERROR(COM.MICROSOFT.XLOOKUP([$'Op. Long_Basis_Vig'.$AA8];[$Analítico_Deriv.A:.A];[$Analítico_Deriv.V:.V]);0)" office:value-type="date" office:date-value="1899-12-30" calcext:value-type="date">
            <text:p>30/12/1899</text:p>
          </table:table-cell>
          <table:table-cell table:style-name="ce42" table:formula="of:=COM.MICROSOFT.XLOOKUP([$'Op. Long_Basis_Vig'.$S8];[$Analítico_Deriv.A:.A];[$Analítico_Deriv.AI:.AI])" office:value-type="string" office:string-value="LB-Milho-26" calcext:value-type="string">
            <text:p>LB-Milho-26</text:p>
          </table:table-cell>
          <table:table-cell table:style-name="ce42" table:formula="of:=COM.MICROSOFT.CONCAT([$'Op. Long_Basis_Vig'.$K8];&quot; &quot;;[$'Op. Long_Basis_Vig'.$N8];&quot; &quot;;[$'Op. Long_Basis_Vig'.$O8];&quot; &quot;;[$'Op. Long_Basis_Vig'.$F8])" office:value-type="string" office:string-value="Milho Safra Atual BRL Sacramento" calcext:value-type="string">
            <text:p>Milho Safra Atual BRL Sacramento</text:p>
          </table:table-cell>
          <table:table-cell table:style-name="ce23" table:formula="of:=IFERROR(COM.MICROSOFT.XLOOKUP([$'Op. Long_Basis_Vig'.$AF8];[$Preços_MTM.O:.O];[$Preços_MTM.P:.P]);0)" office:value-type="float" office:value="58" calcext:value-type="float">
            <text:p>58,00</text:p>
          </table:table-cell>
          <table:table-cell table:style-name="ce18" table:formula="of:=IFERROR(COM.MICROSOFT.XLOOKUP([$'Op. Long_Basis_Vig'.$U8];[$Preços_MTM.C:.C];[$Preços_MTM.D:.D]);0)" office:value-type="float" office:value="73.57" calcext:value-type="float">
            <text:p>73,5700</text:p>
          </table:table-cell>
          <table:table-cell table:style-name="ce18" table:formula="of:=IFERROR(COM.MICROSOFT.XLOOKUP([$'Op. Long_Basis_Vig'.$AD8];[$Preços_MTM.H:.H];[$Preços_MTM.I:.I]);0)" office:value-type="float" office:value="0" calcext:value-type="float">
            <text:p>0,0000</text:p>
          </table:table-cell>
          <table:table-cell table:formula="of:=IF([$'Op. Long_Basis_Vig'.$O8]=&quot;BRL&quot;;([$'Op. Long_Basis_Vig'.$AG8]-[$'Op. Long_Basis_Vig'.$Q8])*[$'Op. Long_Basis_Vig'.$M8];IF([$'Op. Long_Basis_Vig'.$O8]=&quot;USD&quot;;([$'Op. Long_Basis_Vig'.$AG8]-[$'Op. Long_Basis_Vig'.$Q8])*[$'Op. Long_Basis_Vig'.$M8]*COM.MICROSOFT.XLOOKUP([$'Op. Long_Basis_Vig'.$R8];[$Preços_MTM.H:.H];[$Preços_MTM.I:.I])))" office:value-type="float" office:value="58982.85" calcext:value-type="float">
            <text:p>58.982,85</text:p>
          </table:table-cell>
          <table:table-cell table:formula="of:=IF([$'Op. Long_Basis_Vig'.$T8]=&quot;CBOT&quot;;([$'Op. Long_Basis_Vig'.$AH8]-[$'Op. Long_Basis_Vig'.$Y8])*5000*[$'Op. Long_Basis_Vig'.$W8]*[$Preços_MTM.$I$4];IF([$'Op. Long_Basis_Vig'.$T8]=&quot;BMF&quot;;([$'Op. Long_Basis_Vig'.$AH8]-[$'Op. Long_Basis_Vig'.$Y8])*450*[$'Op. Long_Basis_Vig'.$W8];&quot;VERIFICAR&quot;))" office:value-type="float" office:value="-5506.19999999974" calcext:value-type="float">
            <text:p>-5.506,20</text:p>
          </table:table-cell>
          <table:table-cell table:formula="of:=([$'Op. Long_Basis_Vig'.$AI8]-[$'Op. Long_Basis_Vig'.$AC8])*[$'Op. Long_Basis_Vig'.$AB8]" office:value-type="float" office:value="0" calcext:value-type="float">
            <text:p>0,00</text:p>
          </table:table-cell>
          <table:table-cell table:formula="of:=SUM([$'Op. Long_Basis_Vig'.$AJ8:.$AL8])" office:value-type="float" office:value="53476.6500000003" calcext:value-type="float">
            <text:p>53.476,65</text:p>
          </table:table-cell>
          <table:table-cell office:value-type="percentage" office:value="0.014" calcext:value-type="percentage">
            <text:p>1,40%</text:p>
          </table:table-cell>
          <table:table-cell table:formula="of:=([$'Op. Long_Basis_Vig'.$Q8]*(1+[$'Op. Long_Basis_Vig'.$AN8])^(((COM.MICROSOFT.XLOOKUP([$'Op. Long_Basis_Vig'.$AF8];[$Preços_MTM.O:.O];[$Preços_MTM.Q:.Q]))-[$'Op. Long_Basis_Vig'.$R8])/30))-[$'Op. Long_Basis_Vig'.$Q8]" office:value-type="float" office:value="0.383661850766053" calcext:value-type="float">
            <text:p>0,38</text:p>
          </table:table-cell>
          <table:table-cell table:style-name="ce114" table:formula="of:=[$'Op. Long_Basis_Vig'.$AO8]*[$'Op. Long_Basis_Vig'.$M8]*-1" office:value-type="float" office:value="-7543.15646481883" calcext:value-type="float">
            <text:p>-7.543,16</text:p>
          </table:table-cell>
          <table:table-cell table:style-name="ce114" table:formula="of:=(4*[$'Op. Long_Basis_Vig'.$M8])*-1" office:value-type="float" office:value="-78643.8" calcext:value-type="float">
            <text:p>-78.643,80</text:p>
          </table:table-cell>
          <table:table-cell table:style-name="ce114" table:formula="of:=SUM([$'Op. Long_Basis_Vig'.$AP8:.$AQ8])" office:value-type="float" office:value="-86186.9564648188" calcext:value-type="float">
            <text:p>-86.186,96</text:p>
          </table:table-cell>
          <table:table-cell table:style-name="ce114" table:formula="of:=SUM([$'Op. Long_Basis_Vig'.$AQ8];[$'Op. Long_Basis_Vig'.$AP8];[$'Op. Long_Basis_Vig'.$AM8])" office:value-type="float" office:value="-32710.3064648186" calcext:value-type="float">
            <text:p>-32.710,31</text:p>
          </table:table-cell>
          <table:table-cell table:style-name="ce114" table:formula="of:=COM.MICROSOFT.CONCAT([$'Op. Long_Basis_Vig'.$K8];&quot; &quot;;[$'Op. Long_Basis_Vig'.$T8])" office:value-type="string" office:string-value="Milho BMF" calcext:value-type="string">
            <text:p>Milho BMF</text:p>
          </table:table-cell>
          <table:table-cell table:style-name="ce114" table:formula="of:=IF([$'Op. Long_Basis_Vig'.$AT8]=&quot;Milho BMF&quot;;[$'Op. Long_Basis_Vig'.$Q8]-[$'Op. Long_Basis_Vig'.$Y8];&quot;CALMA&quot;)" office:value-type="float" office:value="-18.29" calcext:value-type="float">
            <text:p>-18,29</text:p>
          </table:table-cell>
          <table:table-cell table:style-name="ce114" table:formula="of:=IF([$'Op. Long_Basis_Vig'.$AT8]=&quot;Milho BMF&quot;;[$'Op. Long_Basis_Vig'.$AG8]-[$'Op. Long_Basis_Vig'.$AH8])" office:value-type="float" office:value="-15.57" calcext:value-type="float">
            <text:p>-15,57</text:p>
          </table:table-cell>
          <table:table-cell table:style-name="ce114" table:formula="of:=[$'Op. Long_Basis_Vig'.$AM8]/[$'Op. Long_Basis_Vig'.$M8]" office:value-type="float" office:value="2.7199423222174" calcext:value-type="float">
            <text:p>2,72</text:p>
          </table:table-cell>
          <table:table-cell table:style-name="ce114" table:formula="of:=[$'Op. Long_Basis_Vig'.$AR8]/[$'Op. Long_Basis_Vig'.$M8]" office:value-type="float" office:value="-4.38366185076605" calcext:value-type="float">
            <text:p>-4,38</text:p>
          </table:table-cell>
          <table:table-cell table:style-name="ce114" table:formula="of:=[$'Op. Long_Basis_Vig'.$AS8]/[$'Op. Long_Basis_Vig'.$M8]" office:value-type="float" office:value="-1.66371952854865" calcext:value-type="float">
            <text:p>-1,66</text:p>
          </table:table-cell>
          <table:table-cell table:style-name="ce23" table:formula="of:=[$'Op. Long_Basis_Vig'.$AW8]*[$'Op. Long_Basis_Vig'.$M8]" office:value-type="float" office:value="53476.6500000003" calcext:value-type="float">
            <text:p>53.476,65</text:p>
          </table:table-cell>
          <table:table-cell table:style-name="ce23" table:formula="of:=[$'Op. Long_Basis_Vig'.$AX8]*[$'Op. Long_Basis_Vig'.$M8]" office:value-type="float" office:value="-86186.9564648188" calcext:value-type="float">
            <text:p>-86.186,96</text:p>
          </table:table-cell>
          <table:table-cell table:style-name="ce23" table:formula="of:=[$'Op. Long_Basis_Vig'.$AY8]*[$'Op. Long_Basis_Vig'.$M8]" office:value-type="float" office:value="-32710.3064648186" calcext:value-type="float">
            <text:p>-32.710,31</text:p>
          </table:table-cell>
          <table:table-cell table:style-name="Default" table:number-columns-repeated="16330"/>
        </table:table-row>
        <table:table-row table:style-name="ro1">
          <table:table-cell office:value-type="string" calcext:value-type="string">
            <text:p>LB10</text:p>
          </table:table-cell>
          <table:table-cell office:value-type="date" office:date-value="2026-06-30" calcext:value-type="date">
            <text:p>30/6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Intergrãos</text:p>
          </table:table-cell>
          <table:table-cell office:value-type="string" calcext:value-type="string">
            <text:p>Matup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Vig'.$E9];&quot; &quot;;[$'Op. Long_Basis_Vig'.$G9])" office:value-type="string" office:string-value="Intergrãos MT" calcext:value-type="string">
            <text:p>Intergrãos MT</text:p>
          </table:table-cell>
          <table:table-cell/>
          <table:table-cell office:value-type="string" calcext:value-type="string">
            <text:p>Matheus Felipe de Souza Santana de Oliveira</text:p>
          </table:table-cell>
          <table:table-cell office:value-type="string" calcext:value-type="string">
            <text:p>Milho</text:p>
          </table:table-cell>
          <table:table-cell office:value-type="float" office:value="111893" calcext:value-type="float">
            <text:p>111.893</text:p>
          </table:table-cell>
          <table:table-cell table:formula="of:=[$'Op. Long_Basis_Vig'.$L9]/60" office:value-type="float" office:value="1864.88333333333" calcext:value-type="float">
            <text:p>1.865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BRL</text:p>
          </table:table-cell>
          <table:table-cell office:value-type="date" office:date-value="2026-06-30" calcext:value-type="date">
            <text:p>30/6/2026</text:p>
          </table:table-cell>
          <table:table-cell office:value-type="float" office:value="38" calcext:value-type="float">
            <text:p>38,00</text:p>
          </table:table-cell>
          <table:table-cell office:value-type="date" office:date-value="2026-07-07" calcext:value-type="date">
            <text:p>7/7/2026</text:p>
          </table:table-cell>
          <table:table-cell table:style-name="ce2" office:value-type="string" calcext:value-type="string">
            <text:p>F23</text:p>
          </table:table-cell>
          <table:table-cell table:style-name="ce33" table:formula="of:=COM.MICROSOFT.XLOOKUP([$'Op. Long_Basis_Vig'.$S9];[$Analítico_Deriv.A:.A];[$Analítico_Deriv.S:.S])" office:value-type="string" office:string-value="BMF" calcext:value-type="string">
            <text:p>BMF</text:p>
          </table:table-cell>
          <table:table-cell table:style-name="ce33" table:formula="of:=COM.MICROSOFT.XLOOKUP([$'Op. Long_Basis_Vig'.$S9];[$Analítico_Deriv.A:.A];[$Analítico_Deriv.T:.T])" office:value-type="string" office:string-value="CCMF27" calcext:value-type="string">
            <text:p>CCMF27</text:p>
          </table:table-cell>
          <table:table-cell table:style-name="ce5" table:formula="of:=COM.MICROSOFT.XLOOKUP([$'Op. Long_Basis_Vig'.$S9];[$Analítico_Deriv.A:.A];[$Analítico_Deriv.V:.V])" office:value-type="date" office:date-value="2027-01-15" calcext:value-type="date">
            <text:p>15/1/2027</text:p>
          </table:table-cell>
          <table:table-cell table:formula="of:=COM.MICROSOFT.XLOOKUP([$'Op. Long_Basis_Vig'.$S9];[$Analítico_Deriv.A:.A];[$Analítico_Deriv.R:.R])" office:value-type="float" office:value="-4.4" calcext:value-type="float">
            <text:p>-4,40</text:p>
          </table:table-cell>
          <table:table-cell table:formula="of:=COM.MICROSOFT.XLOOKUP([$'Op. Long_Basis_Vig'.$S9];[$Analítico_Deriv.A:.A];[$Analítico_Deriv.AE:.AE])" office:value-type="float" office:value="-118800" calcext:value-type="float">
            <text:p>-118.800</text:p>
          </table:table-cell>
          <table:table-cell table:style-name="ce18" table:formula="of:=COM.MICROSOFT.XLOOKUP([$'Op. Long_Basis_Vig'.$S9];[$Analítico_Deriv.A:.A];[$Analítico_Deriv.U:.U])" office:value-type="float" office:value="73.667" calcext:value-type="float">
            <text:p>73,6670</text:p>
          </table:table-cell>
          <table:table-cell table:formula="of:=SUM([$'Op. Long_Basis_Vig'.$L9]+[$'Op. Long_Basis_Vig'.$X9])" office:value-type="float" office:value="-6907.00000000002" calcext:value-type="float">
            <text:p>-6.907</text:p>
          </table:table-cell>
          <table:table-cell table:style-name="ce42" office:value-type="string" calcext:value-type="string">
            <text:p>-</text:p>
          </table:table-cell>
          <table:table-cell table:formula="of:=IFERROR(COM.MICROSOFT.XLOOKUP([$'Op. Long_Basis_Vig'.$AA9];[$Analítico_Deriv.A:.A];[$Analítico_Deriv.X:.X]);0)" office:value-type="float" office:value="0" calcext:value-type="float">
            <text:p>0,00</text:p>
          </table:table-cell>
          <table:table-cell table:style-name="ce18" table:formula="of:=IFERROR(COM.MICROSOFT.XLOOKUP([$'Op. Long_Basis_Vig'.$AA9];[$Analítico_Deriv.A:.A];[$Analítico_Deriv.U:.U]);0)" office:value-type="float" office:value="0" calcext:value-type="float">
            <text:p>0,0000</text:p>
          </table:table-cell>
          <table:table-cell table:style-name="ce5" table:formula="of:=IFERROR(COM.MICROSOFT.XLOOKUP([$'Op. Long_Basis_Vig'.$AA9];[$Analítico_Deriv.A:.A];[$Analítico_Deriv.V:.V]);0)" office:value-type="date" office:date-value="1899-12-30" calcext:value-type="date">
            <text:p>30/12/1899</text:p>
          </table:table-cell>
          <table:table-cell table:style-name="ce42" table:formula="of:=COM.MICROSOFT.XLOOKUP([$'Op. Long_Basis_Vig'.$S9];[$Analítico_Deriv.A:.A];[$Analítico_Deriv.AI:.AI])" office:value-type="string" office:string-value="LB-Milho-26" calcext:value-type="string">
            <text:p>LB-Milho-26</text:p>
          </table:table-cell>
          <table:table-cell table:style-name="ce42" table:formula="of:=COM.MICROSOFT.CONCAT([$'Op. Long_Basis_Vig'.$K9];&quot; &quot;;[$'Op. Long_Basis_Vig'.$N9];&quot; &quot;;[$'Op. Long_Basis_Vig'.$O9];&quot; &quot;;[$'Op. Long_Basis_Vig'.$F9])" office:value-type="string" office:string-value="Milho Safra Atual BRL Matupa" calcext:value-type="string">
            <text:p>Milho Safra Atual BRL Matupa</text:p>
          </table:table-cell>
          <table:table-cell table:style-name="ce23" table:formula="of:=IFERROR(COM.MICROSOFT.XLOOKUP([$'Op. Long_Basis_Vig'.$AF9];[$Preços_MTM.O:.O];[$Preços_MTM.P:.P]);0)" office:value-type="float" office:value="44.4" calcext:value-type="float">
            <text:p>44,40</text:p>
          </table:table-cell>
          <table:table-cell table:style-name="ce18" table:formula="of:=IFERROR(COM.MICROSOFT.XLOOKUP([$'Op. Long_Basis_Vig'.$U9];[$Preços_MTM.C:.C];[$Preços_MTM.D:.D]);0)" office:value-type="float" office:value="73.57" calcext:value-type="float">
            <text:p>73,5700</text:p>
          </table:table-cell>
          <table:table-cell table:style-name="ce18" table:formula="of:=IFERROR(COM.MICROSOFT.XLOOKUP([$'Op. Long_Basis_Vig'.$AD9];[$Preços_MTM.H:.H];[$Preços_MTM.I:.I]);0)" office:value-type="float" office:value="0" calcext:value-type="float">
            <text:p>0,0000</text:p>
          </table:table-cell>
          <table:table-cell table:formula="of:=IF([$'Op. Long_Basis_Vig'.$O9]=&quot;BRL&quot;;([$'Op. Long_Basis_Vig'.$AG9]-[$'Op. Long_Basis_Vig'.$Q9])*[$'Op. Long_Basis_Vig'.$M9];IF([$'Op. Long_Basis_Vig'.$O9]=&quot;USD&quot;;([$'Op. Long_Basis_Vig'.$AG9]-[$'Op. Long_Basis_Vig'.$Q9])*[$'Op. Long_Basis_Vig'.$M9]*COM.MICROSOFT.XLOOKUP([$'Op. Long_Basis_Vig'.$R9];[$Preços_MTM.H:.H];[$Preços_MTM.I:.I])))" office:value-type="float" office:value="11935.2533333333" calcext:value-type="float">
            <text:p>11.935,25</text:p>
          </table:table-cell>
          <table:table-cell table:formula="of:=IF([$'Op. Long_Basis_Vig'.$T9]=&quot;CBOT&quot;;([$'Op. Long_Basis_Vig'.$AH9]-[$'Op. Long_Basis_Vig'.$Y9])*5000*[$'Op. Long_Basis_Vig'.$W9]*[$Preços_MTM.$I$4];IF([$'Op. Long_Basis_Vig'.$T9]=&quot;BMF&quot;;([$'Op. Long_Basis_Vig'.$AH9]-[$'Op. Long_Basis_Vig'.$Y9])*450*[$'Op. Long_Basis_Vig'.$W9];&quot;VERIFICAR&quot;))" office:value-type="float" office:value="192.060000000017" calcext:value-type="float">
            <text:p>192,06</text:p>
          </table:table-cell>
          <table:table-cell table:formula="of:=([$'Op. Long_Basis_Vig'.$AI9]-[$'Op. Long_Basis_Vig'.$AC9])*[$'Op. Long_Basis_Vig'.$AB9]" office:value-type="float" office:value="0" calcext:value-type="float">
            <text:p>0,00</text:p>
          </table:table-cell>
          <table:table-cell table:formula="of:=SUM([$'Op. Long_Basis_Vig'.$AJ9:.$AL9])" office:value-type="float" office:value="12127.3133333333" calcext:value-type="float">
            <text:p>12.127,31</text:p>
          </table:table-cell>
          <table:table-cell office:value-type="percentage" office:value="0.014" calcext:value-type="percentage">
            <text:p>1,40%</text:p>
          </table:table-cell>
          <table:table-cell table:formula="of:=([$'Op. Long_Basis_Vig'.$Q9]*(1+[$'Op. Long_Basis_Vig'.$AN9])^(((COM.MICROSOFT.XLOOKUP([$'Op. Long_Basis_Vig'.$AF9];[$Preços_MTM.O:.O];[$Preços_MTM.Q:.Q]))-[$'Op. Long_Basis_Vig'.$R9])/30))-[$'Op. Long_Basis_Vig'.$Q9]" office:value-type="float" office:value="1.03525100161523" calcext:value-type="float">
            <text:p>1,04</text:p>
          </table:table-cell>
          <table:table-cell table:style-name="ce114" table:formula="of:=[$'Op. Long_Basis_Vig'.$AO9]*[$'Op. Long_Basis_Vig'.$M9]*-1" office:value-type="float" office:value="-1930.62233872888" calcext:value-type="float">
            <text:p>-1.930,62</text:p>
          </table:table-cell>
          <table:table-cell table:style-name="ce114" table:formula="of:=(4*[$'Op. Long_Basis_Vig'.$M9])*-1" office:value-type="float" office:value="-7459.53333333333" calcext:value-type="float">
            <text:p>-7.459,53</text:p>
          </table:table-cell>
          <table:table-cell table:style-name="ce114" table:formula="of:=SUM([$'Op. Long_Basis_Vig'.$AP9:.$AQ9])" office:value-type="float" office:value="-9390.15567206222" calcext:value-type="float">
            <text:p>-9.390,16</text:p>
          </table:table-cell>
          <table:table-cell table:style-name="ce114" table:formula="of:=SUM([$'Op. Long_Basis_Vig'.$AQ9];[$'Op. Long_Basis_Vig'.$AP9];[$'Op. Long_Basis_Vig'.$AM9])" office:value-type="float" office:value="2737.15766127113" calcext:value-type="float">
            <text:p>2.737,16</text:p>
          </table:table-cell>
          <table:table-cell table:style-name="ce114" table:formula="of:=COM.MICROSOFT.CONCAT([$'Op. Long_Basis_Vig'.$K9];&quot; &quot;;[$'Op. Long_Basis_Vig'.$T9])" office:value-type="string" office:string-value="Milho BMF" calcext:value-type="string">
            <text:p>Milho BMF</text:p>
          </table:table-cell>
          <table:table-cell table:style-name="ce114" table:formula="of:=IF([$'Op. Long_Basis_Vig'.$AT9]=&quot;Milho BMF&quot;;[$'Op. Long_Basis_Vig'.$Q9]-[$'Op. Long_Basis_Vig'.$Y9];&quot;CALMA&quot;)" office:value-type="float" office:value="-35.667" calcext:value-type="float">
            <text:p>-35,67</text:p>
          </table:table-cell>
          <table:table-cell table:style-name="ce114" table:formula="of:=IF([$'Op. Long_Basis_Vig'.$AT9]=&quot;Milho BMF&quot;;[$'Op. Long_Basis_Vig'.$AG9]-[$'Op. Long_Basis_Vig'.$AH9])" office:value-type="float" office:value="-29.17" calcext:value-type="float">
            <text:p>-29,17</text:p>
          </table:table-cell>
          <table:table-cell table:style-name="ce114" table:formula="of:=[$'Op. Long_Basis_Vig'.$AM9]/[$'Op. Long_Basis_Vig'.$M9]" office:value-type="float" office:value="6.50298767572592" calcext:value-type="float">
            <text:p>6,50</text:p>
          </table:table-cell>
          <table:table-cell table:style-name="ce114" table:formula="of:=[$'Op. Long_Basis_Vig'.$AR9]/[$'Op. Long_Basis_Vig'.$M9]" office:value-type="float" office:value="-5.03525100161523" calcext:value-type="float">
            <text:p>-5,04</text:p>
          </table:table-cell>
          <table:table-cell table:style-name="ce114" table:formula="of:=[$'Op. Long_Basis_Vig'.$AS9]/[$'Op. Long_Basis_Vig'.$M9]" office:value-type="float" office:value="1.4677366741107" calcext:value-type="float">
            <text:p>1,47</text:p>
          </table:table-cell>
          <table:table-cell table:style-name="ce23" table:formula="of:=[$'Op. Long_Basis_Vig'.$AW9]*[$'Op. Long_Basis_Vig'.$M9]" office:value-type="float" office:value="12127.3133333333" calcext:value-type="float">
            <text:p>12.127,31</text:p>
          </table:table-cell>
          <table:table-cell table:style-name="ce23" table:formula="of:=[$'Op. Long_Basis_Vig'.$AX9]*[$'Op. Long_Basis_Vig'.$M9]" office:value-type="float" office:value="-9390.15567206222" calcext:value-type="float">
            <text:p>-9.390,16</text:p>
          </table:table-cell>
          <table:table-cell table:style-name="ce23" table:formula="of:=[$'Op. Long_Basis_Vig'.$AY9]*[$'Op. Long_Basis_Vig'.$M9]" office:value-type="float" office:value="2737.15766127113" calcext:value-type="float">
            <text:p>2.737,16</text:p>
          </table:table-cell>
          <table:table-cell table:style-name="Default" table:number-columns-repeated="16330"/>
        </table:table-row>
        <table:table-row table:style-name="ro1">
          <table:table-cell office:value-type="string" calcext:value-type="string">
            <text:p>LB11</text:p>
          </table:table-cell>
          <table:table-cell office:value-type="date" office:date-value="2026-07-09" calcext:value-type="date">
            <text:p>9/7/2026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Intergrãos</text:p>
          </table:table-cell>
          <table:table-cell office:value-type="string" calcext:value-type="string">
            <text:p>Matupa</text:p>
          </table:table-cell>
          <table:table-cell table:style-name="ce27" office:value-type="string" calcext:value-type="string">
            <text:p>MT</text:p>
          </table:table-cell>
          <table:table-cell table:style-name="ce27" table:formula="of:=COM.MICROSOFT.CONCAT([$'Op. Long_Basis_Vig'.$E10];&quot; &quot;;[$'Op. Long_Basis_Vig'.$G10])" office:value-type="string" office:string-value="Intergrãos MT" calcext:value-type="string">
            <text:p>Intergrãos MT</text:p>
          </table:table-cell>
          <table:table-cell/>
          <table:table-cell office:value-type="string" calcext:value-type="string">
            <text:p>Volnei Alves de Carvalho</text:p>
          </table:table-cell>
          <table:table-cell office:value-type="string" calcext:value-type="string">
            <text:p>Milho</text:p>
          </table:table-cell>
          <table:table-cell office:value-type="float" office:value="34644" calcext:value-type="float">
            <text:p>34.644</text:p>
          </table:table-cell>
          <table:table-cell table:formula="of:=[$'Op. Long_Basis_Vig'.$L10]/60" office:value-type="float" office:value="577.4" calcext:value-type="float">
            <text:p>577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BRL</text:p>
          </table:table-cell>
          <table:table-cell office:value-type="date" office:date-value="2026-06-30" calcext:value-type="date">
            <text:p>30/6/2026</text:p>
          </table:table-cell>
          <table:table-cell office:value-type="float" office:value="38" calcext:value-type="float">
            <text:p>38,00</text:p>
          </table:table-cell>
          <table:table-cell office:value-type="date" office:date-value="2026-07-14" calcext:value-type="date">
            <text:p>14/7/2026</text:p>
          </table:table-cell>
          <table:table-cell table:style-name="ce2" office:value-type="string" calcext:value-type="string">
            <text:p>F24</text:p>
          </table:table-cell>
          <table:table-cell table:style-name="ce33" table:formula="of:=COM.MICROSOFT.XLOOKUP([$'Op. Long_Basis_Vig'.$S10];[$Analítico_Deriv.A:.A];[$Analítico_Deriv.S:.S])" office:value-type="string" office:string-value="BMF" calcext:value-type="string">
            <text:p>BMF</text:p>
          </table:table-cell>
          <table:table-cell table:style-name="ce33" table:formula="of:=COM.MICROSOFT.XLOOKUP([$'Op. Long_Basis_Vig'.$S10];[$Analítico_Deriv.A:.A];[$Analítico_Deriv.T:.T])" office:value-type="string" office:string-value="CCMF27" calcext:value-type="string">
            <text:p>CCMF27</text:p>
          </table:table-cell>
          <table:table-cell table:style-name="ce5" table:formula="of:=COM.MICROSOFT.XLOOKUP([$'Op. Long_Basis_Vig'.$S10];[$Analítico_Deriv.A:.A];[$Analítico_Deriv.V:.V])" office:value-type="date" office:date-value="2027-01-15" calcext:value-type="date">
            <text:p>15/1/2027</text:p>
          </table:table-cell>
          <table:table-cell table:formula="of:=COM.MICROSOFT.XLOOKUP([$'Op. Long_Basis_Vig'.$S10];[$Analítico_Deriv.A:.A];[$Analítico_Deriv.R:.R])" office:value-type="float" office:value="-1.3" calcext:value-type="float">
            <text:p>-1,30</text:p>
          </table:table-cell>
          <table:table-cell table:formula="of:=COM.MICROSOFT.XLOOKUP([$'Op. Long_Basis_Vig'.$S10];[$Analítico_Deriv.A:.A];[$Analítico_Deriv.AE:.AE])" office:value-type="float" office:value="-35100" calcext:value-type="float">
            <text:p>-35.100</text:p>
          </table:table-cell>
          <table:table-cell table:style-name="ce18" table:formula="of:=COM.MICROSOFT.XLOOKUP([$'Op. Long_Basis_Vig'.$S10];[$Analítico_Deriv.A:.A];[$Analítico_Deriv.U:.U])" office:value-type="float" office:value="73.677" calcext:value-type="float">
            <text:p>73,6770</text:p>
          </table:table-cell>
          <table:table-cell table:formula="of:=SUM([$'Op. Long_Basis_Vig'.$L10]+[$'Op. Long_Basis_Vig'.$X10])" office:value-type="float" office:value="-456" calcext:value-type="float">
            <text:p>-456</text:p>
          </table:table-cell>
          <table:table-cell table:style-name="ce42" office:value-type="string" calcext:value-type="string">
            <text:p>-</text:p>
          </table:table-cell>
          <table:table-cell table:formula="of:=IFERROR(COM.MICROSOFT.XLOOKUP([$'Op. Long_Basis_Vig'.$AA10];[$Analítico_Deriv.A:.A];[$Analítico_Deriv.X:.X]);0)" office:value-type="float" office:value="0" calcext:value-type="float">
            <text:p>0,00</text:p>
          </table:table-cell>
          <table:table-cell table:style-name="ce18" table:formula="of:=IFERROR(COM.MICROSOFT.XLOOKUP([$'Op. Long_Basis_Vig'.$AA10];[$Analítico_Deriv.A:.A];[$Analítico_Deriv.U:.U]);0)" office:value-type="float" office:value="0" calcext:value-type="float">
            <text:p>0,0000</text:p>
          </table:table-cell>
          <table:table-cell table:style-name="ce5" table:formula="of:=IFERROR(COM.MICROSOFT.XLOOKUP([$'Op. Long_Basis_Vig'.$AA10];[$Analítico_Deriv.A:.A];[$Analítico_Deriv.V:.V]);0)" office:value-type="date" office:date-value="1899-12-30" calcext:value-type="date">
            <text:p>30/12/1899</text:p>
          </table:table-cell>
          <table:table-cell table:style-name="ce42" table:formula="of:=COM.MICROSOFT.XLOOKUP([$'Op. Long_Basis_Vig'.$S10];[$Analítico_Deriv.A:.A];[$Analítico_Deriv.AI:.AI])" office:value-type="string" office:string-value="LB-Milho-26" calcext:value-type="string">
            <text:p>LB-Milho-26</text:p>
          </table:table-cell>
          <table:table-cell table:style-name="ce42" table:formula="of:=COM.MICROSOFT.CONCAT([$'Op. Long_Basis_Vig'.$K10];&quot; &quot;;[$'Op. Long_Basis_Vig'.$N10];&quot; &quot;;[$'Op. Long_Basis_Vig'.$O10];&quot; &quot;;[$'Op. Long_Basis_Vig'.$F10])" office:value-type="string" office:string-value="Milho Safra Atual BRL Matupa" calcext:value-type="string">
            <text:p>Milho Safra Atual BRL Matupa</text:p>
          </table:table-cell>
          <table:table-cell table:style-name="ce23" table:formula="of:=IFERROR(COM.MICROSOFT.XLOOKUP([$'Op. Long_Basis_Vig'.$AF10];[$Preços_MTM.O:.O];[$Preços_MTM.P:.P]);0)" office:value-type="float" office:value="44.4" calcext:value-type="float">
            <text:p>44,40</text:p>
          </table:table-cell>
          <table:table-cell table:style-name="ce18" table:formula="of:=IFERROR(COM.MICROSOFT.XLOOKUP([$'Op. Long_Basis_Vig'.$U10];[$Preços_MTM.C:.C];[$Preços_MTM.D:.D]);0)" office:value-type="float" office:value="73.57" calcext:value-type="float">
            <text:p>73,5700</text:p>
          </table:table-cell>
          <table:table-cell table:style-name="ce18" table:formula="of:=IFERROR(COM.MICROSOFT.XLOOKUP([$'Op. Long_Basis_Vig'.$AD10];[$Preços_MTM.H:.H];[$Preços_MTM.I:.I]);0)" office:value-type="float" office:value="0" calcext:value-type="float">
            <text:p>0,0000</text:p>
          </table:table-cell>
          <table:table-cell table:formula="of:=IF([$'Op. Long_Basis_Vig'.$O10]=&quot;BRL&quot;;([$'Op. Long_Basis_Vig'.$AG10]-[$'Op. Long_Basis_Vig'.$Q10])*[$'Op. Long_Basis_Vig'.$M10];IF([$'Op. Long_Basis_Vig'.$O10]=&quot;USD&quot;;([$'Op. Long_Basis_Vig'.$AG10]-[$'Op. Long_Basis_Vig'.$Q10])*[$'Op. Long_Basis_Vig'.$M10]*COM.MICROSOFT.XLOOKUP([$'Op. Long_Basis_Vig'.$R10];[$Preços_MTM.H:.H];[$Preços_MTM.I:.I])))" office:value-type="float" office:value="3695.36" calcext:value-type="float">
            <text:p>3.695,36</text:p>
          </table:table-cell>
          <table:table-cell table:formula="of:=IF([$'Op. Long_Basis_Vig'.$T10]=&quot;CBOT&quot;;([$'Op. Long_Basis_Vig'.$AH10]-[$'Op. Long_Basis_Vig'.$Y10])*5000*[$'Op. Long_Basis_Vig'.$W10]*[$Preços_MTM.$I$4];IF([$'Op. Long_Basis_Vig'.$T10]=&quot;BMF&quot;;([$'Op. Long_Basis_Vig'.$AH10]-[$'Op. Long_Basis_Vig'.$Y10])*450*[$'Op. Long_Basis_Vig'.$W10];&quot;VERIFICAR&quot;))" office:value-type="float" office:value="62.5950000000079" calcext:value-type="float">
            <text:p>62,60</text:p>
          </table:table-cell>
          <table:table-cell table:formula="of:=([$'Op. Long_Basis_Vig'.$AI10]-[$'Op. Long_Basis_Vig'.$AC10])*[$'Op. Long_Basis_Vig'.$AB10]" office:value-type="float" office:value="0" calcext:value-type="float">
            <text:p>0,00</text:p>
          </table:table-cell>
          <table:table-cell table:formula="of:=SUM([$'Op. Long_Basis_Vig'.$AJ10:.$AL10])" office:value-type="float" office:value="3757.95500000001" calcext:value-type="float">
            <text:p>3.757,96</text:p>
          </table:table-cell>
          <table:table-cell office:value-type="percentage" office:value="0.014" calcext:value-type="percentage">
            <text:p>1,40%</text:p>
          </table:table-cell>
          <table:table-cell table:formula="of:=([$'Op. Long_Basis_Vig'.$Q10]*(1+[$'Op. Long_Basis_Vig'.$AN10])^(((COM.MICROSOFT.XLOOKUP([$'Op. Long_Basis_Vig'.$AF10];[$Preços_MTM.O:.O];[$Preços_MTM.Q:.Q]))-[$'Op. Long_Basis_Vig'.$R10])/30))-[$'Op. Long_Basis_Vig'.$Q10]" office:value-type="float" office:value="0.908825383864631" calcext:value-type="float">
            <text:p>0,91</text:p>
          </table:table-cell>
          <table:table-cell table:style-name="ce114" table:formula="of:=[$'Op. Long_Basis_Vig'.$AO10]*[$'Op. Long_Basis_Vig'.$M10]*-1" office:value-type="float" office:value="-524.755776643438" calcext:value-type="float">
            <text:p>-524,76</text:p>
          </table:table-cell>
          <table:table-cell table:style-name="ce114" table:formula="of:=(4*[$'Op. Long_Basis_Vig'.$M10])*-1" office:value-type="float" office:value="-2309.6" calcext:value-type="float">
            <text:p>-2.309,60</text:p>
          </table:table-cell>
          <table:table-cell table:style-name="ce114" table:formula="of:=SUM([$'Op. Long_Basis_Vig'.$AP10:.$AQ10])" office:value-type="float" office:value="-2834.35577664344" calcext:value-type="float">
            <text:p>-2.834,36</text:p>
          </table:table-cell>
          <table:table-cell table:style-name="ce114" table:formula="of:=SUM([$'Op. Long_Basis_Vig'.$AQ10];[$'Op. Long_Basis_Vig'.$AP10];[$'Op. Long_Basis_Vig'.$AM10])" office:value-type="float" office:value="923.599223356569" calcext:value-type="float">
            <text:p>923,60</text:p>
          </table:table-cell>
          <table:table-cell table:style-name="ce114" table:formula="of:=COM.MICROSOFT.CONCAT([$'Op. Long_Basis_Vig'.$K10];&quot; &quot;;[$'Op. Long_Basis_Vig'.$T10])" office:value-type="string" office:string-value="Milho BMF" calcext:value-type="string">
            <text:p>Milho BMF</text:p>
          </table:table-cell>
          <table:table-cell table:style-name="ce114" table:formula="of:=IF([$'Op. Long_Basis_Vig'.$AT10]=&quot;Milho BMF&quot;;[$'Op. Long_Basis_Vig'.$Q10]-[$'Op. Long_Basis_Vig'.$Y10];&quot;CALMA&quot;)" office:value-type="float" office:value="-35.677" calcext:value-type="float">
            <text:p>-35,68</text:p>
          </table:table-cell>
          <table:table-cell table:style-name="ce114" table:formula="of:=IF([$'Op. Long_Basis_Vig'.$AT10]=&quot;Milho BMF&quot;;[$'Op. Long_Basis_Vig'.$AG10]-[$'Op. Long_Basis_Vig'.$AH10])" office:value-type="float" office:value="-29.17" calcext:value-type="float">
            <text:p>-29,17</text:p>
          </table:table-cell>
          <table:table-cell table:style-name="ce114" table:formula="of:=[$'Op. Long_Basis_Vig'.$AM10]/[$'Op. Long_Basis_Vig'.$M10]" office:value-type="float" office:value="6.50840838240389" calcext:value-type="float">
            <text:p>6,51</text:p>
          </table:table-cell>
          <table:table-cell table:style-name="ce114" table:formula="of:=[$'Op. Long_Basis_Vig'.$AR10]/[$'Op. Long_Basis_Vig'.$M10]" office:value-type="float" office:value="-4.90882538386463" calcext:value-type="float">
            <text:p>-4,91</text:p>
          </table:table-cell>
          <table:table-cell table:style-name="ce114" table:formula="of:=[$'Op. Long_Basis_Vig'.$AS10]/[$'Op. Long_Basis_Vig'.$M10]" office:value-type="float" office:value="1.59958299853926" calcext:value-type="float">
            <text:p>1,60</text:p>
          </table:table-cell>
          <table:table-cell table:style-name="ce23" table:formula="of:=[$'Op. Long_Basis_Vig'.$AW10]*[$'Op. Long_Basis_Vig'.$M10]" office:value-type="float" office:value="3757.95500000001" calcext:value-type="float">
            <text:p>3.757,96</text:p>
          </table:table-cell>
          <table:table-cell table:style-name="ce23" table:formula="of:=[$'Op. Long_Basis_Vig'.$AX10]*[$'Op. Long_Basis_Vig'.$M10]" office:value-type="float" office:value="-2834.35577664344" calcext:value-type="float">
            <text:p>-2.834,36</text:p>
          </table:table-cell>
          <table:table-cell table:style-name="ce23" table:formula="of:=[$'Op. Long_Basis_Vig'.$AY10]*[$'Op. Long_Basis_Vig'.$M10]" office:value-type="float" office:value="923.599223356569" calcext:value-type="float">
            <text:p>923,60</text:p>
          </table:table-cell>
          <table:table-cell table:style-name="Default" table:number-columns-repeated="16330"/>
        </table:table-row>
        <table:table-row table:style-name="ro1" table:number-rows-repeated="1048565">
          <table:table-cell table:number-columns-repeated="54"/>
          <table:table-cell table:style-name="Default" table:number-columns-repeated="16330"/>
        </table:table-row>
        <table:table-row table:style-name="ro1">
          <table:table-cell table:number-columns-repeated="54"/>
          <table:table-cell table:style-name="Default" table:number-columns-repeated="16330"/>
        </table:table-row>
        <calcext:conditional-formats>
          <calcext:conditional-format calcext:target-range-address="'Op. Long_Basis_Vig'.AP1:'Op. Long_Basis_Vig'.AT5 'Op. Long_Basis_Vig'.AU1:'Op. Long_Basis_Vig'.AY1048576 'Op. Long_Basis_Vig'.AP6:'Op. Long_Basis_Vig'.AS6 'Op. Long_Basis_Vig'.AP7:'Op. Long_Basis_Vig'.AT1048576">
            <calcext:condition calcext:apply-style-name="ConditionalStyle_35" calcext:value="between(-0.000000000001,-9.99999999999999E+021)" calcext:base-cell-address="'Op. Long_Basis_Vig'.AP1"/>
          </calcext:conditional-format>
          <calcext:conditional-format calcext:target-range-address="'Op. Long_Basis_Vig'.L1:'Op. Long_Basis_Vig'.M1048576">
            <calcext:condition calcext:apply-style-name="ConditionalStyle_37" calcext:value="between(-0.00000001,-9.99999999999999E+018)" calcext:base-cell-address="'Op. Long_Basis_Vig'.L1"/>
          </calcext:conditional-format>
          <calcext:conditional-format calcext:target-range-address="'Op. Long_Basis_Vig'.W1:'Op. Long_Basis_Vig'.X1048576 'Op. Long_Basis_Vig'.Z1:'Op. Long_Basis_Vig'.Z1048576 'Op. Long_Basis_Vig'.AB1:'Op. Long_Basis_Vig'.AB1048576 'Op. Long_Basis_Vig'.AJ1:'Op. Long_Basis_Vig'.AO1048576">
            <calcext:condition calcext:apply-style-name="ConditionalStyle_36" calcext:value="between(-1E-017,-9.99999999999999E+047)" calcext:base-cell-address="'Op. Long_Basis_Vig'.W1"/>
          </calcext:conditional-format>
        </calcext:conditional-formats>
      </table:table>
      <table:table table:name="MTM_LB-Milho-26" table:style-name="ta7">
        <office:forms form:automatic-focus="false" form:apply-design-mode="false"/>
        <table:table-column table:style-name="co1" table:default-cell-style-name="Default"/>
        <table:table-column table:style-name="co13" table:number-columns-repeated="6" table:default-cell-style-name="Default"/>
        <table:table-column table:style-name="co1" table:number-columns-repeated="16377"/>
        <table:table-row table:style-name="ro1">
          <table:table-cell/>
          <table:table-cell>
            <draw:frame draw:z-index="1" draw:name="Imagem 3" draw:style-name="gr8" draw:text-style-name="P1" svg:width="1.11cm" svg:height="1.774cm" svg:x="0.423cm" svg:y="0.159cm">
              <draw:image xlink:href="Pictures/1000000100000107000000D3CA0178B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Default" table:number-columns-repeated="16377"/>
        </table:table-row>
        <table:table-row table:style-name="ro1">
          <table:table-cell/>
          <table:table-cell>
            <draw:custom-shape draw:z-index="2" draw:name="CaixaDeTexto 4" draw:style-name="gr2" draw:text-style-name="P3" svg:width="8.949cm" svg:height="0.951cm" svg:x="1.72cm" svg:y="0.265cm">
              <text:p text:style-name="P2"><text:span text:style-name="T9">MTM DE </text:span><text:span text:style-name="T10">LONG BASIS </text:span><text:span text:style-name="T9">- MILHO 2026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ce122" office:value-type="string" calcext:value-type="string">
            <text:p>Operação:</text:p>
          </table:table-cell>
          <table:table-cell table:style-name="ce123" office:value-type="string" calcext:value-type="string">
            <text:p>LB-Milho-26</text:p>
          </table:table-cell>
          <table:table-cell table:style-name="Default" table:number-columns-repeated="16377"/>
        </table:table-row>
        <table:table-row table:style-name="ro1">
          <table:table-cell table:number-columns-repeated="5"/>
          <table:table-cell table:style-name="ce122" office:value-type="string" calcext:value-type="string">
            <text:p>Status:</text:p>
          </table:table-cell>
          <table:table-cell table:style-name="ce123" office:value-type="string" calcext:value-type="string">
            <text:p>Vigente</text:p>
          </table:table-cell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115" office:value-type="string" calcext:value-type="string" table:number-columns-spanned="6" table:number-rows-spanned="1">
            <text:p>RESULTADO PARCIAL OP. LONG BASIS</text:p>
          </table:table-cell>
          <table:covered-table-cell table:number-columns-repeated="5" table:style-name="ce115"/>
          <table:table-cell table:style-name="Default" table:number-columns-repeated="16377"/>
        </table:table-row>
        <table:table-row table:style-name="ro4">
          <table:table-cell table:number-columns-repeated="2"/>
          <table:table-cell table:style-name="ce2" table:number-columns-repeated="5"/>
          <table:table-cell table:style-name="Default" table:number-columns-repeated="16377"/>
        </table:table-row>
        <table:table-row table:style-name="ro1">
          <table:table-cell/>
          <table:table-cell table:style-name="ce116" office:value-type="string" calcext:value-type="string">
            <text:p>Empresa</text:p>
          </table:table-cell>
          <table:table-cell table:style-name="ce119" office:value-type="string" calcext:value-type="string">
            <text:p>Volume (Scs)</text:p>
          </table:table-cell>
          <table:table-cell table:style-name="ce119" office:value-type="string" calcext:value-type="string">
            <text:p>MTM</text:p>
          </table:table-cell>
          <table:table-cell table:style-name="ce119" office:value-type="string" calcext:value-type="string">
            <text:p>Custos Op</text:p>
          </table:table-cell>
          <table:table-cell table:style-name="ce119" office:value-type="string" calcext:value-type="string">
            <text:p>MTM Líquido</text:p>
          </table:table-cell>
          <table:table-cell table:style-name="ce119" office:value-type="string" calcext:value-type="string">
            <text:p>Parcial (R$/sc)</text:p>
          </table:table-cell>
          <table:table-cell table:style-name="Default" table:number-columns-repeated="16377"/>
        </table:table-row>
        <table:table-row table:style-name="ro1">
          <table:table-cell/>
          <table:table-cell table:style-name="ce117" office:value-type="string" calcext:value-type="string">
            <text:p>Intergrãos MT</text:p>
          </table:table-cell>
          <table:table-cell table:style-name="ce120" table:formula="of:=SUMIFS([$'Op. Long_Basis_Vig'.M:.M];[$'Op. Long_Basis_Vig'.C:.C];[$'MTM_LB-Milho-26'.$G$3];[$'Op. Long_Basis_Vig'.AE:.AE];[$'MTM_LB-Milho-26'.$G$2];[$'Op. Long_Basis_Vig'.H:.H];[$'MTM_LB-Milho-26'.B8])" office:value-type="float" office:value="12442.2833333333" calcext:value-type="float">
            <text:p>12.442,28 </text:p>
          </table:table-cell>
          <table:table-cell table:style-name="ce120" table:formula="of:=SUMIFS([$'Op. Long_Basis_Vig'.AM:.AM];[$'Op. Long_Basis_Vig'.C:.C];[$'MTM_LB-Milho-26'.$G$3];[$'Op. Long_Basis_Vig'.AE:.AE];[$'MTM_LB-Milho-26'.$G$2];[$'Op. Long_Basis_Vig'.H:.H];[$'MTM_LB-Milho-26'.B8])" office:value-type="float" office:value="67480.0087833334" calcext:value-type="float">
            <text:p>67.480,01 </text:p>
          </table:table-cell>
          <table:table-cell table:style-name="ce120" table:formula="of:=SUMIFS([$'Op. Long_Basis_Vig'.AR:.AR];[$'Op. Long_Basis_Vig'.C:.C];[$'MTM_LB-Milho-26'.$G$3];[$'Op. Long_Basis_Vig'.AE:.AE];[$'MTM_LB-Milho-26'.$G$2];[$'Op. Long_Basis_Vig'.H:.H];[$'MTM_LB-Milho-26'.B8])" office:value-type="float" office:value="-62442.4188913937" calcext:value-type="float">
            <text:p>-62.442,42 </text:p>
          </table:table-cell>
          <table:table-cell table:style-name="ce120" table:formula="of:=SUMIFS([$'Op. Long_Basis_Vig'.AS:.AS];[$'Op. Long_Basis_Vig'.C:.C];[$'MTM_LB-Milho-26'.$G$3];[$'Op. Long_Basis_Vig'.AE:.AE];[$'MTM_LB-Milho-26'.$G$2];[$'Op. Long_Basis_Vig'.H:.H];[$'MTM_LB-Milho-26'.B8])" office:value-type="float" office:value="5037.58989193965" calcext:value-type="float">
            <text:p>5.037,59 </text:p>
          </table:table-cell>
          <table:table-cell table:style-name="ce120" table:formula="of:=IFERROR([.F8]/[.C8];0)" office:value-type="float" office:value="0.404876641769101" calcext:value-type="float">
            <text:p>0,40 </text:p>
          </table:table-cell>
          <table:table-cell table:style-name="Default" table:number-columns-repeated="16377"/>
        </table:table-row>
        <table:table-row table:style-name="ro1">
          <table:table-cell/>
          <table:table-cell table:style-name="ce117" office:value-type="string" calcext:value-type="string">
            <text:p>Intergrãos MG</text:p>
          </table:table-cell>
          <table:table-cell table:style-name="ce120" table:formula="of:=SUMIFS([$'Op. Long_Basis_Vig'.M:.M];[$'Op. Long_Basis_Vig'.C:.C];[$'MTM_LB-Milho-26'.$G$3];[$'Op. Long_Basis_Vig'.AE:.AE];[$'MTM_LB-Milho-26'.$G$2];[$'Op. Long_Basis_Vig'.H:.H];[$'MTM_LB-Milho-26'.B9])" office:value-type="float" office:value="19660.95" calcext:value-type="float">
            <text:p>19.660,95 </text:p>
          </table:table-cell>
          <table:table-cell table:style-name="ce120" table:formula="of:=SUMIFS([$'Op. Long_Basis_Vig'.AM:.AM];[$'Op. Long_Basis_Vig'.C:.C];[$'MTM_LB-Milho-26'.$G$3];[$'Op. Long_Basis_Vig'.AE:.AE];[$'MTM_LB-Milho-26'.$G$2];[$'Op. Long_Basis_Vig'.H:.H];[$'MTM_LB-Milho-26'.B9])" office:value-type="float" office:value="53476.6500000003" calcext:value-type="float">
            <text:p>53.476,65 </text:p>
          </table:table-cell>
          <table:table-cell table:style-name="ce120" table:formula="of:=SUMIFS([$'Op. Long_Basis_Vig'.AR:.AR];[$'Op. Long_Basis_Vig'.C:.C];[$'MTM_LB-Milho-26'.$G$3];[$'Op. Long_Basis_Vig'.AE:.AE];[$'MTM_LB-Milho-26'.$G$2];[$'Op. Long_Basis_Vig'.H:.H];[$'MTM_LB-Milho-26'.B9])" office:value-type="float" office:value="-86186.9564648188" calcext:value-type="float">
            <text:p>-86.186,96 </text:p>
          </table:table-cell>
          <table:table-cell table:style-name="ce120" table:formula="of:=SUMIFS([$'Op. Long_Basis_Vig'.AS:.AS];[$'Op. Long_Basis_Vig'.C:.C];[$'MTM_LB-Milho-26'.$G$3];[$'Op. Long_Basis_Vig'.AE:.AE];[$'MTM_LB-Milho-26'.$G$2];[$'Op. Long_Basis_Vig'.H:.H];[$'MTM_LB-Milho-26'.B9])" office:value-type="float" office:value="-32710.3064648186" calcext:value-type="float">
            <text:p>-32.710,31 </text:p>
          </table:table-cell>
          <table:table-cell table:style-name="ce120" table:formula="of:=IFERROR([.F9]/[.C9];0)" office:value-type="float" office:value="-1.66371952854865" calcext:value-type="float">
            <text:p>-1,66 </text:p>
          </table:table-cell>
          <table:table-cell table:style-name="Default" table:number-columns-repeated="16377"/>
        </table:table-row>
        <table:table-row table:style-name="ro1">
          <table:table-cell/>
          <table:table-cell table:style-name="ce117" office:value-type="string" calcext:value-type="string">
            <text:p>Intergran MG</text:p>
          </table:table-cell>
          <table:table-cell table:style-name="ce120" table:formula="of:=SUMIFS([$'Op. Long_Basis_Vig'.M:.M];[$'Op. Long_Basis_Vig'.C:.C];[$'MTM_LB-Milho-26'.$G$3];[$'Op. Long_Basis_Vig'.AE:.AE];[$'MTM_LB-Milho-26'.$G$2];[$'Op. Long_Basis_Vig'.H:.H];[$'MTM_LB-Milho-26'.B10])" office:value-type="float" office:value="0" calcext:value-type="float">
            <text:p>0,00 </text:p>
          </table:table-cell>
          <table:table-cell table:style-name="ce120" table:formula="of:=SUMIFS([$'Op. Long_Basis_Vig'.AM:.AM];[$'Op. Long_Basis_Vig'.C:.C];[$'MTM_LB-Milho-26'.$G$3];[$'Op. Long_Basis_Vig'.AE:.AE];[$'MTM_LB-Milho-26'.$G$2];[$'Op. Long_Basis_Vig'.H:.H];[$'MTM_LB-Milho-26'.B10])" office:value-type="float" office:value="0" calcext:value-type="float">
            <text:p>0,00 </text:p>
          </table:table-cell>
          <table:table-cell table:style-name="ce120" table:formula="of:=SUMIFS([$'Op. Long_Basis_Vig'.AR:.AR];[$'Op. Long_Basis_Vig'.C:.C];[$'MTM_LB-Milho-26'.$G$3];[$'Op. Long_Basis_Vig'.AE:.AE];[$'MTM_LB-Milho-26'.$G$2];[$'Op. Long_Basis_Vig'.H:.H];[$'MTM_LB-Milho-26'.B10])" office:value-type="float" office:value="0" calcext:value-type="float">
            <text:p>0,00 </text:p>
          </table:table-cell>
          <table:table-cell table:style-name="ce120" table:formula="of:=SUMIFS([$'Op. Long_Basis_Vig'.AS:.AS];[$'Op. Long_Basis_Vig'.C:.C];[$'MTM_LB-Milho-26'.$G$3];[$'Op. Long_Basis_Vig'.AE:.AE];[$'MTM_LB-Milho-26'.$G$2];[$'Op. Long_Basis_Vig'.H:.H];[$'MTM_LB-Milho-26'.B10])" office:value-type="float" office:value="0" calcext:value-type="float">
            <text:p>0,00 </text:p>
          </table:table-cell>
          <table:table-cell table:style-name="ce120" table:formula="of:=IFERROR([.F10]/[.C10];0)" office:value-type="float" office:value="0" calcext:value-type="float">
            <text:p>0,00 </text:p>
          </table:table-cell>
          <table:table-cell table:style-name="Default" table:number-columns-repeated="16377"/>
        </table:table-row>
        <table:table-row table:style-name="ro1">
          <table:table-cell/>
          <table:table-cell table:style-name="ce117" office:value-type="string" calcext:value-type="string">
            <text:p>Intergran GO</text:p>
          </table:table-cell>
          <table:table-cell table:style-name="ce120" table:formula="of:=SUMIFS([$'Op. Long_Basis_Vig'.M:.M];[$'Op. Long_Basis_Vig'.C:.C];[$'MTM_LB-Milho-26'.$G$3];[$'Op. Long_Basis_Vig'.AE:.AE];[$'MTM_LB-Milho-26'.$G$2];[$'Op. Long_Basis_Vig'.H:.H];[$'MTM_LB-Milho-26'.B11])" office:value-type="float" office:value="0" calcext:value-type="float">
            <text:p>0,00 </text:p>
          </table:table-cell>
          <table:table-cell table:style-name="ce120" table:formula="of:=SUMIFS([$'Op. Long_Basis_Vig'.AM:.AM];[$'Op. Long_Basis_Vig'.C:.C];[$'MTM_LB-Milho-26'.$G$3];[$'Op. Long_Basis_Vig'.AE:.AE];[$'MTM_LB-Milho-26'.$G$2];[$'Op. Long_Basis_Vig'.H:.H];[$'MTM_LB-Milho-26'.B11])" office:value-type="float" office:value="0" calcext:value-type="float">
            <text:p>0,00 </text:p>
          </table:table-cell>
          <table:table-cell table:style-name="ce120" table:formula="of:=SUMIFS([$'Op. Long_Basis_Vig'.AR:.AR];[$'Op. Long_Basis_Vig'.C:.C];[$'MTM_LB-Milho-26'.$G$3];[$'Op. Long_Basis_Vig'.AE:.AE];[$'MTM_LB-Milho-26'.$G$2];[$'Op. Long_Basis_Vig'.H:.H];[$'MTM_LB-Milho-26'.B11])" office:value-type="float" office:value="0" calcext:value-type="float">
            <text:p>0,00 </text:p>
          </table:table-cell>
          <table:table-cell table:style-name="ce120" table:formula="of:=SUMIFS([$'Op. Long_Basis_Vig'.AS:.AS];[$'Op. Long_Basis_Vig'.C:.C];[$'MTM_LB-Milho-26'.$G$3];[$'Op. Long_Basis_Vig'.AE:.AE];[$'MTM_LB-Milho-26'.$G$2];[$'Op. Long_Basis_Vig'.H:.H];[$'MTM_LB-Milho-26'.B11])" office:value-type="float" office:value="0" calcext:value-type="float">
            <text:p>0,00 </text:p>
          </table:table-cell>
          <table:table-cell table:style-name="ce120" table:formula="of:=IFERROR([.F11]/[.C11];0)" office:value-type="float" office:value="0" calcext:value-type="float">
            <text:p>0,00 </text:p>
          </table:table-cell>
          <table:table-cell table:style-name="Default" table:number-columns-repeated="16377"/>
        </table:table-row>
        <table:table-row table:style-name="ro1">
          <table:table-cell/>
          <table:table-cell table:style-name="ce118" office:value-type="string" calcext:value-type="string">
            <text:p>TOTAL</text:p>
          </table:table-cell>
          <table:table-cell table:style-name="ce121" table:formula="of:=SUM([.C8:.C11])" office:value-type="float" office:value="32103.2333333333" calcext:value-type="float">
            <text:p>32.103,23 </text:p>
          </table:table-cell>
          <table:table-cell table:style-name="ce121" table:formula="of:=SUM([.D8:.D11])" office:value-type="float" office:value="120956.658783334" calcext:value-type="float">
            <text:p>120.956,66 </text:p>
          </table:table-cell>
          <table:table-cell table:style-name="ce121" table:formula="of:=SUM([.E8:.E11])" office:value-type="float" office:value="-148629.375356213" calcext:value-type="float">
            <text:p>-148.629,38 </text:p>
          </table:table-cell>
          <table:table-cell table:style-name="ce121" table:formula="of:=SUM([.F8:.F11])" office:value-type="float" office:value="-27672.7165728789" calcext:value-type="float">
            <text:p>-27.672,72 </text:p>
          </table:table-cell>
          <table:table-cell table:style-name="ce121" table:formula="of:=IFERROR([.F12]/[.C12];0)" office:value-type="float" office:value="-0.861991572174316" calcext:value-type="float">
            <text:p>-0,86 </text:p>
          </table:table-cell>
          <table:table-cell table:style-name="Default" table:number-columns-repeated="16377"/>
        </table:table-row>
        <table:table-row table:style-name="ro1" table:number-rows-repeated="2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RESULTADO POR COMPONENTE</text:p>
          </table:table-cell>
          <table:covered-table-cell table:number-columns-repeated="2" table:style-name="ce115"/>
          <table:table-cell table:number-columns-repeated="3"/>
          <table:table-cell table:style-name="Default" table:number-columns-repeated="16377"/>
        </table:table-row>
        <table:table-row table:style-name="ro4">
          <table:table-cell/>
          <table:table-cell table:style-name="ce2"/>
          <table:table-cell table:number-columns-repeated="5"/>
          <table:table-cell table:style-name="Default" table:number-columns-repeated="16377"/>
        </table:table-row>
        <table:table-row table:style-name="ro1">
          <table:table-cell/>
          <table:table-cell table:style-name="ce119" office:value-type="string" calcext:value-type="string">
            <text:p>Componente</text:p>
          </table:table-cell>
          <table:table-cell table:style-name="ce119" office:value-type="string" calcext:value-type="string">
            <text:p>R$</text:p>
          </table:table-cell>
          <table:table-cell table:style-name="ce119" office:value-type="string" calcext:value-type="string">
            <text:p>Parcial (R$/sc)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/>
          <table:table-cell table:style-name="ce120" office:value-type="string" calcext:value-type="string">
            <text:p>Físico</text:p>
          </table:table-cell>
          <table:table-cell table:style-name="ce120" table:formula="of:=SUMIFS([$'Op. Long_Basis_Vig'.AJ:.AJ];[$'Op. Long_Basis_Vig'.C:.C];[$'MTM_LB-Milho-26'.$G$3];[$'Op. Long_Basis_Vig'.AE:.AE];[$'MTM_LB-Milho-26'.$G$2])" office:value-type="float" office:value="118613.463333333" calcext:value-type="float">
            <text:p>118.613,46 </text:p>
          </table:table-cell>
          <table:table-cell table:style-name="ce120" table:formula="of:=IFERROR([.C18]/[.$C$12];0)" office:value-type="float" office:value="3.6947513075007" calcext:value-type="float">
            <text:p>3,69 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/>
          <table:table-cell table:style-name="ce120" office:value-type="string" calcext:value-type="string">
            <text:p>Bolsa</text:p>
          </table:table-cell>
          <table:table-cell table:style-name="ce120" table:formula="of:=SUMIFS([$'Op. Long_Basis_Vig'.AK:.AK];[$'Op. Long_Basis_Vig'.C:.C];[$'MTM_LB-Milho-26'.$G$3];[$'Op. Long_Basis_Vig'.AE:.AE];[$'MTM_LB-Milho-26'.$G$2])" office:value-type="float" office:value="2343.19545000032" calcext:value-type="float">
            <text:p>2.343,20 </text:p>
          </table:table-cell>
          <table:table-cell table:style-name="ce120" table:formula="of:=IFERROR([.C19]/[.$C$12];0)" office:value-type="float" office:value="0.0729893909959326" calcext:value-type="float">
            <text:p>0,07 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/>
          <table:table-cell table:style-name="ce120" office:value-type="string" calcext:value-type="string">
            <text:p>Dólar</text:p>
          </table:table-cell>
          <table:table-cell table:style-name="ce120" table:formula="of:=SUMIFS([$'Op. Long_Basis_Vig'.AL:.AL];[$'Op. Long_Basis_Vig'.C:.C];[$'MTM_LB-Milho-26'.$G$3];[$'Op. Long_Basis_Vig'.AE:.AE];[$'MTM_LB-Milho-26'.$G$2])" office:value-type="float" office:value="0" calcext:value-type="float">
            <text:p>0,00 </text:p>
          </table:table-cell>
          <table:table-cell table:style-name="ce120" table:formula="of:=IFERROR([.C20]/[.$C$12];0)" office:value-type="float" office:value="0" calcext:value-type="float">
            <text:p>0,00 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/>
          <table:table-cell table:style-name="ce120" office:value-type="string" calcext:value-type="string">
            <text:p>Financeiro</text:p>
          </table:table-cell>
          <table:table-cell table:style-name="ce120" table:formula="of:=SUMIFS([$'Op. Long_Basis_Vig'.AP:.AP];[$'Op. Long_Basis_Vig'.C:.C];[$'MTM_LB-Milho-26'.$G$3];[$'Op. Long_Basis_Vig'.AE:.AE];[$'MTM_LB-Milho-26'.$G$2])" office:value-type="float" office:value="-16916.4420228792" calcext:value-type="float">
            <text:p>-16.916,44 </text:p>
          </table:table-cell>
          <table:table-cell table:style-name="ce120" table:formula="of:=IFERROR([.C21]/[.$C$12];0)" office:value-type="float" office:value="-0.526938886411625" calcext:value-type="float">
            <text:p>-0,53 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/>
          <table:table-cell table:style-name="ce120" office:value-type="string" calcext:value-type="string">
            <text:p>Outros Custos</text:p>
          </table:table-cell>
          <table:table-cell table:style-name="ce120" table:formula="of:=SUMIFS([$'Op. Long_Basis_Vig'.AQ:.AQ];[$'Op. Long_Basis_Vig'.C:.C];[$'MTM_LB-Milho-26'.$G$3];[$'Op. Long_Basis_Vig'.AE:.AE];[$'MTM_LB-Milho-26'.$G$2])" office:value-type="float" office:value="-131712.933333333" calcext:value-type="float">
            <text:p>-131.712,93 </text:p>
          </table:table-cell>
          <table:table-cell table:style-name="ce120" table:formula="of:=IFERROR([.C22]/[.$C$12];0)" office:value-type="float" office:value="-4.10279338425932" calcext:value-type="float">
            <text:p>-4,10 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/>
          <table:table-cell table:style-name="ce120" office:value-type="string" calcext:value-type="string">
            <text:p>Proteção (Call)</text:p>
          </table:table-cell>
          <table:table-cell table:style-name="ce120" office:value-type="float" office:value="0" calcext:value-type="float">
            <text:p>0,00 </text:p>
          </table:table-cell>
          <table:table-cell table:style-name="ce120" table:formula="of:=IFERROR([.C23]/[.$C$12];0)" office:value-type="float" office:value="0" calcext:value-type="float">
            <text:p>0,00 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/>
          <table:table-cell table:style-name="ce121" office:value-type="string" calcext:value-type="string">
            <text:p>TOTAL</text:p>
          </table:table-cell>
          <table:table-cell table:style-name="ce121" table:formula="of:=SUM([.C18:.C22])" office:value-type="float" office:value="-27672.7165728789" calcext:value-type="float">
            <text:p>-27.672,72 </text:p>
          </table:table-cell>
          <table:table-cell table:style-name="ce121" table:formula="of:=SUM([.D18:.D23])" office:value-type="float" office:value="-0.861991572174317" calcext:value-type="float">
            <text:p>-0,86 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115" office:value-type="string" calcext:value-type="string" table:number-columns-spanned="6" table:number-rows-spanned="1">
            <text:p>RESULTADO PARCIAL OP. LONG BASIS</text:p>
          </table:table-cell>
          <table:covered-table-cell table:number-columns-repeated="5" table:style-name="ce115"/>
          <table:table-cell table:style-name="Default" table:number-columns-repeated="16377"/>
        </table:table-row>
        <table:table-row table:style-name="ro1">
          <table:table-cell/>
          <table:table-cell>
            <draw:frame table:end-cell-address="'MTM_LB-Milho-26'.G42" table:end-x="2.728cm" table:end-y="0.528cm" draw:z-index="0" draw:name="Gráfico 1" draw:style-name="gr9" draw:text-style-name="P1" svg:width="16.372cm" svg:height="7.936cm" svg:x="0cm" svg:y="0cm">
              <draw:object draw:notify-on-update-of-ranges="'Din.MTM_LB'.A5:'Din.MTM_LB'.A7 'Din.MTM_LB'.B4:'Din.MTM_LB'.B4 'Din.MTM_LB'.B5:'Din.MTM_LB'.B7 'Din.MTM_LB'.C4:'Din.MTM_LB'.C4 'Din.MTM_LB'.C5:'Din.MTM_LB'.C7 'Din.MTM_LB'.D4:'Din.MTM_LB'.D4 'Din.MTM_LB'.D5:'Din.MTM_LB'.D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16377"/>
        </table:table-row>
      </table:table>
      <table:table table:name="Analítico_Deriv_Op" table:style-name="ta8">
        <table:table-column table:style-name="co24" table:default-cell-style-name="ce2"/>
        <table:table-column table:style-name="co13" table:number-columns-repeated="4" table:default-cell-style-name="ce2"/>
        <table:table-column table:style-name="co13" table:default-cell-style-name="ce125"/>
        <table:table-column table:style-name="co13" table:number-columns-repeated="14" table:default-cell-style-name="ce2"/>
        <table:table-column table:style-name="co13" table:default-cell-style-name="ce18"/>
        <table:table-column table:style-name="co13" table:number-columns-repeated="2" table:default-cell-style-name="ce2"/>
        <table:table-column table:style-name="co25" table:number-columns-repeated="10" table:default-cell-style-name="ce2"/>
        <table:table-column table:style-name="co1" table:number-columns-repeated="16351"/>
        <table:table-row table:style-name="ro1">
          <table:table-cell table:number-columns-repeated="33"/>
        </table:table-row>
        <table:table-row table:style-name="ro1">
          <table:table-cell>
            <draw:frame draw:z-index="1" draw:name="Imagem 2" draw:style-name="gr4" draw:text-style-name="P1" svg:width="3.391cm" svg:height="1.751cm" svg:x="0.476cm" svg:y="0.026cm">
              <draw:image xlink:href="Pictures/100000010000019600000196CD52D19B.png" xlink:type="simple" xlink:show="embed" xlink:actuate="onLoad" draw:mime-type="image/png">
                <text:p/>
              </draw:image>
              <svg:desc>Relfer – Estruturas Metálicas</svg:desc>
            </draw:frame>
          </table:table-cell>
          <table:table-cell table:number-columns-repeated="32"/>
        </table:table-row>
        <table:table-row table:style-name="ro1">
          <table:table-cell/>
          <table:table-cell>
            <draw:custom-shape draw:z-index="0" draw:name="CaixaDeTexto 1" draw:style-name="gr2" draw:text-style-name="P3" svg:width="11.055cm" svg:height="0.919cm" svg:x="2.572cm" svg:y="0.249cm">
              <text:p text:style-name="P2"><text:span text:style-name="T3">ACOMPANHAMENTO DE POSIÇÃO DE </text:span><text:span text:style-name="T4">OPÇÕE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1"/>
        </table:table-row>
        <table:table-row table:style-name="ro1" table:number-rows-repeated="2">
          <table:table-cell table:number-columns-repeated="33"/>
        </table:table-row>
        <table:table-row table:style-name="ro2">
          <table:table-cell table:style-name="ce124" office:value-type="string" calcext:value-type="string">
            <text:p>ID</text:p>
          </table:table-cell>
          <table:table-cell table:style-name="ce124" office:value-type="string" calcext:value-type="string">
            <text:p>Data Hedge</text:p>
          </table:table-cell>
          <table:table-cell table:style-name="ce124" office:value-type="string" calcext:value-type="string">
            <text:p>Status Extrato</text:p>
          </table:table-cell>
          <table:table-cell table:style-name="ce124" office:value-type="string" calcext:value-type="string">
            <text:p>Commodity</text:p>
          </table:table-cell>
          <table:table-cell table:style-name="ce124" office:value-type="string" calcext:value-type="string">
            <text:p>Safra</text:p>
          </table:table-cell>
          <table:table-cell table:style-name="ce126" office:value-type="string" calcext:value-type="string">
            <text:p>Vínculo</text:p>
          </table:table-cell>
          <table:table-cell table:style-name="ce124" office:value-type="string" calcext:value-type="string">
            <text:p>Status Operação</text:p>
          </table:table-cell>
          <table:table-cell table:style-name="ce124" office:value-type="string" calcext:value-type="string">
            <text:p>Trade ID</text:p>
          </table:table-cell>
          <table:table-cell table:style-name="ce124" office:value-type="string" calcext:value-type="string">
            <text:p>Contrato</text:p>
          </table:table-cell>
          <table:table-cell table:style-name="ce124" office:value-type="string" calcext:value-type="string">
            <text:p>Empresa</text:p>
          </table:table-cell>
          <table:table-cell table:style-name="ce124" office:value-type="string" calcext:value-type="string">
            <text:p>Corretora</text:p>
          </table:table-cell>
          <table:table-cell table:style-name="ce124" office:value-type="string" calcext:value-type="string">
            <text:p>Operação</text:p>
          </table:table-cell>
          <table:table-cell table:style-name="ce124" office:value-type="string" calcext:value-type="string">
            <text:p>Estratégia</text:p>
          </table:table-cell>
          <table:table-cell table:style-name="ce124" office:value-type="string" calcext:value-type="string">
            <text:p>Tipo Opção</text:p>
          </table:table-cell>
          <table:table-cell table:style-name="ce124" office:value-type="string" calcext:value-type="string">
            <text:p>N° Lotes</text:p>
          </table:table-cell>
          <table:table-cell table:style-name="ce124" office:value-type="string" calcext:value-type="string">
            <text:p>Bolsa</text:p>
          </table:table-cell>
          <table:table-cell table:style-name="ce124" office:value-type="string" calcext:value-type="string">
            <text:p>Referência</text:p>
          </table:table-cell>
          <table:table-cell table:style-name="ce124" office:value-type="string" calcext:value-type="string">
            <text:p>Strike</text:p>
          </table:table-cell>
          <table:table-cell table:style-name="ce124" office:value-type="string" calcext:value-type="string">
            <text:p>Data de Expiração</text:p>
          </table:table-cell>
          <table:table-cell table:style-name="ce124" office:value-type="string" calcext:value-type="string">
            <text:p>Preço</text:p>
          </table:table-cell>
          <table:table-cell table:style-name="ce128" office:value-type="string" calcext:value-type="string">
            <text:p>FV</text:p>
          </table:table-cell>
          <table:table-cell table:style-name="ce124" office:value-type="string" calcext:value-type="string">
            <text:p>MTM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O1</text:p>
          </table:table-cell>
          <table:table-cell table:style-name="ce5" office:value-type="date" office:date-value="2026-04-24" calcext:value-type="date">
            <text:p>24/4/2026</text:p>
          </table:table-cell>
          <table:table-cell table:style-name="ce5" office:value-type="string" calcext:value-type="string">
            <text:p>Vigente</text:p>
          </table:table-cell>
          <table:table-cell table:style-name="ce5" office:value-type="string" calcext:value-type="string">
            <text:p>Milho</text:p>
          </table:table-cell>
          <table:table-cell table:style-name="ce5" office:value-type="string" calcext:value-type="string">
            <text:p>Safra Atual</text:p>
          </table:table-cell>
          <table:table-cell office:value-type="string" calcext:value-type="string">
            <text:p>F15</text:p>
          </table:table-cell>
          <table:table-cell table:style-name="ce5" office:value-type="string" calcext:value-type="string">
            <text:p>Vigente</text:p>
          </table:table-cell>
          <table:table-cell table:style-name="ce33" office:value-type="float" office:value="48907015" calcext:value-type="float">
            <text:p>48907015</text:p>
          </table:table-cell>
          <table:table-cell table:style-name="ce33" office:value-type="string" calcext:value-type="string">
            <text:p>26D06267760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Compra</text:p>
          </table:table-cell>
          <table:table-cell table:style-name="ce5" office:value-type="string" calcext:value-type="string">
            <text:p>Opção</text:p>
          </table:table-cell>
          <table:table-cell table:style-name="ce5" office:value-type="string" calcext:value-type="string">
            <text:p>Call</text:p>
          </table:table-cell>
          <table:table-cell table:style-name="ce23" office:value-type="float" office:value="22.22" calcext:value-type="float">
            <text:p>22,22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CCMN26</text:p>
          </table:table-cell>
          <table:table-cell table:style-name="ce127" office:value-type="float" office:value="76.5" calcext:value-type="float">
            <text:p>76,5000</text:p>
          </table:table-cell>
          <table:table-cell table:style-name="ce5" office:value-type="date" office:date-value="2026-07-15" calcext:value-type="date">
            <text:p>15/7/2026</text:p>
          </table:table-cell>
          <table:table-cell table:style-name="ce33" office:value-type="float" office:value="0.1498" calcext:value-type="float">
            <text:p>0,1498</text:p>
          </table:table-cell>
          <table:table-cell table:style-name="ce33" office:value-type="float" office:value="0" calcext:value-type="float">
            <text:p>0</text:p>
          </table:table-cell>
          <table:table-cell table:formula="of:=[$Analítico_Deriv_Op.$U7]*450*[$Analítico_Deriv_Op.$O7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1048568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Analítico_Deriv" table:style-name="ta9">
        <table:table-column table:style-name="co24" table:default-cell-style-name="ce2"/>
        <table:table-column table:style-name="co13" table:default-cell-style-name="ce2"/>
        <table:table-column table:style-name="co13" table:default-cell-style-name="ce129"/>
        <table:table-column table:style-name="co13" table:number-columns-repeated="4" table:default-cell-style-name="ce2"/>
        <table:table-column table:style-name="co13" table:default-cell-style-name="ce125"/>
        <table:table-column table:style-name="co13" table:number-columns-repeated="9" table:default-cell-style-name="ce2"/>
        <table:table-column table:style-name="co13" table:default-cell-style-name="ce133"/>
        <table:table-column table:style-name="co13" table:number-columns-repeated="5" table:default-cell-style-name="ce2"/>
        <table:table-column table:style-name="co13" table:number-columns-repeated="2" table:default-cell-style-name="ce136"/>
        <table:table-column table:style-name="co13" table:default-cell-style-name="ce18"/>
        <table:table-column table:style-name="co13" table:number-columns-repeated="2" table:default-cell-style-name="ce136"/>
        <table:table-column table:style-name="co13" table:visibility="collapse" table:default-cell-style-name="ce136"/>
        <table:table-column table:style-name="co13" table:visibility="collapse" table:default-cell-style-name="ce2"/>
        <table:table-column table:style-name="co13" table:visibility="collapse" table:default-cell-style-name="ce141"/>
        <table:table-column table:style-name="co13" table:default-cell-style-name="ce141"/>
        <table:table-column table:style-name="co13" table:visibility="collapse" table:number-columns-repeated="2" table:default-cell-style-name="ce2"/>
        <table:table-column table:style-name="co13" table:default-cell-style-name="ce2"/>
        <table:table-column table:style-name="co13" table:default-cell-style-name="ce145"/>
        <table:table-column table:style-name="co13" table:default-cell-style-name="ce2"/>
        <table:table-column table:style-name="co13" table:number-columns-repeated="2" table:default-cell-style-name="ce136"/>
        <table:table-column table:style-name="co13" table:default-cell-style-name="ce2"/>
        <table:table-column table:style-name="co13" table:number-columns-repeated="2" table:default-cell-style-name="ce136"/>
        <table:table-column table:style-name="co13" table:visibility="collapse" table:number-columns-repeated="2" table:default-cell-style-name="ce2"/>
        <table:table-column table:style-name="co17" table:visibility="collapse" table:number-columns-repeated="2" table:default-cell-style-name="ce2"/>
        <table:table-column table:style-name="co4" table:number-columns-repeated="8" table:default-cell-style-name="ce2"/>
        <table:table-column table:style-name="co1" table:number-columns-repeated="16330"/>
        <table:table-row table:style-name="ro1">
          <table:table-cell table:number-columns-repeated="54"/>
        </table:table-row>
        <table:table-row table:style-name="ro1">
          <table:table-cell>
            <draw:frame draw:z-index="1" draw:name="Imagem 2" draw:style-name="gr4" draw:text-style-name="P1" svg:width="3.391cm" svg:height="1.751cm" svg:x="0.476cm" svg:y="0.026cm">
              <draw:image xlink:href="Pictures/100000010000019600000196CD52D19B.png" xlink:type="simple" xlink:show="embed" xlink:actuate="onLoad" draw:mime-type="image/png">
                <text:p/>
              </draw:image>
              <svg:desc>Relfer – Estruturas Metálicas</svg:desc>
            </draw:frame>
          </table:table-cell>
          <table:table-cell table:number-columns-repeated="53"/>
        </table:table-row>
        <table:table-row table:style-name="ro1">
          <table:table-cell/>
          <table:table-cell>
            <draw:custom-shape draw:z-index="0" draw:name="CaixaDeTexto 1" draw:style-name="gr2" draw:text-style-name="P3" svg:width="18.722cm" svg:height="0.919cm" svg:x="2.572cm" svg:y="0.249cm">
              <text:p text:style-name="P2"><text:span text:style-name="T3">ACOMPANHAMENTO DE POSIÇÃO DE </text:span><text:span text:style-name="T4">DERIVATIVOS</text:span><text:span text:style-name="T3"> DE </text:span><text:span text:style-name="T4">COMMODITIES </text:span><text:span text:style-name="T3">E</text:span><text:span text:style-name="T4"> NDF'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table:style-name="ce138" table:formula="of:=SUBTOTAL(9;[$Analítico_Deriv.$Y$7:.$Y$30])" office:value-type="float" office:value="0" calcext:value-type="float">
            <text:p>0,00</text:p>
          </table:table-cell>
          <table:table-cell/>
          <table:table-cell table:style-name="ce138" table:formula="of:=SUBTOTAL(9;[$Analítico_Deriv.$AA$7:.$AA$30])" office:value-type="float" office:value="1032.9667917991" calcext:value-type="float">
            <text:p>1.032,97</text:p>
          </table:table-cell>
          <table:table-cell table:style-name="ce138" table:formula="of:=SUBTOTAL(9;[$Analítico_Deriv.$AB$7:.$AB$30])" office:value-type="float" office:value="5365.74600000044" calcext:value-type="float">
            <text:p>5.365,75</text:p>
          </table:table-cell>
          <table:table-cell table:number-columns-repeated="2"/>
          <table:table-cell table:style-name="ce142" table:formula="of:=SUBTOTAL(9;[$Analítico_Deriv.$AE$7:.$AE$30])" office:value-type="float" office:value="-1933740" calcext:value-type="float">
            <text:p>-1.933.740</text:p>
          </table:table-cell>
          <table:table-cell table:style-name="ce142" table:formula="of:=SUBTOTAL(9;[$Analítico_Deriv.$AF$7:.$AF$30])" office:value-type="float" office:value="-1933.74" calcext:value-type="float">
            <text:p>-1.934</text:p>
          </table:table-cell>
          <table:table-cell table:number-columns-repeated="5"/>
          <table:table-cell table:style-name="ce138" table:formula="of:=SUBTOTAL(9;[$Analítico_Deriv.$AL$7:.$AL$30])" office:value-type="float" office:value="-250020.674848397" calcext:value-type="float">
            <text:p>-250.020,67</text:p>
          </table:table-cell>
          <table:table-cell table:style-name="ce138" table:formula="of:=SUBTOTAL(9;[$Analítico_Deriv.$AM$7:.$AM$30])" office:value-type="float" office:value="-1298732.3955" calcext:value-type="float">
            <text:p>-1.298.732,40</text:p>
          </table:table-cell>
          <table:table-cell/>
          <table:table-cell table:style-name="ce138" table:formula="of:=SUBTOTAL(9;[$Analítico_Deriv.$AO$7:.$AO$30])" office:value-type="float" office:value="0" calcext:value-type="float">
            <text:p>0,00</text:p>
          </table:table-cell>
          <table:table-cell table:style-name="ce138" table:formula="of:=SUBTOTAL(9;[$Analítico_Deriv.$AP$7:.$AP$30])" office:value-type="float" office:value="-844.5" calcext:value-type="float">
            <text:p>-844,50</text:p>
          </table:table-cell>
          <table:table-cell table:number-columns-repeated="12"/>
        </table:table-row>
        <table:table-row table:style-name="ro2">
          <table:table-cell table:style-name="ce124" office:value-type="string" calcext:value-type="string">
            <text:p>ID</text:p>
          </table:table-cell>
          <table:table-cell table:style-name="ce124" office:value-type="string" calcext:value-type="string">
            <text:p>Data Hedge</text:p>
          </table:table-cell>
          <table:table-cell table:style-name="ce130" office:value-type="string" calcext:value-type="string">
            <text:p>Status Extrato</text:p>
          </table:table-cell>
          <table:table-cell table:style-name="ce124" office:value-type="string" calcext:value-type="string">
            <text:p>Commodity</text:p>
          </table:table-cell>
          <table:table-cell table:style-name="ce124" office:value-type="string" calcext:value-type="string">
            <text:p>Commodity Vinculada</text:p>
          </table:table-cell>
          <table:table-cell table:style-name="ce124" office:value-type="string" calcext:value-type="string">
            <text:p>Safra</text:p>
          </table:table-cell>
          <table:table-cell table:style-name="ce124" office:value-type="string" calcext:value-type="string">
            <text:p>Movimento</text:p>
          </table:table-cell>
          <table:table-cell table:style-name="ce126" office:value-type="string" calcext:value-type="string">
            <text:p>Vínculo</text:p>
          </table:table-cell>
          <table:table-cell table:style-name="ce124" office:value-type="string" calcext:value-type="string">
            <text:p>Status Operação</text:p>
          </table:table-cell>
          <table:table-cell table:style-name="ce124" office:value-type="string" calcext:value-type="string">
            <text:p>Trade ID</text:p>
          </table:table-cell>
          <table:table-cell table:style-name="ce124" office:value-type="string" calcext:value-type="string">
            <text:p>Contrato</text:p>
          </table:table-cell>
          <table:table-cell table:style-name="ce124" office:value-type="string" calcext:value-type="string">
            <text:p>Empresa</text:p>
          </table:table-cell>
          <table:table-cell table:style-name="ce124" office:value-type="string" calcext:value-type="string">
            <text:p>Corretora</text:p>
          </table:table-cell>
          <table:table-cell table:style-name="ce124" office:value-type="string" calcext:value-type="string">
            <text:p>Operação</text:p>
          </table:table-cell>
          <table:table-cell table:style-name="ce124" office:value-type="string" calcext:value-type="string">
            <text:p>Estratégia</text:p>
          </table:table-cell>
          <table:table-cell table:style-name="ce124" office:value-type="string" calcext:value-type="string">
            <text:p>Exposição</text:p>
          </table:table-cell>
          <table:table-cell table:style-name="ce124" office:value-type="string" calcext:value-type="string">
            <text:p>N° Lotes</text:p>
          </table:table-cell>
          <table:table-cell table:style-name="ce134" office:value-type="string" calcext:value-type="string">
            <text:p>N° Lotes Exposição</text:p>
          </table:table-cell>
          <table:table-cell table:style-name="ce124" office:value-type="string" calcext:value-type="string">
            <text:p>Bolsa</text:p>
          </table:table-cell>
          <table:table-cell table:style-name="ce124" office:value-type="string" calcext:value-type="string">
            <text:p>Referência</text:p>
          </table:table-cell>
          <table:table-cell table:style-name="ce124" office:value-type="string" calcext:value-type="string">
            <text:p>Strike</text:p>
          </table:table-cell>
          <table:table-cell table:style-name="ce124" office:value-type="string" calcext:value-type="string">
            <text:p>Data de Expiração</text:p>
          </table:table-cell>
          <table:table-cell table:style-name="ce124" office:value-type="string" calcext:value-type="string">
            <text:p>Data de Vencimento</text:p>
          </table:table-cell>
          <table:table-cell table:style-name="ce137" office:value-type="string" calcext:value-type="string">
            <text:p>Notional USD</text:p>
          </table:table-cell>
          <table:table-cell table:style-name="ce137" office:value-type="string" calcext:value-type="string">
            <text:p>Exposição Cambial</text:p>
          </table:table-cell>
          <table:table-cell table:style-name="ce128" office:value-type="string" calcext:value-type="string">
            <text:p>FV</text:p>
          </table:table-cell>
          <table:table-cell table:style-name="ce137" office:value-type="string" calcext:value-type="string">
            <text:p>MTM USD</text:p>
          </table:table-cell>
          <table:table-cell table:style-name="ce137" office:value-type="string" calcext:value-type="string">
            <text:p>MTM BRL</text:p>
          </table:table-cell>
          <table:table-cell table:style-name="ce139" office:value-type="string" calcext:value-type="string">
            <text:p>MTM Posição Dol</text:p>
          </table:table-cell>
          <table:table-cell table:style-name="ce108" office:value-type="string" calcext:value-type="string">
            <text:p>Chave Commo + Bolsa</text:p>
          </table:table-cell>
          <table:table-cell table:style-name="ce143" office:value-type="string" calcext:value-type="string">
            <text:p>Vol Kgs Exposição</text:p>
          </table:table-cell>
          <table:table-cell table:style-name="ce144" office:value-type="string" calcext:value-type="string">
            <text:p>Exposição em Tons</text:p>
          </table:table-cell>
          <table:table-cell table:style-name="ce108" office:value-type="string" calcext:value-type="string">
            <text:p>Mês</text:p>
          </table:table-cell>
          <table:table-cell table:style-name="ce108" office:value-type="string" calcext:value-type="string">
            <text:p>Ano</text:p>
          </table:table-cell>
          <table:table-cell table:style-name="ce124" office:value-type="string" calcext:value-type="string">
            <text:p>Operação Vinculada</text:p>
          </table:table-cell>
          <table:table-cell table:style-name="ce146" office:value-type="string" calcext:value-type="string">
            <text:p>Stress Test</text:p>
          </table:table-cell>
          <table:table-cell table:style-name="ce124" office:value-type="string" calcext:value-type="string">
            <text:p>FV Stress</text:p>
          </table:table-cell>
          <table:table-cell table:style-name="ce137" office:value-type="string" calcext:value-type="string">
            <text:p>MTM USD Stress</text:p>
          </table:table-cell>
          <table:table-cell table:style-name="ce137" office:value-type="string" calcext:value-type="string">
            <text:p>MTM BRL Stress</text:p>
          </table:table-cell>
          <table:table-cell table:style-name="ce124" office:value-type="string" calcext:value-type="string">
            <text:p>MTM Posição Dol Stress</text:p>
          </table:table-cell>
          <table:table-cell table:style-name="ce137" office:value-type="string" calcext:value-type="string">
            <text:p>Exposição Basis</text:p>
          </table:table-cell>
          <table:table-cell table:style-name="ce137" office:value-type="string" calcext:value-type="string">
            <text:p>Comissão</text:p>
          </table:table-cell>
          <table:table-cell table:style-name="ce108" office:value-type="string" calcext:value-type="string">
            <text:p>Mês Comissão</text:p>
          </table:table-cell>
          <table:table-cell table:style-name="ce108" office:value-type="string" calcext:value-type="string">
            <text:p>Ano Comissão</text:p>
          </table:table-cell>
          <table:table-cell table:style-name="ce108" office:value-type="string" calcext:value-type="string">
            <text:p>Mês Fluxo Caixa</text:p>
          </table:table-cell>
          <table:table-cell table:style-name="ce108" office:value-type="string" calcext:value-type="string">
            <text:p>Ano Fluxo Caixa</text:p>
          </table:table-cell>
          <table:table-cell table:style-name="ce27" table:number-columns-repeated="8"/>
        </table:table-row>
        <table:table-row table:style-name="ro1">
          <table:table-cell office:value-type="string" calcext:value-type="string">
            <text:p>F1</text:p>
          </table:table-cell>
          <table:table-cell table:style-name="ce5" office:value-type="date" office:date-value="2026-02-11" calcext:value-type="date">
            <text:p>11/2/2026</text:p>
          </table:table-cell>
          <table:table-cell table:style-name="ce131" office:value-type="string" calcext:value-type="string">
            <text:p>Liquidado</text:p>
          </table:table-cell>
          <table:table-cell table:number-columns-repeated="2"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10641338E</text:p>
          </table:table-cell>
          <table:table-cell table:style-name="ce5" office:value-type="string" calcext:value-type="string">
            <text:p>26B03011727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1.8" calcext:value-type="float">
            <text:p>1,80</text:p>
          </table:table-cell>
          <table:table-cell table:style-name="ce135" table:formula="of:=IF([$Analítico_Deriv.$P7]=&quot;VENDA&quot;;[$Analítico_Deriv.$Q7]*-1;[$Analítico_Deriv.$Q7])" office:value-type="float" office:value="-1.8" calcext:value-type="float">
            <text:p>-1,80</text:p>
          </table:table-cell>
          <table:table-cell office:value-type="string" calcext:value-type="string">
            <text:p>CBOT</text:p>
          </table:table-cell>
          <table:table-cell office:value-type="string" calcext:value-type="string">
            <text:p>ZSQ6</text:p>
          </table:table-cell>
          <table:table-cell table:style-name="ce127" office:value-type="float" office:value="11.3645" calcext:value-type="float">
            <text:p>11,3645</text:p>
          </table:table-cell>
          <table:table-cell table:style-name="ce5" office:value-type="date" office:date-value="2026-08-14" calcext:value-type="date">
            <text:p>14/8/2026</text:p>
          </table:table-cell>
          <table:table-cell table:style-name="ce5" office:value-type="date" office:date-value="2026-07-31" calcext:value-type="date">
            <text:p>31/7/2026</text:p>
          </table:table-cell>
          <table:table-cell table:formula="of:=IF([$Analítico_Deriv.$AD7]=&quot;Dolar BMF&quot;;&quot;PREENCHER&quot;;IF([$Analítico_Deriv.$AD7]=&quot;SOJA CBOT&quot;;[$Analítico_Deriv.$R7]*5000*[$Analítico_Deriv.$U7];IF([$Analítico_Deriv.$AD7]=&quot;MILHO CBOT&quot;;[$Analítico_Deriv.$R7]*5000*[$Analítico_Deriv.$U7];IF([$Analítico_Deriv.$AD7]=&quot;MILHO BMF&quot;;0;&quot;VALIDAR&quot;))))" office:value-type="float" office:value="-102280.5" calcext:value-type="float">
            <text:p>-102.280,50</text:p>
          </table:table-cell>
          <table:table-cell table:formula="of:=IF([$Analítico_Deriv.$C7]=&quot;Vigente&quot;;IF([$Analítico_Deriv.$AD7]=&quot;Soja CBOT&quot;;[$Analítico_Deriv.$X7]*-1;IF([$Analítico_Deriv.$AD7]=&quot;Milho CBOT&quot;;[$Analítico_Deriv.$X7]*-1;IF([$Analítico_Deriv.$AD7]=&quot;Milho BMF&quot;;0;IF([$Analítico_Deriv.$AD7]=&quot;Dolar BMF&quot;;[$Analítico_Deriv.$X7]))));0)" office:value-type="float" office:value="0" calcext:value-type="float">
            <text:p>0,00</text:p>
          </table:table-cell>
          <table:table-cell table:formula="of:=COM.MICROSOFT.XLOOKUP([$Analítico_Deriv.$T7];[$Preços_MTM.C:.C];[$Preços_MTM.D:.D];COM.MICROSOFT.XLOOKUP([$Analítico_Deriv.$T7];[$Preços_MTM.H:.H];[$Preços_MTM.I:.I]))" office:value-type="float" office:value="11.225" calcext:value-type="float">
            <text:p>11,2250</text:p>
          </table:table-cell>
          <table:table-cell table:formula="of:=IF([$Analítico_Deriv.$C7]=&quot;Vigente&quot;;IF([$Analítico_Deriv.$S7]=&quot;CBOT&quot;;([$Analítico_Deriv.$Z7]-[$Analítico_Deriv.$U7])*5000*[$Analítico_Deriv.$R7];IF([$Analítico_Deriv.$S7]=&quot;BMF&quot;;[$Analítico_Deriv.$AB7]/[$Preços_MTM.$I$4];&quot;VERIFICAR&quot;));0)" office:value-type="float" office:value="0" calcext:value-type="float">
            <text:p>0,00</text:p>
          </table:table-cell>
          <table:table-cell table:formula="of:=IF([$Analítico_Deriv.$C7]=&quot;Vigente&quot;;(IF([$Analítico_Deriv.$S7]=&quot;BMF&quot;;([$Analítico_Deriv.$Z7]-[$Analítico_Deriv.$U7])*450*[$Analítico_Deriv.$R7];IF([$Analítico_Deriv.$S7]=&quot;CBOT&quot;;[$Analítico_Deriv.$AA7]*[$Preços_MTM.$I$4];&quot;VERIFICAR&quot;)))+[$Analítico_Deriv.$AC7];0)" office:value-type="float" office:value="0" calcext:value-type="float">
            <text:p>0,00</text:p>
          </table:table-cell>
          <table:table-cell table:formula="of:=IF([$Analítico_Deriv.$C7]=&quot;Vigente&quot;;IF([$Analítico_Deriv.$AD7]=&quot;DOLAR BMF&quot;;([$Analítico_Deriv.$Z7]-[$Analítico_Deriv.$U7])*[$Analítico_Deriv.$X7];0);0)" office:value-type="float" office:value="0" calcext:value-type="float">
            <text:p>0,00</text:p>
          </table:table-cell>
          <table:table-cell table:formula="of:=COM.MICROSOFT.CONCAT([$Analítico_Deriv.$D7];&quot; &quot;;[$Analítico_Deriv.$S7])" office:value-type="string" office:string-value="Soja CBOT" calcext:value-type="string">
            <text:p>Soja CBOT</text:p>
          </table:table-cell>
          <table:table-cell table:formula="of:=IF([$Analítico_Deriv.$AD7]=&quot;DOLAR BMF&quot;;0;(COM.MICROSOFT.XLOOKUP([$Analítico_Deriv.$AD7];[$dms.D:.D];[$dms.E:.E]))*[$Analítico_Deriv.$R7])" office:value-type="float" office:value="-244940.4" calcext:value-type="float">
            <text:p>-244.940</text:p>
          </table:table-cell>
          <table:table-cell table:formula="of:=[$Analítico_Deriv.$AE7]/1000" office:value-type="float" office:value="-244.9404" calcext:value-type="float">
            <text:p>-245</text:p>
          </table:table-cell>
          <table:table-cell table:formula="of:=COM.MICROSOFT.XLOOKUP([$Analítico_Deriv.$V7];[$dms.J:.J];[$dms.L:.L])" office:value-type="string" office:string-value="Ago" calcext:value-type="string">
            <text:p>Ago</text:p>
          </table:table-cell>
          <table:table-cell table:formula="of:=COM.MICROSOFT.XLOOKUP([$Analítico_Deriv.$V7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7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7]+([$Analítico_Deriv.$AJ7]*[$Analítico_Deriv.$Z7])" office:value-type="float" office:value="11.225" calcext:value-type="float">
            <text:p>11,225</text:p>
          </table:table-cell>
          <table:table-cell table:formula="of:=IF([$Analítico_Deriv.$C7]=&quot;Vigente&quot;;IF([$Analítico_Deriv.$S7]=&quot;CBOT&quot;;([$Analítico_Deriv.$AK7]-[$Analítico_Deriv.$U7])*5000*[$Analítico_Deriv.$R7];IF([$Analítico_Deriv.$S7]=&quot;BMF&quot;;[$Analítico_Deriv.$AM7]/[$Preços_MTM.$I$4];&quot;VERIFICAR&quot;));0)" office:value-type="float" office:value="0" calcext:value-type="float">
            <text:p>0,00</text:p>
          </table:table-cell>
          <table:table-cell table:formula="of:=IF([$Analítico_Deriv.$C7]=&quot;Vigente&quot;;(IF([$Analítico_Deriv.$S7]=&quot;BMF&quot;;([$Analítico_Deriv.$AK7]-[$Analítico_Deriv.$U7])*450*[$Analítico_Deriv.$R7];IF([$Analítico_Deriv.$S7]=&quot;CBOT&quot;;[$Analítico_Deriv.$AL7]*[$Preços_MTM.$I$4];&quot;VERIFICAR&quot;)))+[$Analítico_Deriv.$AN7];0)" office:value-type="float" office:value="0" calcext:value-type="float">
            <text:p>0,00</text:p>
          </table:table-cell>
          <table:table-cell table:style-name="ce33" table:formula="of:=IF([$Analítico_Deriv.$C7]=&quot;Vigente&quot;;IF([$Analítico_Deriv.$AD7]=&quot;DOLAR BMF&quot;;([$Analítico_Deriv.$AK7]-[$Analítico_Deriv.$U7])*[$Analítico_Deriv.$X7];0);0)" office:value-type="float" office:value="0" calcext:value-type="float">
            <text:p>0</text:p>
          </table:table-cell>
          <table:table-cell table:formula="of:=IF([$Analítico_Deriv.$I7]=&quot;Vigente&quot;;IF([$Analítico_Deriv.$AD7]=&quot;Soja CBOT&quot;;[$Analítico_Deriv.$X7]*-1;IF([$Analítico_Deriv.$AD7]=&quot;Milho CBOT&quot;;[$Analítico_Deriv.$X7]*-1;IF([$Analítico_Deriv.$AD7]=&quot;Milho BMF&quot;;0;IF([$Analítico_Deriv.$AD7]=&quot;Dolar BMF&quot;;[$Analítico_Deriv.$X7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7];[$dms.J:.J];[$dms.L:.L]);&quot;&quot;)">
            <text:p/>
          </table:table-cell>
          <table:table-cell table:style-name="ce23" table:formula="of:=IFERROR(COM.MICROSOFT.XLOOKUP([$Analítico_Deriv.$B7];[$dms.J:.J];[$dms.M:.M]);&quot;&quot;)">
            <text:p/>
          </table:table-cell>
          <table:table-cell table:style-name="ce23" table:formula="of:=COM.MICROSOFT.XLOOKUP([$Analítico_Deriv.$W7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7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</text:p>
          </table:table-cell>
          <table:table-cell table:style-name="ce5" office:value-type="date" office:date-value="2026-02-12" calcext:value-type="date">
            <text:p>12/2/2026</text:p>
          </table:table-cell>
          <table:table-cell table:style-name="ce131" office:value-type="string" calcext:value-type="string">
            <text:p>Liquidado</text:p>
          </table:table-cell>
          <table:table-cell table:number-columns-repeated="2"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10642715E</text:p>
          </table:table-cell>
          <table:table-cell table:style-name="ce5" office:value-type="string" calcext:value-type="string">
            <text:p>26B03146694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.88" calcext:value-type="float">
            <text:p>0,88</text:p>
          </table:table-cell>
          <table:table-cell table:style-name="ce135" table:formula="of:=IF([$Analítico_Deriv.$P8]=&quot;VENDA&quot;;[$Analítico_Deriv.$Q8]*-1;[$Analítico_Deriv.$Q8])" office:value-type="float" office:value="-0.88" calcext:value-type="float">
            <text:p>-0,88</text:p>
          </table:table-cell>
          <table:table-cell office:value-type="string" calcext:value-type="string">
            <text:p>CBOT</text:p>
          </table:table-cell>
          <table:table-cell office:value-type="string" calcext:value-type="string">
            <text:p>ZSQ6</text:p>
          </table:table-cell>
          <table:table-cell table:style-name="ce127" office:value-type="float" office:value="11.477" calcext:value-type="float">
            <text:p>11,4770</text:p>
          </table:table-cell>
          <table:table-cell table:style-name="ce5" office:value-type="date" office:date-value="2026-08-14" calcext:value-type="date">
            <text:p>14/8/2026</text:p>
          </table:table-cell>
          <table:table-cell table:style-name="ce5" office:value-type="date" office:date-value="2026-07-31" calcext:value-type="date">
            <text:p>31/7/2026</text:p>
          </table:table-cell>
          <table:table-cell table:formula="of:=IF([$Analítico_Deriv.$AD8]=&quot;Dolar BMF&quot;;&quot;PREENCHER&quot;;IF([$Analítico_Deriv.$AD8]=&quot;SOJA CBOT&quot;;[$Analítico_Deriv.$R8]*5000*[$Analítico_Deriv.$U8];IF([$Analítico_Deriv.$AD8]=&quot;MILHO CBOT&quot;;[$Analítico_Deriv.$R8]*5000*[$Analítico_Deriv.$U8];IF([$Analítico_Deriv.$AD8]=&quot;MILHO BMF&quot;;0;&quot;VALIDAR&quot;))))" office:value-type="float" office:value="-50498.8" calcext:value-type="float">
            <text:p>-50.498,80</text:p>
          </table:table-cell>
          <table:table-cell table:formula="of:=IF([$Analítico_Deriv.$C8]=&quot;Vigente&quot;;IF([$Analítico_Deriv.$AD8]=&quot;Soja CBOT&quot;;[$Analítico_Deriv.$X8]*-1;IF([$Analítico_Deriv.$AD8]=&quot;Milho CBOT&quot;;[$Analítico_Deriv.$X8]*-1;IF([$Analítico_Deriv.$AD8]=&quot;Milho BMF&quot;;0;IF([$Analítico_Deriv.$AD8]=&quot;Dolar BMF&quot;;[$Analítico_Deriv.$X8]))));0)" office:value-type="float" office:value="0" calcext:value-type="float">
            <text:p>0,00</text:p>
          </table:table-cell>
          <table:table-cell table:formula="of:=COM.MICROSOFT.XLOOKUP([$Analítico_Deriv.$T8];[$Preços_MTM.C:.C];[$Preços_MTM.D:.D];COM.MICROSOFT.XLOOKUP([$Analítico_Deriv.$T8];[$Preços_MTM.H:.H];[$Preços_MTM.I:.I]))" office:value-type="float" office:value="11.225" calcext:value-type="float">
            <text:p>11,2250</text:p>
          </table:table-cell>
          <table:table-cell table:formula="of:=IF([$Analítico_Deriv.$C8]=&quot;Vigente&quot;;IF([$Analítico_Deriv.$S8]=&quot;CBOT&quot;;([$Analítico_Deriv.$Z8]-[$Analítico_Deriv.$U8])*5000*[$Analítico_Deriv.$R8];IF([$Analítico_Deriv.$S8]=&quot;BMF&quot;;[$Analítico_Deriv.$AB8]/[$Preços_MTM.$I$4];&quot;VERIFICAR&quot;));0)" office:value-type="float" office:value="0" calcext:value-type="float">
            <text:p>0,00</text:p>
          </table:table-cell>
          <table:table-cell table:formula="of:=IF([$Analítico_Deriv.$C8]=&quot;Vigente&quot;;(IF([$Analítico_Deriv.$S8]=&quot;BMF&quot;;([$Analítico_Deriv.$Z8]-[$Analítico_Deriv.$U8])*450*[$Analítico_Deriv.$R8];IF([$Analítico_Deriv.$S8]=&quot;CBOT&quot;;[$Analítico_Deriv.$AA8]*[$Preços_MTM.$I$4];&quot;VERIFICAR&quot;)))+[$Analítico_Deriv.$AC8];0)" office:value-type="float" office:value="0" calcext:value-type="float">
            <text:p>0,00</text:p>
          </table:table-cell>
          <table:table-cell table:formula="of:=IF([$Analítico_Deriv.$C8]=&quot;Vigente&quot;;IF([$Analítico_Deriv.$AD8]=&quot;DOLAR BMF&quot;;([$Analítico_Deriv.$Z8]-[$Analítico_Deriv.$U8])*[$Analítico_Deriv.$X8];0);0)" office:value-type="float" office:value="0" calcext:value-type="float">
            <text:p>0,00</text:p>
          </table:table-cell>
          <table:table-cell table:formula="of:=COM.MICROSOFT.CONCAT([$Analítico_Deriv.$D8];&quot; &quot;;[$Analítico_Deriv.$S8])" office:value-type="string" office:string-value="Soja CBOT" calcext:value-type="string">
            <text:p>Soja CBOT</text:p>
          </table:table-cell>
          <table:table-cell table:formula="of:=IF([$Analítico_Deriv.$AD8]=&quot;DOLAR BMF&quot;;0;(COM.MICROSOFT.XLOOKUP([$Analítico_Deriv.$AD8];[$dms.D:.D];[$dms.E:.E]))*[$Analítico_Deriv.$R8])" office:value-type="float" office:value="-119748.64" calcext:value-type="float">
            <text:p>-119.749</text:p>
          </table:table-cell>
          <table:table-cell table:formula="of:=[$Analítico_Deriv.$AE8]/1000" office:value-type="float" office:value="-119.74864" calcext:value-type="float">
            <text:p>-120</text:p>
          </table:table-cell>
          <table:table-cell table:formula="of:=COM.MICROSOFT.XLOOKUP([$Analítico_Deriv.$V8];[$dms.J:.J];[$dms.L:.L])" office:value-type="string" office:string-value="Ago" calcext:value-type="string">
            <text:p>Ago</text:p>
          </table:table-cell>
          <table:table-cell table:formula="of:=COM.MICROSOFT.XLOOKUP([$Analítico_Deriv.$V8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8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8]+([$Analítico_Deriv.$AJ8]*[$Analítico_Deriv.$Z8])" office:value-type="float" office:value="11.225" calcext:value-type="float">
            <text:p>11,225</text:p>
          </table:table-cell>
          <table:table-cell table:formula="of:=IF([$Analítico_Deriv.$C8]=&quot;Vigente&quot;;IF([$Analítico_Deriv.$S8]=&quot;CBOT&quot;;([$Analítico_Deriv.$AK8]-[$Analítico_Deriv.$U8])*5000*[$Analítico_Deriv.$R8];IF([$Analítico_Deriv.$S8]=&quot;BMF&quot;;[$Analítico_Deriv.$AM8]/[$Preços_MTM.$I$4];&quot;VERIFICAR&quot;));0)" office:value-type="float" office:value="0" calcext:value-type="float">
            <text:p>0,00</text:p>
          </table:table-cell>
          <table:table-cell table:formula="of:=IF([$Analítico_Deriv.$C8]=&quot;Vigente&quot;;(IF([$Analítico_Deriv.$S8]=&quot;BMF&quot;;([$Analítico_Deriv.$AK8]-[$Analítico_Deriv.$U8])*450*[$Analítico_Deriv.$R8];IF([$Analítico_Deriv.$S8]=&quot;CBOT&quot;;[$Analítico_Deriv.$AL8]*[$Preços_MTM.$I$4];&quot;VERIFICAR&quot;)))+[$Analítico_Deriv.$AN8];0)" office:value-type="float" office:value="0" calcext:value-type="float">
            <text:p>0,00</text:p>
          </table:table-cell>
          <table:table-cell table:style-name="ce33" table:formula="of:=IF([$Analítico_Deriv.$C8]=&quot;Vigente&quot;;IF([$Analítico_Deriv.$AD8]=&quot;DOLAR BMF&quot;;([$Analítico_Deriv.$AK8]-[$Analítico_Deriv.$U8])*[$Analítico_Deriv.$X8];0);0)" office:value-type="float" office:value="0" calcext:value-type="float">
            <text:p>0</text:p>
          </table:table-cell>
          <table:table-cell table:formula="of:=IF([$Analítico_Deriv.$I8]=&quot;Vigente&quot;;IF([$Analítico_Deriv.$AD8]=&quot;Soja CBOT&quot;;[$Analítico_Deriv.$X8]*-1;IF([$Analítico_Deriv.$AD8]=&quot;Milho CBOT&quot;;[$Analítico_Deriv.$X8]*-1;IF([$Analítico_Deriv.$AD8]=&quot;Milho BMF&quot;;0;IF([$Analítico_Deriv.$AD8]=&quot;Dolar BMF&quot;;[$Analítico_Deriv.$X8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8];[$dms.J:.J];[$dms.L:.L]);&quot;&quot;)">
            <text:p/>
          </table:table-cell>
          <table:table-cell table:style-name="ce23" table:formula="of:=IFERROR(COM.MICROSOFT.XLOOKUP([$Analítico_Deriv.$B8];[$dms.J:.J];[$dms.M:.M]);&quot;&quot;)">
            <text:p/>
          </table:table-cell>
          <table:table-cell table:style-name="ce23" table:formula="of:=COM.MICROSOFT.XLOOKUP([$Analítico_Deriv.$W8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8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</text:p>
          </table:table-cell>
          <table:table-cell table:style-name="ce5" office:value-type="date" office:date-value="2026-02-13" calcext:value-type="date">
            <text:p>13/2/2026</text:p>
          </table:table-cell>
          <table:table-cell table:style-name="ce131" office:value-type="string" calcext:value-type="string">
            <text:p>Liquidado</text:p>
          </table:table-cell>
          <table:table-cell table:number-columns-repeated="2"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10644306E</text:p>
          </table:table-cell>
          <table:table-cell table:style-name="ce5" office:value-type="string" calcext:value-type="string">
            <text:p>26B03280604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1.09" calcext:value-type="float">
            <text:p>1,09</text:p>
          </table:table-cell>
          <table:table-cell table:style-name="ce135" table:formula="of:=IF([$Analítico_Deriv.$P9]=&quot;VENDA&quot;;[$Analítico_Deriv.$Q9]*-1;[$Analítico_Deriv.$Q9])" office:value-type="float" office:value="-1.09" calcext:value-type="float">
            <text:p>-1,09</text:p>
          </table:table-cell>
          <table:table-cell office:value-type="string" calcext:value-type="string">
            <text:p>CBOT</text:p>
          </table:table-cell>
          <table:table-cell office:value-type="string" calcext:value-type="string">
            <text:p>ZSQ6</text:p>
          </table:table-cell>
          <table:table-cell table:style-name="ce127" office:value-type="float" office:value="11.487" calcext:value-type="float">
            <text:p>11,4870</text:p>
          </table:table-cell>
          <table:table-cell table:style-name="ce5" office:value-type="date" office:date-value="2026-08-14" calcext:value-type="date">
            <text:p>14/8/2026</text:p>
          </table:table-cell>
          <table:table-cell table:style-name="ce5" office:value-type="date" office:date-value="2026-07-31" calcext:value-type="date">
            <text:p>31/7/2026</text:p>
          </table:table-cell>
          <table:table-cell table:formula="of:=IF([$Analítico_Deriv.$AD9]=&quot;Dolar BMF&quot;;&quot;PREENCHER&quot;;IF([$Analítico_Deriv.$AD9]=&quot;SOJA CBOT&quot;;[$Analítico_Deriv.$R9]*5000*[$Analítico_Deriv.$U9];IF([$Analítico_Deriv.$AD9]=&quot;MILHO CBOT&quot;;[$Analítico_Deriv.$R9]*5000*[$Analítico_Deriv.$U9];IF([$Analítico_Deriv.$AD9]=&quot;MILHO BMF&quot;;0;&quot;VALIDAR&quot;))))" office:value-type="float" office:value="-62604.15" calcext:value-type="float">
            <text:p>-62.604,15</text:p>
          </table:table-cell>
          <table:table-cell table:formula="of:=IF([$Analítico_Deriv.$C9]=&quot;Vigente&quot;;IF([$Analítico_Deriv.$AD9]=&quot;Soja CBOT&quot;;[$Analítico_Deriv.$X9]*-1;IF([$Analítico_Deriv.$AD9]=&quot;Milho CBOT&quot;;[$Analítico_Deriv.$X9]*-1;IF([$Analítico_Deriv.$AD9]=&quot;Milho BMF&quot;;0;IF([$Analítico_Deriv.$AD9]=&quot;Dolar BMF&quot;;[$Analítico_Deriv.$X9]))));0)" office:value-type="float" office:value="0" calcext:value-type="float">
            <text:p>0,00</text:p>
          </table:table-cell>
          <table:table-cell table:formula="of:=COM.MICROSOFT.XLOOKUP([$Analítico_Deriv.$T9];[$Preços_MTM.C:.C];[$Preços_MTM.D:.D];COM.MICROSOFT.XLOOKUP([$Analítico_Deriv.$T9];[$Preços_MTM.H:.H];[$Preços_MTM.I:.I]))" office:value-type="float" office:value="11.225" calcext:value-type="float">
            <text:p>11,2250</text:p>
          </table:table-cell>
          <table:table-cell table:formula="of:=IF([$Analítico_Deriv.$C9]=&quot;Vigente&quot;;IF([$Analítico_Deriv.$S9]=&quot;CBOT&quot;;([$Analítico_Deriv.$Z9]-[$Analítico_Deriv.$U9])*5000*[$Analítico_Deriv.$R9];IF([$Analítico_Deriv.$S9]=&quot;BMF&quot;;[$Analítico_Deriv.$AB9]/[$Preços_MTM.$I$4];&quot;VERIFICAR&quot;));0)" office:value-type="float" office:value="0" calcext:value-type="float">
            <text:p>0,00</text:p>
          </table:table-cell>
          <table:table-cell table:formula="of:=IF([$Analítico_Deriv.$C9]=&quot;Vigente&quot;;(IF([$Analítico_Deriv.$S9]=&quot;BMF&quot;;([$Analítico_Deriv.$Z9]-[$Analítico_Deriv.$U9])*450*[$Analítico_Deriv.$R9];IF([$Analítico_Deriv.$S9]=&quot;CBOT&quot;;[$Analítico_Deriv.$AA9]*[$Preços_MTM.$I$4];&quot;VERIFICAR&quot;)))+[$Analítico_Deriv.$AC9];0)" office:value-type="float" office:value="0" calcext:value-type="float">
            <text:p>0,00</text:p>
          </table:table-cell>
          <table:table-cell table:formula="of:=IF([$Analítico_Deriv.$C9]=&quot;Vigente&quot;;IF([$Analítico_Deriv.$AD9]=&quot;DOLAR BMF&quot;;([$Analítico_Deriv.$Z9]-[$Analítico_Deriv.$U9])*[$Analítico_Deriv.$X9];0);0)" office:value-type="float" office:value="0" calcext:value-type="float">
            <text:p>0,00</text:p>
          </table:table-cell>
          <table:table-cell table:formula="of:=COM.MICROSOFT.CONCAT([$Analítico_Deriv.$D9];&quot; &quot;;[$Analítico_Deriv.$S9])" office:value-type="string" office:string-value="Soja CBOT" calcext:value-type="string">
            <text:p>Soja CBOT</text:p>
          </table:table-cell>
          <table:table-cell table:formula="of:=IF([$Analítico_Deriv.$AD9]=&quot;DOLAR BMF&quot;;0;(COM.MICROSOFT.XLOOKUP([$Analítico_Deriv.$AD9];[$dms.D:.D];[$dms.E:.E]))*[$Analítico_Deriv.$R9])" office:value-type="float" office:value="-148325.02" calcext:value-type="float">
            <text:p>-148.325</text:p>
          </table:table-cell>
          <table:table-cell table:formula="of:=[$Analítico_Deriv.$AE9]/1000" office:value-type="float" office:value="-148.32502" calcext:value-type="float">
            <text:p>-148</text:p>
          </table:table-cell>
          <table:table-cell table:formula="of:=COM.MICROSOFT.XLOOKUP([$Analítico_Deriv.$V9];[$dms.J:.J];[$dms.L:.L])" office:value-type="string" office:string-value="Ago" calcext:value-type="string">
            <text:p>Ago</text:p>
          </table:table-cell>
          <table:table-cell table:formula="of:=COM.MICROSOFT.XLOOKUP([$Analítico_Deriv.$V9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9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9]+([$Analítico_Deriv.$AJ9]*[$Analítico_Deriv.$Z9])" office:value-type="float" office:value="11.225" calcext:value-type="float">
            <text:p>11,225</text:p>
          </table:table-cell>
          <table:table-cell table:formula="of:=IF([$Analítico_Deriv.$C9]=&quot;Vigente&quot;;IF([$Analítico_Deriv.$S9]=&quot;CBOT&quot;;([$Analítico_Deriv.$AK9]-[$Analítico_Deriv.$U9])*5000*[$Analítico_Deriv.$R9];IF([$Analítico_Deriv.$S9]=&quot;BMF&quot;;[$Analítico_Deriv.$AM9]/[$Preços_MTM.$I$4];&quot;VERIFICAR&quot;));0)" office:value-type="float" office:value="0" calcext:value-type="float">
            <text:p>0,00</text:p>
          </table:table-cell>
          <table:table-cell table:formula="of:=IF([$Analítico_Deriv.$C9]=&quot;Vigente&quot;;(IF([$Analítico_Deriv.$S9]=&quot;BMF&quot;;([$Analítico_Deriv.$AK9]-[$Analítico_Deriv.$U9])*450*[$Analítico_Deriv.$R9];IF([$Analítico_Deriv.$S9]=&quot;CBOT&quot;;[$Analítico_Deriv.$AL9]*[$Preços_MTM.$I$4];&quot;VERIFICAR&quot;)))+[$Analítico_Deriv.$AN9];0)" office:value-type="float" office:value="0" calcext:value-type="float">
            <text:p>0,00</text:p>
          </table:table-cell>
          <table:table-cell table:style-name="ce33" table:formula="of:=IF([$Analítico_Deriv.$C9]=&quot;Vigente&quot;;IF([$Analítico_Deriv.$AD9]=&quot;DOLAR BMF&quot;;([$Analítico_Deriv.$AK9]-[$Analítico_Deriv.$U9])*[$Analítico_Deriv.$X9];0);0)" office:value-type="float" office:value="0" calcext:value-type="float">
            <text:p>0</text:p>
          </table:table-cell>
          <table:table-cell table:formula="of:=IF([$Analítico_Deriv.$I9]=&quot;Vigente&quot;;IF([$Analítico_Deriv.$AD9]=&quot;Soja CBOT&quot;;[$Analítico_Deriv.$X9]*-1;IF([$Analítico_Deriv.$AD9]=&quot;Milho CBOT&quot;;[$Analítico_Deriv.$X9]*-1;IF([$Analítico_Deriv.$AD9]=&quot;Milho BMF&quot;;0;IF([$Analítico_Deriv.$AD9]=&quot;Dolar BMF&quot;;[$Analítico_Deriv.$X9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9];[$dms.J:.J];[$dms.L:.L]);&quot;&quot;)">
            <text:p/>
          </table:table-cell>
          <table:table-cell table:style-name="ce23" table:formula="of:=IFERROR(COM.MICROSOFT.XLOOKUP([$Analítico_Deriv.$B9];[$dms.J:.J];[$dms.M:.M]);&quot;&quot;)">
            <text:p/>
          </table:table-cell>
          <table:table-cell table:style-name="ce23" table:formula="of:=COM.MICROSOFT.XLOOKUP([$Analítico_Deriv.$W9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9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</text:p>
          </table:table-cell>
          <table:table-cell table:style-name="ce5" office:value-type="date" office:date-value="2026-03-03" calcext:value-type="date">
            <text:p>3/3/2026</text:p>
          </table:table-cell>
          <table:table-cell table:style-name="ce131" office:value-type="string" calcext:value-type="string">
            <text:p>Liquidado</text:p>
          </table:table-cell>
          <table:table-cell table:number-columns-repeated="2"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10659258E</text:p>
          </table:table-cell>
          <table:table-cell table:style-name="ce5" office:value-type="string" calcext:value-type="string">
            <text:p>26C00406175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.39" calcext:value-type="float">
            <text:p>0,39</text:p>
          </table:table-cell>
          <table:table-cell table:style-name="ce135" table:formula="of:=IF([$Analítico_Deriv.$P10]=&quot;VENDA&quot;;[$Analítico_Deriv.$Q10]*-1;[$Analítico_Deriv.$Q10])" office:value-type="float" office:value="-0.39" calcext:value-type="float">
            <text:p>-0,39</text:p>
          </table:table-cell>
          <table:table-cell office:value-type="string" calcext:value-type="string">
            <text:p>CBOT</text:p>
          </table:table-cell>
          <table:table-cell office:value-type="string" calcext:value-type="string">
            <text:p>ZSQ6</text:p>
          </table:table-cell>
          <table:table-cell table:style-name="ce127" office:value-type="float" office:value="11.76" calcext:value-type="float">
            <text:p>11,7600</text:p>
          </table:table-cell>
          <table:table-cell table:style-name="ce5" office:value-type="date" office:date-value="2026-08-14" calcext:value-type="date">
            <text:p>14/8/2026</text:p>
          </table:table-cell>
          <table:table-cell table:style-name="ce5" office:value-type="date" office:date-value="2026-07-31" calcext:value-type="date">
            <text:p>31/7/2026</text:p>
          </table:table-cell>
          <table:table-cell table:formula="of:=IF([$Analítico_Deriv.$AD10]=&quot;Dolar BMF&quot;;&quot;PREENCHER&quot;;IF([$Analítico_Deriv.$AD10]=&quot;SOJA CBOT&quot;;[$Analítico_Deriv.$R10]*5000*[$Analítico_Deriv.$U10];IF([$Analítico_Deriv.$AD10]=&quot;MILHO CBOT&quot;;[$Analítico_Deriv.$R10]*5000*[$Analítico_Deriv.$U10];IF([$Analítico_Deriv.$AD10]=&quot;MILHO BMF&quot;;0;&quot;VALIDAR&quot;))))" office:value-type="float" office:value="-22932" calcext:value-type="float">
            <text:p>-22.932,00</text:p>
          </table:table-cell>
          <table:table-cell table:formula="of:=IF([$Analítico_Deriv.$C10]=&quot;Vigente&quot;;IF([$Analítico_Deriv.$AD10]=&quot;Soja CBOT&quot;;[$Analítico_Deriv.$X10]*-1;IF([$Analítico_Deriv.$AD10]=&quot;Milho CBOT&quot;;[$Analítico_Deriv.$X10]*-1;IF([$Analítico_Deriv.$AD10]=&quot;Milho BMF&quot;;0;IF([$Analítico_Deriv.$AD10]=&quot;Dolar BMF&quot;;[$Analítico_Deriv.$X10]))));0)" office:value-type="float" office:value="0" calcext:value-type="float">
            <text:p>0,00</text:p>
          </table:table-cell>
          <table:table-cell table:formula="of:=COM.MICROSOFT.XLOOKUP([$Analítico_Deriv.$T10];[$Preços_MTM.C:.C];[$Preços_MTM.D:.D];COM.MICROSOFT.XLOOKUP([$Analítico_Deriv.$T10];[$Preços_MTM.H:.H];[$Preços_MTM.I:.I]))" office:value-type="float" office:value="11.225" calcext:value-type="float">
            <text:p>11,2250</text:p>
          </table:table-cell>
          <table:table-cell table:formula="of:=IF([$Analítico_Deriv.$C10]=&quot;Vigente&quot;;IF([$Analítico_Deriv.$S10]=&quot;CBOT&quot;;([$Analítico_Deriv.$Z10]-[$Analítico_Deriv.$U10])*5000*[$Analítico_Deriv.$R10];IF([$Analítico_Deriv.$S10]=&quot;BMF&quot;;[$Analítico_Deriv.$AB10]/[$Preços_MTM.$I$4];&quot;VERIFICAR&quot;));0)" office:value-type="float" office:value="0" calcext:value-type="float">
            <text:p>0,00</text:p>
          </table:table-cell>
          <table:table-cell table:formula="of:=IF([$Analítico_Deriv.$C10]=&quot;Vigente&quot;;(IF([$Analítico_Deriv.$S10]=&quot;BMF&quot;;([$Analítico_Deriv.$Z10]-[$Analítico_Deriv.$U10])*450*[$Analítico_Deriv.$R10];IF([$Analítico_Deriv.$S10]=&quot;CBOT&quot;;[$Analítico_Deriv.$AA10]*[$Preços_MTM.$I$4];&quot;VERIFICAR&quot;)))+[$Analítico_Deriv.$AC10];0)" office:value-type="float" office:value="0" calcext:value-type="float">
            <text:p>0,00</text:p>
          </table:table-cell>
          <table:table-cell table:formula="of:=IF([$Analítico_Deriv.$C10]=&quot;Vigente&quot;;IF([$Analítico_Deriv.$AD10]=&quot;DOLAR BMF&quot;;([$Analítico_Deriv.$Z10]-[$Analítico_Deriv.$U10])*[$Analítico_Deriv.$X10];0);0)" office:value-type="float" office:value="0" calcext:value-type="float">
            <text:p>0,00</text:p>
          </table:table-cell>
          <table:table-cell table:style-name="ce33" table:formula="of:=COM.MICROSOFT.CONCAT([$Analítico_Deriv.$D10];&quot; &quot;;[$Analítico_Deriv.$S10])" office:value-type="string" office:string-value="Soja CBOT" calcext:value-type="string">
            <text:p>Soja CBOT</text:p>
          </table:table-cell>
          <table:table-cell table:formula="of:=IF([$Analítico_Deriv.$AD10]=&quot;DOLAR BMF&quot;;0;(COM.MICROSOFT.XLOOKUP([$Analítico_Deriv.$AD10];[$dms.D:.D];[$dms.E:.E]))*[$Analítico_Deriv.$R10])" office:value-type="float" office:value="-53070.42" calcext:value-type="float">
            <text:p>-53.070</text:p>
          </table:table-cell>
          <table:table-cell table:formula="of:=[$Analítico_Deriv.$AE10]/1000" office:value-type="float" office:value="-53.07042" calcext:value-type="float">
            <text:p>-53</text:p>
          </table:table-cell>
          <table:table-cell table:style-name="ce33" table:formula="of:=COM.MICROSOFT.XLOOKUP([$Analítico_Deriv.$V10];[$dms.J:.J];[$dms.L:.L])" office:value-type="string" office:string-value="Ago" calcext:value-type="string">
            <text:p>Ago</text:p>
          </table:table-cell>
          <table:table-cell table:style-name="ce33" table:formula="of:=COM.MICROSOFT.XLOOKUP([$Analítico_Deriv.$V10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0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0]+([$Analítico_Deriv.$AJ10]*[$Analítico_Deriv.$Z10])" office:value-type="float" office:value="11.225" calcext:value-type="float">
            <text:p>11,225</text:p>
          </table:table-cell>
          <table:table-cell table:formula="of:=IF([$Analítico_Deriv.$C10]=&quot;Vigente&quot;;IF([$Analítico_Deriv.$S10]=&quot;CBOT&quot;;([$Analítico_Deriv.$AK10]-[$Analítico_Deriv.$U10])*5000*[$Analítico_Deriv.$R10];IF([$Analítico_Deriv.$S10]=&quot;BMF&quot;;[$Analítico_Deriv.$AM10]/[$Preços_MTM.$I$4];&quot;VERIFICAR&quot;));0)" office:value-type="float" office:value="0" calcext:value-type="float">
            <text:p>0,00</text:p>
          </table:table-cell>
          <table:table-cell table:formula="of:=IF([$Analítico_Deriv.$C10]=&quot;Vigente&quot;;(IF([$Analítico_Deriv.$S10]=&quot;BMF&quot;;([$Analítico_Deriv.$AK10]-[$Analítico_Deriv.$U10])*450*[$Analítico_Deriv.$R10];IF([$Analítico_Deriv.$S10]=&quot;CBOT&quot;;[$Analítico_Deriv.$AL10]*[$Preços_MTM.$I$4];&quot;VERIFICAR&quot;)))+[$Analítico_Deriv.$AN10];0)" office:value-type="float" office:value="0" calcext:value-type="float">
            <text:p>0,00</text:p>
          </table:table-cell>
          <table:table-cell table:style-name="ce33" table:formula="of:=IF([$Analítico_Deriv.$C10]=&quot;Vigente&quot;;IF([$Analítico_Deriv.$AD10]=&quot;DOLAR BMF&quot;;([$Analítico_Deriv.$AK10]-[$Analítico_Deriv.$U10])*[$Analítico_Deriv.$X10];0);0)" office:value-type="float" office:value="0" calcext:value-type="float">
            <text:p>0</text:p>
          </table:table-cell>
          <table:table-cell table:formula="of:=IF([$Analítico_Deriv.$I10]=&quot;Vigente&quot;;IF([$Analítico_Deriv.$AD10]=&quot;Soja CBOT&quot;;[$Analítico_Deriv.$X10]*-1;IF([$Analítico_Deriv.$AD10]=&quot;Milho CBOT&quot;;[$Analítico_Deriv.$X10]*-1;IF([$Analítico_Deriv.$AD10]=&quot;Milho BMF&quot;;0;IF([$Analítico_Deriv.$AD10]=&quot;Dolar BMF&quot;;[$Analítico_Deriv.$X10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0];[$dms.J:.J];[$dms.L:.L]);&quot;&quot;)">
            <text:p/>
          </table:table-cell>
          <table:table-cell table:style-name="ce23" table:formula="of:=IFERROR(COM.MICROSOFT.XLOOKUP([$Analítico_Deriv.$B10];[$dms.J:.J];[$dms.M:.M]);&quot;&quot;)">
            <text:p/>
          </table:table-cell>
          <table:table-cell table:style-name="ce23" table:formula="of:=COM.MICROSOFT.XLOOKUP([$Analítico_Deriv.$W10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0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</text:p>
          </table:table-cell>
          <table:table-cell table:style-name="ce5" office:value-type="date" office:date-value="2026-03-03" calcext:value-type="date">
            <text:p>3/3/2026</text:p>
          </table:table-cell>
          <table:table-cell table:style-name="ce131" office:value-type="string" calcext:value-type="string">
            <text:p>Liquidado</text:p>
          </table:table-cell>
          <table:table-cell table:number-columns-repeated="2"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10659505E</text:p>
          </table:table-cell>
          <table:table-cell table:style-name="ce5" office:value-type="string" calcext:value-type="string">
            <text:p>26C00406126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.88" calcext:value-type="float">
            <text:p>0,88</text:p>
          </table:table-cell>
          <table:table-cell table:style-name="ce135" table:formula="of:=IF([$Analítico_Deriv.$P11]=&quot;VENDA&quot;;[$Analítico_Deriv.$Q11]*-1;[$Analítico_Deriv.$Q11])" office:value-type="float" office:value="-0.88" calcext:value-type="float">
            <text:p>-0,88</text:p>
          </table:table-cell>
          <table:table-cell office:value-type="string" calcext:value-type="string">
            <text:p>CBOT</text:p>
          </table:table-cell>
          <table:table-cell office:value-type="string" calcext:value-type="string">
            <text:p>ZSQ6</text:p>
          </table:table-cell>
          <table:table-cell table:style-name="ce127" office:value-type="float" office:value="11.6825" calcext:value-type="float">
            <text:p>11,6825</text:p>
          </table:table-cell>
          <table:table-cell table:style-name="ce5" office:value-type="date" office:date-value="2026-08-14" calcext:value-type="date">
            <text:p>14/8/2026</text:p>
          </table:table-cell>
          <table:table-cell table:style-name="ce5" office:value-type="date" office:date-value="2026-07-31" calcext:value-type="date">
            <text:p>31/7/2026</text:p>
          </table:table-cell>
          <table:table-cell table:formula="of:=IF([$Analítico_Deriv.$AD11]=&quot;Dolar BMF&quot;;&quot;PREENCHER&quot;;IF([$Analítico_Deriv.$AD11]=&quot;SOJA CBOT&quot;;[$Analítico_Deriv.$R11]*5000*[$Analítico_Deriv.$U11];IF([$Analítico_Deriv.$AD11]=&quot;MILHO CBOT&quot;;[$Analítico_Deriv.$R11]*5000*[$Analítico_Deriv.$U11];IF([$Analítico_Deriv.$AD11]=&quot;MILHO BMF&quot;;0;&quot;VALIDAR&quot;))))" office:value-type="float" office:value="-51403" calcext:value-type="float">
            <text:p>-51.403,00</text:p>
          </table:table-cell>
          <table:table-cell table:formula="of:=IF([$Analítico_Deriv.$C11]=&quot;Vigente&quot;;IF([$Analítico_Deriv.$AD11]=&quot;Soja CBOT&quot;;[$Analítico_Deriv.$X11]*-1;IF([$Analítico_Deriv.$AD11]=&quot;Milho CBOT&quot;;[$Analítico_Deriv.$X11]*-1;IF([$Analítico_Deriv.$AD11]=&quot;Milho BMF&quot;;0;IF([$Analítico_Deriv.$AD11]=&quot;Dolar BMF&quot;;[$Analítico_Deriv.$X11]))));0)" office:value-type="float" office:value="0" calcext:value-type="float">
            <text:p>0,00</text:p>
          </table:table-cell>
          <table:table-cell table:formula="of:=COM.MICROSOFT.XLOOKUP([$Analítico_Deriv.$T11];[$Preços_MTM.C:.C];[$Preços_MTM.D:.D];COM.MICROSOFT.XLOOKUP([$Analítico_Deriv.$T11];[$Preços_MTM.H:.H];[$Preços_MTM.I:.I]))" office:value-type="float" office:value="11.225" calcext:value-type="float">
            <text:p>11,2250</text:p>
          </table:table-cell>
          <table:table-cell table:formula="of:=IF([$Analítico_Deriv.$C11]=&quot;Vigente&quot;;IF([$Analítico_Deriv.$S11]=&quot;CBOT&quot;;([$Analítico_Deriv.$Z11]-[$Analítico_Deriv.$U11])*5000*[$Analítico_Deriv.$R11];IF([$Analítico_Deriv.$S11]=&quot;BMF&quot;;[$Analítico_Deriv.$AB11]/[$Preços_MTM.$I$4];&quot;VERIFICAR&quot;));0)" office:value-type="float" office:value="0" calcext:value-type="float">
            <text:p>0,00</text:p>
          </table:table-cell>
          <table:table-cell table:formula="of:=IF([$Analítico_Deriv.$C11]=&quot;Vigente&quot;;(IF([$Analítico_Deriv.$S11]=&quot;BMF&quot;;([$Analítico_Deriv.$Z11]-[$Analítico_Deriv.$U11])*450*[$Analítico_Deriv.$R11];IF([$Analítico_Deriv.$S11]=&quot;CBOT&quot;;[$Analítico_Deriv.$AA11]*[$Preços_MTM.$I$4];&quot;VERIFICAR&quot;)))+[$Analítico_Deriv.$AC11];0)" office:value-type="float" office:value="0" calcext:value-type="float">
            <text:p>0,00</text:p>
          </table:table-cell>
          <table:table-cell table:formula="of:=IF([$Analítico_Deriv.$C11]=&quot;Vigente&quot;;IF([$Analítico_Deriv.$AD11]=&quot;DOLAR BMF&quot;;([$Analítico_Deriv.$Z11]-[$Analítico_Deriv.$U11])*[$Analítico_Deriv.$X11];0);0)" office:value-type="float" office:value="0" calcext:value-type="float">
            <text:p>0,00</text:p>
          </table:table-cell>
          <table:table-cell table:style-name="ce33" table:formula="of:=COM.MICROSOFT.CONCAT([$Analítico_Deriv.$D11];&quot; &quot;;[$Analítico_Deriv.$S11])" office:value-type="string" office:string-value="Soja CBOT" calcext:value-type="string">
            <text:p>Soja CBOT</text:p>
          </table:table-cell>
          <table:table-cell table:formula="of:=IF([$Analítico_Deriv.$AD11]=&quot;DOLAR BMF&quot;;0;(COM.MICROSOFT.XLOOKUP([$Analítico_Deriv.$AD11];[$dms.D:.D];[$dms.E:.E]))*[$Analítico_Deriv.$R11])" office:value-type="float" office:value="-119748.64" calcext:value-type="float">
            <text:p>-119.749</text:p>
          </table:table-cell>
          <table:table-cell table:formula="of:=[$Analítico_Deriv.$AE11]/1000" office:value-type="float" office:value="-119.74864" calcext:value-type="float">
            <text:p>-120</text:p>
          </table:table-cell>
          <table:table-cell table:style-name="ce33" table:formula="of:=COM.MICROSOFT.XLOOKUP([$Analítico_Deriv.$V11];[$dms.J:.J];[$dms.L:.L])" office:value-type="string" office:string-value="Ago" calcext:value-type="string">
            <text:p>Ago</text:p>
          </table:table-cell>
          <table:table-cell table:style-name="ce33" table:formula="of:=COM.MICROSOFT.XLOOKUP([$Analítico_Deriv.$V11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1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1]+([$Analítico_Deriv.$AJ11]*[$Analítico_Deriv.$Z11])" office:value-type="float" office:value="11.225" calcext:value-type="float">
            <text:p>11,225</text:p>
          </table:table-cell>
          <table:table-cell table:formula="of:=IF([$Analítico_Deriv.$C11]=&quot;Vigente&quot;;IF([$Analítico_Deriv.$S11]=&quot;CBOT&quot;;([$Analítico_Deriv.$AK11]-[$Analítico_Deriv.$U11])*5000*[$Analítico_Deriv.$R11];IF([$Analítico_Deriv.$S11]=&quot;BMF&quot;;[$Analítico_Deriv.$AM11]/[$Preços_MTM.$I$4];&quot;VERIFICAR&quot;));0)" office:value-type="float" office:value="0" calcext:value-type="float">
            <text:p>0,00</text:p>
          </table:table-cell>
          <table:table-cell table:formula="of:=IF([$Analítico_Deriv.$C11]=&quot;Vigente&quot;;(IF([$Analítico_Deriv.$S11]=&quot;BMF&quot;;([$Analítico_Deriv.$AK11]-[$Analítico_Deriv.$U11])*450*[$Analítico_Deriv.$R11];IF([$Analítico_Deriv.$S11]=&quot;CBOT&quot;;[$Analítico_Deriv.$AL11]*[$Preços_MTM.$I$4];&quot;VERIFICAR&quot;)))+[$Analítico_Deriv.$AN11];0)" office:value-type="float" office:value="0" calcext:value-type="float">
            <text:p>0,00</text:p>
          </table:table-cell>
          <table:table-cell table:style-name="ce33" table:formula="of:=IF([$Analítico_Deriv.$C11]=&quot;Vigente&quot;;IF([$Analítico_Deriv.$AD11]=&quot;DOLAR BMF&quot;;([$Analítico_Deriv.$AK11]-[$Analítico_Deriv.$U11])*[$Analítico_Deriv.$X11];0);0)" office:value-type="float" office:value="0" calcext:value-type="float">
            <text:p>0</text:p>
          </table:table-cell>
          <table:table-cell table:formula="of:=IF([$Analítico_Deriv.$I11]=&quot;Vigente&quot;;IF([$Analítico_Deriv.$AD11]=&quot;Soja CBOT&quot;;[$Analítico_Deriv.$X11]*-1;IF([$Analítico_Deriv.$AD11]=&quot;Milho CBOT&quot;;[$Analítico_Deriv.$X11]*-1;IF([$Analítico_Deriv.$AD11]=&quot;Milho BMF&quot;;0;IF([$Analítico_Deriv.$AD11]=&quot;Dolar BMF&quot;;[$Analítico_Deriv.$X11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1];[$dms.J:.J];[$dms.L:.L]);&quot;&quot;)">
            <text:p/>
          </table:table-cell>
          <table:table-cell table:style-name="ce23" table:formula="of:=IFERROR(COM.MICROSOFT.XLOOKUP([$Analítico_Deriv.$B11];[$dms.J:.J];[$dms.M:.M]);&quot;&quot;)">
            <text:p/>
          </table:table-cell>
          <table:table-cell table:style-name="ce23" table:formula="of:=COM.MICROSOFT.XLOOKUP([$Analítico_Deriv.$W11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1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table:style-name="ce5" office:value-type="date" office:date-value="2026-03-04" calcext:value-type="date">
            <text:p>4/3/2026</text:p>
          </table:table-cell>
          <table:table-cell table:style-name="ce131" office:value-type="string" calcext:value-type="string">
            <text:p>Liquidado</text:p>
          </table:table-cell>
          <table:table-cell table:number-columns-repeated="2"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10661061E</text:p>
          </table:table-cell>
          <table:table-cell table:style-name="ce5" office:value-type="string" calcext:value-type="string">
            <text:p>26C01357475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.44" calcext:value-type="float">
            <text:p>0,44</text:p>
          </table:table-cell>
          <table:table-cell table:style-name="ce135" table:formula="of:=IF([$Analítico_Deriv.$P12]=&quot;VENDA&quot;;[$Analítico_Deriv.$Q12]*-1;[$Analítico_Deriv.$Q12])" office:value-type="float" office:value="-0.44" calcext:value-type="float">
            <text:p>-0,44</text:p>
          </table:table-cell>
          <table:table-cell office:value-type="string" calcext:value-type="string">
            <text:p>CBOT</text:p>
          </table:table-cell>
          <table:table-cell office:value-type="string" calcext:value-type="string">
            <text:p>ZSQ6</text:p>
          </table:table-cell>
          <table:table-cell table:style-name="ce127" office:value-type="float" office:value="11.7" calcext:value-type="float">
            <text:p>11,7000</text:p>
          </table:table-cell>
          <table:table-cell table:style-name="ce5" office:value-type="date" office:date-value="2026-08-14" calcext:value-type="date">
            <text:p>14/8/2026</text:p>
          </table:table-cell>
          <table:table-cell table:style-name="ce5" office:value-type="date" office:date-value="2026-07-31" calcext:value-type="date">
            <text:p>31/7/2026</text:p>
          </table:table-cell>
          <table:table-cell table:formula="of:=IF([$Analítico_Deriv.$AD12]=&quot;Dolar BMF&quot;;&quot;PREENCHER&quot;;IF([$Analítico_Deriv.$AD12]=&quot;SOJA CBOT&quot;;[$Analítico_Deriv.$R12]*5000*[$Analítico_Deriv.$U12];IF([$Analítico_Deriv.$AD12]=&quot;MILHO CBOT&quot;;[$Analítico_Deriv.$R12]*5000*[$Analítico_Deriv.$U12];IF([$Analítico_Deriv.$AD12]=&quot;MILHO BMF&quot;;0;&quot;VALIDAR&quot;))))" office:value-type="float" office:value="-25740" calcext:value-type="float">
            <text:p>-25.740,00</text:p>
          </table:table-cell>
          <table:table-cell table:formula="of:=IF([$Analítico_Deriv.$C12]=&quot;Vigente&quot;;IF([$Analítico_Deriv.$AD12]=&quot;Soja CBOT&quot;;[$Analítico_Deriv.$X12]*-1;IF([$Analítico_Deriv.$AD12]=&quot;Milho CBOT&quot;;[$Analítico_Deriv.$X12]*-1;IF([$Analítico_Deriv.$AD12]=&quot;Milho BMF&quot;;0;IF([$Analítico_Deriv.$AD12]=&quot;Dolar BMF&quot;;[$Analítico_Deriv.$X12]))));0)" office:value-type="float" office:value="0" calcext:value-type="float">
            <text:p>0,00</text:p>
          </table:table-cell>
          <table:table-cell table:formula="of:=COM.MICROSOFT.XLOOKUP([$Analítico_Deriv.$T12];[$Preços_MTM.C:.C];[$Preços_MTM.D:.D];COM.MICROSOFT.XLOOKUP([$Analítico_Deriv.$T12];[$Preços_MTM.H:.H];[$Preços_MTM.I:.I]))" office:value-type="float" office:value="11.225" calcext:value-type="float">
            <text:p>11,2250</text:p>
          </table:table-cell>
          <table:table-cell table:formula="of:=IF([$Analítico_Deriv.$C12]=&quot;Vigente&quot;;IF([$Analítico_Deriv.$S12]=&quot;CBOT&quot;;([$Analítico_Deriv.$Z12]-[$Analítico_Deriv.$U12])*5000*[$Analítico_Deriv.$R12];IF([$Analítico_Deriv.$S12]=&quot;BMF&quot;;[$Analítico_Deriv.$AB12]/[$Preços_MTM.$I$4];&quot;VERIFICAR&quot;));0)" office:value-type="float" office:value="0" calcext:value-type="float">
            <text:p>0,00</text:p>
          </table:table-cell>
          <table:table-cell table:formula="of:=IF([$Analítico_Deriv.$C12]=&quot;Vigente&quot;;(IF([$Analítico_Deriv.$S12]=&quot;BMF&quot;;([$Analítico_Deriv.$Z12]-[$Analítico_Deriv.$U12])*450*[$Analítico_Deriv.$R12];IF([$Analítico_Deriv.$S12]=&quot;CBOT&quot;;[$Analítico_Deriv.$AA12]*[$Preços_MTM.$I$4];&quot;VERIFICAR&quot;)))+[$Analítico_Deriv.$AC12];0)" office:value-type="float" office:value="0" calcext:value-type="float">
            <text:p>0,00</text:p>
          </table:table-cell>
          <table:table-cell table:formula="of:=IF([$Analítico_Deriv.$C12]=&quot;Vigente&quot;;IF([$Analítico_Deriv.$AD12]=&quot;DOLAR BMF&quot;;([$Analítico_Deriv.$Z12]-[$Analítico_Deriv.$U12])*[$Analítico_Deriv.$X12];0);0)" office:value-type="float" office:value="0" calcext:value-type="float">
            <text:p>0,00</text:p>
          </table:table-cell>
          <table:table-cell table:style-name="ce33" table:formula="of:=COM.MICROSOFT.CONCAT([$Analítico_Deriv.$D12];&quot; &quot;;[$Analítico_Deriv.$S12])" office:value-type="string" office:string-value="Soja CBOT" calcext:value-type="string">
            <text:p>Soja CBOT</text:p>
          </table:table-cell>
          <table:table-cell table:formula="of:=IF([$Analítico_Deriv.$AD12]=&quot;DOLAR BMF&quot;;0;(COM.MICROSOFT.XLOOKUP([$Analítico_Deriv.$AD12];[$dms.D:.D];[$dms.E:.E]))*[$Analítico_Deriv.$R12])" office:value-type="float" office:value="-59874.32" calcext:value-type="float">
            <text:p>-59.874</text:p>
          </table:table-cell>
          <table:table-cell table:formula="of:=[$Analítico_Deriv.$AE12]/1000" office:value-type="float" office:value="-59.87432" calcext:value-type="float">
            <text:p>-60</text:p>
          </table:table-cell>
          <table:table-cell table:style-name="ce33" table:formula="of:=COM.MICROSOFT.XLOOKUP([$Analítico_Deriv.$V12];[$dms.J:.J];[$dms.L:.L])" office:value-type="string" office:string-value="Ago" calcext:value-type="string">
            <text:p>Ago</text:p>
          </table:table-cell>
          <table:table-cell table:style-name="ce33" table:formula="of:=COM.MICROSOFT.XLOOKUP([$Analítico_Deriv.$V12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2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2]+([$Analítico_Deriv.$AJ12]*[$Analítico_Deriv.$Z12])" office:value-type="float" office:value="11.225" calcext:value-type="float">
            <text:p>11,225</text:p>
          </table:table-cell>
          <table:table-cell table:formula="of:=IF([$Analítico_Deriv.$C12]=&quot;Vigente&quot;;IF([$Analítico_Deriv.$S12]=&quot;CBOT&quot;;([$Analítico_Deriv.$AK12]-[$Analítico_Deriv.$U12])*5000*[$Analítico_Deriv.$R12];IF([$Analítico_Deriv.$S12]=&quot;BMF&quot;;[$Analítico_Deriv.$AM12]/[$Preços_MTM.$I$4];&quot;VERIFICAR&quot;));0)" office:value-type="float" office:value="0" calcext:value-type="float">
            <text:p>0,00</text:p>
          </table:table-cell>
          <table:table-cell table:formula="of:=IF([$Analítico_Deriv.$C12]=&quot;Vigente&quot;;(IF([$Analítico_Deriv.$S12]=&quot;BMF&quot;;([$Analítico_Deriv.$AK12]-[$Analítico_Deriv.$U12])*450*[$Analítico_Deriv.$R12];IF([$Analítico_Deriv.$S12]=&quot;CBOT&quot;;[$Analítico_Deriv.$AL12]*[$Preços_MTM.$I$4];&quot;VERIFICAR&quot;)))+[$Analítico_Deriv.$AN12];0)" office:value-type="float" office:value="0" calcext:value-type="float">
            <text:p>0,00</text:p>
          </table:table-cell>
          <table:table-cell table:style-name="ce33" table:formula="of:=IF([$Analítico_Deriv.$C12]=&quot;Vigente&quot;;IF([$Analítico_Deriv.$AD12]=&quot;DOLAR BMF&quot;;([$Analítico_Deriv.$AK12]-[$Analítico_Deriv.$U12])*[$Analítico_Deriv.$X12];0);0)" office:value-type="float" office:value="0" calcext:value-type="float">
            <text:p>0</text:p>
          </table:table-cell>
          <table:table-cell table:formula="of:=IF([$Analítico_Deriv.$I12]=&quot;Vigente&quot;;IF([$Analítico_Deriv.$AD12]=&quot;Soja CBOT&quot;;[$Analítico_Deriv.$X12]*-1;IF([$Analítico_Deriv.$AD12]=&quot;Milho CBOT&quot;;[$Analítico_Deriv.$X12]*-1;IF([$Analítico_Deriv.$AD12]=&quot;Milho BMF&quot;;0;IF([$Analítico_Deriv.$AD12]=&quot;Dolar BMF&quot;;[$Analítico_Deriv.$X12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2];[$dms.J:.J];[$dms.L:.L]);&quot;&quot;)">
            <text:p/>
          </table:table-cell>
          <table:table-cell table:style-name="ce23" table:formula="of:=IFERROR(COM.MICROSOFT.XLOOKUP([$Analítico_Deriv.$B12];[$dms.J:.J];[$dms.M:.M]);&quot;&quot;)">
            <text:p/>
          </table:table-cell>
          <table:table-cell table:style-name="ce23" table:formula="of:=COM.MICROSOFT.XLOOKUP([$Analítico_Deriv.$W12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2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</text:p>
          </table:table-cell>
          <table:table-cell table:style-name="ce5" office:value-type="date" office:date-value="2026-05-07" calcext:value-type="date">
            <text:p>7/5/2026</text:p>
          </table:table-cell>
          <table:table-cell table:style-name="ce131" office:value-type="string" calcext:value-type="string">
            <text:p>Liquidado</text:p>
          </table:table-cell>
          <table:table-cell table:number-columns-repeated="2"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Saída</text:p>
          </table:table-cell>
          <table:table-cell office:value-type="string" calcext:value-type="string">
            <text:p>F1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10715216E</text:p>
          </table:table-cell>
          <table:table-cell table:style-name="ce132" office:value-type="string" calcext:value-type="string">
            <text:p>26E02233280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Compr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Compra</text:p>
          </table:table-cell>
          <table:table-cell table:style-name="ce23" office:value-type="float" office:value="1.8" calcext:value-type="float">
            <text:p>1,80</text:p>
          </table:table-cell>
          <table:table-cell table:style-name="ce135" table:formula="of:=IF([$Analítico_Deriv.$P13]=&quot;VENDA&quot;;[$Analítico_Deriv.$Q13]*-1;[$Analítico_Deriv.$Q13])" office:value-type="float" office:value="1.8" calcext:value-type="float">
            <text:p>1,80</text:p>
          </table:table-cell>
          <table:table-cell office:value-type="string" calcext:value-type="string">
            <text:p>CBOT</text:p>
          </table:table-cell>
          <table:table-cell office:value-type="string" calcext:value-type="string">
            <text:p>ZSQ6</text:p>
          </table:table-cell>
          <table:table-cell table:style-name="ce127" office:value-type="float" office:value="11.815" calcext:value-type="float">
            <text:p>11,8150</text:p>
          </table:table-cell>
          <table:table-cell table:style-name="ce5" office:value-type="date" office:date-value="2026-08-14" calcext:value-type="date">
            <text:p>14/8/2026</text:p>
          </table:table-cell>
          <table:table-cell table:style-name="ce5" office:value-type="date" office:date-value="2026-07-31" calcext:value-type="date">
            <text:p>31/7/2026</text:p>
          </table:table-cell>
          <table:table-cell table:formula="of:=IF([$Analítico_Deriv.$AD13]=&quot;Dolar BMF&quot;;&quot;PREENCHER&quot;;IF([$Analítico_Deriv.$AD13]=&quot;SOJA CBOT&quot;;[$Analítico_Deriv.$R13]*5000*[$Analítico_Deriv.$U13];IF([$Analítico_Deriv.$AD13]=&quot;MILHO CBOT&quot;;[$Analítico_Deriv.$R13]*5000*[$Analítico_Deriv.$U13];IF([$Analítico_Deriv.$AD13]=&quot;MILHO BMF&quot;;0;&quot;VALIDAR&quot;))))" office:value-type="float" office:value="106335" calcext:value-type="float">
            <text:p>106.335,00</text:p>
          </table:table-cell>
          <table:table-cell table:formula="of:=IF([$Analítico_Deriv.$C13]=&quot;Vigente&quot;;IF([$Analítico_Deriv.$AD13]=&quot;Soja CBOT&quot;;[$Analítico_Deriv.$X13]*-1;IF([$Analítico_Deriv.$AD13]=&quot;Milho CBOT&quot;;[$Analítico_Deriv.$X13]*-1;IF([$Analítico_Deriv.$AD13]=&quot;Milho BMF&quot;;0;IF([$Analítico_Deriv.$AD13]=&quot;Dolar BMF&quot;;[$Analítico_Deriv.$X13]))));0)" office:value-type="float" office:value="0" calcext:value-type="float">
            <text:p>0,00</text:p>
          </table:table-cell>
          <table:table-cell table:formula="of:=COM.MICROSOFT.XLOOKUP([$Analítico_Deriv.$T13];[$Preços_MTM.C:.C];[$Preços_MTM.D:.D];COM.MICROSOFT.XLOOKUP([$Analítico_Deriv.$T13];[$Preços_MTM.H:.H];[$Preços_MTM.I:.I]))" office:value-type="float" office:value="11.225" calcext:value-type="float">
            <text:p>11,2250</text:p>
          </table:table-cell>
          <table:table-cell table:formula="of:=IF([$Analítico_Deriv.$C13]=&quot;Vigente&quot;;IF([$Analítico_Deriv.$S13]=&quot;CBOT&quot;;([$Analítico_Deriv.$Z13]-[$Analítico_Deriv.$U13])*5000*[$Analítico_Deriv.$R13];IF([$Analítico_Deriv.$S13]=&quot;BMF&quot;;[$Analítico_Deriv.$AB13]/[$Preços_MTM.$I$4];&quot;VERIFICAR&quot;));0)" office:value-type="float" office:value="0" calcext:value-type="float">
            <text:p>0,00</text:p>
          </table:table-cell>
          <table:table-cell table:formula="of:=IF([$Analítico_Deriv.$C13]=&quot;Vigente&quot;;(IF([$Analítico_Deriv.$S13]=&quot;BMF&quot;;([$Analítico_Deriv.$Z13]-[$Analítico_Deriv.$U13])*450*[$Analítico_Deriv.$R13];IF([$Analítico_Deriv.$S13]=&quot;CBOT&quot;;[$Analítico_Deriv.$AA13]*[$Preços_MTM.$I$4];&quot;VERIFICAR&quot;)))+[$Analítico_Deriv.$AC13];0)" office:value-type="float" office:value="0" calcext:value-type="float">
            <text:p>0,00</text:p>
          </table:table-cell>
          <table:table-cell table:style-name="ce140" table:formula="of:=IF([$Analítico_Deriv.$C13]=&quot;Vigente&quot;;IF([$Analítico_Deriv.$AD13]=&quot;DOLAR BMF&quot;;([$Analítico_Deriv.$Z13]-[$Analítico_Deriv.$U13])*[$Analítico_Deriv.$X13];0);0)" office:value-type="float" office:value="0" calcext:value-type="float">
            <text:p>0,00</text:p>
          </table:table-cell>
          <table:table-cell table:style-name="ce33" table:formula="of:=COM.MICROSOFT.CONCAT([$Analítico_Deriv.$D13];&quot; &quot;;[$Analítico_Deriv.$S13])" office:value-type="string" office:string-value="Soja CBOT" calcext:value-type="string">
            <text:p>Soja CBOT</text:p>
          </table:table-cell>
          <table:table-cell table:formula="of:=IF([$Analítico_Deriv.$AD13]=&quot;DOLAR BMF&quot;;0;(COM.MICROSOFT.XLOOKUP([$Analítico_Deriv.$AD13];[$dms.D:.D];[$dms.E:.E]))*[$Analítico_Deriv.$R13])" office:value-type="float" office:value="244940.4" calcext:value-type="float">
            <text:p>244.940</text:p>
          </table:table-cell>
          <table:table-cell table:formula="of:=[$Analítico_Deriv.$AE13]/1000" office:value-type="float" office:value="244.9404" calcext:value-type="float">
            <text:p>245</text:p>
          </table:table-cell>
          <table:table-cell table:style-name="ce33" table:formula="of:=COM.MICROSOFT.XLOOKUP([$Analítico_Deriv.$V13];[$dms.J:.J];[$dms.L:.L])" office:value-type="string" office:string-value="Ago" calcext:value-type="string">
            <text:p>Ago</text:p>
          </table:table-cell>
          <table:table-cell table:style-name="ce33" table:formula="of:=COM.MICROSOFT.XLOOKUP([$Analítico_Deriv.$V13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3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3]+([$Analítico_Deriv.$AJ13]*[$Analítico_Deriv.$Z13])" office:value-type="float" office:value="11.225" calcext:value-type="float">
            <text:p>11,225</text:p>
          </table:table-cell>
          <table:table-cell table:formula="of:=IF([$Analítico_Deriv.$C13]=&quot;Vigente&quot;;IF([$Analítico_Deriv.$S13]=&quot;CBOT&quot;;([$Analítico_Deriv.$AK13]-[$Analítico_Deriv.$U13])*5000*[$Analítico_Deriv.$R13];IF([$Analítico_Deriv.$S13]=&quot;BMF&quot;;[$Analítico_Deriv.$AM13]/[$Preços_MTM.$I$4];&quot;VERIFICAR&quot;));0)" office:value-type="float" office:value="0" calcext:value-type="float">
            <text:p>0,00</text:p>
          </table:table-cell>
          <table:table-cell table:formula="of:=IF([$Analítico_Deriv.$C13]=&quot;Vigente&quot;;(IF([$Analítico_Deriv.$S13]=&quot;BMF&quot;;([$Analítico_Deriv.$AK13]-[$Analítico_Deriv.$U13])*450*[$Analítico_Deriv.$R13];IF([$Analítico_Deriv.$S13]=&quot;CBOT&quot;;[$Analítico_Deriv.$AL13]*[$Preços_MTM.$I$4];&quot;VERIFICAR&quot;)))+[$Analítico_Deriv.$AN13];0)" office:value-type="float" office:value="0" calcext:value-type="float">
            <text:p>0,00</text:p>
          </table:table-cell>
          <table:table-cell table:style-name="ce33" table:formula="of:=IF([$Analítico_Deriv.$C13]=&quot;Vigente&quot;;IF([$Analítico_Deriv.$AD13]=&quot;DOLAR BMF&quot;;([$Analítico_Deriv.$AK13]-[$Analítico_Deriv.$U13])*[$Analítico_Deriv.$X13];0);0)" office:value-type="float" office:value="0" calcext:value-type="float">
            <text:p>0</text:p>
          </table:table-cell>
          <table:table-cell table:formula="of:=IF([$Analítico_Deriv.$I13]=&quot;Vigente&quot;;IF([$Analítico_Deriv.$AD13]=&quot;Soja CBOT&quot;;[$Analítico_Deriv.$X13]*-1;IF([$Analítico_Deriv.$AD13]=&quot;Milho CBOT&quot;;[$Analítico_Deriv.$X13]*-1;IF([$Analítico_Deriv.$AD13]=&quot;Milho BMF&quot;;0;IF([$Analítico_Deriv.$AD13]=&quot;Dolar BMF&quot;;[$Analítico_Deriv.$X13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3];[$dms.J:.J];[$dms.L:.L]);&quot;&quot;)">
            <text:p/>
          </table:table-cell>
          <table:table-cell table:style-name="ce23" table:formula="of:=IFERROR(COM.MICROSOFT.XLOOKUP([$Analítico_Deriv.$B13];[$dms.J:.J];[$dms.M:.M]);&quot;&quot;)">
            <text:p/>
          </table:table-cell>
          <table:table-cell table:style-name="ce23" table:formula="of:=COM.MICROSOFT.XLOOKUP([$Analítico_Deriv.$W13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3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</text:p>
          </table:table-cell>
          <table:table-cell table:style-name="ce5" office:value-type="date" office:date-value="2026-06-05" calcext:value-type="date">
            <text:p>5/6/2026</text:p>
          </table:table-cell>
          <table:table-cell table:style-name="ce131" office:value-type="string" calcext:value-type="string">
            <text:p>Liquidado</text:p>
          </table:table-cell>
          <table:table-cell table:number-columns-repeated="2"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Saída</text:p>
          </table:table-cell>
          <table:table-cell office:value-type="string" calcext:value-type="string">
            <text:p>F2; F3; F4; F5; F6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10738696E</text:p>
          </table:table-cell>
          <table:table-cell table:style-name="ce5" office:value-type="string" calcext:value-type="string">
            <text:p>26F00546742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Compr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Compra</text:p>
          </table:table-cell>
          <table:table-cell table:style-name="ce23" office:value-type="float" office:value="3.68" calcext:value-type="float">
            <text:p>3,68</text:p>
          </table:table-cell>
          <table:table-cell table:style-name="ce135" table:formula="of:=IF([$Analítico_Deriv.$P14]=&quot;VENDA&quot;;[$Analítico_Deriv.$Q14]*-1;[$Analítico_Deriv.$Q14])" office:value-type="float" office:value="3.68" calcext:value-type="float">
            <text:p>3,68</text:p>
          </table:table-cell>
          <table:table-cell office:value-type="string" calcext:value-type="string">
            <text:p>CBOT</text:p>
          </table:table-cell>
          <table:table-cell office:value-type="string" calcext:value-type="string">
            <text:p>ZSQ6</text:p>
          </table:table-cell>
          <table:table-cell table:style-name="ce127" office:value-type="float" office:value="11.3305" calcext:value-type="float">
            <text:p>11,3305</text:p>
          </table:table-cell>
          <table:table-cell table:style-name="ce5" office:value-type="date" office:date-value="2026-08-14" calcext:value-type="date">
            <text:p>14/8/2026</text:p>
          </table:table-cell>
          <table:table-cell table:style-name="ce5" office:value-type="date" office:date-value="2026-07-31" calcext:value-type="date">
            <text:p>31/7/2026</text:p>
          </table:table-cell>
          <table:table-cell table:formula="of:=IF([$Analítico_Deriv.$AD14]=&quot;Dolar BMF&quot;;&quot;PREENCHER&quot;;IF([$Analítico_Deriv.$AD14]=&quot;SOJA CBOT&quot;;[$Analítico_Deriv.$R14]*5000*[$Analítico_Deriv.$U14];IF([$Analítico_Deriv.$AD14]=&quot;MILHO CBOT&quot;;[$Analítico_Deriv.$R14]*5000*[$Analítico_Deriv.$U14];IF([$Analítico_Deriv.$AD14]=&quot;MILHO BMF&quot;;0;&quot;VALIDAR&quot;))))" office:value-type="float" office:value="208481.2" calcext:value-type="float">
            <text:p>208.481,20</text:p>
          </table:table-cell>
          <table:table-cell table:formula="of:=IF([$Analítico_Deriv.$C14]=&quot;Vigente&quot;;IF([$Analítico_Deriv.$AD14]=&quot;Soja CBOT&quot;;[$Analítico_Deriv.$X14]*-1;IF([$Analítico_Deriv.$AD14]=&quot;Milho CBOT&quot;;[$Analítico_Deriv.$X14]*-1;IF([$Analítico_Deriv.$AD14]=&quot;Milho BMF&quot;;0;IF([$Analítico_Deriv.$AD14]=&quot;Dolar BMF&quot;;[$Analítico_Deriv.$X14]))));0)" office:value-type="float" office:value="0" calcext:value-type="float">
            <text:p>0,00</text:p>
          </table:table-cell>
          <table:table-cell table:formula="of:=COM.MICROSOFT.XLOOKUP([$Analítico_Deriv.$T14];[$Preços_MTM.C:.C];[$Preços_MTM.D:.D];COM.MICROSOFT.XLOOKUP([$Analítico_Deriv.$T14];[$Preços_MTM.H:.H];[$Preços_MTM.I:.I]))" office:value-type="float" office:value="11.225" calcext:value-type="float">
            <text:p>11,2250</text:p>
          </table:table-cell>
          <table:table-cell table:formula="of:=IF([$Analítico_Deriv.$C14]=&quot;Vigente&quot;;IF([$Analítico_Deriv.$S14]=&quot;CBOT&quot;;([$Analítico_Deriv.$Z14]-[$Analítico_Deriv.$U14])*5000*[$Analítico_Deriv.$R14];IF([$Analítico_Deriv.$S14]=&quot;BMF&quot;;[$Analítico_Deriv.$AB14]/[$Preços_MTM.$I$4];&quot;VERIFICAR&quot;));0)" office:value-type="float" office:value="0" calcext:value-type="float">
            <text:p>0,00</text:p>
          </table:table-cell>
          <table:table-cell table:formula="of:=IF([$Analítico_Deriv.$C14]=&quot;Vigente&quot;;(IF([$Analítico_Deriv.$S14]=&quot;BMF&quot;;([$Analítico_Deriv.$Z14]-[$Analítico_Deriv.$U14])*450*[$Analítico_Deriv.$R14];IF([$Analítico_Deriv.$S14]=&quot;CBOT&quot;;[$Analítico_Deriv.$AA14]*[$Preços_MTM.$I$4];&quot;VERIFICAR&quot;)))+[$Analítico_Deriv.$AC14];0)" office:value-type="float" office:value="0" calcext:value-type="float">
            <text:p>0,00</text:p>
          </table:table-cell>
          <table:table-cell table:formula="of:=IF([$Analítico_Deriv.$C14]=&quot;Vigente&quot;;IF([$Analítico_Deriv.$AD14]=&quot;DOLAR BMF&quot;;([$Analítico_Deriv.$Z14]-[$Analítico_Deriv.$U14])*[$Analítico_Deriv.$X14];0);0)" office:value-type="float" office:value="0" calcext:value-type="float">
            <text:p>0,00</text:p>
          </table:table-cell>
          <table:table-cell table:style-name="ce33" table:formula="of:=COM.MICROSOFT.CONCAT([$Analítico_Deriv.$D14];&quot; &quot;;[$Analítico_Deriv.$S14])" office:value-type="string" office:string-value="Soja CBOT" calcext:value-type="string">
            <text:p>Soja CBOT</text:p>
          </table:table-cell>
          <table:table-cell table:formula="of:=IF([$Analítico_Deriv.$AD14]=&quot;DOLAR BMF&quot;;0;(COM.MICROSOFT.XLOOKUP([$Analítico_Deriv.$AD14];[$dms.D:.D];[$dms.E:.E]))*[$Analítico_Deriv.$R14])" office:value-type="float" office:value="500767.04" calcext:value-type="float">
            <text:p>500.767</text:p>
          </table:table-cell>
          <table:table-cell table:formula="of:=[$Analítico_Deriv.$AE14]/1000" office:value-type="float" office:value="500.76704" calcext:value-type="float">
            <text:p>501</text:p>
          </table:table-cell>
          <table:table-cell table:style-name="ce33" table:formula="of:=COM.MICROSOFT.XLOOKUP([$Analítico_Deriv.$V14];[$dms.J:.J];[$dms.L:.L])" office:value-type="string" office:string-value="Ago" calcext:value-type="string">
            <text:p>Ago</text:p>
          </table:table-cell>
          <table:table-cell table:style-name="ce33" table:formula="of:=COM.MICROSOFT.XLOOKUP([$Analítico_Deriv.$V14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4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4]+([$Analítico_Deriv.$AJ14]*[$Analítico_Deriv.$Z14])" office:value-type="float" office:value="11.225" calcext:value-type="float">
            <text:p>11,225</text:p>
          </table:table-cell>
          <table:table-cell table:formula="of:=IF([$Analítico_Deriv.$C14]=&quot;Vigente&quot;;IF([$Analítico_Deriv.$S14]=&quot;CBOT&quot;;([$Analítico_Deriv.$AK14]-[$Analítico_Deriv.$U14])*5000*[$Analítico_Deriv.$R14];IF([$Analítico_Deriv.$S14]=&quot;BMF&quot;;[$Analítico_Deriv.$AM14]/[$Preços_MTM.$I$4];&quot;VERIFICAR&quot;));0)" office:value-type="float" office:value="0" calcext:value-type="float">
            <text:p>0,00</text:p>
          </table:table-cell>
          <table:table-cell table:formula="of:=IF([$Analítico_Deriv.$C14]=&quot;Vigente&quot;;(IF([$Analítico_Deriv.$S14]=&quot;BMF&quot;;([$Analítico_Deriv.$AK14]-[$Analítico_Deriv.$U14])*450*[$Analítico_Deriv.$R14];IF([$Analítico_Deriv.$S14]=&quot;CBOT&quot;;[$Analítico_Deriv.$AL14]*[$Preços_MTM.$I$4];&quot;VERIFICAR&quot;)))+[$Analítico_Deriv.$AN14];0)" office:value-type="float" office:value="0" calcext:value-type="float">
            <text:p>0,00</text:p>
          </table:table-cell>
          <table:table-cell table:style-name="ce33" table:formula="of:=IF([$Analítico_Deriv.$C14]=&quot;Vigente&quot;;IF([$Analítico_Deriv.$AD14]=&quot;DOLAR BMF&quot;;([$Analítico_Deriv.$AK14]-[$Analítico_Deriv.$U14])*[$Analítico_Deriv.$X14];0);0)" office:value-type="float" office:value="0" calcext:value-type="float">
            <text:p>0</text:p>
          </table:table-cell>
          <table:table-cell table:formula="of:=IF([$Analítico_Deriv.$I14]=&quot;Vigente&quot;;IF([$Analítico_Deriv.$AD14]=&quot;Soja CBOT&quot;;[$Analítico_Deriv.$X14]*-1;IF([$Analítico_Deriv.$AD14]=&quot;Milho CBOT&quot;;[$Analítico_Deriv.$X14]*-1;IF([$Analítico_Deriv.$AD14]=&quot;Milho BMF&quot;;0;IF([$Analítico_Deriv.$AD14]=&quot;Dolar BMF&quot;;[$Analítico_Deriv.$X14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4];[$dms.J:.J];[$dms.L:.L]);&quot;&quot;)">
            <text:p/>
          </table:table-cell>
          <table:table-cell table:style-name="ce23" table:formula="of:=IFERROR(COM.MICROSOFT.XLOOKUP([$Analítico_Deriv.$B14];[$dms.J:.J];[$dms.M:.M]);&quot;&quot;)">
            <text:p/>
          </table:table-cell>
          <table:table-cell table:style-name="ce23" table:formula="of:=COM.MICROSOFT.XLOOKUP([$Analítico_Deriv.$W14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4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</text:p>
          </table:table-cell>
          <table:table-cell table:style-name="ce5" office:value-type="date" office:date-value="2026-02-11" calcext:value-type="date">
            <text:p>11/2/2026</text:p>
          </table:table-cell>
          <table:table-cell table:style-name="ce131" office:value-type="string" calcext:value-type="string">
            <text:p>Liquidado</text:p>
          </table:table-cell>
          <table:table-cell table:style-name="ce5" office:value-type="string" calcext:value-type="string">
            <text:p>Dolar</text:p>
          </table:table-cell>
          <table:table-cell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 office:value-type="string" calcext:value-type="string">
            <text:p>F1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45708069</text:p>
          </table:table-cell>
          <table:table-cell table:style-name="ce5" office:value-type="string" calcext:value-type="string">
            <text:p>26B03011734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" calcext:value-type="float">
            <text:p>0,00</text:p>
          </table:table-cell>
          <table:table-cell table:style-name="ce135" table:formula="of:=IF([$Analítico_Deriv.$P15]=&quot;VENDA&quot;;[$Analítico_Deriv.$Q15]*-1;[$Analítico_Deriv.$Q15])" office:value-type="float" office:value="0" calcext:value-type="float">
            <text:p>0,00</text:p>
          </table:table-cell>
          <table:table-cell office:value-type="string" calcext:value-type="string">
            <text:p>BMF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27" office:value-type="float" office:value="5.3206" calcext:value-type="float">
            <text:p>5,3206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5" office:value-type="date" office:date-value="2026-07-02" calcext:value-type="date">
            <text:p>2/7/2026</text:p>
          </table:table-cell>
          <table:table-cell office:value-type="float" office:value="-81000" calcext:value-type="float">
            <text:p>-81.000,00</text:p>
          </table:table-cell>
          <table:table-cell table:formula="of:=IF([$Analítico_Deriv.$C15]=&quot;Vigente&quot;;IF([$Analítico_Deriv.$AD15]=&quot;Soja CBOT&quot;;[$Analítico_Deriv.$X15]*-1;IF([$Analítico_Deriv.$AD15]=&quot;Milho CBOT&quot;;[$Analítico_Deriv.$X15]*-1;IF([$Analítico_Deriv.$AD15]=&quot;Milho BMF&quot;;0;IF([$Analítico_Deriv.$AD15]=&quot;Dolar BMF&quot;;[$Analítico_Deriv.$X15]))));0)" office:value-type="float" office:value="0" calcext:value-type="float">
            <text:p>0,00</text:p>
          </table:table-cell>
          <table:table-cell table:formula="of:=COM.MICROSOFT.XLOOKUP([$Analítico_Deriv.$T15];[$Preços_MTM.C:.C];[$Preços_MTM.D:.D];COM.MICROSOFT.XLOOKUP([$Analítico_Deriv.$T15];[$Preços_MTM.H:.H];[$Preços_MTM.I:.I]))" office:value-type="float" office:value="5.1766" calcext:value-type="float">
            <text:p>5,1766</text:p>
          </table:table-cell>
          <table:table-cell table:formula="of:=IF([$Analítico_Deriv.$C15]=&quot;Vigente&quot;;IF([$Analítico_Deriv.$S15]=&quot;CBOT&quot;;([$Analítico_Deriv.$Z15]-[$Analítico_Deriv.$U15])*5000*[$Analítico_Deriv.$R15];IF([$Analítico_Deriv.$S15]=&quot;BMF&quot;;[$Analítico_Deriv.$AB15]/[$Preços_MTM.$I$4];&quot;VERIFICAR&quot;));0)" office:value-type="float" office:value="0" calcext:value-type="float">
            <text:p>0,00</text:p>
          </table:table-cell>
          <table:table-cell table:formula="of:=IF([$Analítico_Deriv.$C15]=&quot;Vigente&quot;;(IF([$Analítico_Deriv.$S15]=&quot;BMF&quot;;([$Analítico_Deriv.$Z15]-[$Analítico_Deriv.$U15])*450*[$Analítico_Deriv.$R15];IF([$Analítico_Deriv.$S15]=&quot;CBOT&quot;;[$Analítico_Deriv.$AA15]*[$Preços_MTM.$I$4];&quot;VERIFICAR&quot;)))+[$Analítico_Deriv.$AC15];0)" office:value-type="float" office:value="0" calcext:value-type="float">
            <text:p>0,00</text:p>
          </table:table-cell>
          <table:table-cell table:formula="of:=IF([$Analítico_Deriv.$C15]=&quot;Vigente&quot;;IF([$Analítico_Deriv.$AD15]=&quot;DOLAR BMF&quot;;([$Analítico_Deriv.$Z15]-[$Analítico_Deriv.$U15])*[$Analítico_Deriv.$X15];0);0)" office:value-type="float" office:value="0" calcext:value-type="float">
            <text:p>0,00</text:p>
          </table:table-cell>
          <table:table-cell table:style-name="ce33" table:formula="of:=COM.MICROSOFT.CONCAT([$Analítico_Deriv.$D15];&quot; &quot;;[$Analítico_Deriv.$S15])" office:value-type="string" office:string-value="Dolar BMF" calcext:value-type="string">
            <text:p>Dolar BMF</text:p>
          </table:table-cell>
          <table:table-cell table:formula="of:=IF([$Analítico_Deriv.$AD15]=&quot;DOLAR BMF&quot;;0;(COM.MICROSOFT.XLOOKUP([$Analítico_Deriv.$AD15];[$dms.D:.D];[$dms.E:.E]))*[$Analítico_Deriv.$R15])" office:value-type="float" office:value="0" calcext:value-type="float">
            <text:p>0</text:p>
          </table:table-cell>
          <table:table-cell table:formula="of:=[$Analítico_Deriv.$AE15]/1000" office:value-type="float" office:value="0" calcext:value-type="float">
            <text:p>0</text:p>
          </table:table-cell>
          <table:table-cell table:style-name="ce33" table:formula="of:=COM.MICROSOFT.XLOOKUP([$Analítico_Deriv.$V15];[$dms.J:.J];[$dms.L:.L])" office:value-type="string" office:string-value="Jun" calcext:value-type="string">
            <text:p>Jun</text:p>
          </table:table-cell>
          <table:table-cell table:style-name="ce33" table:formula="of:=COM.MICROSOFT.XLOOKUP([$Analítico_Deriv.$V15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5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5]+([$Analítico_Deriv.$AJ15]*[$Analítico_Deriv.$Z15])" office:value-type="float" office:value="5.1766" calcext:value-type="float">
            <text:p>5,1766</text:p>
          </table:table-cell>
          <table:table-cell table:formula="of:=IF([$Analítico_Deriv.$C15]=&quot;Vigente&quot;;IF([$Analítico_Deriv.$S15]=&quot;CBOT&quot;;([$Analítico_Deriv.$AK15]-[$Analítico_Deriv.$U15])*5000*[$Analítico_Deriv.$R15];IF([$Analítico_Deriv.$S15]=&quot;BMF&quot;;[$Analítico_Deriv.$AM15]/[$Preços_MTM.$I$4];&quot;VERIFICAR&quot;));0)" office:value-type="float" office:value="0" calcext:value-type="float">
            <text:p>0,00</text:p>
          </table:table-cell>
          <table:table-cell table:formula="of:=IF([$Analítico_Deriv.$C15]=&quot;Vigente&quot;;(IF([$Analítico_Deriv.$S15]=&quot;BMF&quot;;([$Analítico_Deriv.$AK15]-[$Analítico_Deriv.$U15])*450*[$Analítico_Deriv.$R15];IF([$Analítico_Deriv.$S15]=&quot;CBOT&quot;;[$Analítico_Deriv.$AL15]*[$Preços_MTM.$I$4];&quot;VERIFICAR&quot;)))+[$Analítico_Deriv.$AN15];0)" office:value-type="float" office:value="0" calcext:value-type="float">
            <text:p>0,00</text:p>
          </table:table-cell>
          <table:table-cell table:style-name="ce33" table:formula="of:=IF([$Analítico_Deriv.$C15]=&quot;Vigente&quot;;IF([$Analítico_Deriv.$AD15]=&quot;DOLAR BMF&quot;;([$Analítico_Deriv.$AK15]-[$Analítico_Deriv.$U15])*[$Analítico_Deriv.$X15];0);0)" office:value-type="float" office:value="0" calcext:value-type="float">
            <text:p>0</text:p>
          </table:table-cell>
          <table:table-cell table:formula="of:=IF([$Analítico_Deriv.$I15]=&quot;Vigente&quot;;IF([$Analítico_Deriv.$AD15]=&quot;Soja CBOT&quot;;[$Analítico_Deriv.$X15]*-1;IF([$Analítico_Deriv.$AD15]=&quot;Milho CBOT&quot;;[$Analítico_Deriv.$X15]*-1;IF([$Analítico_Deriv.$AD15]=&quot;Milho BMF&quot;;0;IF([$Analítico_Deriv.$AD15]=&quot;Dolar BMF&quot;;[$Analítico_Deriv.$X15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5];[$dms.J:.J];[$dms.L:.L]);&quot;&quot;)">
            <text:p/>
          </table:table-cell>
          <table:table-cell table:style-name="ce23" table:formula="of:=IFERROR(COM.MICROSOFT.XLOOKUP([$Analítico_Deriv.$B15];[$dms.J:.J];[$dms.M:.M]);&quot;&quot;)">
            <text:p/>
          </table:table-cell>
          <table:table-cell table:style-name="ce23" table:formula="of:=COM.MICROSOFT.XLOOKUP([$Analítico_Deriv.$W15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5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</text:p>
          </table:table-cell>
          <table:table-cell table:style-name="ce5" office:value-type="date" office:date-value="2026-02-12" calcext:value-type="date">
            <text:p>12/2/2026</text:p>
          </table:table-cell>
          <table:table-cell table:style-name="ce131" office:value-type="string" calcext:value-type="string">
            <text:p>Liquidado</text:p>
          </table:table-cell>
          <table:table-cell table:style-name="ce5" office:value-type="string" calcext:value-type="string">
            <text:p>Dolar</text:p>
          </table:table-cell>
          <table:table-cell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 office:value-type="string" calcext:value-type="string">
            <text:p>F2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45764188</text:p>
          </table:table-cell>
          <table:table-cell table:style-name="ce5" office:value-type="string" calcext:value-type="string">
            <text:p>26B03146718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" calcext:value-type="float">
            <text:p>0,00</text:p>
          </table:table-cell>
          <table:table-cell table:style-name="ce135" table:formula="of:=IF([$Analítico_Deriv.$P16]=&quot;VENDA&quot;;[$Analítico_Deriv.$Q16]*-1;[$Analítico_Deriv.$Q16])" office:value-type="float" office:value="0" calcext:value-type="float">
            <text:p>0,00</text:p>
          </table:table-cell>
          <table:table-cell office:value-type="string" calcext:value-type="string">
            <text:p>BMF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27" office:value-type="float" office:value="5.3401" calcext:value-type="float">
            <text:p>5,3401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5" office:value-type="date" office:date-value="2026-07-02" calcext:value-type="date">
            <text:p>2/7/2026</text:p>
          </table:table-cell>
          <table:table-cell office:value-type="float" office:value="-39330" calcext:value-type="float">
            <text:p>-39.330,00</text:p>
          </table:table-cell>
          <table:table-cell table:formula="of:=IF([$Analítico_Deriv.$C16]=&quot;Vigente&quot;;IF([$Analítico_Deriv.$AD16]=&quot;Soja CBOT&quot;;[$Analítico_Deriv.$X16]*-1;IF([$Analítico_Deriv.$AD16]=&quot;Milho CBOT&quot;;[$Analítico_Deriv.$X16]*-1;IF([$Analítico_Deriv.$AD16]=&quot;Milho BMF&quot;;0;IF([$Analítico_Deriv.$AD16]=&quot;Dolar BMF&quot;;[$Analítico_Deriv.$X16]))));0)" office:value-type="float" office:value="0" calcext:value-type="float">
            <text:p>0,00</text:p>
          </table:table-cell>
          <table:table-cell table:formula="of:=COM.MICROSOFT.XLOOKUP([$Analítico_Deriv.$T16];[$Preços_MTM.C:.C];[$Preços_MTM.D:.D];COM.MICROSOFT.XLOOKUP([$Analítico_Deriv.$T16];[$Preços_MTM.H:.H];[$Preços_MTM.I:.I]))" office:value-type="float" office:value="5.1766" calcext:value-type="float">
            <text:p>5,1766</text:p>
          </table:table-cell>
          <table:table-cell table:formula="of:=IF([$Analítico_Deriv.$C16]=&quot;Vigente&quot;;IF([$Analítico_Deriv.$S16]=&quot;CBOT&quot;;([$Analítico_Deriv.$Z16]-[$Analítico_Deriv.$U16])*5000*[$Analítico_Deriv.$R16];IF([$Analítico_Deriv.$S16]=&quot;BMF&quot;;[$Analítico_Deriv.$AB16]/[$Preços_MTM.$I$4];&quot;VERIFICAR&quot;));0)" office:value-type="float" office:value="0" calcext:value-type="float">
            <text:p>0,00</text:p>
          </table:table-cell>
          <table:table-cell table:formula="of:=IF([$Analítico_Deriv.$C16]=&quot;Vigente&quot;;(IF([$Analítico_Deriv.$S16]=&quot;BMF&quot;;([$Analítico_Deriv.$Z16]-[$Analítico_Deriv.$U16])*450*[$Analítico_Deriv.$R16];IF([$Analítico_Deriv.$S16]=&quot;CBOT&quot;;[$Analítico_Deriv.$AA16]*[$Preços_MTM.$I$4];&quot;VERIFICAR&quot;)))+[$Analítico_Deriv.$AC16];0)" office:value-type="float" office:value="0" calcext:value-type="float">
            <text:p>0,00</text:p>
          </table:table-cell>
          <table:table-cell table:formula="of:=IF([$Analítico_Deriv.$C16]=&quot;Vigente&quot;;IF([$Analítico_Deriv.$AD16]=&quot;DOLAR BMF&quot;;([$Analítico_Deriv.$Z16]-[$Analítico_Deriv.$U16])*[$Analítico_Deriv.$X16];0);0)" office:value-type="float" office:value="0" calcext:value-type="float">
            <text:p>0,00</text:p>
          </table:table-cell>
          <table:table-cell table:style-name="ce33" table:formula="of:=COM.MICROSOFT.CONCAT([$Analítico_Deriv.$D16];&quot; &quot;;[$Analítico_Deriv.$S16])" office:value-type="string" office:string-value="Dolar BMF" calcext:value-type="string">
            <text:p>Dolar BMF</text:p>
          </table:table-cell>
          <table:table-cell table:formula="of:=IF([$Analítico_Deriv.$AD16]=&quot;DOLAR BMF&quot;;0;(COM.MICROSOFT.XLOOKUP([$Analítico_Deriv.$AD16];[$dms.D:.D];[$dms.E:.E]))*[$Analítico_Deriv.$R16])" office:value-type="float" office:value="0" calcext:value-type="float">
            <text:p>0</text:p>
          </table:table-cell>
          <table:table-cell table:formula="of:=[$Analítico_Deriv.$AE16]/1000" office:value-type="float" office:value="0" calcext:value-type="float">
            <text:p>0</text:p>
          </table:table-cell>
          <table:table-cell table:style-name="ce33" table:formula="of:=COM.MICROSOFT.XLOOKUP([$Analítico_Deriv.$V16];[$dms.J:.J];[$dms.L:.L])" office:value-type="string" office:string-value="Jun" calcext:value-type="string">
            <text:p>Jun</text:p>
          </table:table-cell>
          <table:table-cell table:style-name="ce33" table:formula="of:=COM.MICROSOFT.XLOOKUP([$Analítico_Deriv.$V16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6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6]+([$Analítico_Deriv.$AJ16]*[$Analítico_Deriv.$Z16])" office:value-type="float" office:value="5.1766" calcext:value-type="float">
            <text:p>5,1766</text:p>
          </table:table-cell>
          <table:table-cell table:formula="of:=IF([$Analítico_Deriv.$C16]=&quot;Vigente&quot;;IF([$Analítico_Deriv.$S16]=&quot;CBOT&quot;;([$Analítico_Deriv.$AK16]-[$Analítico_Deriv.$U16])*5000*[$Analítico_Deriv.$R16];IF([$Analítico_Deriv.$S16]=&quot;BMF&quot;;[$Analítico_Deriv.$AM16]/[$Preços_MTM.$I$4];&quot;VERIFICAR&quot;));0)" office:value-type="float" office:value="0" calcext:value-type="float">
            <text:p>0,00</text:p>
          </table:table-cell>
          <table:table-cell table:formula="of:=IF([$Analítico_Deriv.$C16]=&quot;Vigente&quot;;(IF([$Analítico_Deriv.$S16]=&quot;BMF&quot;;([$Analítico_Deriv.$AK16]-[$Analítico_Deriv.$U16])*450*[$Analítico_Deriv.$R16];IF([$Analítico_Deriv.$S16]=&quot;CBOT&quot;;[$Analítico_Deriv.$AL16]*[$Preços_MTM.$I$4];&quot;VERIFICAR&quot;)))+[$Analítico_Deriv.$AN16];0)" office:value-type="float" office:value="0" calcext:value-type="float">
            <text:p>0,00</text:p>
          </table:table-cell>
          <table:table-cell table:style-name="ce33" table:formula="of:=IF([$Analítico_Deriv.$C16]=&quot;Vigente&quot;;IF([$Analítico_Deriv.$AD16]=&quot;DOLAR BMF&quot;;([$Analítico_Deriv.$AK16]-[$Analítico_Deriv.$U16])*[$Analítico_Deriv.$X16];0);0)" office:value-type="float" office:value="0" calcext:value-type="float">
            <text:p>0</text:p>
          </table:table-cell>
          <table:table-cell table:formula="of:=IF([$Analítico_Deriv.$I16]=&quot;Vigente&quot;;IF([$Analítico_Deriv.$AD16]=&quot;Soja CBOT&quot;;[$Analítico_Deriv.$X16]*-1;IF([$Analítico_Deriv.$AD16]=&quot;Milho CBOT&quot;;[$Analítico_Deriv.$X16]*-1;IF([$Analítico_Deriv.$AD16]=&quot;Milho BMF&quot;;0;IF([$Analítico_Deriv.$AD16]=&quot;Dolar BMF&quot;;[$Analítico_Deriv.$X16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6];[$dms.J:.J];[$dms.L:.L]);&quot;&quot;)">
            <text:p/>
          </table:table-cell>
          <table:table-cell table:style-name="ce23" table:formula="of:=IFERROR(COM.MICROSOFT.XLOOKUP([$Analítico_Deriv.$B16];[$dms.J:.J];[$dms.M:.M]);&quot;&quot;)">
            <text:p/>
          </table:table-cell>
          <table:table-cell table:style-name="ce23" table:formula="of:=COM.MICROSOFT.XLOOKUP([$Analítico_Deriv.$W16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6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</text:p>
          </table:table-cell>
          <table:table-cell table:style-name="ce5" office:value-type="date" office:date-value="2026-02-13" calcext:value-type="date">
            <text:p>13/2/2026</text:p>
          </table:table-cell>
          <table:table-cell table:style-name="ce131" office:value-type="string" calcext:value-type="string">
            <text:p>Liquidado</text:p>
          </table:table-cell>
          <table:table-cell table:style-name="ce5" office:value-type="string" calcext:value-type="string">
            <text:p>Dolar</text:p>
          </table:table-cell>
          <table:table-cell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 office:value-type="string" calcext:value-type="string">
            <text:p>F3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45819506</text:p>
          </table:table-cell>
          <table:table-cell table:style-name="ce5" office:value-type="string" calcext:value-type="string">
            <text:p>26B03280607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" calcext:value-type="float">
            <text:p>0,00</text:p>
          </table:table-cell>
          <table:table-cell table:style-name="ce135" table:formula="of:=IF([$Analítico_Deriv.$P17]=&quot;VENDA&quot;;[$Analítico_Deriv.$Q17]*-1;[$Analítico_Deriv.$Q17])" office:value-type="float" office:value="0" calcext:value-type="float">
            <text:p>0,00</text:p>
          </table:table-cell>
          <table:table-cell office:value-type="string" calcext:value-type="string">
            <text:p>BMF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27" office:value-type="float" office:value="5.3628" calcext:value-type="float">
            <text:p>5,3628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5" office:value-type="date" office:date-value="2026-07-02" calcext:value-type="date">
            <text:p>2/7/2026</text:p>
          </table:table-cell>
          <table:table-cell office:value-type="float" office:value="-46650" calcext:value-type="float">
            <text:p>-46.650,00</text:p>
          </table:table-cell>
          <table:table-cell table:formula="of:=IF([$Analítico_Deriv.$C17]=&quot;Vigente&quot;;IF([$Analítico_Deriv.$AD17]=&quot;Soja CBOT&quot;;[$Analítico_Deriv.$X17]*-1;IF([$Analítico_Deriv.$AD17]=&quot;Milho CBOT&quot;;[$Analítico_Deriv.$X17]*-1;IF([$Analítico_Deriv.$AD17]=&quot;Milho BMF&quot;;0;IF([$Analítico_Deriv.$AD17]=&quot;Dolar BMF&quot;;[$Analítico_Deriv.$X17]))));0)" office:value-type="float" office:value="0" calcext:value-type="float">
            <text:p>0,00</text:p>
          </table:table-cell>
          <table:table-cell table:formula="of:=COM.MICROSOFT.XLOOKUP([$Analítico_Deriv.$T17];[$Preços_MTM.C:.C];[$Preços_MTM.D:.D];COM.MICROSOFT.XLOOKUP([$Analítico_Deriv.$T17];[$Preços_MTM.H:.H];[$Preços_MTM.I:.I]))" office:value-type="float" office:value="5.1766" calcext:value-type="float">
            <text:p>5,1766</text:p>
          </table:table-cell>
          <table:table-cell table:formula="of:=IF([$Analítico_Deriv.$C17]=&quot;Vigente&quot;;IF([$Analítico_Deriv.$S17]=&quot;CBOT&quot;;([$Analítico_Deriv.$Z17]-[$Analítico_Deriv.$U17])*5000*[$Analítico_Deriv.$R17];IF([$Analítico_Deriv.$S17]=&quot;BMF&quot;;[$Analítico_Deriv.$AB17]/[$Preços_MTM.$I$4];&quot;VERIFICAR&quot;));0)" office:value-type="float" office:value="0" calcext:value-type="float">
            <text:p>0,00</text:p>
          </table:table-cell>
          <table:table-cell table:formula="of:=IF([$Analítico_Deriv.$C17]=&quot;Vigente&quot;;(IF([$Analítico_Deriv.$S17]=&quot;BMF&quot;;([$Analítico_Deriv.$Z17]-[$Analítico_Deriv.$U17])*450*[$Analítico_Deriv.$R17];IF([$Analítico_Deriv.$S17]=&quot;CBOT&quot;;[$Analítico_Deriv.$AA17]*[$Preços_MTM.$I$4];&quot;VERIFICAR&quot;)))+[$Analítico_Deriv.$AC17];0)" office:value-type="float" office:value="0" calcext:value-type="float">
            <text:p>0,00</text:p>
          </table:table-cell>
          <table:table-cell table:formula="of:=IF([$Analítico_Deriv.$C17]=&quot;Vigente&quot;;IF([$Analítico_Deriv.$AD17]=&quot;DOLAR BMF&quot;;([$Analítico_Deriv.$Z17]-[$Analítico_Deriv.$U17])*[$Analítico_Deriv.$X17];0);0)" office:value-type="float" office:value="0" calcext:value-type="float">
            <text:p>0,00</text:p>
          </table:table-cell>
          <table:table-cell table:style-name="ce33" table:formula="of:=COM.MICROSOFT.CONCAT([$Analítico_Deriv.$D17];&quot; &quot;;[$Analítico_Deriv.$S17])" office:value-type="string" office:string-value="Dolar BMF" calcext:value-type="string">
            <text:p>Dolar BMF</text:p>
          </table:table-cell>
          <table:table-cell table:formula="of:=IF([$Analítico_Deriv.$AD17]=&quot;DOLAR BMF&quot;;0;(COM.MICROSOFT.XLOOKUP([$Analítico_Deriv.$AD17];[$dms.D:.D];[$dms.E:.E]))*[$Analítico_Deriv.$R17])" office:value-type="float" office:value="0" calcext:value-type="float">
            <text:p>0</text:p>
          </table:table-cell>
          <table:table-cell table:formula="of:=[$Analítico_Deriv.$AE17]/1000" office:value-type="float" office:value="0" calcext:value-type="float">
            <text:p>0</text:p>
          </table:table-cell>
          <table:table-cell table:style-name="ce33" table:formula="of:=COM.MICROSOFT.XLOOKUP([$Analítico_Deriv.$V17];[$dms.J:.J];[$dms.L:.L])" office:value-type="string" office:string-value="Jun" calcext:value-type="string">
            <text:p>Jun</text:p>
          </table:table-cell>
          <table:table-cell table:style-name="ce33" table:formula="of:=COM.MICROSOFT.XLOOKUP([$Analítico_Deriv.$V17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7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7]+([$Analítico_Deriv.$AJ17]*[$Analítico_Deriv.$Z17])" office:value-type="float" office:value="5.1766" calcext:value-type="float">
            <text:p>5,1766</text:p>
          </table:table-cell>
          <table:table-cell table:formula="of:=IF([$Analítico_Deriv.$C17]=&quot;Vigente&quot;;IF([$Analítico_Deriv.$S17]=&quot;CBOT&quot;;([$Analítico_Deriv.$AK17]-[$Analítico_Deriv.$U17])*5000*[$Analítico_Deriv.$R17];IF([$Analítico_Deriv.$S17]=&quot;BMF&quot;;[$Analítico_Deriv.$AM17]/[$Preços_MTM.$I$4];&quot;VERIFICAR&quot;));0)" office:value-type="float" office:value="0" calcext:value-type="float">
            <text:p>0,00</text:p>
          </table:table-cell>
          <table:table-cell table:formula="of:=IF([$Analítico_Deriv.$C17]=&quot;Vigente&quot;;(IF([$Analítico_Deriv.$S17]=&quot;BMF&quot;;([$Analítico_Deriv.$AK17]-[$Analítico_Deriv.$U17])*450*[$Analítico_Deriv.$R17];IF([$Analítico_Deriv.$S17]=&quot;CBOT&quot;;[$Analítico_Deriv.$AL17]*[$Preços_MTM.$I$4];&quot;VERIFICAR&quot;)))+[$Analítico_Deriv.$AN17];0)" office:value-type="float" office:value="0" calcext:value-type="float">
            <text:p>0,00</text:p>
          </table:table-cell>
          <table:table-cell table:style-name="ce33" table:formula="of:=IF([$Analítico_Deriv.$C17]=&quot;Vigente&quot;;IF([$Analítico_Deriv.$AD17]=&quot;DOLAR BMF&quot;;([$Analítico_Deriv.$AK17]-[$Analítico_Deriv.$U17])*[$Analítico_Deriv.$X17];0);0)" office:value-type="float" office:value="0" calcext:value-type="float">
            <text:p>0</text:p>
          </table:table-cell>
          <table:table-cell table:formula="of:=IF([$Analítico_Deriv.$I17]=&quot;Vigente&quot;;IF([$Analítico_Deriv.$AD17]=&quot;Soja CBOT&quot;;[$Analítico_Deriv.$X17]*-1;IF([$Analítico_Deriv.$AD17]=&quot;Milho CBOT&quot;;[$Analítico_Deriv.$X17]*-1;IF([$Analítico_Deriv.$AD17]=&quot;Milho BMF&quot;;0;IF([$Analítico_Deriv.$AD17]=&quot;Dolar BMF&quot;;[$Analítico_Deriv.$X17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7];[$dms.J:.J];[$dms.L:.L]);&quot;&quot;)">
            <text:p/>
          </table:table-cell>
          <table:table-cell table:style-name="ce23" table:formula="of:=IFERROR(COM.MICROSOFT.XLOOKUP([$Analítico_Deriv.$B17];[$dms.J:.J];[$dms.M:.M]);&quot;&quot;)">
            <text:p/>
          </table:table-cell>
          <table:table-cell table:style-name="ce23" table:formula="of:=COM.MICROSOFT.XLOOKUP([$Analítico_Deriv.$W17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7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</text:p>
          </table:table-cell>
          <table:table-cell table:style-name="ce5" office:value-type="date" office:date-value="2026-03-03" calcext:value-type="date">
            <text:p>3/3/2026</text:p>
          </table:table-cell>
          <table:table-cell table:style-name="ce131" office:value-type="string" calcext:value-type="string">
            <text:p>Liquidado</text:p>
          </table:table-cell>
          <table:table-cell table:style-name="ce5" office:value-type="string" calcext:value-type="string">
            <text:p>Dolar</text:p>
          </table:table-cell>
          <table:table-cell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 office:value-type="string" calcext:value-type="string">
            <text:p>F4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46534554</text:p>
          </table:table-cell>
          <table:table-cell table:style-name="ce5" office:value-type="string" calcext:value-type="string">
            <text:p>26C00406241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" calcext:value-type="float">
            <text:p>0,00</text:p>
          </table:table-cell>
          <table:table-cell table:style-name="ce135" table:formula="of:=IF([$Analítico_Deriv.$P18]=&quot;VENDA&quot;;[$Analítico_Deriv.$Q18]*-1;[$Analítico_Deriv.$Q18])" office:value-type="float" office:value="0" calcext:value-type="float">
            <text:p>0,00</text:p>
          </table:table-cell>
          <table:table-cell office:value-type="string" calcext:value-type="string">
            <text:p>BMF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27" office:value-type="float" office:value="5.4201" calcext:value-type="float">
            <text:p>5,4201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5" office:value-type="date" office:date-value="2026-07-02" calcext:value-type="date">
            <text:p>2/7/2026</text:p>
          </table:table-cell>
          <table:table-cell office:value-type="float" office:value="-16721" calcext:value-type="float">
            <text:p>-16.721,00</text:p>
          </table:table-cell>
          <table:table-cell table:formula="of:=IF([$Analítico_Deriv.$C18]=&quot;Vigente&quot;;IF([$Analítico_Deriv.$AD18]=&quot;Soja CBOT&quot;;[$Analítico_Deriv.$X18]*-1;IF([$Analítico_Deriv.$AD18]=&quot;Milho CBOT&quot;;[$Analítico_Deriv.$X18]*-1;IF([$Analítico_Deriv.$AD18]=&quot;Milho BMF&quot;;0;IF([$Analítico_Deriv.$AD18]=&quot;Dolar BMF&quot;;[$Analítico_Deriv.$X18]))));0)" office:value-type="float" office:value="0" calcext:value-type="float">
            <text:p>0,00</text:p>
          </table:table-cell>
          <table:table-cell table:formula="of:=COM.MICROSOFT.XLOOKUP([$Analítico_Deriv.$T18];[$Preços_MTM.C:.C];[$Preços_MTM.D:.D];COM.MICROSOFT.XLOOKUP([$Analítico_Deriv.$T18];[$Preços_MTM.H:.H];[$Preços_MTM.I:.I]))" office:value-type="float" office:value="5.1766" calcext:value-type="float">
            <text:p>5,1766</text:p>
          </table:table-cell>
          <table:table-cell table:formula="of:=IF([$Analítico_Deriv.$C18]=&quot;Vigente&quot;;IF([$Analítico_Deriv.$S18]=&quot;CBOT&quot;;([$Analítico_Deriv.$Z18]-[$Analítico_Deriv.$U18])*5000*[$Analítico_Deriv.$R18];IF([$Analítico_Deriv.$S18]=&quot;BMF&quot;;[$Analítico_Deriv.$AB18]/[$Preços_MTM.$I$4];&quot;VERIFICAR&quot;));0)" office:value-type="float" office:value="0" calcext:value-type="float">
            <text:p>0,00</text:p>
          </table:table-cell>
          <table:table-cell table:formula="of:=IF([$Analítico_Deriv.$C18]=&quot;Vigente&quot;;(IF([$Analítico_Deriv.$S18]=&quot;BMF&quot;;([$Analítico_Deriv.$Z18]-[$Analítico_Deriv.$U18])*450*[$Analítico_Deriv.$R18];IF([$Analítico_Deriv.$S18]=&quot;CBOT&quot;;[$Analítico_Deriv.$AA18]*[$Preços_MTM.$I$4];&quot;VERIFICAR&quot;)))+[$Analítico_Deriv.$AC18];0)" office:value-type="float" office:value="0" calcext:value-type="float">
            <text:p>0,00</text:p>
          </table:table-cell>
          <table:table-cell table:formula="of:=IF([$Analítico_Deriv.$C18]=&quot;Vigente&quot;;IF([$Analítico_Deriv.$AD18]=&quot;DOLAR BMF&quot;;([$Analítico_Deriv.$Z18]-[$Analítico_Deriv.$U18])*[$Analítico_Deriv.$X18];0);0)" office:value-type="float" office:value="0" calcext:value-type="float">
            <text:p>0,00</text:p>
          </table:table-cell>
          <table:table-cell table:style-name="ce33" table:formula="of:=COM.MICROSOFT.CONCAT([$Analítico_Deriv.$D18];&quot; &quot;;[$Analítico_Deriv.$S18])" office:value-type="string" office:string-value="Dolar BMF" calcext:value-type="string">
            <text:p>Dolar BMF</text:p>
          </table:table-cell>
          <table:table-cell table:formula="of:=IF([$Analítico_Deriv.$AD18]=&quot;DOLAR BMF&quot;;0;(COM.MICROSOFT.XLOOKUP([$Analítico_Deriv.$AD18];[$dms.D:.D];[$dms.E:.E]))*[$Analítico_Deriv.$R18])" office:value-type="float" office:value="0" calcext:value-type="float">
            <text:p>0</text:p>
          </table:table-cell>
          <table:table-cell table:formula="of:=[$Analítico_Deriv.$AE18]/1000" office:value-type="float" office:value="0" calcext:value-type="float">
            <text:p>0</text:p>
          </table:table-cell>
          <table:table-cell table:style-name="ce33" table:formula="of:=COM.MICROSOFT.XLOOKUP([$Analítico_Deriv.$V18];[$dms.J:.J];[$dms.L:.L])" office:value-type="string" office:string-value="Jun" calcext:value-type="string">
            <text:p>Jun</text:p>
          </table:table-cell>
          <table:table-cell table:style-name="ce33" table:formula="of:=COM.MICROSOFT.XLOOKUP([$Analítico_Deriv.$V18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8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8]+([$Analítico_Deriv.$AJ18]*[$Analítico_Deriv.$Z18])" office:value-type="float" office:value="5.1766" calcext:value-type="float">
            <text:p>5,1766</text:p>
          </table:table-cell>
          <table:table-cell table:formula="of:=IF([$Analítico_Deriv.$C18]=&quot;Vigente&quot;;IF([$Analítico_Deriv.$S18]=&quot;CBOT&quot;;([$Analítico_Deriv.$AK18]-[$Analítico_Deriv.$U18])*5000*[$Analítico_Deriv.$R18];IF([$Analítico_Deriv.$S18]=&quot;BMF&quot;;[$Analítico_Deriv.$AM18]/[$Preços_MTM.$I$4];&quot;VERIFICAR&quot;));0)" office:value-type="float" office:value="0" calcext:value-type="float">
            <text:p>0,00</text:p>
          </table:table-cell>
          <table:table-cell table:formula="of:=IF([$Analítico_Deriv.$C18]=&quot;Vigente&quot;;(IF([$Analítico_Deriv.$S18]=&quot;BMF&quot;;([$Analítico_Deriv.$AK18]-[$Analítico_Deriv.$U18])*450*[$Analítico_Deriv.$R18];IF([$Analítico_Deriv.$S18]=&quot;CBOT&quot;;[$Analítico_Deriv.$AL18]*[$Preços_MTM.$I$4];&quot;VERIFICAR&quot;)))+[$Analítico_Deriv.$AN18];0)" office:value-type="float" office:value="0" calcext:value-type="float">
            <text:p>0,00</text:p>
          </table:table-cell>
          <table:table-cell table:style-name="ce33" table:formula="of:=IF([$Analítico_Deriv.$C18]=&quot;Vigente&quot;;IF([$Analítico_Deriv.$AD18]=&quot;DOLAR BMF&quot;;([$Analítico_Deriv.$AK18]-[$Analítico_Deriv.$U18])*[$Analítico_Deriv.$X18];0);0)" office:value-type="float" office:value="0" calcext:value-type="float">
            <text:p>0</text:p>
          </table:table-cell>
          <table:table-cell table:formula="of:=IF([$Analítico_Deriv.$I18]=&quot;Vigente&quot;;IF([$Analítico_Deriv.$AD18]=&quot;Soja CBOT&quot;;[$Analítico_Deriv.$X18]*-1;IF([$Analítico_Deriv.$AD18]=&quot;Milho CBOT&quot;;[$Analítico_Deriv.$X18]*-1;IF([$Analítico_Deriv.$AD18]=&quot;Milho BMF&quot;;0;IF([$Analítico_Deriv.$AD18]=&quot;Dolar BMF&quot;;[$Analítico_Deriv.$X18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8];[$dms.J:.J];[$dms.L:.L]);&quot;&quot;)">
            <text:p/>
          </table:table-cell>
          <table:table-cell table:style-name="ce23" table:formula="of:=IFERROR(COM.MICROSOFT.XLOOKUP([$Analítico_Deriv.$B18];[$dms.J:.J];[$dms.M:.M]);&quot;&quot;)">
            <text:p/>
          </table:table-cell>
          <table:table-cell table:style-name="ce23" table:formula="of:=COM.MICROSOFT.XLOOKUP([$Analítico_Deriv.$W18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8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</text:p>
          </table:table-cell>
          <table:table-cell table:style-name="ce5" office:value-type="date" office:date-value="2026-03-03" calcext:value-type="date">
            <text:p>3/3/2026</text:p>
          </table:table-cell>
          <table:table-cell table:style-name="ce131" office:value-type="string" calcext:value-type="string">
            <text:p>Liquidado</text:p>
          </table:table-cell>
          <table:table-cell table:style-name="ce5" office:value-type="string" calcext:value-type="string">
            <text:p>Dolar</text:p>
          </table:table-cell>
          <table:table-cell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 office:value-type="string" calcext:value-type="string">
            <text:p>F5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46545077</text:p>
          </table:table-cell>
          <table:table-cell table:style-name="ce5" office:value-type="string" calcext:value-type="string">
            <text:p>26C00406244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" calcext:value-type="float">
            <text:p>0,00</text:p>
          </table:table-cell>
          <table:table-cell table:style-name="ce135" table:formula="of:=IF([$Analítico_Deriv.$P19]=&quot;VENDA&quot;;[$Analítico_Deriv.$Q19]*-1;[$Analítico_Deriv.$Q19])" office:value-type="float" office:value="0" calcext:value-type="float">
            <text:p>0,00</text:p>
          </table:table-cell>
          <table:table-cell office:value-type="string" calcext:value-type="string">
            <text:p>BMF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27" office:value-type="float" office:value="5.4428" calcext:value-type="float">
            <text:p>5,4428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5" office:value-type="date" office:date-value="2026-07-02" calcext:value-type="date">
            <text:p>2/7/2026</text:p>
          </table:table-cell>
          <table:table-cell office:value-type="float" office:value="-38584" calcext:value-type="float">
            <text:p>-38.584,00</text:p>
          </table:table-cell>
          <table:table-cell table:formula="of:=IF([$Analítico_Deriv.$C19]=&quot;Vigente&quot;;IF([$Analítico_Deriv.$AD19]=&quot;Soja CBOT&quot;;[$Analítico_Deriv.$X19]*-1;IF([$Analítico_Deriv.$AD19]=&quot;Milho CBOT&quot;;[$Analítico_Deriv.$X19]*-1;IF([$Analítico_Deriv.$AD19]=&quot;Milho BMF&quot;;0;IF([$Analítico_Deriv.$AD19]=&quot;Dolar BMF&quot;;[$Analítico_Deriv.$X19]))));0)" office:value-type="float" office:value="0" calcext:value-type="float">
            <text:p>0,00</text:p>
          </table:table-cell>
          <table:table-cell table:formula="of:=COM.MICROSOFT.XLOOKUP([$Analítico_Deriv.$T19];[$Preços_MTM.C:.C];[$Preços_MTM.D:.D];COM.MICROSOFT.XLOOKUP([$Analítico_Deriv.$T19];[$Preços_MTM.H:.H];[$Preços_MTM.I:.I]))" office:value-type="float" office:value="5.1766" calcext:value-type="float">
            <text:p>5,1766</text:p>
          </table:table-cell>
          <table:table-cell table:formula="of:=IF([$Analítico_Deriv.$C19]=&quot;Vigente&quot;;IF([$Analítico_Deriv.$S19]=&quot;CBOT&quot;;([$Analítico_Deriv.$Z19]-[$Analítico_Deriv.$U19])*5000*[$Analítico_Deriv.$R19];IF([$Analítico_Deriv.$S19]=&quot;BMF&quot;;[$Analítico_Deriv.$AB19]/[$Preços_MTM.$I$4];&quot;VERIFICAR&quot;));0)" office:value-type="float" office:value="0" calcext:value-type="float">
            <text:p>0,00</text:p>
          </table:table-cell>
          <table:table-cell table:formula="of:=IF([$Analítico_Deriv.$C19]=&quot;Vigente&quot;;(IF([$Analítico_Deriv.$S19]=&quot;BMF&quot;;([$Analítico_Deriv.$Z19]-[$Analítico_Deriv.$U19])*450*[$Analítico_Deriv.$R19];IF([$Analítico_Deriv.$S19]=&quot;CBOT&quot;;[$Analítico_Deriv.$AA19]*[$Preços_MTM.$I$4];&quot;VERIFICAR&quot;)))+[$Analítico_Deriv.$AC19];0)" office:value-type="float" office:value="0" calcext:value-type="float">
            <text:p>0,00</text:p>
          </table:table-cell>
          <table:table-cell table:formula="of:=IF([$Analítico_Deriv.$C19]=&quot;Vigente&quot;;IF([$Analítico_Deriv.$AD19]=&quot;DOLAR BMF&quot;;([$Analítico_Deriv.$Z19]-[$Analítico_Deriv.$U19])*[$Analítico_Deriv.$X19];0);0)" office:value-type="float" office:value="0" calcext:value-type="float">
            <text:p>0,00</text:p>
          </table:table-cell>
          <table:table-cell table:style-name="ce33" table:formula="of:=COM.MICROSOFT.CONCAT([$Analítico_Deriv.$D19];&quot; &quot;;[$Analítico_Deriv.$S19])" office:value-type="string" office:string-value="Dolar BMF" calcext:value-type="string">
            <text:p>Dolar BMF</text:p>
          </table:table-cell>
          <table:table-cell table:formula="of:=IF([$Analítico_Deriv.$AD19]=&quot;DOLAR BMF&quot;;0;(COM.MICROSOFT.XLOOKUP([$Analítico_Deriv.$AD19];[$dms.D:.D];[$dms.E:.E]))*[$Analítico_Deriv.$R19])" office:value-type="float" office:value="0" calcext:value-type="float">
            <text:p>0</text:p>
          </table:table-cell>
          <table:table-cell table:formula="of:=[$Analítico_Deriv.$AE19]/1000" office:value-type="float" office:value="0" calcext:value-type="float">
            <text:p>0</text:p>
          </table:table-cell>
          <table:table-cell table:style-name="ce33" table:formula="of:=COM.MICROSOFT.XLOOKUP([$Analítico_Deriv.$V19];[$dms.J:.J];[$dms.L:.L])" office:value-type="string" office:string-value="Jun" calcext:value-type="string">
            <text:p>Jun</text:p>
          </table:table-cell>
          <table:table-cell table:style-name="ce33" table:formula="of:=COM.MICROSOFT.XLOOKUP([$Analítico_Deriv.$V19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19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19]+([$Analítico_Deriv.$AJ19]*[$Analítico_Deriv.$Z19])" office:value-type="float" office:value="5.1766" calcext:value-type="float">
            <text:p>5,1766</text:p>
          </table:table-cell>
          <table:table-cell table:formula="of:=IF([$Analítico_Deriv.$C19]=&quot;Vigente&quot;;IF([$Analítico_Deriv.$S19]=&quot;CBOT&quot;;([$Analítico_Deriv.$AK19]-[$Analítico_Deriv.$U19])*5000*[$Analítico_Deriv.$R19];IF([$Analítico_Deriv.$S19]=&quot;BMF&quot;;[$Analítico_Deriv.$AM19]/[$Preços_MTM.$I$4];&quot;VERIFICAR&quot;));0)" office:value-type="float" office:value="0" calcext:value-type="float">
            <text:p>0,00</text:p>
          </table:table-cell>
          <table:table-cell table:formula="of:=IF([$Analítico_Deriv.$C19]=&quot;Vigente&quot;;(IF([$Analítico_Deriv.$S19]=&quot;BMF&quot;;([$Analítico_Deriv.$AK19]-[$Analítico_Deriv.$U19])*450*[$Analítico_Deriv.$R19];IF([$Analítico_Deriv.$S19]=&quot;CBOT&quot;;[$Analítico_Deriv.$AL19]*[$Preços_MTM.$I$4];&quot;VERIFICAR&quot;)))+[$Analítico_Deriv.$AN19];0)" office:value-type="float" office:value="0" calcext:value-type="float">
            <text:p>0,00</text:p>
          </table:table-cell>
          <table:table-cell table:style-name="ce33" table:formula="of:=IF([$Analítico_Deriv.$C19]=&quot;Vigente&quot;;IF([$Analítico_Deriv.$AD19]=&quot;DOLAR BMF&quot;;([$Analítico_Deriv.$AK19]-[$Analítico_Deriv.$U19])*[$Analítico_Deriv.$X19];0);0)" office:value-type="float" office:value="0" calcext:value-type="float">
            <text:p>0</text:p>
          </table:table-cell>
          <table:table-cell table:formula="of:=IF([$Analítico_Deriv.$I19]=&quot;Vigente&quot;;IF([$Analítico_Deriv.$AD19]=&quot;Soja CBOT&quot;;[$Analítico_Deriv.$X19]*-1;IF([$Analítico_Deriv.$AD19]=&quot;Milho CBOT&quot;;[$Analítico_Deriv.$X19]*-1;IF([$Analítico_Deriv.$AD19]=&quot;Milho BMF&quot;;0;IF([$Analítico_Deriv.$AD19]=&quot;Dolar BMF&quot;;[$Analítico_Deriv.$X19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19];[$dms.J:.J];[$dms.L:.L]);&quot;&quot;)">
            <text:p/>
          </table:table-cell>
          <table:table-cell table:style-name="ce23" table:formula="of:=IFERROR(COM.MICROSOFT.XLOOKUP([$Analítico_Deriv.$B19];[$dms.J:.J];[$dms.M:.M]);&quot;&quot;)">
            <text:p/>
          </table:table-cell>
          <table:table-cell table:style-name="ce23" table:formula="of:=COM.MICROSOFT.XLOOKUP([$Analítico_Deriv.$W19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19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</text:p>
          </table:table-cell>
          <table:table-cell table:style-name="ce5" office:value-type="date" office:date-value="2026-03-04" calcext:value-type="date">
            <text:p>4/3/2026</text:p>
          </table:table-cell>
          <table:table-cell table:style-name="ce131" office:value-type="string" calcext:value-type="string">
            <text:p>Liquidado</text:p>
          </table:table-cell>
          <table:table-cell table:style-name="ce5" office:value-type="string" calcext:value-type="string">
            <text:p>Dolar</text:p>
          </table:table-cell>
          <table:table-cell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Entrada</text:p>
          </table:table-cell>
          <table:table-cell office:value-type="string" calcext:value-type="string">
            <text:p>F6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46613727</text:p>
          </table:table-cell>
          <table:table-cell table:style-name="ce5" office:value-type="string" calcext:value-type="string">
            <text:p>26C01359951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0" calcext:value-type="float">
            <text:p>0,00</text:p>
          </table:table-cell>
          <table:table-cell table:style-name="ce135" table:formula="of:=IF([$Analítico_Deriv.$P20]=&quot;VENDA&quot;;[$Analítico_Deriv.$Q20]*-1;[$Analítico_Deriv.$Q20])" office:value-type="float" office:value="0" calcext:value-type="float">
            <text:p>0,00</text:p>
          </table:table-cell>
          <table:table-cell office:value-type="string" calcext:value-type="string">
            <text:p>BMF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27" office:value-type="float" office:value="5.33968" calcext:value-type="float">
            <text:p>5,3397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5" office:value-type="date" office:date-value="2026-07-02" calcext:value-type="date">
            <text:p>2/7/2026</text:p>
          </table:table-cell>
          <table:table-cell office:value-type="float" office:value="-18635" calcext:value-type="float">
            <text:p>-18.635,00</text:p>
          </table:table-cell>
          <table:table-cell table:formula="of:=IF([$Analítico_Deriv.$C20]=&quot;Vigente&quot;;IF([$Analítico_Deriv.$AD20]=&quot;Soja CBOT&quot;;[$Analítico_Deriv.$X20]*-1;IF([$Analítico_Deriv.$AD20]=&quot;Milho CBOT&quot;;[$Analítico_Deriv.$X20]*-1;IF([$Analítico_Deriv.$AD20]=&quot;Milho BMF&quot;;0;IF([$Analítico_Deriv.$AD20]=&quot;Dolar BMF&quot;;[$Analítico_Deriv.$X20]))));0)" office:value-type="float" office:value="0" calcext:value-type="float">
            <text:p>0,00</text:p>
          </table:table-cell>
          <table:table-cell table:formula="of:=COM.MICROSOFT.XLOOKUP([$Analítico_Deriv.$T20];[$Preços_MTM.C:.C];[$Preços_MTM.D:.D];COM.MICROSOFT.XLOOKUP([$Analítico_Deriv.$T20];[$Preços_MTM.H:.H];[$Preços_MTM.I:.I]))" office:value-type="float" office:value="5.1766" calcext:value-type="float">
            <text:p>5,1766</text:p>
          </table:table-cell>
          <table:table-cell table:formula="of:=IF([$Analítico_Deriv.$C20]=&quot;Vigente&quot;;IF([$Analítico_Deriv.$S20]=&quot;CBOT&quot;;([$Analítico_Deriv.$Z20]-[$Analítico_Deriv.$U20])*5000*[$Analítico_Deriv.$R20];IF([$Analítico_Deriv.$S20]=&quot;BMF&quot;;[$Analítico_Deriv.$AB20]/[$Preços_MTM.$I$4];&quot;VERIFICAR&quot;));0)" office:value-type="float" office:value="0" calcext:value-type="float">
            <text:p>0,00</text:p>
          </table:table-cell>
          <table:table-cell table:formula="of:=IF([$Analítico_Deriv.$C20]=&quot;Vigente&quot;;(IF([$Analítico_Deriv.$S20]=&quot;BMF&quot;;([$Analítico_Deriv.$Z20]-[$Analítico_Deriv.$U20])*450*[$Analítico_Deriv.$R20];IF([$Analítico_Deriv.$S20]=&quot;CBOT&quot;;[$Analítico_Deriv.$AA20]*[$Preços_MTM.$I$4];&quot;VERIFICAR&quot;)))+[$Analítico_Deriv.$AC20];0)" office:value-type="float" office:value="0" calcext:value-type="float">
            <text:p>0,00</text:p>
          </table:table-cell>
          <table:table-cell table:formula="of:=IF([$Analítico_Deriv.$C20]=&quot;Vigente&quot;;IF([$Analítico_Deriv.$AD20]=&quot;DOLAR BMF&quot;;([$Analítico_Deriv.$Z20]-[$Analítico_Deriv.$U20])*[$Analítico_Deriv.$X20];0);0)" office:value-type="float" office:value="0" calcext:value-type="float">
            <text:p>0,00</text:p>
          </table:table-cell>
          <table:table-cell table:style-name="ce33" table:formula="of:=COM.MICROSOFT.CONCAT([$Analítico_Deriv.$D20];&quot; &quot;;[$Analítico_Deriv.$S20])" office:value-type="string" office:string-value="Dolar BMF" calcext:value-type="string">
            <text:p>Dolar BMF</text:p>
          </table:table-cell>
          <table:table-cell table:formula="of:=IF([$Analítico_Deriv.$AD20]=&quot;DOLAR BMF&quot;;0;(COM.MICROSOFT.XLOOKUP([$Analítico_Deriv.$AD20];[$dms.D:.D];[$dms.E:.E]))*[$Analítico_Deriv.$R20])" office:value-type="float" office:value="0" calcext:value-type="float">
            <text:p>0</text:p>
          </table:table-cell>
          <table:table-cell table:formula="of:=[$Analítico_Deriv.$AE20]/1000" office:value-type="float" office:value="0" calcext:value-type="float">
            <text:p>0</text:p>
          </table:table-cell>
          <table:table-cell table:style-name="ce33" table:formula="of:=COM.MICROSOFT.XLOOKUP([$Analítico_Deriv.$V20];[$dms.J:.J];[$dms.L:.L])" office:value-type="string" office:string-value="Jun" calcext:value-type="string">
            <text:p>Jun</text:p>
          </table:table-cell>
          <table:table-cell table:style-name="ce33" table:formula="of:=COM.MICROSOFT.XLOOKUP([$Analítico_Deriv.$V20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20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20]+([$Analítico_Deriv.$AJ20]*[$Analítico_Deriv.$Z20])" office:value-type="float" office:value="5.1766" calcext:value-type="float">
            <text:p>5,1766</text:p>
          </table:table-cell>
          <table:table-cell table:formula="of:=IF([$Analítico_Deriv.$C20]=&quot;Vigente&quot;;IF([$Analítico_Deriv.$S20]=&quot;CBOT&quot;;([$Analítico_Deriv.$AK20]-[$Analítico_Deriv.$U20])*5000*[$Analítico_Deriv.$R20];IF([$Analítico_Deriv.$S20]=&quot;BMF&quot;;[$Analítico_Deriv.$AM20]/[$Preços_MTM.$I$4];&quot;VERIFICAR&quot;));0)" office:value-type="float" office:value="0" calcext:value-type="float">
            <text:p>0,00</text:p>
          </table:table-cell>
          <table:table-cell table:formula="of:=IF([$Analítico_Deriv.$C20]=&quot;Vigente&quot;;(IF([$Analítico_Deriv.$S20]=&quot;BMF&quot;;([$Analítico_Deriv.$AK20]-[$Analítico_Deriv.$U20])*450*[$Analítico_Deriv.$R20];IF([$Analítico_Deriv.$S20]=&quot;CBOT&quot;;[$Analítico_Deriv.$AL20]*[$Preços_MTM.$I$4];&quot;VERIFICAR&quot;)))+[$Analítico_Deriv.$AN20];0)" office:value-type="float" office:value="0" calcext:value-type="float">
            <text:p>0,00</text:p>
          </table:table-cell>
          <table:table-cell table:style-name="ce33" table:formula="of:=IF([$Analítico_Deriv.$C20]=&quot;Vigente&quot;;IF([$Analítico_Deriv.$AD20]=&quot;DOLAR BMF&quot;;([$Analítico_Deriv.$AK20]-[$Analítico_Deriv.$U20])*[$Analítico_Deriv.$X20];0);0)" office:value-type="float" office:value="0" calcext:value-type="float">
            <text:p>0</text:p>
          </table:table-cell>
          <table:table-cell table:formula="of:=IF([$Analítico_Deriv.$I20]=&quot;Vigente&quot;;IF([$Analítico_Deriv.$AD20]=&quot;Soja CBOT&quot;;[$Analítico_Deriv.$X20]*-1;IF([$Analítico_Deriv.$AD20]=&quot;Milho CBOT&quot;;[$Analítico_Deriv.$X20]*-1;IF([$Analítico_Deriv.$AD20]=&quot;Milho BMF&quot;;0;IF([$Analítico_Deriv.$AD20]=&quot;Dolar BMF&quot;;[$Analítico_Deriv.$X20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20];[$dms.J:.J];[$dms.L:.L]);&quot;&quot;)">
            <text:p/>
          </table:table-cell>
          <table:table-cell table:style-name="ce23" table:formula="of:=IFERROR(COM.MICROSOFT.XLOOKUP([$Analítico_Deriv.$B20];[$dms.J:.J];[$dms.M:.M]);&quot;&quot;)">
            <text:p/>
          </table:table-cell>
          <table:table-cell table:style-name="ce23" table:formula="of:=COM.MICROSOFT.XLOOKUP([$Analítico_Deriv.$W20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20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</text:p>
          </table:table-cell>
          <table:table-cell table:style-name="ce5" office:value-type="date" office:date-value="2026-04-24" calcext:value-type="date">
            <text:p>24/4/2026</text:p>
          </table:table-cell>
          <table:table-cell table:style-name="ce131" office:value-type="string" calcext:value-type="string">
            <text:p>Vigente</text:p>
          </table:table-cell>
          <table:table-cell table:number-columns-repeated="2" table:style-name="ce5" office:value-type="string" calcext:value-type="string">
            <text:p>Milho</text:p>
          </table:table-cell>
          <table:table-cell table:style-name="ce5" office:value-type="string" calcext:value-type="string">
            <text:p>Safra Próxima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Vigente</text:p>
          </table:table-cell>
          <table:table-cell table:style-name="ce5" office:value-type="string" calcext:value-type="string">
            <text:p>48902930</text:p>
          </table:table-cell>
          <table:table-cell table:style-name="ce5" office:value-type="string" calcext:value-type="string">
            <text:p>26D06267730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22.22" calcext:value-type="float">
            <text:p>22,22</text:p>
          </table:table-cell>
          <table:table-cell table:style-name="ce135" table:formula="of:=IF([$Analítico_Deriv.$P21]=&quot;VENDA&quot;;[$Analítico_Deriv.$Q21]*-1;[$Analítico_Deriv.$Q21])" office:value-type="float" office:value="-22.22" calcext:value-type="float">
            <text:p>-22,22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CCMF27</text:p>
          </table:table-cell>
          <table:table-cell table:style-name="ce127" office:value-type="float" office:value="74.32955" calcext:value-type="float">
            <text:p>74,3296</text:p>
          </table:table-cell>
          <table:table-cell table:style-name="ce5" office:value-type="date" office:date-value="2027-01-15" calcext:value-type="date">
            <text:p>15/1/2027</text:p>
          </table:table-cell>
          <table:table-cell table:style-name="ce5" office:value-type="date" office:date-value="2027-01-19" calcext:value-type="date">
            <text:p>19/1/2027</text:p>
          </table:table-cell>
          <table:table-cell table:formula="of:=IF([$Analítico_Deriv.$AD21]=&quot;Dolar BMF&quot;;&quot;PREENCHER&quot;;IF([$Analítico_Deriv.$AD21]=&quot;SOJA CBOT&quot;;[$Analítico_Deriv.$R21]*5000*[$Analítico_Deriv.$U21];IF([$Analítico_Deriv.$AD21]=&quot;MILHO CBOT&quot;;[$Analítico_Deriv.$R21]*5000*[$Analítico_Deriv.$U21];IF([$Analítico_Deriv.$AD21]=&quot;MILHO BMF&quot;;0;&quot;VALIDAR&quot;))))" office:value-type="float" office:value="0" calcext:value-type="float">
            <text:p>0,00</text:p>
          </table:table-cell>
          <table:table-cell table:formula="of:=IF([$Analítico_Deriv.$C21]=&quot;Vigente&quot;;IF([$Analítico_Deriv.$AD21]=&quot;Soja CBOT&quot;;[$Analítico_Deriv.$X21]*-1;IF([$Analítico_Deriv.$AD21]=&quot;Milho CBOT&quot;;[$Analítico_Deriv.$X21]*-1;IF([$Analítico_Deriv.$AD21]=&quot;Milho BMF&quot;;0;IF([$Analítico_Deriv.$AD21]=&quot;Dolar BMF&quot;;[$Analítico_Deriv.$X21]))));0)" office:value-type="float" office:value="0" calcext:value-type="float">
            <text:p>0,00</text:p>
          </table:table-cell>
          <table:table-cell table:formula="of:=COM.MICROSOFT.XLOOKUP([$Analítico_Deriv.$T21];[$Preços_MTM.C:.C];[$Preços_MTM.D:.D];COM.MICROSOFT.XLOOKUP([$Analítico_Deriv.$T21];[$Preços_MTM.H:.H];[$Preços_MTM.I:.I]))" office:value-type="float" office:value="73.57" calcext:value-type="float">
            <text:p>73,5700</text:p>
          </table:table-cell>
          <table:table-cell table:formula="of:=IF([$Analítico_Deriv.$C21]=&quot;Vigente&quot;;IF([$Analítico_Deriv.$S21]=&quot;CBOT&quot;;([$Analítico_Deriv.$Z21]-[$Analítico_Deriv.$U21])*5000*[$Analítico_Deriv.$R21];IF([$Analítico_Deriv.$S21]=&quot;BMF&quot;;[$Analítico_Deriv.$AB21]/[$Preços_MTM.$I$4];&quot;VERIFICAR&quot;));0)" office:value-type="float" office:value="1462.07343343922" calcext:value-type="float">
            <text:p>1.462,07</text:p>
          </table:table-cell>
          <table:table-cell table:formula="of:=IF([$Analítico_Deriv.$C21]=&quot;Vigente&quot;;(IF([$Analítico_Deriv.$S21]=&quot;BMF&quot;;([$Analítico_Deriv.$Z21]-[$Analítico_Deriv.$U21])*450*[$Analítico_Deriv.$R21];IF([$Analítico_Deriv.$S21]=&quot;CBOT&quot;;[$Analítico_Deriv.$AA21]*[$Preços_MTM.$I$4];&quot;VERIFICAR&quot;)))+[$Analítico_Deriv.$AC21];0)" office:value-type="float" office:value="7594.74045000004" calcext:value-type="float">
            <text:p>7.594,74</text:p>
          </table:table-cell>
          <table:table-cell table:formula="of:=IF([$Analítico_Deriv.$C21]=&quot;Vigente&quot;;IF([$Analítico_Deriv.$AD21]=&quot;DOLAR BMF&quot;;([$Analítico_Deriv.$Z21]-[$Analítico_Deriv.$U21])*[$Analítico_Deriv.$X21];0);0)" office:value-type="float" office:value="0" calcext:value-type="float">
            <text:p>0,00</text:p>
          </table:table-cell>
          <table:table-cell table:style-name="ce33" table:formula="of:=COM.MICROSOFT.CONCAT([$Analítico_Deriv.$D21];&quot; &quot;;[$Analítico_Deriv.$S21])" office:value-type="string" office:string-value="Milho BMF" calcext:value-type="string">
            <text:p>Milho BMF</text:p>
          </table:table-cell>
          <table:table-cell table:formula="of:=IF([$Analítico_Deriv.$AD21]=&quot;DOLAR BMF&quot;;0;(COM.MICROSOFT.XLOOKUP([$Analítico_Deriv.$AD21];[$dms.D:.D];[$dms.E:.E]))*[$Analítico_Deriv.$R21])" office:value-type="float" office:value="-599940" calcext:value-type="float">
            <text:p>-599.940</text:p>
          </table:table-cell>
          <table:table-cell table:formula="of:=[$Analítico_Deriv.$AE21]/1000" office:value-type="float" office:value="-599.94" calcext:value-type="float">
            <text:p>-600</text:p>
          </table:table-cell>
          <table:table-cell table:style-name="ce33" table:formula="of:=COM.MICROSOFT.XLOOKUP([$Analítico_Deriv.$V21];[$dms.J:.J];[$dms.L:.L])" office:value-type="string" office:string-value="Jan" calcext:value-type="string">
            <text:p>Jan</text:p>
          </table:table-cell>
          <table:table-cell table:style-name="ce33" table:formula="of:=COM.MICROSOFT.XLOOKUP([$Analítico_Deriv.$V21];[$dms.J:.J];[$dms.M:.M])" office:value-type="float" office:value="2027" calcext:value-type="float">
            <text:p>2027</text:p>
          </table:table-cell>
          <table:table-cell table:style-name="ce33" office:value-type="string" calcext:value-type="string">
            <text:p>LB-Milho-26</text:p>
          </table:table-cell>
          <table:table-cell table:formula="of:=COM.MICROSOFT.XLOOKUP([$Analítico_Deriv.$AD21];[$Gestão_Stonex.G:.G];[$Gestão_Stonex.H:.H])" office:value-type="percentage" office:value="0.55" calcext:value-type="percentage">
            <text:p>55,00%</text:p>
          </table:table-cell>
          <table:table-cell table:style-name="ce33" table:formula="of:=[$Analítico_Deriv.$Z21]+([$Analítico_Deriv.$AJ21]*[$Analítico_Deriv.$Z21])" office:value-type="float" office:value="114.0335" calcext:value-type="float">
            <text:p>114,0335</text:p>
          </table:table-cell>
          <table:table-cell table:formula="of:=IF([$Analítico_Deriv.$C21]=&quot;Vigente&quot;;IF([$Analítico_Deriv.$S21]=&quot;CBOT&quot;;([$Analítico_Deriv.$AK21]-[$Analítico_Deriv.$U21])*5000*[$Analítico_Deriv.$R21];IF([$Analítico_Deriv.$S21]=&quot;BMF&quot;;[$Analítico_Deriv.$AM21]/[$Preços_MTM.$I$4];&quot;VERIFICAR&quot;));0)" office:value-type="float" office:value="-76426.9508229858" calcext:value-type="float">
            <text:p>-76.426,95</text:p>
          </table:table-cell>
          <table:table-cell table:formula="of:=IF([$Analítico_Deriv.$C21]=&quot;Vigente&quot;;(IF([$Analítico_Deriv.$S21]=&quot;BMF&quot;;([$Analítico_Deriv.$AK21]-[$Analítico_Deriv.$U21])*450*[$Analítico_Deriv.$R21];IF([$Analítico_Deriv.$S21]=&quot;CBOT&quot;;[$Analítico_Deriv.$AL21]*[$Preços_MTM.$I$4];&quot;VERIFICAR&quot;)))+[$Analítico_Deriv.$AN21];0)" office:value-type="float" office:value="-396999.79605" calcext:value-type="float">
            <text:p>-396.999,80</text:p>
          </table:table-cell>
          <table:table-cell table:style-name="ce33" table:formula="of:=IF([$Analítico_Deriv.$C21]=&quot;Vigente&quot;;IF([$Analítico_Deriv.$AD21]=&quot;DOLAR BMF&quot;;([$Analítico_Deriv.$AK21]-[$Analítico_Deriv.$U21])*[$Analítico_Deriv.$X21];0);0)" office:value-type="float" office:value="0" calcext:value-type="float">
            <text:p>0</text:p>
          </table:table-cell>
          <table:table-cell table:formula="of:=IF([$Analítico_Deriv.$I21]=&quot;Vigente&quot;;IF([$Analítico_Deriv.$AD21]=&quot;Soja CBOT&quot;;[$Analítico_Deriv.$X21]*-1;IF([$Analítico_Deriv.$AD21]=&quot;Milho CBOT&quot;;[$Analítico_Deriv.$X21]*-1;IF([$Analítico_Deriv.$AD21]=&quot;Milho BMF&quot;;0;IF([$Analítico_Deriv.$AD21]=&quot;Dolar BMF&quot;;[$Analítico_Deriv.$X21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21];[$dms.J:.J];[$dms.L:.L]);&quot;&quot;)">
            <text:p/>
          </table:table-cell>
          <table:table-cell table:style-name="ce23" table:formula="of:=IFERROR(COM.MICROSOFT.XLOOKUP([$Analítico_Deriv.$B21];[$dms.J:.J];[$dms.M:.M]);&quot;&quot;)">
            <text:p/>
          </table:table-cell>
          <table:table-cell table:style-name="ce23" table:formula="of:=COM.MICROSOFT.XLOOKUP([$Analítico_Deriv.$W21];[$dms.J:.J];[$dms.L:.L])" office:value-type="string" office:string-value="Jan" calcext:value-type="string">
            <text:p>Jan</text:p>
          </table:table-cell>
          <table:table-cell table:style-name="ce23" table:formula="of:=COM.MICROSOFT.XLOOKUP([$Analítico_Deriv.$W21];[$dms.J:.J];[$dms.M:.M])" office:value-type="float" office:value="2027" calcext:value-type="float">
            <text:p>2.027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</text:p>
          </table:table-cell>
          <table:table-cell table:style-name="ce5" office:value-type="date" office:date-value="2026-05-07" calcext:value-type="date">
            <text:p>7/5/2026</text:p>
          </table:table-cell>
          <table:table-cell table:style-name="ce131" office:value-type="string" calcext:value-type="string">
            <text:p>Liquidado</text:p>
          </table:table-cell>
          <table:table-cell table:style-name="ce5" office:value-type="string" calcext:value-type="string">
            <text:p>Dolar</text:p>
          </table:table-cell>
          <table:table-cell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Saída</text:p>
          </table:table-cell>
          <table:table-cell office:value-type="string" calcext:value-type="string">
            <text:p>F9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49419446</text:p>
          </table:table-cell>
          <table:table-cell table:style-name="ce132" office:value-type="string" calcext:value-type="string">
            <text:p>26E02233360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Compr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Compra</text:p>
          </table:table-cell>
          <table:table-cell table:style-name="ce23" office:value-type="float" office:value="0" calcext:value-type="float">
            <text:p>0,00</text:p>
          </table:table-cell>
          <table:table-cell table:style-name="ce135" table:formula="of:=IF([$Analítico_Deriv.$P22]=&quot;VENDA&quot;;[$Analítico_Deriv.$Q22]*-1;[$Analítico_Deriv.$Q22])" office:value-type="float" office:value="0" calcext:value-type="float">
            <text:p>0,00</text:p>
          </table:table-cell>
          <table:table-cell office:value-type="string" calcext:value-type="string">
            <text:p>BMF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27" office:value-type="float" office:value="4.9844" calcext:value-type="float">
            <text:p>4,9844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5" office:value-type="date" office:date-value="2026-07-02" calcext:value-type="date">
            <text:p>2/7/2026</text:p>
          </table:table-cell>
          <table:table-cell office:value-type="float" office:value="81000" calcext:value-type="float">
            <text:p>81.000,00</text:p>
          </table:table-cell>
          <table:table-cell table:formula="of:=IF([$Analítico_Deriv.$C22]=&quot;Vigente&quot;;IF([$Analítico_Deriv.$AD22]=&quot;Soja CBOT&quot;;[$Analítico_Deriv.$X22]*-1;IF([$Analítico_Deriv.$AD22]=&quot;Milho CBOT&quot;;[$Analítico_Deriv.$X22]*-1;IF([$Analítico_Deriv.$AD22]=&quot;Milho BMF&quot;;0;IF([$Analítico_Deriv.$AD22]=&quot;Dolar BMF&quot;;[$Analítico_Deriv.$X22]))));0)" office:value-type="float" office:value="0" calcext:value-type="float">
            <text:p>0,00</text:p>
          </table:table-cell>
          <table:table-cell table:formula="of:=COM.MICROSOFT.XLOOKUP([$Analítico_Deriv.$T22];[$Preços_MTM.C:.C];[$Preços_MTM.D:.D];COM.MICROSOFT.XLOOKUP([$Analítico_Deriv.$T22];[$Preços_MTM.H:.H];[$Preços_MTM.I:.I]))" office:value-type="float" office:value="5.1766" calcext:value-type="float">
            <text:p>5,1766</text:p>
          </table:table-cell>
          <table:table-cell table:formula="of:=IF([$Analítico_Deriv.$C22]=&quot;Vigente&quot;;IF([$Analítico_Deriv.$S22]=&quot;CBOT&quot;;([$Analítico_Deriv.$Z22]-[$Analítico_Deriv.$U22])*5000*[$Analítico_Deriv.$R22];IF([$Analítico_Deriv.$S22]=&quot;BMF&quot;;[$Analítico_Deriv.$AB22]/[$Preços_MTM.$I$4];&quot;VERIFICAR&quot;));0)" office:value-type="float" office:value="0" calcext:value-type="float">
            <text:p>0,00</text:p>
          </table:table-cell>
          <table:table-cell table:formula="of:=IF([$Analítico_Deriv.$C22]=&quot;Vigente&quot;;(IF([$Analítico_Deriv.$S22]=&quot;BMF&quot;;([$Analítico_Deriv.$Z22]-[$Analítico_Deriv.$U22])*450*[$Analítico_Deriv.$R22];IF([$Analítico_Deriv.$S22]=&quot;CBOT&quot;;[$Analítico_Deriv.$AA22]*[$Preços_MTM.$I$4];&quot;VERIFICAR&quot;)))+[$Analítico_Deriv.$AC22];0)" office:value-type="float" office:value="0" calcext:value-type="float">
            <text:p>0,00</text:p>
          </table:table-cell>
          <table:table-cell table:formula="of:=IF([$Analítico_Deriv.$C22]=&quot;Vigente&quot;;IF([$Analítico_Deriv.$AD22]=&quot;DOLAR BMF&quot;;([$Analítico_Deriv.$Z22]-[$Analítico_Deriv.$U22])*[$Analítico_Deriv.$X22];0);0)" office:value-type="float" office:value="0" calcext:value-type="float">
            <text:p>0,00</text:p>
          </table:table-cell>
          <table:table-cell table:style-name="ce33" table:formula="of:=COM.MICROSOFT.CONCAT([$Analítico_Deriv.$D22];&quot; &quot;;[$Analítico_Deriv.$S22])" office:value-type="string" office:string-value="Dolar BMF" calcext:value-type="string">
            <text:p>Dolar BMF</text:p>
          </table:table-cell>
          <table:table-cell table:formula="of:=IF([$Analítico_Deriv.$AD22]=&quot;DOLAR BMF&quot;;0;(COM.MICROSOFT.XLOOKUP([$Analítico_Deriv.$AD22];[$dms.D:.D];[$dms.E:.E]))*[$Analítico_Deriv.$R22])" office:value-type="float" office:value="0" calcext:value-type="float">
            <text:p>0</text:p>
          </table:table-cell>
          <table:table-cell table:formula="of:=[$Analítico_Deriv.$AE22]/1000" office:value-type="float" office:value="0" calcext:value-type="float">
            <text:p>0</text:p>
          </table:table-cell>
          <table:table-cell table:style-name="ce33" table:formula="of:=COM.MICROSOFT.XLOOKUP([$Analítico_Deriv.$V22];[$dms.J:.J];[$dms.L:.L])" office:value-type="string" office:string-value="Jun" calcext:value-type="string">
            <text:p>Jun</text:p>
          </table:table-cell>
          <table:table-cell table:style-name="ce33" table:formula="of:=COM.MICROSOFT.XLOOKUP([$Analítico_Deriv.$V22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22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22]+([$Analítico_Deriv.$AJ22]*[$Analítico_Deriv.$Z22])" office:value-type="float" office:value="5.1766" calcext:value-type="float">
            <text:p>5,1766</text:p>
          </table:table-cell>
          <table:table-cell table:formula="of:=IF([$Analítico_Deriv.$C22]=&quot;Vigente&quot;;IF([$Analítico_Deriv.$S22]=&quot;CBOT&quot;;([$Analítico_Deriv.$AK22]-[$Analítico_Deriv.$U22])*5000*[$Analítico_Deriv.$R22];IF([$Analítico_Deriv.$S22]=&quot;BMF&quot;;[$Analítico_Deriv.$AM22]/[$Preços_MTM.$I$4];&quot;VERIFICAR&quot;));0)" office:value-type="float" office:value="0" calcext:value-type="float">
            <text:p>0,00</text:p>
          </table:table-cell>
          <table:table-cell table:formula="of:=IF([$Analítico_Deriv.$C22]=&quot;Vigente&quot;;(IF([$Analítico_Deriv.$S22]=&quot;BMF&quot;;([$Analítico_Deriv.$AK22]-[$Analítico_Deriv.$U22])*450*[$Analítico_Deriv.$R22];IF([$Analítico_Deriv.$S22]=&quot;CBOT&quot;;[$Analítico_Deriv.$AL22]*[$Preços_MTM.$I$4];&quot;VERIFICAR&quot;)))+[$Analítico_Deriv.$AN22];0)" office:value-type="float" office:value="0" calcext:value-type="float">
            <text:p>0,00</text:p>
          </table:table-cell>
          <table:table-cell table:style-name="ce33" table:formula="of:=IF([$Analítico_Deriv.$C22]=&quot;Vigente&quot;;IF([$Analítico_Deriv.$AD22]=&quot;DOLAR BMF&quot;;([$Analítico_Deriv.$AK22]-[$Analítico_Deriv.$U22])*[$Analítico_Deriv.$X22];0);0)" office:value-type="float" office:value="0" calcext:value-type="float">
            <text:p>0</text:p>
          </table:table-cell>
          <table:table-cell table:formula="of:=IF([$Analítico_Deriv.$I22]=&quot;Vigente&quot;;IF([$Analítico_Deriv.$AD22]=&quot;Soja CBOT&quot;;[$Analítico_Deriv.$X22]*-1;IF([$Analítico_Deriv.$AD22]=&quot;Milho CBOT&quot;;[$Analítico_Deriv.$X22]*-1;IF([$Analítico_Deriv.$AD22]=&quot;Milho BMF&quot;;0;IF([$Analítico_Deriv.$AD22]=&quot;Dolar BMF&quot;;[$Analítico_Deriv.$X22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22];[$dms.J:.J];[$dms.L:.L]);&quot;&quot;)">
            <text:p/>
          </table:table-cell>
          <table:table-cell table:style-name="ce23" table:formula="of:=IFERROR(COM.MICROSOFT.XLOOKUP([$Analítico_Deriv.$B22];[$dms.J:.J];[$dms.M:.M]);&quot;&quot;)">
            <text:p/>
          </table:table-cell>
          <table:table-cell table:style-name="ce23" table:formula="of:=COM.MICROSOFT.XLOOKUP([$Analítico_Deriv.$W22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22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7</text:p>
          </table:table-cell>
          <table:table-cell table:style-name="ce5" office:value-type="date" office:date-value="2026-06-05" calcext:value-type="date">
            <text:p>5/6/2026</text:p>
          </table:table-cell>
          <table:table-cell table:style-name="ce131" office:value-type="string" calcext:value-type="string">
            <text:p>Liquidado</text:p>
          </table:table-cell>
          <table:table-cell table:style-name="ce5" office:value-type="string" calcext:value-type="string">
            <text:p>Dolar</text:p>
          </table:table-cell>
          <table:table-cell table:style-name="ce5" office:value-type="string" calcext:value-type="string">
            <text:p>Soja</text:p>
          </table:table-cell>
          <table:table-cell table:style-name="ce5" office:value-type="string" calcext:value-type="string">
            <text:p>Safra Atual</text:p>
          </table:table-cell>
          <table:table-cell table:style-name="ce5" office:value-type="string" calcext:value-type="string">
            <text:p>Saída</text:p>
          </table:table-cell>
          <table:table-cell office:value-type="string" calcext:value-type="string">
            <text:p>F10; F11; F12; F13; F14</text:p>
          </table:table-cell>
          <table:table-cell table:style-name="ce5" office:value-type="string" calcext:value-type="string">
            <text:p>Liquidado</text:p>
          </table:table-cell>
          <table:table-cell table:style-name="ce5" office:value-type="string" calcext:value-type="string">
            <text:p>50675007</text:p>
          </table:table-cell>
          <table:table-cell table:style-name="ce5" office:value-type="string" calcext:value-type="string">
            <text:p>26F00585561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Compr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Compra</text:p>
          </table:table-cell>
          <table:table-cell table:style-name="ce23" office:value-type="float" office:value="0" calcext:value-type="float">
            <text:p>0,00</text:p>
          </table:table-cell>
          <table:table-cell table:style-name="ce135" table:formula="of:=IF([$Analítico_Deriv.$P23]=&quot;VENDA&quot;;[$Analítico_Deriv.$Q23]*-1;[$Analítico_Deriv.$Q23])" office:value-type="float" office:value="0" calcext:value-type="float">
            <text:p>0,00</text:p>
          </table:table-cell>
          <table:table-cell office:value-type="string" calcext:value-type="string">
            <text:p>BMF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27" office:value-type="float" office:value="5.1751" calcext:value-type="float">
            <text:p>5,1751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5" office:value-type="date" office:date-value="2026-07-02" calcext:value-type="date">
            <text:p>2/7/2026</text:p>
          </table:table-cell>
          <table:table-cell office:value-type="float" office:value="159920" calcext:value-type="float">
            <text:p>159.920,00</text:p>
          </table:table-cell>
          <table:table-cell table:formula="of:=IF([$Analítico_Deriv.$C23]=&quot;Vigente&quot;;IF([$Analítico_Deriv.$AD23]=&quot;Soja CBOT&quot;;[$Analítico_Deriv.$X23]*-1;IF([$Analítico_Deriv.$AD23]=&quot;Milho CBOT&quot;;[$Analítico_Deriv.$X23]*-1;IF([$Analítico_Deriv.$AD23]=&quot;Milho BMF&quot;;0;IF([$Analítico_Deriv.$AD23]=&quot;Dolar BMF&quot;;[$Analítico_Deriv.$X23]))));0)" office:value-type="float" office:value="0" calcext:value-type="float">
            <text:p>0,00</text:p>
          </table:table-cell>
          <table:table-cell table:formula="of:=COM.MICROSOFT.XLOOKUP([$Analítico_Deriv.$T23];[$Preços_MTM.C:.C];[$Preços_MTM.D:.D];COM.MICROSOFT.XLOOKUP([$Analítico_Deriv.$T23];[$Preços_MTM.H:.H];[$Preços_MTM.I:.I]))" office:value-type="float" office:value="5.1766" calcext:value-type="float">
            <text:p>5,1766</text:p>
          </table:table-cell>
          <table:table-cell table:formula="of:=IF([$Analítico_Deriv.$C23]=&quot;Vigente&quot;;IF([$Analítico_Deriv.$S23]=&quot;CBOT&quot;;([$Analítico_Deriv.$Z23]-[$Analítico_Deriv.$U23])*5000*[$Analítico_Deriv.$R23];IF([$Analítico_Deriv.$S23]=&quot;BMF&quot;;[$Analítico_Deriv.$AB23]/[$Preços_MTM.$I$4];&quot;VERIFICAR&quot;));0)" office:value-type="float" office:value="0" calcext:value-type="float">
            <text:p>0,00</text:p>
          </table:table-cell>
          <table:table-cell table:formula="of:=IF([$Analítico_Deriv.$C23]=&quot;Vigente&quot;;(IF([$Analítico_Deriv.$S23]=&quot;BMF&quot;;([$Analítico_Deriv.$Z23]-[$Analítico_Deriv.$U23])*450*[$Analítico_Deriv.$R23];IF([$Analítico_Deriv.$S23]=&quot;CBOT&quot;;[$Analítico_Deriv.$AA23]*[$Preços_MTM.$I$4];&quot;VERIFICAR&quot;)))+[$Analítico_Deriv.$AC23];0)" office:value-type="float" office:value="0" calcext:value-type="float">
            <text:p>0,00</text:p>
          </table:table-cell>
          <table:table-cell table:formula="of:=IF([$Analítico_Deriv.$C23]=&quot;Vigente&quot;;IF([$Analítico_Deriv.$AD23]=&quot;DOLAR BMF&quot;;([$Analítico_Deriv.$Z23]-[$Analítico_Deriv.$U23])*[$Analítico_Deriv.$X23];0);0)" office:value-type="float" office:value="0" calcext:value-type="float">
            <text:p>0,00</text:p>
          </table:table-cell>
          <table:table-cell table:style-name="ce33" table:formula="of:=COM.MICROSOFT.CONCAT([$Analítico_Deriv.$D23];&quot; &quot;;[$Analítico_Deriv.$S23])" office:value-type="string" office:string-value="Dolar BMF" calcext:value-type="string">
            <text:p>Dolar BMF</text:p>
          </table:table-cell>
          <table:table-cell table:formula="of:=IF([$Analítico_Deriv.$AD23]=&quot;DOLAR BMF&quot;;0;(COM.MICROSOFT.XLOOKUP([$Analítico_Deriv.$AD23];[$dms.D:.D];[$dms.E:.E]))*[$Analítico_Deriv.$R23])" office:value-type="float" office:value="0" calcext:value-type="float">
            <text:p>0</text:p>
          </table:table-cell>
          <table:table-cell table:formula="of:=[$Analítico_Deriv.$AE23]/1000" office:value-type="float" office:value="0" calcext:value-type="float">
            <text:p>0</text:p>
          </table:table-cell>
          <table:table-cell table:style-name="ce33" table:formula="of:=COM.MICROSOFT.XLOOKUP([$Analítico_Deriv.$V23];[$dms.J:.J];[$dms.L:.L])" office:value-type="string" office:string-value="Jun" calcext:value-type="string">
            <text:p>Jun</text:p>
          </table:table-cell>
          <table:table-cell table:style-name="ce33" table:formula="of:=COM.MICROSOFT.XLOOKUP([$Analítico_Deriv.$V23];[$dms.J:.J];[$dms.M:.M])" office:value-type="float" office:value="2026" calcext:value-type="float">
            <text:p>2026</text:p>
          </table:table-cell>
          <table:table-cell table:style-name="ce33" office:value-type="string" calcext:value-type="string">
            <text:p>LB-Soja-26</text:p>
          </table:table-cell>
          <table:table-cell table:formula="of:=COM.MICROSOFT.XLOOKUP([$Analítico_Deriv.$AD23];[$Gestão_Stonex.G:.G];[$Gestão_Stonex.H:.H])" office:value-type="percentage" office:value="0" calcext:value-type="percentage">
            <text:p>0,00%</text:p>
          </table:table-cell>
          <table:table-cell table:style-name="ce33" table:formula="of:=[$Analítico_Deriv.$Z23]+([$Analítico_Deriv.$AJ23]*[$Analítico_Deriv.$Z23])" office:value-type="float" office:value="5.1766" calcext:value-type="float">
            <text:p>5,1766</text:p>
          </table:table-cell>
          <table:table-cell table:formula="of:=IF([$Analítico_Deriv.$C23]=&quot;Vigente&quot;;IF([$Analítico_Deriv.$S23]=&quot;CBOT&quot;;([$Analítico_Deriv.$AK23]-[$Analítico_Deriv.$U23])*5000*[$Analítico_Deriv.$R23];IF([$Analítico_Deriv.$S23]=&quot;BMF&quot;;[$Analítico_Deriv.$AM23]/[$Preços_MTM.$I$4];&quot;VERIFICAR&quot;));0)" office:value-type="float" office:value="0" calcext:value-type="float">
            <text:p>0,00</text:p>
          </table:table-cell>
          <table:table-cell table:formula="of:=IF([$Analítico_Deriv.$C23]=&quot;Vigente&quot;;(IF([$Analítico_Deriv.$S23]=&quot;BMF&quot;;([$Analítico_Deriv.$AK23]-[$Analítico_Deriv.$U23])*450*[$Analítico_Deriv.$R23];IF([$Analítico_Deriv.$S23]=&quot;CBOT&quot;;[$Analítico_Deriv.$AL23]*[$Preços_MTM.$I$4];&quot;VERIFICAR&quot;)))+[$Analítico_Deriv.$AN23];0)" office:value-type="float" office:value="0" calcext:value-type="float">
            <text:p>0,00</text:p>
          </table:table-cell>
          <table:table-cell table:style-name="ce33" table:formula="of:=IF([$Analítico_Deriv.$C23]=&quot;Vigente&quot;;IF([$Analítico_Deriv.$AD23]=&quot;DOLAR BMF&quot;;([$Analítico_Deriv.$AK23]-[$Analítico_Deriv.$U23])*[$Analítico_Deriv.$X23];0);0)" office:value-type="float" office:value="0" calcext:value-type="float">
            <text:p>0</text:p>
          </table:table-cell>
          <table:table-cell table:formula="of:=IF([$Analítico_Deriv.$I23]=&quot;Vigente&quot;;IF([$Analítico_Deriv.$AD23]=&quot;Soja CBOT&quot;;[$Analítico_Deriv.$X23]*-1;IF([$Analítico_Deriv.$AD23]=&quot;Milho CBOT&quot;;[$Analítico_Deriv.$X23]*-1;IF([$Analítico_Deriv.$AD23]=&quot;Milho BMF&quot;;0;IF([$Analítico_Deriv.$AD23]=&quot;Dolar BMF&quot;;[$Analítico_Deriv.$X23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23];[$dms.J:.J];[$dms.L:.L]);&quot;&quot;)">
            <text:p/>
          </table:table-cell>
          <table:table-cell table:style-name="ce23" table:formula="of:=IFERROR(COM.MICROSOFT.XLOOKUP([$Analítico_Deriv.$B23];[$dms.J:.J];[$dms.M:.M]);&quot;&quot;)">
            <text:p/>
          </table:table-cell>
          <table:table-cell table:style-name="ce23" table:formula="of:=COM.MICROSOFT.XLOOKUP([$Analítico_Deriv.$W23];[$dms.J:.J];[$dms.L:.L])" office:value-type="string" office:string-value="Jul" calcext:value-type="string">
            <text:p>Jul</text:p>
          </table:table-cell>
          <table:table-cell table:style-name="ce23" table:formula="of:=COM.MICROSOFT.XLOOKUP([$Analítico_Deriv.$W23];[$dms.J:.J];[$dms.M:.M])" office:value-type="float" office:value="2026" calcext:value-type="float">
            <text:p>2.026,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F18</text:p>
          </table:table-cell>
          <table:table-cell table:style-name="ce5" office:value-type="date" office:date-value="2026-06-18" calcext:value-type="date">
            <text:p>18/6/2026</text:p>
          </table:table-cell>
          <table:table-cell table:style-name="ce131" office:value-type="string" calcext:value-type="string">
            <text:p>Vigente</text:p>
          </table:table-cell>
          <table:table-cell table:number-columns-repeated="2" table:style-name="ce5" office:value-type="string" calcext:value-type="string">
            <text:p>Milho</text:p>
          </table:table-cell>
          <table:table-cell table:style-name="ce5" office:value-type="string" calcext:value-type="string">
            <text:p>Safra Próxima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Vigente</text:p>
          </table:table-cell>
          <table:table-cell table:style-name="ce33" office:value-type="float" office:value="51280331" calcext:value-type="float">
            <text:p>51280331</text:p>
          </table:table-cell>
          <table:table-cell table:style-name="ce33" office:value-type="string" calcext:value-type="string">
            <text:p>26F03369839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10" calcext:value-type="float">
            <text:p>10,00</text:p>
          </table:table-cell>
          <table:table-cell table:style-name="ce135" table:formula="of:=IF([$Analítico_Deriv.$P24]=&quot;VENDA&quot;;[$Analítico_Deriv.$Q24]*-1;[$Analítico_Deriv.$Q24])" office:value-type="float" office:value="-10" calcext:value-type="float">
            <text:p>-10,00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CCMF27</text:p>
          </table:table-cell>
          <table:table-cell table:style-name="ce127" office:value-type="float" office:value="73.21" calcext:value-type="float">
            <text:p>73,2100</text:p>
          </table:table-cell>
          <table:table-cell table:style-name="ce5" office:value-type="date" office:date-value="2027-01-15" calcext:value-type="date">
            <text:p>15/1/2027</text:p>
          </table:table-cell>
          <table:table-cell table:style-name="ce5" office:value-type="date" office:date-value="2027-01-19" calcext:value-type="date">
            <text:p>19/1/2027</text:p>
          </table:table-cell>
          <table:table-cell table:formula="of:=IF([$Analítico_Deriv.$AD24]=&quot;Dolar BMF&quot;;&quot;PREENCHER&quot;;IF([$Analítico_Deriv.$AD24]=&quot;SOJA CBOT&quot;;[$Analítico_Deriv.$R24]*5000*[$Analítico_Deriv.$U24];IF([$Analítico_Deriv.$AD24]=&quot;MILHO CBOT&quot;;[$Analítico_Deriv.$R24]*5000*[$Analítico_Deriv.$U24];IF([$Analítico_Deriv.$AD24]=&quot;MILHO BMF&quot;;0;&quot;VALIDAR&quot;))))" office:value-type="float" office:value="0" calcext:value-type="float">
            <text:p>0,00</text:p>
          </table:table-cell>
          <table:table-cell table:formula="of:=IF([$Analítico_Deriv.$C24]=&quot;Vigente&quot;;IF([$Analítico_Deriv.$AD24]=&quot;Soja CBOT&quot;;[$Analítico_Deriv.$X24]*-1;IF([$Analítico_Deriv.$AD24]=&quot;Milho CBOT&quot;;[$Analítico_Deriv.$X24]*-1;IF([$Analítico_Deriv.$AD24]=&quot;Milho BMF&quot;;0;IF([$Analítico_Deriv.$AD24]=&quot;Dolar BMF&quot;;[$Analítico_Deriv.$X24]))));0)" office:value-type="float" office:value="0" calcext:value-type="float">
            <text:p>0,00</text:p>
          </table:table-cell>
          <table:table-cell table:formula="of:=COM.MICROSOFT.XLOOKUP([$Analítico_Deriv.$T24];[$Preços_MTM.C:.C];[$Preços_MTM.D:.D];COM.MICROSOFT.XLOOKUP([$Analítico_Deriv.$T24];[$Preços_MTM.H:.H];[$Preços_MTM.I:.I]))" office:value-type="float" office:value="73.57" calcext:value-type="float">
            <text:p>73,5700</text:p>
          </table:table-cell>
          <table:table-cell table:formula="of:=IF([$Analítico_Deriv.$C24]=&quot;Vigente&quot;;IF([$Analítico_Deriv.$S24]=&quot;CBOT&quot;;([$Analítico_Deriv.$Z24]-[$Analítico_Deriv.$U24])*5000*[$Analítico_Deriv.$R24];IF([$Analítico_Deriv.$S24]=&quot;BMF&quot;;[$Analítico_Deriv.$AB24]/[$Preços_MTM.$I$4];&quot;VERIFICAR&quot;));0)" office:value-type="float" office:value="-311.868322263933" calcext:value-type="float">
            <text:p>-311,87</text:p>
          </table:table-cell>
          <table:table-cell table:formula="of:=IF([$Analítico_Deriv.$C24]=&quot;Vigente&quot;;(IF([$Analítico_Deriv.$S24]=&quot;BMF&quot;;([$Analítico_Deriv.$Z24]-[$Analítico_Deriv.$U24])*450*[$Analítico_Deriv.$R24];IF([$Analítico_Deriv.$S24]=&quot;CBOT&quot;;[$Analítico_Deriv.$AA24]*[$Preços_MTM.$I$4];&quot;VERIFICAR&quot;)))+[$Analítico_Deriv.$AC24];0)" office:value-type="float" office:value="-1620" calcext:value-type="float">
            <text:p>-1.620,00</text:p>
          </table:table-cell>
          <table:table-cell table:formula="of:=IF([$Analítico_Deriv.$C24]=&quot;Vigente&quot;;IF([$Analítico_Deriv.$AD24]=&quot;DOLAR BMF&quot;;([$Analítico_Deriv.$Z24]-[$Analítico_Deriv.$U24])*[$Analítico_Deriv.$X24];0);0)" office:value-type="float" office:value="0" calcext:value-type="float">
            <text:p>0,00</text:p>
          </table:table-cell>
          <table:table-cell table:style-name="ce33" table:formula="of:=COM.MICROSOFT.CONCAT([$Analítico_Deriv.$D24];&quot; &quot;;[$Analítico_Deriv.$S24])" office:value-type="string" office:string-value="Milho BMF" calcext:value-type="string">
            <text:p>Milho BMF</text:p>
          </table:table-cell>
          <table:table-cell table:formula="of:=IF([$Analítico_Deriv.$AD24]=&quot;DOLAR BMF&quot;;0;(COM.MICROSOFT.XLOOKUP([$Analítico_Deriv.$AD24];[$dms.D:.D];[$dms.E:.E]))*[$Analítico_Deriv.$R24])" office:value-type="float" office:value="-270000" calcext:value-type="float">
            <text:p>-270.000</text:p>
          </table:table-cell>
          <table:table-cell table:formula="of:=[$Analítico_Deriv.$AE24]/1000" office:value-type="float" office:value="-270" calcext:value-type="float">
            <text:p>-270</text:p>
          </table:table-cell>
          <table:table-cell table:style-name="ce33" table:formula="of:=COM.MICROSOFT.XLOOKUP([$Analítico_Deriv.$V24];[$dms.J:.J];[$dms.L:.L])" office:value-type="string" office:string-value="Jan" calcext:value-type="string">
            <text:p>Jan</text:p>
          </table:table-cell>
          <table:table-cell table:style-name="ce33" table:formula="of:=COM.MICROSOFT.XLOOKUP([$Analítico_Deriv.$V24];[$dms.J:.J];[$dms.M:.M])" office:value-type="float" office:value="2027" calcext:value-type="float">
            <text:p>2027</text:p>
          </table:table-cell>
          <table:table-cell table:style-name="ce33"/>
          <table:table-cell table:formula="of:=COM.MICROSOFT.XLOOKUP([$Analítico_Deriv.$AD24];[$Gestão_Stonex.G:.G];[$Gestão_Stonex.H:.H])" office:value-type="percentage" office:value="0.55" calcext:value-type="percentage">
            <text:p>55,00%</text:p>
          </table:table-cell>
          <table:table-cell table:style-name="ce33" table:formula="of:=[$Analítico_Deriv.$Z24]+([$Analítico_Deriv.$AJ24]*[$Analítico_Deriv.$Z24])" office:value-type="float" office:value="114.0335" calcext:value-type="float">
            <text:p>114,0335</text:p>
          </table:table-cell>
          <table:table-cell table:formula="of:=IF([$Analítico_Deriv.$C24]=&quot;Vigente&quot;;IF([$Analítico_Deriv.$S24]=&quot;CBOT&quot;;([$Analítico_Deriv.$AK24]-[$Analítico_Deriv.$U24])*5000*[$Analítico_Deriv.$R24];IF([$Analítico_Deriv.$S24]=&quot;BMF&quot;;[$Analítico_Deriv.$AM24]/[$Preços_MTM.$I$4];&quot;VERIFICAR&quot;));0)" office:value-type="float" office:value="-35365.4345942824" calcext:value-type="float">
            <text:p>-35.365,43</text:p>
          </table:table-cell>
          <table:table-cell table:formula="of:=IF([$Analítico_Deriv.$C24]=&quot;Vigente&quot;;(IF([$Analítico_Deriv.$S24]=&quot;BMF&quot;;([$Analítico_Deriv.$AK24]-[$Analítico_Deriv.$U24])*450*[$Analítico_Deriv.$R24];IF([$Analítico_Deriv.$S24]=&quot;CBOT&quot;;[$Analítico_Deriv.$AL24]*[$Preços_MTM.$I$4];&quot;VERIFICAR&quot;)))+[$Analítico_Deriv.$AN24];0)" office:value-type="float" office:value="-183705.75" calcext:value-type="float">
            <text:p>-183.705,75</text:p>
          </table:table-cell>
          <table:table-cell table:style-name="ce33" table:formula="of:=IF([$Analítico_Deriv.$C24]=&quot;Vigente&quot;;IF([$Analítico_Deriv.$AD24]=&quot;DOLAR BMF&quot;;([$Analítico_Deriv.$AK24]-[$Analítico_Deriv.$U24])*[$Analítico_Deriv.$X24];0);0)" office:value-type="float" office:value="0" calcext:value-type="float">
            <text:p>0</text:p>
          </table:table-cell>
          <table:table-cell table:formula="of:=IF([$Analítico_Deriv.$I24]=&quot;Vigente&quot;;IF([$Analítico_Deriv.$AD24]=&quot;Soja CBOT&quot;;[$Analítico_Deriv.$X24]*-1;IF([$Analítico_Deriv.$AD24]=&quot;Milho CBOT&quot;;[$Analítico_Deriv.$X24]*-1;IF([$Analítico_Deriv.$AD24]=&quot;Milho BMF&quot;;0;IF([$Analítico_Deriv.$AD24]=&quot;Dolar BMF&quot;;[$Analítico_Deriv.$X24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24];[$dms.J:.J];[$dms.L:.L]);&quot;&quot;)" office:value-type="string" office:string-value="Jun" calcext:value-type="string">
            <text:p>Jun</text:p>
          </table:table-cell>
          <table:table-cell table:style-name="ce23" table:formula="of:=IFERROR(COM.MICROSOFT.XLOOKUP([$Analítico_Deriv.$B24];[$dms.J:.J];[$dms.M:.M]);&quot;&quot;)" office:value-type="float" office:value="2026" calcext:value-type="float">
            <text:p>2.026,00</text:p>
          </table:table-cell>
          <table:table-cell table:style-name="ce23" table:formula="of:=COM.MICROSOFT.XLOOKUP([$Analítico_Deriv.$W24];[$dms.J:.J];[$dms.L:.L])" office:value-type="string" office:string-value="Jan" calcext:value-type="string">
            <text:p>Jan</text:p>
          </table:table-cell>
          <table:table-cell table:style-name="ce23" table:formula="of:=COM.MICROSOFT.XLOOKUP([$Analítico_Deriv.$W24];[$dms.J:.J];[$dms.M:.M])" office:value-type="float" office:value="2027" calcext:value-type="float">
            <text:p>2.027,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F19</text:p>
          </table:table-cell>
          <table:table-cell table:style-name="ce5" office:value-type="date" office:date-value="2026-06-18" calcext:value-type="date">
            <text:p>18/6/2026</text:p>
          </table:table-cell>
          <table:table-cell table:style-name="ce131" office:value-type="string" calcext:value-type="string">
            <text:p>Vigente</text:p>
          </table:table-cell>
          <table:table-cell table:number-columns-repeated="2" table:style-name="ce5" office:value-type="string" calcext:value-type="string">
            <text:p>Milho</text:p>
          </table:table-cell>
          <table:table-cell table:style-name="ce5" office:value-type="string" calcext:value-type="string">
            <text:p>Safra Próxima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Vigente</text:p>
          </table:table-cell>
          <table:table-cell table:style-name="ce33" office:value-type="float" office:value="51283536" calcext:value-type="float">
            <text:p>51283536</text:p>
          </table:table-cell>
          <table:table-cell table:style-name="ce33" office:value-type="string" calcext:value-type="string">
            <text:p>26F03369838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90" calcext:value-type="float">
            <text:p>90,00</text:p>
          </table:table-cell>
          <table:table-cell table:style-name="ce135" table:formula="of:=IF([$Analítico_Deriv.$P25]=&quot;VENDA&quot;;[$Analítico_Deriv.$Q25]*-1;[$Analítico_Deriv.$Q25])" office:value-type="float" office:value="-90" calcext:value-type="float">
            <text:p>-90,00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CCMF27</text:p>
          </table:table-cell>
          <table:table-cell table:style-name="ce127" office:value-type="float" office:value="73.29" calcext:value-type="float">
            <text:p>73,2900</text:p>
          </table:table-cell>
          <table:table-cell table:style-name="ce5" office:value-type="date" office:date-value="2027-01-15" calcext:value-type="date">
            <text:p>15/1/2027</text:p>
          </table:table-cell>
          <table:table-cell table:style-name="ce5" office:value-type="date" office:date-value="2027-01-19" calcext:value-type="date">
            <text:p>19/1/2027</text:p>
          </table:table-cell>
          <table:table-cell table:formula="of:=IF([$Analítico_Deriv.$AD25]=&quot;Dolar BMF&quot;;&quot;PREENCHER&quot;;IF([$Analítico_Deriv.$AD25]=&quot;SOJA CBOT&quot;;[$Analítico_Deriv.$R25]*5000*[$Analítico_Deriv.$U25];IF([$Analítico_Deriv.$AD25]=&quot;MILHO CBOT&quot;;[$Analítico_Deriv.$R25]*5000*[$Analítico_Deriv.$U25];IF([$Analítico_Deriv.$AD25]=&quot;MILHO BMF&quot;;0;&quot;VALIDAR&quot;))))" office:value-type="float" office:value="0" calcext:value-type="float">
            <text:p>0,00</text:p>
          </table:table-cell>
          <table:table-cell table:formula="of:=IF([$Analítico_Deriv.$C25]=&quot;Vigente&quot;;IF([$Analítico_Deriv.$AD25]=&quot;Soja CBOT&quot;;[$Analítico_Deriv.$X25]*-1;IF([$Analítico_Deriv.$AD25]=&quot;Milho CBOT&quot;;[$Analítico_Deriv.$X25]*-1;IF([$Analítico_Deriv.$AD25]=&quot;Milho BMF&quot;;0;IF([$Analítico_Deriv.$AD25]=&quot;Dolar BMF&quot;;[$Analítico_Deriv.$X25]))));0)" office:value-type="float" office:value="0" calcext:value-type="float">
            <text:p>0,00</text:p>
          </table:table-cell>
          <table:table-cell table:formula="of:=COM.MICROSOFT.XLOOKUP([$Analítico_Deriv.$T25];[$Preços_MTM.C:.C];[$Preços_MTM.D:.D];COM.MICROSOFT.XLOOKUP([$Analítico_Deriv.$T25];[$Preços_MTM.H:.H];[$Preços_MTM.I:.I]))" office:value-type="float" office:value="73.57" calcext:value-type="float">
            <text:p>73,5700</text:p>
          </table:table-cell>
          <table:table-cell table:formula="of:=IF([$Analítico_Deriv.$C25]=&quot;Vigente&quot;;IF([$Analítico_Deriv.$S25]=&quot;CBOT&quot;;([$Analítico_Deriv.$Z25]-[$Analítico_Deriv.$U25])*5000*[$Analítico_Deriv.$R25];IF([$Analítico_Deriv.$S25]=&quot;BMF&quot;;[$Analítico_Deriv.$AB25]/[$Preços_MTM.$I$4];&quot;VERIFICAR&quot;));0)" office:value-type="float" office:value="-2183.07825584743" calcext:value-type="float">
            <text:p>-2.183,08</text:p>
          </table:table-cell>
          <table:table-cell table:formula="of:=IF([$Analítico_Deriv.$C25]=&quot;Vigente&quot;;(IF([$Analítico_Deriv.$S25]=&quot;BMF&quot;;([$Analítico_Deriv.$Z25]-[$Analítico_Deriv.$U25])*450*[$Analítico_Deriv.$R25];IF([$Analítico_Deriv.$S25]=&quot;CBOT&quot;;[$Analítico_Deriv.$AA25]*[$Preços_MTM.$I$4];&quot;VERIFICAR&quot;)))+[$Analítico_Deriv.$AC25];0)" office:value-type="float" office:value="-11339.9999999995" calcext:value-type="float">
            <text:p>-11.340,00</text:p>
          </table:table-cell>
          <table:table-cell table:formula="of:=IF([$Analítico_Deriv.$C25]=&quot;Vigente&quot;;IF([$Analítico_Deriv.$AD25]=&quot;DOLAR BMF&quot;;([$Analítico_Deriv.$Z25]-[$Analítico_Deriv.$U25])*[$Analítico_Deriv.$X25];0);0)" office:value-type="float" office:value="0" calcext:value-type="float">
            <text:p>0,00</text:p>
          </table:table-cell>
          <table:table-cell table:style-name="ce33" table:formula="of:=COM.MICROSOFT.CONCAT([$Analítico_Deriv.$D25];&quot; &quot;;[$Analítico_Deriv.$S25])" office:value-type="string" office:string-value="Milho BMF" calcext:value-type="string">
            <text:p>Milho BMF</text:p>
          </table:table-cell>
          <table:table-cell table:formula="of:=IF([$Analítico_Deriv.$AD25]=&quot;DOLAR BMF&quot;;0;(COM.MICROSOFT.XLOOKUP([$Analítico_Deriv.$AD25];[$dms.D:.D];[$dms.E:.E]))*[$Analítico_Deriv.$R25])" office:value-type="float" office:value="-2430000" calcext:value-type="float">
            <text:p>-2.430.000</text:p>
          </table:table-cell>
          <table:table-cell table:formula="of:=[$Analítico_Deriv.$AE25]/1000" office:value-type="float" office:value="-2430" calcext:value-type="float">
            <text:p>-2.430</text:p>
          </table:table-cell>
          <table:table-cell table:style-name="ce33" table:formula="of:=COM.MICROSOFT.XLOOKUP([$Analítico_Deriv.$V25];[$dms.J:.J];[$dms.L:.L])" office:value-type="string" office:string-value="Jan" calcext:value-type="string">
            <text:p>Jan</text:p>
          </table:table-cell>
          <table:table-cell table:style-name="ce33" table:formula="of:=COM.MICROSOFT.XLOOKUP([$Analítico_Deriv.$V25];[$dms.J:.J];[$dms.M:.M])" office:value-type="float" office:value="2027" calcext:value-type="float">
            <text:p>2027</text:p>
          </table:table-cell>
          <table:table-cell table:style-name="ce33" office:value-type="string" calcext:value-type="string">
            <text:p>LB-Milho-26</text:p>
          </table:table-cell>
          <table:table-cell table:formula="of:=COM.MICROSOFT.XLOOKUP([$Analítico_Deriv.$AD25];[$Gestão_Stonex.G:.G];[$Gestão_Stonex.H:.H])" office:value-type="percentage" office:value="0.55" calcext:value-type="percentage">
            <text:p>55,00%</text:p>
          </table:table-cell>
          <table:table-cell table:style-name="ce33" table:formula="of:=[$Analítico_Deriv.$Z25]+([$Analítico_Deriv.$AJ25]*[$Analítico_Deriv.$Z25])" office:value-type="float" office:value="114.0335" calcext:value-type="float">
            <text:p>114,0335</text:p>
          </table:table-cell>
          <table:table-cell table:formula="of:=IF([$Analítico_Deriv.$C25]=&quot;Vigente&quot;;IF([$Analítico_Deriv.$S25]=&quot;CBOT&quot;;([$Analítico_Deriv.$AK25]-[$Analítico_Deriv.$U25])*5000*[$Analítico_Deriv.$R25];IF([$Analítico_Deriv.$S25]=&quot;BMF&quot;;[$Analítico_Deriv.$AM25]/[$Preços_MTM.$I$4];&quot;VERIFICAR&quot;));0)" office:value-type="float" office:value="-317665.174704014" calcext:value-type="float">
            <text:p>-317.665,17</text:p>
          </table:table-cell>
          <table:table-cell table:formula="of:=IF([$Analítico_Deriv.$C25]=&quot;Vigente&quot;;(IF([$Analítico_Deriv.$S25]=&quot;BMF&quot;;([$Analítico_Deriv.$AK25]-[$Analítico_Deriv.$U25])*450*[$Analítico_Deriv.$R25];IF([$Analítico_Deriv.$S25]=&quot;CBOT&quot;;[$Analítico_Deriv.$AL25]*[$Preços_MTM.$I$4];&quot;VERIFICAR&quot;)))+[$Analítico_Deriv.$AN25];0)" office:value-type="float" office:value="-1650111.75" calcext:value-type="float">
            <text:p>-1.650.111,75</text:p>
          </table:table-cell>
          <table:table-cell table:style-name="ce33" table:formula="of:=IF([$Analítico_Deriv.$C25]=&quot;Vigente&quot;;IF([$Analítico_Deriv.$AD25]=&quot;DOLAR BMF&quot;;([$Analítico_Deriv.$AK25]-[$Analítico_Deriv.$U25])*[$Analítico_Deriv.$X25];0);0)" office:value-type="float" office:value="0" calcext:value-type="float">
            <text:p>0</text:p>
          </table:table-cell>
          <table:table-cell table:formula="of:=IF([$Analítico_Deriv.$I25]=&quot;Vigente&quot;;IF([$Analítico_Deriv.$AD25]=&quot;Soja CBOT&quot;;[$Analítico_Deriv.$X25]*-1;IF([$Analítico_Deriv.$AD25]=&quot;Milho CBOT&quot;;[$Analítico_Deriv.$X25]*-1;IF([$Analítico_Deriv.$AD25]=&quot;Milho BMF&quot;;0;IF([$Analítico_Deriv.$AD25]=&quot;Dolar BMF&quot;;[$Analítico_Deriv.$X25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25];[$dms.J:.J];[$dms.L:.L]);&quot;&quot;)" office:value-type="string" office:string-value="Jun" calcext:value-type="string">
            <text:p>Jun</text:p>
          </table:table-cell>
          <table:table-cell table:style-name="ce23" table:formula="of:=IFERROR(COM.MICROSOFT.XLOOKUP([$Analítico_Deriv.$B25];[$dms.J:.J];[$dms.M:.M]);&quot;&quot;)" office:value-type="float" office:value="2026" calcext:value-type="float">
            <text:p>2.026,00</text:p>
          </table:table-cell>
          <table:table-cell table:style-name="ce23" table:formula="of:=COM.MICROSOFT.XLOOKUP([$Analítico_Deriv.$W25];[$dms.J:.J];[$dms.L:.L])" office:value-type="string" office:string-value="Jan" calcext:value-type="string">
            <text:p>Jan</text:p>
          </table:table-cell>
          <table:table-cell table:style-name="ce23" table:formula="of:=COM.MICROSOFT.XLOOKUP([$Analítico_Deriv.$W25];[$dms.J:.J];[$dms.M:.M])" office:value-type="float" office:value="2027" calcext:value-type="float">
            <text:p>2.027,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F20</text:p>
          </table:table-cell>
          <table:table-cell table:style-name="ce5" office:value-type="date" office:date-value="2026-06-22" calcext:value-type="date">
            <text:p>22/6/2026</text:p>
          </table:table-cell>
          <table:table-cell table:style-name="ce131" office:value-type="string" calcext:value-type="string">
            <text:p>Vigente</text:p>
          </table:table-cell>
          <table:table-cell table:number-columns-repeated="2" table:style-name="ce5" office:value-type="string" calcext:value-type="string">
            <text:p>Milho</text:p>
          </table:table-cell>
          <table:table-cell table:style-name="ce5" office:value-type="string" calcext:value-type="string">
            <text:p>Safra Próxima</text:p>
          </table:table-cell>
          <table:table-cell table:style-name="ce5" office:value-type="string" calcext:value-type="string">
            <text:p>Saída</text:p>
          </table:table-cell>
          <table:table-cell office:value-type="string" calcext:value-type="string">
            <text:p>F18; F19</text:p>
          </table:table-cell>
          <table:table-cell table:style-name="ce5" office:value-type="string" calcext:value-type="string">
            <text:p>Vigente</text:p>
          </table:table-cell>
          <table:table-cell table:style-name="ce33" office:value-type="float" office:value="51397917" calcext:value-type="float">
            <text:p>51397917</text:p>
          </table:table-cell>
          <table:table-cell table:style-name="ce33" office:value-type="string" calcext:value-type="string">
            <text:p>26F03681863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Compr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Compra</text:p>
          </table:table-cell>
          <table:table-cell table:style-name="ce23" office:value-type="float" office:value="26" calcext:value-type="float">
            <text:p>26,00</text:p>
          </table:table-cell>
          <table:table-cell table:style-name="ce135" table:formula="of:=IF([$Analítico_Deriv.$P26]=&quot;VENDA&quot;;[$Analítico_Deriv.$Q26]*-1;[$Analítico_Deriv.$Q26])" office:value-type="float" office:value="26" calcext:value-type="float">
            <text:p>26,00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CCMF27</text:p>
          </table:table-cell>
          <table:table-cell table:style-name="ce127" office:value-type="float" office:value="73.14462" calcext:value-type="float">
            <text:p>73,1446</text:p>
          </table:table-cell>
          <table:table-cell table:style-name="ce5" office:value-type="date" office:date-value="2027-01-15" calcext:value-type="date">
            <text:p>15/1/2027</text:p>
          </table:table-cell>
          <table:table-cell table:style-name="ce5" office:value-type="date" office:date-value="2027-01-19" calcext:value-type="date">
            <text:p>19/1/2027</text:p>
          </table:table-cell>
          <table:table-cell table:formula="of:=IF([$Analítico_Deriv.$AD26]=&quot;Dolar BMF&quot;;&quot;PREENCHER&quot;;IF([$Analítico_Deriv.$AD26]=&quot;SOJA CBOT&quot;;[$Analítico_Deriv.$R26]*5000*[$Analítico_Deriv.$U26];IF([$Analítico_Deriv.$AD26]=&quot;MILHO CBOT&quot;;[$Analítico_Deriv.$R26]*5000*[$Analítico_Deriv.$U26];IF([$Analítico_Deriv.$AD26]=&quot;MILHO BMF&quot;;0;&quot;VALIDAR&quot;))))" office:value-type="float" office:value="0" calcext:value-type="float">
            <text:p>0,00</text:p>
          </table:table-cell>
          <table:table-cell table:formula="of:=IF([$Analítico_Deriv.$C26]=&quot;Vigente&quot;;IF([$Analítico_Deriv.$AD26]=&quot;Soja CBOT&quot;;[$Analítico_Deriv.$X26]*-1;IF([$Analítico_Deriv.$AD26]=&quot;Milho CBOT&quot;;[$Analítico_Deriv.$X26]*-1;IF([$Analítico_Deriv.$AD26]=&quot;Milho BMF&quot;;0;IF([$Analítico_Deriv.$AD26]=&quot;Dolar BMF&quot;;[$Analítico_Deriv.$X26]))));0)" office:value-type="float" office:value="0" calcext:value-type="float">
            <text:p>0,00</text:p>
          </table:table-cell>
          <table:table-cell table:formula="of:=COM.MICROSOFT.XLOOKUP([$Analítico_Deriv.$T26];[$Preços_MTM.C:.C];[$Preços_MTM.D:.D];COM.MICROSOFT.XLOOKUP([$Analítico_Deriv.$T26];[$Preços_MTM.H:.H];[$Preços_MTM.I:.I]))" office:value-type="float" office:value="73.57" calcext:value-type="float">
            <text:p>73,5700</text:p>
          </table:table-cell>
          <table:table-cell table:formula="of:=IF([$Analítico_Deriv.$C26]=&quot;Vigente&quot;;IF([$Analítico_Deriv.$S26]=&quot;CBOT&quot;;([$Analítico_Deriv.$Z26]-[$Analítico_Deriv.$U26])*5000*[$Analítico_Deriv.$R26];IF([$Analítico_Deriv.$S26]=&quot;BMF&quot;;[$Analítico_Deriv.$AB26]/[$Preços_MTM.$I$4];&quot;VERIFICAR&quot;));0)" office:value-type="float" office:value="958.118394455652" calcext:value-type="float">
            <text:p>958,12</text:p>
          </table:table-cell>
          <table:table-cell table:formula="of:=IF([$Analítico_Deriv.$C26]=&quot;Vigente&quot;;(IF([$Analítico_Deriv.$S26]=&quot;BMF&quot;;([$Analítico_Deriv.$Z26]-[$Analítico_Deriv.$U26])*450*[$Analítico_Deriv.$R26];IF([$Analítico_Deriv.$S26]=&quot;CBOT&quot;;[$Analítico_Deriv.$AA26]*[$Preços_MTM.$I$4];&quot;VERIFICAR&quot;)))+[$Analítico_Deriv.$AC26];0)" office:value-type="float" office:value="4976.94599999988" calcext:value-type="float">
            <text:p>4.976,95</text:p>
          </table:table-cell>
          <table:table-cell table:formula="of:=IF([$Analítico_Deriv.$C26]=&quot;Vigente&quot;;IF([$Analítico_Deriv.$AD26]=&quot;DOLAR BMF&quot;;([$Analítico_Deriv.$Z26]-[$Analítico_Deriv.$U26])*[$Analítico_Deriv.$X26];0);0)" office:value-type="float" office:value="0" calcext:value-type="float">
            <text:p>0,00</text:p>
          </table:table-cell>
          <table:table-cell table:style-name="ce33" table:formula="of:=COM.MICROSOFT.CONCAT([$Analítico_Deriv.$D26];&quot; &quot;;[$Analítico_Deriv.$S26])" office:value-type="string" office:string-value="Milho BMF" calcext:value-type="string">
            <text:p>Milho BMF</text:p>
          </table:table-cell>
          <table:table-cell table:formula="of:=IF([$Analítico_Deriv.$AD26]=&quot;DOLAR BMF&quot;;0;(COM.MICROSOFT.XLOOKUP([$Analítico_Deriv.$AD26];[$dms.D:.D];[$dms.E:.E]))*[$Analítico_Deriv.$R26])" office:value-type="float" office:value="702000" calcext:value-type="float">
            <text:p>702.000</text:p>
          </table:table-cell>
          <table:table-cell table:formula="of:=[$Analítico_Deriv.$AE26]/1000" office:value-type="float" office:value="702" calcext:value-type="float">
            <text:p>702</text:p>
          </table:table-cell>
          <table:table-cell table:style-name="ce33" table:formula="of:=COM.MICROSOFT.XLOOKUP([$Analítico_Deriv.$V26];[$dms.J:.J];[$dms.L:.L])" office:value-type="string" office:string-value="Jan" calcext:value-type="string">
            <text:p>Jan</text:p>
          </table:table-cell>
          <table:table-cell table:style-name="ce33" table:formula="of:=COM.MICROSOFT.XLOOKUP([$Analítico_Deriv.$V26];[$dms.J:.J];[$dms.M:.M])" office:value-type="float" office:value="2027" calcext:value-type="float">
            <text:p>2027</text:p>
          </table:table-cell>
          <table:table-cell table:style-name="ce33"/>
          <table:table-cell table:formula="of:=COM.MICROSOFT.XLOOKUP([$Analítico_Deriv.$AD26];[$Gestão_Stonex.G:.G];[$Gestão_Stonex.H:.H])" office:value-type="percentage" office:value="0.55" calcext:value-type="percentage">
            <text:p>55,00%</text:p>
          </table:table-cell>
          <table:table-cell table:style-name="ce33" table:formula="of:=[$Analítico_Deriv.$Z26]+([$Analítico_Deriv.$AJ26]*[$Analítico_Deriv.$Z26])" office:value-type="float" office:value="114.0335" calcext:value-type="float">
            <text:p>114,0335</text:p>
          </table:table-cell>
          <table:table-cell table:formula="of:=IF([$Analítico_Deriv.$C26]=&quot;Vigente&quot;;IF([$Analítico_Deriv.$S26]=&quot;CBOT&quot;;([$Analítico_Deriv.$AK26]-[$Analítico_Deriv.$U26])*5000*[$Analítico_Deriv.$R26];IF([$Analítico_Deriv.$S26]=&quot;BMF&quot;;[$Analítico_Deriv.$AM26]/[$Preços_MTM.$I$4];&quot;VERIFICAR&quot;));0)" office:value-type="float" office:value="92097.3907017037" calcext:value-type="float">
            <text:p>92.097,39</text:p>
          </table:table-cell>
          <table:table-cell table:formula="of:=IF([$Analítico_Deriv.$C26]=&quot;Vigente&quot;;(IF([$Analítico_Deriv.$S26]=&quot;BMF&quot;;([$Analítico_Deriv.$AK26]-[$Analítico_Deriv.$U26])*450*[$Analítico_Deriv.$R26];IF([$Analítico_Deriv.$S26]=&quot;CBOT&quot;;[$Analítico_Deriv.$AL26]*[$Preços_MTM.$I$4];&quot;VERIFICAR&quot;)))+[$Analítico_Deriv.$AN26];0)" office:value-type="float" office:value="478399.896" calcext:value-type="float">
            <text:p>478.399,90</text:p>
          </table:table-cell>
          <table:table-cell table:style-name="ce33" table:formula="of:=IF([$Analítico_Deriv.$C26]=&quot;Vigente&quot;;IF([$Analítico_Deriv.$AD26]=&quot;DOLAR BMF&quot;;([$Analítico_Deriv.$AK26]-[$Analítico_Deriv.$U26])*[$Analítico_Deriv.$X26];0);0)" office:value-type="float" office:value="0" calcext:value-type="float">
            <text:p>0</text:p>
          </table:table-cell>
          <table:table-cell table:formula="of:=IF([$Analítico_Deriv.$I26]=&quot;Vigente&quot;;IF([$Analítico_Deriv.$AD26]=&quot;Soja CBOT&quot;;[$Analítico_Deriv.$X26]*-1;IF([$Analítico_Deriv.$AD26]=&quot;Milho CBOT&quot;;[$Analítico_Deriv.$X26]*-1;IF([$Analítico_Deriv.$AD26]=&quot;Milho BMF&quot;;0;IF([$Analítico_Deriv.$AD26]=&quot;Dolar BMF&quot;;[$Analítico_Deriv.$X26]))));0)" office:value-type="float" office:value="0" calcext:value-type="float">
            <text:p>0,00</text:p>
          </table:table-cell>
          <table:table-cell office:value-type="float" office:value="-390" calcext:value-type="float">
            <text:p>-390,00</text:p>
          </table:table-cell>
          <table:table-cell table:style-name="ce23" table:formula="of:=IFERROR(COM.MICROSOFT.XLOOKUP([$Analítico_Deriv.$B26];[$dms.J:.J];[$dms.L:.L]);&quot;&quot;)" office:value-type="string" office:string-value="Jun" calcext:value-type="string">
            <text:p>Jun</text:p>
          </table:table-cell>
          <table:table-cell table:style-name="ce23" table:formula="of:=IFERROR(COM.MICROSOFT.XLOOKUP([$Analítico_Deriv.$B26];[$dms.J:.J];[$dms.M:.M]);&quot;&quot;)" office:value-type="float" office:value="2026" calcext:value-type="float">
            <text:p>2.026,00</text:p>
          </table:table-cell>
          <table:table-cell table:style-name="ce23" table:formula="of:=COM.MICROSOFT.XLOOKUP([$Analítico_Deriv.$W26];[$dms.J:.J];[$dms.L:.L])" office:value-type="string" office:string-value="Jan" calcext:value-type="string">
            <text:p>Jan</text:p>
          </table:table-cell>
          <table:table-cell table:style-name="ce23" table:formula="of:=COM.MICROSOFT.XLOOKUP([$Analítico_Deriv.$W26];[$dms.J:.J];[$dms.M:.M])" office:value-type="float" office:value="2027" calcext:value-type="float">
            <text:p>2.027,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F21</text:p>
          </table:table-cell>
          <table:table-cell table:style-name="ce5" office:value-type="date" office:date-value="2026-06-23" calcext:value-type="date">
            <text:p>23/6/2026</text:p>
          </table:table-cell>
          <table:table-cell table:style-name="ce131" office:value-type="string" calcext:value-type="string">
            <text:p>Vigente</text:p>
          </table:table-cell>
          <table:table-cell table:number-columns-repeated="2" table:style-name="ce5" office:value-type="string" calcext:value-type="string">
            <text:p>Milho</text:p>
          </table:table-cell>
          <table:table-cell table:style-name="ce5" office:value-type="string" calcext:value-type="string">
            <text:p>Safra Próxima</text:p>
          </table:table-cell>
          <table:table-cell table:style-name="ce5" office:value-type="string" calcext:value-type="string">
            <text:p>Saída</text:p>
          </table:table-cell>
          <table:table-cell office:value-type="string" calcext:value-type="string">
            <text:p>F19</text:p>
          </table:table-cell>
          <table:table-cell table:style-name="ce5" office:value-type="string" calcext:value-type="string">
            <text:p>Vigente</text:p>
          </table:table-cell>
          <table:table-cell table:style-name="ce33" office:value-type="float" office:value="51445068" calcext:value-type="float">
            <text:p>51445068</text:p>
          </table:table-cell>
          <table:table-cell table:style-name="ce33" office:value-type="string" calcext:value-type="string">
            <text:p>26F03792482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Compr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Compra</text:p>
          </table:table-cell>
          <table:table-cell table:style-name="ce23" office:value-type="float" office:value="6.3" calcext:value-type="float">
            <text:p>6,30</text:p>
          </table:table-cell>
          <table:table-cell table:style-name="ce135" table:formula="of:=IF([$Analítico_Deriv.$P27]=&quot;VENDA&quot;;[$Analítico_Deriv.$Q27]*-1;[$Analítico_Deriv.$Q27])" office:value-type="float" office:value="6.3" calcext:value-type="float">
            <text:p>6,30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CCMF27</text:p>
          </table:table-cell>
          <table:table-cell table:style-name="ce127" office:value-type="float" office:value="73.16667" calcext:value-type="float">
            <text:p>73,1667</text:p>
          </table:table-cell>
          <table:table-cell table:style-name="ce5" office:value-type="date" office:date-value="2027-01-15" calcext:value-type="date">
            <text:p>15/1/2027</text:p>
          </table:table-cell>
          <table:table-cell table:style-name="ce5" office:value-type="date" office:date-value="2027-01-19" calcext:value-type="date">
            <text:p>19/1/2027</text:p>
          </table:table-cell>
          <table:table-cell table:formula="of:=IF([$Analítico_Deriv.$AD27]=&quot;Dolar BMF&quot;;&quot;PREENCHER&quot;;IF([$Analítico_Deriv.$AD27]=&quot;SOJA CBOT&quot;;[$Analítico_Deriv.$R27]*5000*[$Analítico_Deriv.$U27];IF([$Analítico_Deriv.$AD27]=&quot;MILHO CBOT&quot;;[$Analítico_Deriv.$R27]*5000*[$Analítico_Deriv.$U27];IF([$Analítico_Deriv.$AD27]=&quot;MILHO BMF&quot;;0;&quot;VALIDAR&quot;))))" office:value-type="float" office:value="0" calcext:value-type="float">
            <text:p>0,00</text:p>
          </table:table-cell>
          <table:table-cell table:formula="of:=IF([$Analítico_Deriv.$C27]=&quot;Vigente&quot;;IF([$Analítico_Deriv.$AD27]=&quot;Soja CBOT&quot;;[$Analítico_Deriv.$X27]*-1;IF([$Analítico_Deriv.$AD27]=&quot;Milho CBOT&quot;;[$Analítico_Deriv.$X27]*-1;IF([$Analítico_Deriv.$AD27]=&quot;Milho BMF&quot;;0;IF([$Analítico_Deriv.$AD27]=&quot;Dolar BMF&quot;;[$Analítico_Deriv.$X27]))));0)" office:value-type="float" office:value="0" calcext:value-type="float">
            <text:p>0,00</text:p>
          </table:table-cell>
          <table:table-cell table:formula="of:=COM.MICROSOFT.XLOOKUP([$Analítico_Deriv.$T27];[$Preços_MTM.C:.C];[$Preços_MTM.D:.D];COM.MICROSOFT.XLOOKUP([$Analítico_Deriv.$T27];[$Preços_MTM.H:.H];[$Preços_MTM.I:.I]))" office:value-type="float" office:value="73.57" calcext:value-type="float">
            <text:p>73,5700</text:p>
          </table:table-cell>
          <table:table-cell table:formula="of:=IF([$Analítico_Deriv.$C27]=&quot;Vigente&quot;;IF([$Analítico_Deriv.$S27]=&quot;CBOT&quot;;([$Analítico_Deriv.$Z27]-[$Analítico_Deriv.$U27])*5000*[$Analítico_Deriv.$R27];IF([$Analítico_Deriv.$S27]=&quot;BMF&quot;;[$Analítico_Deriv.$AB27]/[$Preços_MTM.$I$4];&quot;VERIFICAR&quot;));0)" office:value-type="float" office:value="220.125238232745" calcext:value-type="float">
            <text:p>220,13</text:p>
          </table:table-cell>
          <table:table-cell table:formula="of:=IF([$Analítico_Deriv.$C27]=&quot;Vigente&quot;;(IF([$Analítico_Deriv.$S27]=&quot;BMF&quot;;([$Analítico_Deriv.$Z27]-[$Analítico_Deriv.$U27])*450*[$Analítico_Deriv.$R27];IF([$Analítico_Deriv.$S27]=&quot;CBOT&quot;;[$Analítico_Deriv.$AA27]*[$Preços_MTM.$I$4];&quot;VERIFICAR&quot;)))+[$Analítico_Deriv.$AC27];0)" office:value-type="float" office:value="1143.44054999999" calcext:value-type="float">
            <text:p>1.143,44</text:p>
          </table:table-cell>
          <table:table-cell table:formula="of:=IF([$Analítico_Deriv.$C27]=&quot;Vigente&quot;;IF([$Analítico_Deriv.$AD27]=&quot;DOLAR BMF&quot;;([$Analítico_Deriv.$Z27]-[$Analítico_Deriv.$U27])*[$Analítico_Deriv.$X27];0);0)" office:value-type="float" office:value="0" calcext:value-type="float">
            <text:p>0,00</text:p>
          </table:table-cell>
          <table:table-cell table:style-name="ce33" table:formula="of:=COM.MICROSOFT.CONCAT([$Analítico_Deriv.$D27];&quot; &quot;;[$Analítico_Deriv.$S27])" office:value-type="string" office:string-value="Milho BMF" calcext:value-type="string">
            <text:p>Milho BMF</text:p>
          </table:table-cell>
          <table:table-cell table:formula="of:=IF([$Analítico_Deriv.$AD27]=&quot;DOLAR BMF&quot;;0;(COM.MICROSOFT.XLOOKUP([$Analítico_Deriv.$AD27];[$dms.D:.D];[$dms.E:.E]))*[$Analítico_Deriv.$R27])" office:value-type="float" office:value="170100" calcext:value-type="float">
            <text:p>170.100</text:p>
          </table:table-cell>
          <table:table-cell table:formula="of:=[$Analítico_Deriv.$AE27]/1000" office:value-type="float" office:value="170.1" calcext:value-type="float">
            <text:p>170</text:p>
          </table:table-cell>
          <table:table-cell table:style-name="ce33" table:formula="of:=COM.MICROSOFT.XLOOKUP([$Analítico_Deriv.$V27];[$dms.J:.J];[$dms.L:.L])" office:value-type="string" office:string-value="Jan" calcext:value-type="string">
            <text:p>Jan</text:p>
          </table:table-cell>
          <table:table-cell table:style-name="ce33" table:formula="of:=COM.MICROSOFT.XLOOKUP([$Analítico_Deriv.$V27];[$dms.J:.J];[$dms.M:.M])" office:value-type="float" office:value="2027" calcext:value-type="float">
            <text:p>2027</text:p>
          </table:table-cell>
          <table:table-cell table:style-name="ce33"/>
          <table:table-cell table:formula="of:=COM.MICROSOFT.XLOOKUP([$Analítico_Deriv.$AD27];[$Gestão_Stonex.G:.G];[$Gestão_Stonex.H:.H])" office:value-type="percentage" office:value="0.55" calcext:value-type="percentage">
            <text:p>55,00%</text:p>
          </table:table-cell>
          <table:table-cell table:style-name="ce33" table:formula="of:=[$Analítico_Deriv.$Z27]+([$Analítico_Deriv.$AJ27]*[$Analítico_Deriv.$Z27])" office:value-type="float" office:value="114.0335" calcext:value-type="float">
            <text:p>114,0335</text:p>
          </table:table-cell>
          <table:table-cell table:formula="of:=IF([$Analítico_Deriv.$C27]=&quot;Vigente&quot;;IF([$Analítico_Deriv.$S27]=&quot;CBOT&quot;;([$Analítico_Deriv.$AK27]-[$Analítico_Deriv.$U27])*5000*[$Analítico_Deriv.$R27];IF([$Analítico_Deriv.$S27]=&quot;BMF&quot;;[$Analítico_Deriv.$AM27]/[$Preços_MTM.$I$4];&quot;VERIFICAR&quot;));0)" office:value-type="float" office:value="22303.8719896044" calcext:value-type="float">
            <text:p>22.303,87</text:p>
          </table:table-cell>
          <table:table-cell table:formula="of:=IF([$Analítico_Deriv.$C27]=&quot;Vigente&quot;;(IF([$Analítico_Deriv.$S27]=&quot;BMF&quot;;([$Analítico_Deriv.$AK27]-[$Analítico_Deriv.$U27])*450*[$Analítico_Deriv.$R27];IF([$Analítico_Deriv.$S27]=&quot;CBOT&quot;;[$Analítico_Deriv.$AL27]*[$Preços_MTM.$I$4];&quot;VERIFICAR&quot;)))+[$Analítico_Deriv.$AN27];0)" office:value-type="float" office:value="115857.46305" calcext:value-type="float">
            <text:p>115.857,46</text:p>
          </table:table-cell>
          <table:table-cell table:style-name="ce33" table:formula="of:=IF([$Analítico_Deriv.$C27]=&quot;Vigente&quot;;IF([$Analítico_Deriv.$AD27]=&quot;DOLAR BMF&quot;;([$Analítico_Deriv.$AK27]-[$Analítico_Deriv.$U27])*[$Analítico_Deriv.$X27];0);0)" office:value-type="float" office:value="0" calcext:value-type="float">
            <text:p>0</text:p>
          </table:table-cell>
          <table:table-cell table:formula="of:=IF([$Analítico_Deriv.$I27]=&quot;Vigente&quot;;IF([$Analítico_Deriv.$AD27]=&quot;Soja CBOT&quot;;[$Analítico_Deriv.$X27]*-1;IF([$Analítico_Deriv.$AD27]=&quot;Milho CBOT&quot;;[$Analítico_Deriv.$X27]*-1;IF([$Analítico_Deriv.$AD27]=&quot;Milho BMF&quot;;0;IF([$Analítico_Deriv.$AD27]=&quot;Dolar BMF&quot;;[$Analítico_Deriv.$X27]))));0)" office:value-type="float" office:value="0" calcext:value-type="float">
            <text:p>0,00</text:p>
          </table:table-cell>
          <table:table-cell office:value-type="float" office:value="-94.5" calcext:value-type="float">
            <text:p>-94,50</text:p>
          </table:table-cell>
          <table:table-cell table:style-name="ce23" table:formula="of:=IFERROR(COM.MICROSOFT.XLOOKUP([$Analítico_Deriv.$B27];[$dms.J:.J];[$dms.L:.L]);&quot;&quot;)" office:value-type="string" office:string-value="Jun" calcext:value-type="string">
            <text:p>Jun</text:p>
          </table:table-cell>
          <table:table-cell table:style-name="ce23" table:formula="of:=IFERROR(COM.MICROSOFT.XLOOKUP([$Analítico_Deriv.$B27];[$dms.J:.J];[$dms.M:.M]);&quot;&quot;)" office:value-type="float" office:value="2026" calcext:value-type="float">
            <text:p>2.026,00</text:p>
          </table:table-cell>
          <table:table-cell table:style-name="ce23" table:formula="of:=COM.MICROSOFT.XLOOKUP([$Analítico_Deriv.$W27];[$dms.J:.J];[$dms.L:.L])" office:value-type="string" office:string-value="Jan" calcext:value-type="string">
            <text:p>Jan</text:p>
          </table:table-cell>
          <table:table-cell table:style-name="ce23" table:formula="of:=COM.MICROSOFT.XLOOKUP([$Analítico_Deriv.$W27];[$dms.J:.J];[$dms.M:.M])" office:value-type="float" office:value="2027" calcext:value-type="float">
            <text:p>2.027,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F22</text:p>
          </table:table-cell>
          <table:table-cell table:style-name="ce5" office:value-type="date" office:date-value="2026-06-23" calcext:value-type="date">
            <text:p>23/6/2026</text:p>
          </table:table-cell>
          <table:table-cell table:style-name="ce131" office:value-type="string" calcext:value-type="string">
            <text:p>Vigente</text:p>
          </table:table-cell>
          <table:table-cell table:number-columns-repeated="2" table:style-name="ce5" office:value-type="string" calcext:value-type="string">
            <text:p>Milho</text:p>
          </table:table-cell>
          <table:table-cell table:style-name="ce5" office:value-type="string" calcext:value-type="string">
            <text:p>Safra Próxima</text:p>
          </table:table-cell>
          <table:table-cell table:style-name="ce5" office:value-type="string" calcext:value-type="string">
            <text:p>Saída</text:p>
          </table:table-cell>
          <table:table-cell office:value-type="string" calcext:value-type="string">
            <text:p>F19</text:p>
          </table:table-cell>
          <table:table-cell table:style-name="ce5" office:value-type="string" calcext:value-type="string">
            <text:p>Vigente</text:p>
          </table:table-cell>
          <table:table-cell table:style-name="ce33" office:value-type="float" office:value="51446205" calcext:value-type="float">
            <text:p>51446205</text:p>
          </table:table-cell>
          <table:table-cell table:style-name="ce33" office:value-type="string" calcext:value-type="string">
            <text:p>26F03792483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Compr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Compra</text:p>
          </table:table-cell>
          <table:table-cell table:style-name="ce23" office:value-type="float" office:value="24" calcext:value-type="float">
            <text:p>24,00</text:p>
          </table:table-cell>
          <table:table-cell table:style-name="ce135" table:formula="of:=IF([$Analítico_Deriv.$P28]=&quot;VENDA&quot;;[$Analítico_Deriv.$Q28]*-1;[$Analítico_Deriv.$Q28])" office:value-type="float" office:value="24" calcext:value-type="float">
            <text:p>24,00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CCMF27</text:p>
          </table:table-cell>
          <table:table-cell table:style-name="ce127" office:value-type="float" office:value="73.16667" calcext:value-type="float">
            <text:p>73,1667</text:p>
          </table:table-cell>
          <table:table-cell table:style-name="ce5" office:value-type="date" office:date-value="2027-01-15" calcext:value-type="date">
            <text:p>15/1/2027</text:p>
          </table:table-cell>
          <table:table-cell table:style-name="ce5" office:value-type="date" office:date-value="2027-01-19" calcext:value-type="date">
            <text:p>19/1/2027</text:p>
          </table:table-cell>
          <table:table-cell table:formula="of:=IF([$Analítico_Deriv.$AD28]=&quot;Dolar BMF&quot;;&quot;PREENCHER&quot;;IF([$Analítico_Deriv.$AD28]=&quot;SOJA CBOT&quot;;[$Analítico_Deriv.$R28]*5000*[$Analítico_Deriv.$U28];IF([$Analítico_Deriv.$AD28]=&quot;MILHO CBOT&quot;;[$Analítico_Deriv.$R28]*5000*[$Analítico_Deriv.$U28];IF([$Analítico_Deriv.$AD28]=&quot;MILHO BMF&quot;;0;&quot;VALIDAR&quot;))))" office:value-type="float" office:value="0" calcext:value-type="float">
            <text:p>0,00</text:p>
          </table:table-cell>
          <table:table-cell table:formula="of:=IF([$Analítico_Deriv.$C28]=&quot;Vigente&quot;;IF([$Analítico_Deriv.$AD28]=&quot;Soja CBOT&quot;;[$Analítico_Deriv.$X28]*-1;IF([$Analítico_Deriv.$AD28]=&quot;Milho CBOT&quot;;[$Analítico_Deriv.$X28]*-1;IF([$Analítico_Deriv.$AD28]=&quot;Milho BMF&quot;;0;IF([$Analítico_Deriv.$AD28]=&quot;Dolar BMF&quot;;[$Analítico_Deriv.$X28]))));0)" office:value-type="float" office:value="0" calcext:value-type="float">
            <text:p>0,00</text:p>
          </table:table-cell>
          <table:table-cell table:formula="of:=COM.MICROSOFT.XLOOKUP([$Analítico_Deriv.$T28];[$Preços_MTM.C:.C];[$Preços_MTM.D:.D];COM.MICROSOFT.XLOOKUP([$Analítico_Deriv.$T28];[$Preços_MTM.H:.H];[$Preços_MTM.I:.I]))" office:value-type="float" office:value="73.57" calcext:value-type="float">
            <text:p>73,5700</text:p>
          </table:table-cell>
          <table:table-cell table:formula="of:=IF([$Analítico_Deriv.$C28]=&quot;Vigente&quot;;IF([$Analítico_Deriv.$S28]=&quot;CBOT&quot;;([$Analítico_Deriv.$Z28]-[$Analítico_Deriv.$U28])*5000*[$Analítico_Deriv.$R28];IF([$Analítico_Deriv.$S28]=&quot;BMF&quot;;[$Analítico_Deriv.$AB28]/[$Preços_MTM.$I$4];&quot;VERIFICAR&quot;));0)" office:value-type="float" office:value="838.572336124741" calcext:value-type="float">
            <text:p>838,57</text:p>
          </table:table-cell>
          <table:table-cell table:formula="of:=IF([$Analítico_Deriv.$C28]=&quot;Vigente&quot;;(IF([$Analítico_Deriv.$S28]=&quot;BMF&quot;;([$Analítico_Deriv.$Z28]-[$Analítico_Deriv.$U28])*450*[$Analítico_Deriv.$R28];IF([$Analítico_Deriv.$S28]=&quot;CBOT&quot;;[$Analítico_Deriv.$AA28]*[$Preços_MTM.$I$4];&quot;VERIFICAR&quot;)))+[$Analítico_Deriv.$AC28];0)" office:value-type="float" office:value="4355.96399999997" calcext:value-type="float">
            <text:p>4.355,96</text:p>
          </table:table-cell>
          <table:table-cell table:formula="of:=IF([$Analítico_Deriv.$C28]=&quot;Vigente&quot;;IF([$Analítico_Deriv.$AD28]=&quot;DOLAR BMF&quot;;([$Analítico_Deriv.$Z28]-[$Analítico_Deriv.$U28])*[$Analítico_Deriv.$X28];0);0)" office:value-type="float" office:value="0" calcext:value-type="float">
            <text:p>0,00</text:p>
          </table:table-cell>
          <table:table-cell table:style-name="ce33" table:formula="of:=COM.MICROSOFT.CONCAT([$Analítico_Deriv.$D28];&quot; &quot;;[$Analítico_Deriv.$S28])" office:value-type="string" office:string-value="Milho BMF" calcext:value-type="string">
            <text:p>Milho BMF</text:p>
          </table:table-cell>
          <table:table-cell table:formula="of:=IF([$Analítico_Deriv.$AD28]=&quot;DOLAR BMF&quot;;0;(COM.MICROSOFT.XLOOKUP([$Analítico_Deriv.$AD28];[$dms.D:.D];[$dms.E:.E]))*[$Analítico_Deriv.$R28])" office:value-type="float" office:value="648000" calcext:value-type="float">
            <text:p>648.000</text:p>
          </table:table-cell>
          <table:table-cell table:formula="of:=[$Analítico_Deriv.$AE28]/1000" office:value-type="float" office:value="648" calcext:value-type="float">
            <text:p>648</text:p>
          </table:table-cell>
          <table:table-cell table:style-name="ce33" table:formula="of:=COM.MICROSOFT.XLOOKUP([$Analítico_Deriv.$V28];[$dms.J:.J];[$dms.L:.L])" office:value-type="string" office:string-value="Jan" calcext:value-type="string">
            <text:p>Jan</text:p>
          </table:table-cell>
          <table:table-cell table:style-name="ce33" table:formula="of:=COM.MICROSOFT.XLOOKUP([$Analítico_Deriv.$V28];[$dms.J:.J];[$dms.M:.M])" office:value-type="float" office:value="2027" calcext:value-type="float">
            <text:p>2027</text:p>
          </table:table-cell>
          <table:table-cell table:style-name="ce33"/>
          <table:table-cell table:formula="of:=COM.MICROSOFT.XLOOKUP([$Analítico_Deriv.$AD28];[$Gestão_Stonex.G:.G];[$Gestão_Stonex.H:.H])" office:value-type="percentage" office:value="0.55" calcext:value-type="percentage">
            <text:p>55,00%</text:p>
          </table:table-cell>
          <table:table-cell table:style-name="ce33" table:formula="of:=[$Analítico_Deriv.$Z28]+([$Analítico_Deriv.$AJ28]*[$Analítico_Deriv.$Z28])" office:value-type="float" office:value="114.0335" calcext:value-type="float">
            <text:p>114,0335</text:p>
          </table:table-cell>
          <table:table-cell table:formula="of:=IF([$Analítico_Deriv.$C28]=&quot;Vigente&quot;;IF([$Analítico_Deriv.$S28]=&quot;CBOT&quot;;([$Analítico_Deriv.$AK28]-[$Analítico_Deriv.$U28])*5000*[$Analítico_Deriv.$R28];IF([$Analítico_Deriv.$S28]=&quot;BMF&quot;;[$Analítico_Deriv.$AM28]/[$Preços_MTM.$I$4];&quot;VERIFICAR&quot;));0)" office:value-type="float" office:value="84967.1313889691" calcext:value-type="float">
            <text:p>84.967,13</text:p>
          </table:table-cell>
          <table:table-cell table:formula="of:=IF([$Analítico_Deriv.$C28]=&quot;Vigente&quot;;(IF([$Analítico_Deriv.$S28]=&quot;BMF&quot;;([$Analítico_Deriv.$AK28]-[$Analítico_Deriv.$U28])*450*[$Analítico_Deriv.$R28];IF([$Analítico_Deriv.$S28]=&quot;CBOT&quot;;[$Analítico_Deriv.$AL28]*[$Preços_MTM.$I$4];&quot;VERIFICAR&quot;)))+[$Analítico_Deriv.$AN28];0)" office:value-type="float" office:value="441361.764" calcext:value-type="float">
            <text:p>441.361,76</text:p>
          </table:table-cell>
          <table:table-cell table:style-name="ce33" table:formula="of:=IF([$Analítico_Deriv.$C28]=&quot;Vigente&quot;;IF([$Analítico_Deriv.$AD28]=&quot;DOLAR BMF&quot;;([$Analítico_Deriv.$AK28]-[$Analítico_Deriv.$U28])*[$Analítico_Deriv.$X28];0);0)" office:value-type="float" office:value="0" calcext:value-type="float">
            <text:p>0</text:p>
          </table:table-cell>
          <table:table-cell table:formula="of:=IF([$Analítico_Deriv.$I28]=&quot;Vigente&quot;;IF([$Analítico_Deriv.$AD28]=&quot;Soja CBOT&quot;;[$Analítico_Deriv.$X28]*-1;IF([$Analítico_Deriv.$AD28]=&quot;Milho CBOT&quot;;[$Analítico_Deriv.$X28]*-1;IF([$Analítico_Deriv.$AD28]=&quot;Milho BMF&quot;;0;IF([$Analítico_Deriv.$AD28]=&quot;Dolar BMF&quot;;[$Analítico_Deriv.$X28]))));0)" office:value-type="float" office:value="0" calcext:value-type="float">
            <text:p>0,00</text:p>
          </table:table-cell>
          <table:table-cell office:value-type="float" office:value="-360" calcext:value-type="float">
            <text:p>-360,00</text:p>
          </table:table-cell>
          <table:table-cell table:style-name="ce23" table:formula="of:=IFERROR(COM.MICROSOFT.XLOOKUP([$Analítico_Deriv.$B28];[$dms.J:.J];[$dms.L:.L]);&quot;&quot;)" office:value-type="string" office:string-value="Jun" calcext:value-type="string">
            <text:p>Jun</text:p>
          </table:table-cell>
          <table:table-cell table:style-name="ce23" table:formula="of:=IFERROR(COM.MICROSOFT.XLOOKUP([$Analítico_Deriv.$B28];[$dms.J:.J];[$dms.M:.M]);&quot;&quot;)" office:value-type="float" office:value="2026" calcext:value-type="float">
            <text:p>2.026,00</text:p>
          </table:table-cell>
          <table:table-cell table:style-name="ce23" table:formula="of:=COM.MICROSOFT.XLOOKUP([$Analítico_Deriv.$W28];[$dms.J:.J];[$dms.L:.L])" office:value-type="string" office:string-value="Jan" calcext:value-type="string">
            <text:p>Jan</text:p>
          </table:table-cell>
          <table:table-cell table:style-name="ce23" table:formula="of:=COM.MICROSOFT.XLOOKUP([$Analítico_Deriv.$W28];[$dms.J:.J];[$dms.M:.M])" office:value-type="float" office:value="2027" calcext:value-type="float">
            <text:p>2.027,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F23</text:p>
          </table:table-cell>
          <table:table-cell table:style-name="ce5" office:value-type="date" office:date-value="2026-06-30" calcext:value-type="date">
            <text:p>30/6/2026</text:p>
          </table:table-cell>
          <table:table-cell table:style-name="ce131" office:value-type="string" calcext:value-type="string">
            <text:p>Vigente</text:p>
          </table:table-cell>
          <table:table-cell table:number-columns-repeated="2" table:style-name="ce5" office:value-type="string" calcext:value-type="string">
            <text:p>Milho</text:p>
          </table:table-cell>
          <table:table-cell table:style-name="ce5" office:value-type="string" calcext:value-type="string">
            <text:p>Safra Próxima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Vigente</text:p>
          </table:table-cell>
          <table:table-cell table:style-name="ce33" office:value-type="float" office:value="51788288" calcext:value-type="float">
            <text:p>51788288</text:p>
          </table:table-cell>
          <table:table-cell table:style-name="ce33" office:value-type="string" calcext:value-type="string">
            <text:p>26F04477149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4.4" calcext:value-type="float">
            <text:p>4,40</text:p>
          </table:table-cell>
          <table:table-cell table:style-name="ce135" table:formula="of:=IF([$Analítico_Deriv.$P29]=&quot;VENDA&quot;;[$Analítico_Deriv.$Q29]*-1;[$Analítico_Deriv.$Q29])" office:value-type="float" office:value="-4.4" calcext:value-type="float">
            <text:p>-4,40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CCMF27</text:p>
          </table:table-cell>
          <table:table-cell table:style-name="ce127" office:value-type="float" office:value="73.667" calcext:value-type="float">
            <text:p>73,6670</text:p>
          </table:table-cell>
          <table:table-cell table:style-name="ce5" office:value-type="date" office:date-value="2027-01-15" calcext:value-type="date">
            <text:p>15/1/2027</text:p>
          </table:table-cell>
          <table:table-cell table:style-name="ce5" office:value-type="date" office:date-value="2027-01-19" calcext:value-type="date">
            <text:p>19/1/2027</text:p>
          </table:table-cell>
          <table:table-cell table:formula="of:=IF([$Analítico_Deriv.$AD29]=&quot;Dolar BMF&quot;;&quot;PREENCHER&quot;;IF([$Analítico_Deriv.$AD29]=&quot;SOJA CBOT&quot;;[$Analítico_Deriv.$R29]*5000*[$Analítico_Deriv.$U29];IF([$Analítico_Deriv.$AD29]=&quot;MILHO CBOT&quot;;[$Analítico_Deriv.$R29]*5000*[$Analítico_Deriv.$U29];IF([$Analítico_Deriv.$AD29]=&quot;MILHO BMF&quot;;0;&quot;VALIDAR&quot;))))" office:value-type="float" office:value="0" calcext:value-type="float">
            <text:p>0,00</text:p>
          </table:table-cell>
          <table:table-cell table:formula="of:=IF([$Analítico_Deriv.$C29]=&quot;Vigente&quot;;IF([$Analítico_Deriv.$AD29]=&quot;Soja CBOT&quot;;[$Analítico_Deriv.$X29]*-1;IF([$Analítico_Deriv.$AD29]=&quot;Milho CBOT&quot;;[$Analítico_Deriv.$X29]*-1;IF([$Analítico_Deriv.$AD29]=&quot;Milho BMF&quot;;0;IF([$Analítico_Deriv.$AD29]=&quot;Dolar BMF&quot;;[$Analítico_Deriv.$X29]))));0)" office:value-type="float" office:value="0" calcext:value-type="float">
            <text:p>0,00</text:p>
          </table:table-cell>
          <table:table-cell table:formula="of:=COM.MICROSOFT.XLOOKUP([$Analítico_Deriv.$T29];[$Preços_MTM.C:.C];[$Preços_MTM.D:.D];COM.MICROSOFT.XLOOKUP([$Analítico_Deriv.$T29];[$Preços_MTM.H:.H];[$Preços_MTM.I:.I]))" office:value-type="float" office:value="73.57" calcext:value-type="float">
            <text:p>73,5700</text:p>
          </table:table-cell>
          <table:table-cell table:formula="of:=IF([$Analítico_Deriv.$C29]=&quot;Vigente&quot;;IF([$Analítico_Deriv.$S29]=&quot;CBOT&quot;;([$Analítico_Deriv.$Z29]-[$Analítico_Deriv.$U29])*5000*[$Analítico_Deriv.$R29];IF([$Analítico_Deriv.$S29]=&quot;BMF&quot;;[$Analítico_Deriv.$AB29]/[$Preços_MTM.$I$4];&quot;VERIFICAR&quot;));0)" office:value-type="float" office:value="36.9737222061828" calcext:value-type="float">
            <text:p>36,97</text:p>
          </table:table-cell>
          <table:table-cell table:formula="of:=IF([$Analítico_Deriv.$C29]=&quot;Vigente&quot;;(IF([$Analítico_Deriv.$S29]=&quot;BMF&quot;;([$Analítico_Deriv.$Z29]-[$Analítico_Deriv.$U29])*450*[$Analítico_Deriv.$R29];IF([$Analítico_Deriv.$S29]=&quot;CBOT&quot;;[$Analítico_Deriv.$AA29]*[$Preços_MTM.$I$4];&quot;VERIFICAR&quot;)))+[$Analítico_Deriv.$AC29];0)" office:value-type="float" office:value="192.060000000017" calcext:value-type="float">
            <text:p>192,06</text:p>
          </table:table-cell>
          <table:table-cell table:formula="of:=IF([$Analítico_Deriv.$C29]=&quot;Vigente&quot;;IF([$Analítico_Deriv.$AD29]=&quot;DOLAR BMF&quot;;([$Analítico_Deriv.$Z29]-[$Analítico_Deriv.$U29])*[$Analítico_Deriv.$X29];0);0)" office:value-type="float" office:value="0" calcext:value-type="float">
            <text:p>0,00</text:p>
          </table:table-cell>
          <table:table-cell table:style-name="ce33" table:formula="of:=COM.MICROSOFT.CONCAT([$Analítico_Deriv.$D29];&quot; &quot;;[$Analítico_Deriv.$S29])" office:value-type="string" office:string-value="Milho BMF" calcext:value-type="string">
            <text:p>Milho BMF</text:p>
          </table:table-cell>
          <table:table-cell table:formula="of:=IF([$Analítico_Deriv.$AD29]=&quot;DOLAR BMF&quot;;0;(COM.MICROSOFT.XLOOKUP([$Analítico_Deriv.$AD29];[$dms.D:.D];[$dms.E:.E]))*[$Analítico_Deriv.$R29])" office:value-type="float" office:value="-118800" calcext:value-type="float">
            <text:p>-118.800</text:p>
          </table:table-cell>
          <table:table-cell table:formula="of:=[$Analítico_Deriv.$AE29]/1000" office:value-type="float" office:value="-118.8" calcext:value-type="float">
            <text:p>-119</text:p>
          </table:table-cell>
          <table:table-cell table:style-name="ce33" table:formula="of:=COM.MICROSOFT.XLOOKUP([$Analítico_Deriv.$V29];[$dms.J:.J];[$dms.L:.L])" office:value-type="string" office:string-value="Jan" calcext:value-type="string">
            <text:p>Jan</text:p>
          </table:table-cell>
          <table:table-cell table:style-name="ce33" table:formula="of:=COM.MICROSOFT.XLOOKUP([$Analítico_Deriv.$V29];[$dms.J:.J];[$dms.M:.M])" office:value-type="float" office:value="2027" calcext:value-type="float">
            <text:p>2027</text:p>
          </table:table-cell>
          <table:table-cell table:style-name="ce33" office:value-type="string" calcext:value-type="string">
            <text:p>LB-Milho-26</text:p>
          </table:table-cell>
          <table:table-cell table:formula="of:=COM.MICROSOFT.XLOOKUP([$Analítico_Deriv.$AD29];[$Gestão_Stonex.G:.G];[$Gestão_Stonex.H:.H])" office:value-type="percentage" office:value="0.55" calcext:value-type="percentage">
            <text:p>55,00%</text:p>
          </table:table-cell>
          <table:table-cell table:style-name="ce33" table:formula="of:=[$Analítico_Deriv.$Z29]+([$Analítico_Deriv.$AJ29]*[$Analítico_Deriv.$Z29])" office:value-type="float" office:value="114.0335" calcext:value-type="float">
            <text:p>114,0335</text:p>
          </table:table-cell>
          <table:table-cell table:formula="of:=IF([$Analítico_Deriv.$C29]=&quot;Vigente&quot;;IF([$Analítico_Deriv.$S29]=&quot;CBOT&quot;;([$Analítico_Deriv.$AK29]-[$Analítico_Deriv.$U29])*5000*[$Analítico_Deriv.$R29];IF([$Analítico_Deriv.$S29]=&quot;BMF&quot;;[$Analítico_Deriv.$AM29]/[$Preços_MTM.$I$4];&quot;VERIFICAR&quot;));0)" office:value-type="float" office:value="-15386.595437482" calcext:value-type="float">
            <text:p>-15.386,60</text:p>
          </table:table-cell>
          <table:table-cell table:formula="of:=IF([$Analítico_Deriv.$C29]=&quot;Vigente&quot;;(IF([$Analítico_Deriv.$S29]=&quot;BMF&quot;;([$Analítico_Deriv.$AK29]-[$Analítico_Deriv.$U29])*450*[$Analítico_Deriv.$R29];IF([$Analítico_Deriv.$S29]=&quot;CBOT&quot;;[$Analítico_Deriv.$AL29]*[$Preços_MTM.$I$4];&quot;VERIFICAR&quot;)))+[$Analítico_Deriv.$AN29];0)" office:value-type="float" office:value="-79925.67" calcext:value-type="float">
            <text:p>-79.925,67</text:p>
          </table:table-cell>
          <table:table-cell table:style-name="ce33" table:formula="of:=IF([$Analítico_Deriv.$C29]=&quot;Vigente&quot;;IF([$Analítico_Deriv.$AD29]=&quot;DOLAR BMF&quot;;([$Analítico_Deriv.$AK29]-[$Analítico_Deriv.$U29])*[$Analítico_Deriv.$X29];0);0)" office:value-type="float" office:value="0" calcext:value-type="float">
            <text:p>0</text:p>
          </table:table-cell>
          <table:table-cell table:formula="of:=IF([$Analítico_Deriv.$I29]=&quot;Vigente&quot;;IF([$Analítico_Deriv.$AD29]=&quot;Soja CBOT&quot;;[$Analítico_Deriv.$X29]*-1;IF([$Analítico_Deriv.$AD29]=&quot;Milho CBOT&quot;;[$Analítico_Deriv.$X29]*-1;IF([$Analítico_Deriv.$AD29]=&quot;Milho BMF&quot;;0;IF([$Analítico_Deriv.$AD29]=&quot;Dolar BMF&quot;;[$Analítico_Deriv.$X29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29];[$dms.J:.J];[$dms.L:.L]);&quot;&quot;)" office:value-type="string" office:string-value="Jun" calcext:value-type="string">
            <text:p>Jun</text:p>
          </table:table-cell>
          <table:table-cell table:style-name="ce23" table:formula="of:=IFERROR(COM.MICROSOFT.XLOOKUP([$Analítico_Deriv.$B29];[$dms.J:.J];[$dms.M:.M]);&quot;&quot;)" office:value-type="float" office:value="2026" calcext:value-type="float">
            <text:p>2.026,00</text:p>
          </table:table-cell>
          <table:table-cell table:style-name="ce23" table:formula="of:=COM.MICROSOFT.XLOOKUP([$Analítico_Deriv.$W29];[$dms.J:.J];[$dms.L:.L])" office:value-type="string" office:string-value="Jan" calcext:value-type="string">
            <text:p>Jan</text:p>
          </table:table-cell>
          <table:table-cell table:style-name="ce23" table:formula="of:=COM.MICROSOFT.XLOOKUP([$Analítico_Deriv.$W29];[$dms.J:.J];[$dms.M:.M])" office:value-type="float" office:value="2027" calcext:value-type="float">
            <text:p>2.027,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F24</text:p>
          </table:table-cell>
          <table:table-cell table:style-name="ce5" office:value-type="date" office:date-value="2026-07-09" calcext:value-type="date">
            <text:p>9/7/2026</text:p>
          </table:table-cell>
          <table:table-cell table:style-name="ce131" office:value-type="string" calcext:value-type="string">
            <text:p>Vigente</text:p>
          </table:table-cell>
          <table:table-cell table:number-columns-repeated="2" table:style-name="ce5" office:value-type="string" calcext:value-type="string">
            <text:p>Milho</text:p>
          </table:table-cell>
          <table:table-cell table:style-name="ce5" office:value-type="string" calcext:value-type="string">
            <text:p>Safra Próxima</text:p>
          </table:table-cell>
          <table:table-cell table:style-name="ce5" office:value-type="string" calcext:value-type="string">
            <text:p>Entrada</text:p>
          </table:table-cell>
          <table:table-cell/>
          <table:table-cell table:style-name="ce5" office:value-type="string" calcext:value-type="string">
            <text:p>Vigente</text:p>
          </table:table-cell>
          <table:table-cell table:style-name="ce5"/>
          <table:table-cell table:style-name="ce33" office:value-type="string" calcext:value-type="string">
            <text:p>26G02571329</text:p>
          </table:table-cell>
          <table:table-cell table:style-name="ce5" office:value-type="string" calcext:value-type="string">
            <text:p>Intergrãos</text:p>
          </table:table-cell>
          <table:table-cell table:style-name="ce5" office:value-type="string" calcext:value-type="string">
            <text:p>Stonex</text:p>
          </table:table-cell>
          <table:table-cell table:style-name="ce5" office:value-type="string" calcext:value-type="string">
            <text:p>Venda</text:p>
          </table:table-cell>
          <table:table-cell table:style-name="ce5" office:value-type="string" calcext:value-type="string">
            <text:p>Futuro</text:p>
          </table:table-cell>
          <table:table-cell table:style-name="ce5" office:value-type="string" calcext:value-type="string">
            <text:p>Venda</text:p>
          </table:table-cell>
          <table:table-cell table:style-name="ce23" office:value-type="float" office:value="1.3" calcext:value-type="float">
            <text:p>1,30</text:p>
          </table:table-cell>
          <table:table-cell table:style-name="ce135" table:formula="of:=IF([$Analítico_Deriv.$P30]=&quot;VENDA&quot;;[$Analítico_Deriv.$Q30]*-1;[$Analítico_Deriv.$Q30])" office:value-type="float" office:value="-1.3" calcext:value-type="float">
            <text:p>-1,30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CCMF27</text:p>
          </table:table-cell>
          <table:table-cell table:style-name="ce127" office:value-type="float" office:value="73.677" calcext:value-type="float">
            <text:p>73,6770</text:p>
          </table:table-cell>
          <table:table-cell table:style-name="ce5" office:value-type="date" office:date-value="2027-01-15" calcext:value-type="date">
            <text:p>15/1/2027</text:p>
          </table:table-cell>
          <table:table-cell table:style-name="ce5" office:value-type="date" office:date-value="2027-01-19" calcext:value-type="date">
            <text:p>19/1/2027</text:p>
          </table:table-cell>
          <table:table-cell table:formula="of:=IF([$Analítico_Deriv.$AD30]=&quot;Dolar BMF&quot;;&quot;PREENCHER&quot;;IF([$Analítico_Deriv.$AD30]=&quot;SOJA CBOT&quot;;[$Analítico_Deriv.$R30]*5000*[$Analítico_Deriv.$U30];IF([$Analítico_Deriv.$AD30]=&quot;MILHO CBOT&quot;;[$Analítico_Deriv.$R30]*5000*[$Analítico_Deriv.$U30];IF([$Analítico_Deriv.$AD30]=&quot;MILHO BMF&quot;;0;&quot;VALIDAR&quot;))))" office:value-type="float" office:value="0" calcext:value-type="float">
            <text:p>0,00</text:p>
          </table:table-cell>
          <table:table-cell table:formula="of:=IF([$Analítico_Deriv.$C30]=&quot;Vigente&quot;;IF([$Analítico_Deriv.$AD30]=&quot;Soja CBOT&quot;;[$Analítico_Deriv.$X30]*-1;IF([$Analítico_Deriv.$AD30]=&quot;Milho CBOT&quot;;[$Analítico_Deriv.$X30]*-1;IF([$Analítico_Deriv.$AD30]=&quot;Milho BMF&quot;;0;IF([$Analítico_Deriv.$AD30]=&quot;Dolar BMF&quot;;[$Analítico_Deriv.$X30]))));0)" office:value-type="float" office:value="0" calcext:value-type="float">
            <text:p>0,00</text:p>
          </table:table-cell>
          <table:table-cell table:formula="of:=COM.MICROSOFT.XLOOKUP([$Analítico_Deriv.$T30];[$Preços_MTM.C:.C];[$Preços_MTM.D:.D];COM.MICROSOFT.XLOOKUP([$Analítico_Deriv.$T30];[$Preços_MTM.H:.H];[$Preços_MTM.I:.I]))" office:value-type="float" office:value="73.57" calcext:value-type="float">
            <text:p>73,5700</text:p>
          </table:table-cell>
          <table:table-cell table:formula="of:=IF([$Analítico_Deriv.$C30]=&quot;Vigente&quot;;IF([$Analítico_Deriv.$S30]=&quot;CBOT&quot;;([$Analítico_Deriv.$Z30]-[$Analítico_Deriv.$U30])*5000*[$Analítico_Deriv.$R30];IF([$Analítico_Deriv.$S30]=&quot;BMF&quot;;[$Analítico_Deriv.$AB30]/[$Preços_MTM.$I$4];&quot;VERIFICAR&quot;));0)" office:value-type="float" office:value="12.0502454519218" calcext:value-type="float">
            <text:p>12,05</text:p>
          </table:table-cell>
          <table:table-cell table:formula="of:=IF([$Analítico_Deriv.$C30]=&quot;Vigente&quot;;(IF([$Analítico_Deriv.$S30]=&quot;BMF&quot;;([$Analítico_Deriv.$Z30]-[$Analítico_Deriv.$U30])*450*[$Analítico_Deriv.$R30];IF([$Analítico_Deriv.$S30]=&quot;CBOT&quot;;[$Analítico_Deriv.$AA30]*[$Preços_MTM.$I$4];&quot;VERIFICAR&quot;)))+[$Analítico_Deriv.$AC30];0)" office:value-type="float" office:value="62.5950000000079" calcext:value-type="float">
            <text:p>62,60</text:p>
          </table:table-cell>
          <table:table-cell table:formula="of:=IF([$Analítico_Deriv.$C30]=&quot;Vigente&quot;;IF([$Analítico_Deriv.$AD30]=&quot;DOLAR BMF&quot;;([$Analítico_Deriv.$Z30]-[$Analítico_Deriv.$U30])*[$Analítico_Deriv.$X30];0);0)" office:value-type="float" office:value="0" calcext:value-type="float">
            <text:p>0,00</text:p>
          </table:table-cell>
          <table:table-cell table:style-name="ce33" table:formula="of:=COM.MICROSOFT.CONCAT([$Analítico_Deriv.$D30];&quot; &quot;;[$Analítico_Deriv.$S30])" office:value-type="string" office:string-value="Milho BMF" calcext:value-type="string">
            <text:p>Milho BMF</text:p>
          </table:table-cell>
          <table:table-cell table:formula="of:=IF([$Analítico_Deriv.$AD30]=&quot;DOLAR BMF&quot;;0;(COM.MICROSOFT.XLOOKUP([$Analítico_Deriv.$AD30];[$dms.D:.D];[$dms.E:.E]))*[$Analítico_Deriv.$R30])" office:value-type="float" office:value="-35100" calcext:value-type="float">
            <text:p>-35.100</text:p>
          </table:table-cell>
          <table:table-cell table:formula="of:=[$Analítico_Deriv.$AE30]/1000" office:value-type="float" office:value="-35.1" calcext:value-type="float">
            <text:p>-35</text:p>
          </table:table-cell>
          <table:table-cell table:style-name="ce33" table:formula="of:=COM.MICROSOFT.XLOOKUP([$Analítico_Deriv.$V30];[$dms.J:.J];[$dms.L:.L])" office:value-type="string" office:string-value="Jan" calcext:value-type="string">
            <text:p>Jan</text:p>
          </table:table-cell>
          <table:table-cell table:style-name="ce33" table:formula="of:=COM.MICROSOFT.XLOOKUP([$Analítico_Deriv.$V30];[$dms.J:.J];[$dms.M:.M])" office:value-type="float" office:value="2027" calcext:value-type="float">
            <text:p>2027</text:p>
          </table:table-cell>
          <table:table-cell table:style-name="ce33" office:value-type="string" calcext:value-type="string">
            <text:p>LB-Milho-26</text:p>
          </table:table-cell>
          <table:table-cell table:formula="of:=COM.MICROSOFT.XLOOKUP([$Analítico_Deriv.$AD30];[$Gestão_Stonex.G:.G];[$Gestão_Stonex.H:.H])" office:value-type="percentage" office:value="0.55" calcext:value-type="percentage">
            <text:p>55,00%</text:p>
          </table:table-cell>
          <table:table-cell table:style-name="ce33" table:formula="of:=[$Analítico_Deriv.$Z30]+([$Analítico_Deriv.$AJ30]*[$Analítico_Deriv.$Z30])" office:value-type="float" office:value="114.0335" calcext:value-type="float">
            <text:p>114,0335</text:p>
          </table:table-cell>
          <table:table-cell table:formula="of:=IF([$Analítico_Deriv.$C30]=&quot;Vigente&quot;;IF([$Analítico_Deriv.$S30]=&quot;CBOT&quot;;([$Analítico_Deriv.$AK30]-[$Analítico_Deriv.$U30])*5000*[$Analítico_Deriv.$R30];IF([$Analítico_Deriv.$S30]=&quot;BMF&quot;;[$Analítico_Deriv.$AM30]/[$Preços_MTM.$I$4];&quot;VERIFICAR&quot;));0)" office:value-type="float" office:value="-4544.91336991048" calcext:value-type="float">
            <text:p>-4.544,91</text:p>
          </table:table-cell>
          <table:table-cell table:formula="of:=IF([$Analítico_Deriv.$C30]=&quot;Vigente&quot;;(IF([$Analítico_Deriv.$S30]=&quot;BMF&quot;;([$Analítico_Deriv.$AK30]-[$Analítico_Deriv.$U30])*450*[$Analítico_Deriv.$R30];IF([$Analítico_Deriv.$S30]=&quot;CBOT&quot;;[$Analítico_Deriv.$AL30]*[$Preços_MTM.$I$4];&quot;VERIFICAR&quot;)))+[$Analítico_Deriv.$AN30];0)" office:value-type="float" office:value="-23608.5525" calcext:value-type="float">
            <text:p>-23.608,55</text:p>
          </table:table-cell>
          <table:table-cell table:style-name="ce33" table:formula="of:=IF([$Analítico_Deriv.$C30]=&quot;Vigente&quot;;IF([$Analítico_Deriv.$AD30]=&quot;DOLAR BMF&quot;;([$Analítico_Deriv.$AK30]-[$Analítico_Deriv.$U30])*[$Analítico_Deriv.$X30];0);0)" office:value-type="float" office:value="0" calcext:value-type="float">
            <text:p>0</text:p>
          </table:table-cell>
          <table:table-cell table:formula="of:=IF([$Analítico_Deriv.$I30]=&quot;Vigente&quot;;IF([$Analítico_Deriv.$AD30]=&quot;Soja CBOT&quot;;[$Analítico_Deriv.$X30]*-1;IF([$Analítico_Deriv.$AD30]=&quot;Milho CBOT&quot;;[$Analítico_Deriv.$X30]*-1;IF([$Analítico_Deriv.$AD30]=&quot;Milho BMF&quot;;0;IF([$Analítico_Deriv.$AD30]=&quot;Dolar BMF&quot;;[$Analítico_Deriv.$X30]))));0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23" table:formula="of:=IFERROR(COM.MICROSOFT.XLOOKUP([$Analítico_Deriv.$B30];[$dms.J:.J];[$dms.L:.L]);&quot;&quot;)" office:value-type="string" office:string-value="Jul" calcext:value-type="string">
            <text:p>Jul</text:p>
          </table:table-cell>
          <table:table-cell table:style-name="ce23" table:formula="of:=IFERROR(COM.MICROSOFT.XLOOKUP([$Analítico_Deriv.$B30];[$dms.J:.J];[$dms.M:.M]);&quot;&quot;)" office:value-type="float" office:value="2026" calcext:value-type="float">
            <text:p>2.026,00</text:p>
          </table:table-cell>
          <table:table-cell table:style-name="ce23" table:formula="of:=COM.MICROSOFT.XLOOKUP([$Analítico_Deriv.$W30];[$dms.J:.J];[$dms.L:.L])" office:value-type="string" office:string-value="Jan" calcext:value-type="string">
            <text:p>Jan</text:p>
          </table:table-cell>
          <table:table-cell table:style-name="ce23" table:formula="of:=COM.MICROSOFT.XLOOKUP([$Analítico_Deriv.$W30];[$dms.J:.J];[$dms.M:.M])" office:value-type="float" office:value="2027" calcext:value-type="float">
            <text:p>2.027,00</text:p>
          </table:table-cell>
          <table:table-cell table:number-columns-repeated="8"/>
        </table:table-row>
        <table:table-row table:style-name="ro1" table:number-rows-repeated="1048545">
          <table:table-cell table:number-columns-repeated="54"/>
        </table:table-row>
        <table:table-row table:style-name="ro1">
          <table:table-cell table:number-columns-repeated="54"/>
        </table:table-row>
        <calcext:conditional-formats>
          <calcext:conditional-format calcext:target-range-address="Analítico_Deriv.C1:Analítico_Deriv.C1048576">
            <calcext:condition calcext:apply-style-name="ConditionalStyle_34" calcext:value="contains-text(&quot;Liquidado&quot;)" calcext:base-cell-address="Analítico_Deriv.C1"/>
            <calcext:condition calcext:apply-style-name="ConditionalStyle_33" calcext:value="contains-text(&quot;Vigente&quot;)" calcext:base-cell-address="Analítico_Deriv.C1"/>
          </calcext:conditional-format>
          <calcext:conditional-format calcext:target-range-address="Analítico_Deriv.X1:Analítico_Deriv.Y1048576 Analítico_Deriv.AA1:Analítico_Deriv.AC1048576 Analítico_Deriv.AE1:Analítico_Deriv.AF1048576 Analítico_Deriv.AL1:Analítico_Deriv.AM1048576 Analítico_Deriv.AO1:Analítico_Deriv.AP1048576">
            <calcext:condition calcext:apply-style-name="ConditionalStyle_31" calcext:value="between(-1E-017,-9.99999999999999E+047)" calcext:base-cell-address="Analítico_Deriv.X1"/>
          </calcext:conditional-format>
          <calcext:conditional-format calcext:target-range-address="Analítico_Deriv.R1:Analítico_Deriv.R1048576">
            <calcext:condition calcext:apply-style-name="ConditionalStyle_32" calcext:value="between(-0.000001,-9.99999999999999E+019)" calcext:base-cell-address="Analítico_Deriv.R1"/>
          </calcext:conditional-format>
        </calcext:conditional-formats>
      </table:table>
      <table:table table:name="Resumo_Derivativos" table:style-name="ta10">
        <table:table-column table:style-name="co1" table:number-columns-repeated="13" table:default-cell-style-name="Default"/>
        <table:table-column table:style-name="co1" table:number-columns-repeated="16371"/>
        <table:table-row table:style-name="ro1">
          <table:table-cell/>
          <table:table-cell>
            <draw:frame draw:z-index="1" draw:name="Imagem 4" draw:style-name="gr10" draw:text-style-name="P1" svg:width="2.741cm" svg:height="1.163cm" svg:x="0.265cm" svg:y="0.291cm">
              <draw:image xlink:href="Pictures/10000001000001030000006572F976C5.png" xlink:type="simple" xlink:show="embed" xlink:actuate="onLoad" draw:mime-type="image/png">
                <text:p/>
              </draw:image>
              <svg:desc>Grupo Spasso | Armazenagem e Comercialização de Grãos no Brasil</svg:desc>
            </draw:frame>
          </table:table-cell>
          <table:table-cell/>
          <table:table-cell>
            <draw:custom-shape draw:z-index="2" draw:name="CaixaDeTexto 5" draw:style-name="gr2" draw:text-style-name="P3" svg:width="12.677cm" svg:height="0.951cm" svg:x="0.026cm" svg:y="0.45cm">
              <text:p text:style-name="P2"><text:span text:style-name="T10">RESUMO DO STATUS DA POSIÇÃO DE DERIVATIVO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 table:style-name="Default" table:number-columns-repeated="16371"/>
        </table:table-row>
        <table:table-row table:style-name="ro1" table:number-rows-repeated="2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47" office:value-type="string" calcext:value-type="string" table:number-columns-spanned="10" table:number-rows-spanned="2">
            <text:p>EXPOSIÇÃO VOL. DERIVATIVOS (TONS)</text:p>
          </table:table-cell>
          <table:covered-table-cell table:number-columns-repeated="9" table:style-name="ce148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covered-table-cell table:number-columns-repeated="10" table:style-name="ce148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Empresa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Safra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Natureza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Soja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Milho</text:p>
          </table:table-cell>
          <table:covered-table-cell table:style-name="ce149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table-cell table:style-name="ce150" office:value-type="string" calcext:value-type="string" table:number-columns-spanned="2" table:number-rows-spanned="6">
            <text:p>Intergrãos</text:p>
          </table:table-cell>
          <table:covered-table-cell table:style-name="ce160"/>
          <table:table-cell table:style-name="ce164" office:value-type="string" calcext:value-type="string" table:number-columns-spanned="2" table:number-rows-spanned="3">
            <text:p>Safra Atual</text:p>
          </table:table-cell>
          <table:covered-table-cell table:style-name="ce160"/>
          <table:table-cell table:style-name="ce175" office:value-type="string" calcext:value-type="string" table:number-columns-spanned="2" table:number-rows-spanned="1">
            <text:p>Compra</text:p>
          </table:table-cell>
          <table:covered-table-cell table:style-name="ce175"/>
          <table:table-cell table:style-name="ce179" table:formula="of:=SUMIFS([$Analítico_Deriv.AF:.AF];[$Analítico_Deriv.D:.D];[$Resumo_Derivativos.H6];[$Analítico_Deriv.P:.P];[$Resumo_Derivativos.F7];[$Analítico_Deriv.F:.F];[$Resumo_Derivativos.D7];[$Analítico_Deriv.L:.L];[$Resumo_Derivativos.B7];[$Analítico_Deriv.C:.C];&quot;Vigente&quot;)" office:value-type="float" office:value="0" calcext:value-type="float" table:number-columns-spanned="2" table:number-rows-spanned="1">
            <text:p>0 </text:p>
          </table:table-cell>
          <table:covered-table-cell table:style-name="ce179"/>
          <table:table-cell table:style-name="ce179" table:formula="of:=SUMIFS([$Analítico_Deriv.AF:.AF];[$Analítico_Deriv.D:.D];[$Resumo_Derivativos.J6];[$Analítico_Deriv.P:.P];[$Resumo_Derivativos.F7];[$Analítico_Deriv.F:.F];[$Resumo_Derivativos.D7];[$Analítico_Deriv.L:.L];[$Resumo_Derivativos.B7];[$Analítico_Deriv.C:.C];&quot;Vigente&quot;)" office:value-type="float" office:value="0" calcext:value-type="float" table:number-columns-spanned="2" table:number-rows-spanned="1">
            <text:p>0 </text:p>
          </table:table-cell>
          <table:covered-table-cell table:style-name="ce179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covered-table-cell table:number-columns-repeated="4" table:style-name="ce151"/>
          <table:table-cell table:style-name="ce176" office:value-type="string" calcext:value-type="string" table:number-columns-spanned="2" table:number-rows-spanned="1">
            <text:p>Venda</text:p>
          </table:table-cell>
          <table:covered-table-cell table:style-name="ce176"/>
          <table:table-cell table:style-name="ce180" table:formula="of:=SUMIFS([$Analítico_Deriv.AF:.AF];[$Analítico_Deriv.D:.D];[$Resumo_Derivativos.H6];[$Analítico_Deriv.P:.P];[$Resumo_Derivativos.F8];[$Analítico_Deriv.F:.F];[$Resumo_Derivativos.D7];[$Analítico_Deriv.L:.L];[$Resumo_Derivativos.B7];[$Analítico_Deriv.C:.C];&quot;Vigente&quot;)" office:value-type="float" office:value="0" calcext:value-type="float" table:number-columns-spanned="2" table:number-rows-spanned="1">
            <text:p>0 </text:p>
          </table:table-cell>
          <table:covered-table-cell table:style-name="ce180"/>
          <table:table-cell table:style-name="ce180" table:formula="of:=SUMIFS([$Analítico_Deriv.AF:.AF];[$Analítico_Deriv.D:.D];[$Resumo_Derivativos.J6];[$Analítico_Deriv.P:.P];[$Resumo_Derivativos.F7];[$Analítico_Deriv.F:.F];[$Resumo_Derivativos.D7];[$Analítico_Deriv.L:.L];[$Resumo_Derivativos.B7];[$Analítico_Deriv.C:.C];&quot;Vigente&quot;)" office:value-type="float" office:value="0" calcext:value-type="float" table:number-columns-spanned="2" table:number-rows-spanned="1">
            <text:p>0 </text:p>
          </table:table-cell>
          <table:covered-table-cell table:style-name="ce180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covered-table-cell table:number-columns-repeated="2" table:style-name="ce151"/>
          <table:covered-table-cell table:number-columns-repeated="2" table:style-name="ce158"/>
          <table:table-cell table:style-name="ce177" office:value-type="string" calcext:value-type="string" table:number-columns-spanned="2" table:number-rows-spanned="1">
            <text:p>Total Safra</text:p>
          </table:table-cell>
          <table:covered-table-cell table:style-name="ce177"/>
          <table:table-cell table:style-name="ce181" table:formula="of:=SUM([.H7:.I8])" office:value-type="float" office:value="0" calcext:value-type="float" table:number-columns-spanned="2" table:number-rows-spanned="1">
            <text:p>0 </text:p>
          </table:table-cell>
          <table:covered-table-cell table:style-name="ce181"/>
          <table:table-cell table:style-name="ce181" table:formula="of:=SUM([.J7:.K8])" office:value-type="float" office:value="0" calcext:value-type="float" table:number-columns-spanned="2" table:number-rows-spanned="1">
            <text:p>0 </text:p>
          </table:table-cell>
          <table:covered-table-cell table:style-name="ce181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covered-table-cell table:number-columns-repeated="2" table:style-name="ce151"/>
          <table:table-cell table:style-name="ce152" office:value-type="string" calcext:value-type="string" table:number-columns-spanned="2" table:number-rows-spanned="3">
            <text:p>Safra Próxima</text:p>
          </table:table-cell>
          <table:covered-table-cell table:style-name="ce151"/>
          <table:table-cell table:style-name="ce176" office:value-type="string" calcext:value-type="string" table:number-columns-spanned="2" table:number-rows-spanned="1">
            <text:p>Compra</text:p>
          </table:table-cell>
          <table:covered-table-cell table:style-name="ce176"/>
          <table:table-cell table:style-name="ce180" table:formula="of:=SUMIFS([$Analítico_Deriv.AF:.AF];[$Analítico_Deriv.D:.D];[$Resumo_Derivativos.H6];[$Analítico_Deriv.P:.P];[$Resumo_Derivativos.F10];[$Analítico_Deriv.F:.F];[$Resumo_Derivativos.D10];[$Analítico_Deriv.L:.L];[$Resumo_Derivativos.B7];[$Analítico_Deriv.C:.C];&quot;Vigente&quot;)" office:value-type="float" office:value="0" calcext:value-type="float" table:number-columns-spanned="2" table:number-rows-spanned="1">
            <text:p>0 </text:p>
          </table:table-cell>
          <table:covered-table-cell table:style-name="ce180"/>
          <table:table-cell table:style-name="ce180" table:formula="of:=SUMIFS([$Analítico_Deriv.AF:.AF];[$Analítico_Deriv.D:.D];[$Resumo_Derivativos.J6];[$Analítico_Deriv.P:.P];[$Resumo_Derivativos.F10];[$Analítico_Deriv.F:.F];[$Resumo_Derivativos.D10];[$Analítico_Deriv.L:.L];[$Resumo_Derivativos.B7];[$Analítico_Deriv.C:.C];&quot;Vigente&quot;)" office:value-type="float" office:value="1520.1" calcext:value-type="float" table:number-columns-spanned="2" table:number-rows-spanned="1">
            <text:p>1.520 </text:p>
          </table:table-cell>
          <table:covered-table-cell table:style-name="ce180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covered-table-cell table:number-columns-repeated="4" table:style-name="ce151"/>
          <table:table-cell table:style-name="ce176" office:value-type="string" calcext:value-type="string" table:number-columns-spanned="2" table:number-rows-spanned="1">
            <text:p>Venda</text:p>
          </table:table-cell>
          <table:covered-table-cell table:style-name="ce176"/>
          <table:table-cell table:style-name="ce180" table:formula="of:=SUMIFS([$Analítico_Deriv.AF:.AF];[$Analítico_Deriv.D:.D];[$Resumo_Derivativos.H6];[$Analítico_Deriv.P:.P];[$Resumo_Derivativos.F11];[$Analítico_Deriv.F:.F];[$Resumo_Derivativos.D10];[$Analítico_Deriv.L:.L];[$Resumo_Derivativos.B7];[$Analítico_Deriv.C:.C];&quot;Vigente&quot;)" office:value-type="float" office:value="0" calcext:value-type="float" table:number-columns-spanned="2" table:number-rows-spanned="1">
            <text:p>0 </text:p>
          </table:table-cell>
          <table:covered-table-cell table:style-name="ce180"/>
          <table:table-cell table:style-name="ce180" table:formula="of:=SUMIFS([$Analítico_Deriv.AF:.AF];[$Analítico_Deriv.D:.D];[$Resumo_Derivativos.J6];[$Analítico_Deriv.P:.P];[$Resumo_Derivativos.F11];[$Analítico_Deriv.F:.F];[$Resumo_Derivativos.D10];[$Analítico_Deriv.L:.L];[$Resumo_Derivativos.B7];[$Analítico_Deriv.C:.C];&quot;Vigente&quot;)" office:value-type="float" office:value="-3453.84" calcext:value-type="float" table:number-columns-spanned="2" table:number-rows-spanned="1">
            <text:p>-3.454 </text:p>
          </table:table-cell>
          <table:covered-table-cell table:style-name="ce180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covered-table-cell table:number-columns-repeated="4" table:style-name="ce152"/>
          <table:table-cell table:style-name="ce178" office:value-type="string" calcext:value-type="string" table:number-columns-spanned="2" table:number-rows-spanned="1">
            <text:p>Total Safra</text:p>
          </table:table-cell>
          <table:covered-table-cell table:style-name="ce178"/>
          <table:table-cell table:style-name="ce182" table:formula="of:=SUM([.H10:.I11])" office:value-type="float" office:value="0" calcext:value-type="float" table:number-columns-spanned="2" table:number-rows-spanned="1">
            <text:p>0 </text:p>
          </table:table-cell>
          <table:covered-table-cell table:style-name="ce182"/>
          <table:table-cell table:style-name="ce182" table:formula="of:=SUM([.J10:.K11])" office:value-type="float" office:value="-1933.74" calcext:value-type="float" table:number-columns-spanned="2" table:number-rows-spanned="1">
            <text:p>-1.934 </text:p>
          </table:table-cell>
          <table:covered-table-cell table:style-name="ce182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Total Geral</text:p>
          </table:table-cell>
          <table:covered-table-cell table:style-name="ce159"/>
          <table:table-cell table:style-name="ce154" table:number-columns-repeated="4"/>
          <table:table-cell table:style-name="ce183" table:formula="of:=SUM([.H12];[.H9])" office:value-type="float" office:value="0" calcext:value-type="float" table:number-columns-spanned="2" table:number-rows-spanned="1">
            <text:p>0 </text:p>
          </table:table-cell>
          <table:covered-table-cell table:style-name="ce184"/>
          <table:table-cell table:style-name="ce183" table:formula="of:=SUM([.J12];[.J9])" office:value-type="float" office:value="-1933.74" calcext:value-type="float" table:number-columns-spanned="2" table:number-rows-spanned="1">
            <text:p>-1.934 </text:p>
          </table:table-cell>
          <table:covered-table-cell table:style-name="ce184"/>
          <table:table-cell table:number-columns-repeated="2"/>
          <table:table-cell table:style-name="Default" table:number-columns-repeated="16371"/>
        </table:table-row>
        <table:table-row table:style-name="ro1">
          <table:table-cell/>
          <table:table-cell table:style-name="ce154" table:number-columns-repeated="10"/>
          <table:table-cell table:number-columns-repeated="2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47" office:value-type="string" calcext:value-type="string" table:number-columns-spanned="12" table:number-rows-spanned="2">
            <text:p>EXPOSIÇÃO CAMBIAL (USD)</text:p>
          </table:table-cell>
          <table:covered-table-cell table:number-columns-repeated="11" table:style-name="ce148"/>
          <table:table-cell table:style-name="Default" table:number-columns-repeated="16371"/>
        </table:table-row>
        <table:table-row table:style-name="ro1">
          <table:table-cell/>
          <table:covered-table-cell table:number-columns-repeated="12" table:style-name="ce148"/>
          <table:table-cell table:style-name="Default" table:number-columns-repeated="16371"/>
        </table:table-row>
        <table:table-row table:style-name="ro1">
          <table:table-cell/>
          <table:table-cell table:style-name="ce155" table:number-columns-spanned="2" table:number-rows-spanned="2"/>
          <table:covered-table-cell table:style-name="ce161"/>
          <table:table-cell table:style-name="ce165" office:value-type="string" calcext:value-type="string" table:number-columns-spanned="4" table:number-rows-spanned="1">
            <text:p>Soja</text:p>
          </table:table-cell>
          <table:covered-table-cell table:number-columns-repeated="3" table:style-name="ce165"/>
          <table:table-cell table:style-name="ce165" office:value-type="string" calcext:value-type="string" table:number-columns-spanned="4" table:number-rows-spanned="1">
            <text:p>Milho</text:p>
          </table:table-cell>
          <table:covered-table-cell table:number-columns-repeated="3" table:style-name="ce165"/>
          <table:table-cell table:style-name="ce161" table:number-columns-spanned="2" table:number-rows-spanned="1"/>
          <table:covered-table-cell table:style-name="ce161"/>
          <table:table-cell table:style-name="Default" table:number-columns-repeated="16371"/>
        </table:table-row>
        <table:table-row table:style-name="ro1">
          <table:table-cell/>
          <table:covered-table-cell table:number-columns-repeated="2" table:style-name="ce155"/>
          <table:table-cell table:style-name="ce165" office:value-type="string" calcext:value-type="string" table:number-columns-spanned="2" table:number-rows-spanned="1">
            <text:p>Safra Atual</text:p>
          </table:table-cell>
          <table:covered-table-cell table:style-name="ce165"/>
          <table:table-cell table:style-name="ce165" office:value-type="string" calcext:value-type="string" table:number-columns-spanned="2" table:number-rows-spanned="1">
            <text:p>Safra Próxima</text:p>
          </table:table-cell>
          <table:covered-table-cell table:style-name="ce165"/>
          <table:table-cell table:style-name="ce165" office:value-type="string" calcext:value-type="string" table:number-columns-spanned="2" table:number-rows-spanned="1">
            <text:p>Safra Atual</text:p>
          </table:table-cell>
          <table:covered-table-cell table:style-name="ce165"/>
          <table:table-cell table:style-name="ce165" office:value-type="string" calcext:value-type="string" table:number-columns-spanned="2" table:number-rows-spanned="1">
            <text:p>Safra Próxima</text:p>
          </table:table-cell>
          <table:covered-table-cell table:style-name="ce165"/>
          <table:table-cell table:style-name="ce165" office:value-type="string" calcext:value-type="string" table:number-columns-spanned="2" table:number-rows-spanned="1">
            <text:p>Total Geral</text:p>
          </table:table-cell>
          <table:covered-table-cell table:style-name="ce165"/>
          <table:table-cell table:style-name="Default" table:number-columns-repeated="16371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CBOT</text:p>
          </table:table-cell>
          <table:covered-table-cell table:style-name="ce162"/>
          <table:table-cell table:style-name="ce166" table:formula="of:=SUM([.D21:.E22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F21:.G22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H21:.I22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J21:.K22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D20:.K20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ompra</text:p>
          </table:table-cell>
          <table:covered-table-cell table:style-name="ce159"/>
          <table:table-cell table:style-name="ce167" table:formula="of:=SUMIFS([$Analítico_Deriv.Y:.Y];[$Analítico_Deriv.D:.D];[$Resumo_Derivativos.D18];[$Analítico_Deriv.F:.F];[$Resumo_Derivativos.D19];[$Analítico_Deriv.P:.P];[$Resumo_Derivativos.B21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Y:.Y];[$Analítico_Deriv.D:.D];[$Resumo_Derivativos.D18];[$Analítico_Deriv.F:.F];[$Resumo_Derivativos.F19];[$Analítico_Deriv.P:.P];[$Resumo_Derivativos.B21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Y:.Y];[$Analítico_Deriv.D:.D];[$Resumo_Derivativos.H18];[$Analítico_Deriv.F:.F];[$Resumo_Derivativos.H19];[$Analítico_Deriv.P:.P];[$Resumo_Derivativos.B21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Y:.Y];[$Analítico_Deriv.D:.D];[$Resumo_Derivativos.H18];[$Analítico_Deriv.F:.F];[$Resumo_Derivativos.J19];[$Analítico_Deriv.P:.P];[$Resumo_Derivativos.B21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([.D21:.K21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Venda</text:p>
          </table:table-cell>
          <table:covered-table-cell table:style-name="ce159"/>
          <table:table-cell table:style-name="ce167" table:formula="of:=SUMIFS([$Analítico_Deriv.Y:.Y];[$Analítico_Deriv.D:.D];[$Resumo_Derivativos.D18];[$Analítico_Deriv.F:.F];[$Resumo_Derivativos.D19];[$Analítico_Deriv.P:.P];[$Resumo_Derivativos.B22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Y:.Y];[$Analítico_Deriv.D:.D];[$Resumo_Derivativos.D18];[$Analítico_Deriv.F:.F];[$Resumo_Derivativos.F19];[$Analítico_Deriv.P:.P];[$Resumo_Derivativos.B22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Y:.Y];[$Analítico_Deriv.D:.D];[$Resumo_Derivativos.H18];[$Analítico_Deriv.F:.F];[$Resumo_Derivativos.H19];[$Analítico_Deriv.P:.P];[$Resumo_Derivativos.B22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Y:.Y];[$Analítico_Deriv.D:.D];[$Resumo_Derivativos.H18];[$Analítico_Deriv.F:.F];[$Resumo_Derivativos.J19];[$Analítico_Deriv.P:.P];[$Resumo_Derivativos.B22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([.D22:.K22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Default" table:number-columns-repeated="16371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NDF</text:p>
          </table:table-cell>
          <table:covered-table-cell table:style-name="ce162"/>
          <table:table-cell table:style-name="ce166" table:formula="of:=SUM([.D24:.E25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F24:.G25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H24:.I25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J24:.K25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D23:.K23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ompra</text:p>
          </table:table-cell>
          <table:covered-table-cell table:style-name="ce159"/>
          <table:table-cell table:style-name="ce167" table:formula="of:=SUMIFS([$Analítico_Deriv.Y:.Y];[$Analítico_Deriv.D:.D];&quot;Dolar&quot;;[$Analítico_Deriv.F:.F];[$Resumo_Derivativos.D19];[$Analítico_Deriv.P:.P];[$Resumo_Derivativos.B24];[$Analítico_Deriv.E:.E];[$Resumo_Derivativos.D18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Y:.Y];[$Analítico_Deriv.D:.D];&quot;Dolar&quot;;[$Analítico_Deriv.F:.F];[$Resumo_Derivativos.F19];[$Analítico_Deriv.P:.P];[$Resumo_Derivativos.B24];[$Analítico_Deriv.E:.E];[$Resumo_Derivativos.D18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Y:.Y];[$Analítico_Deriv.D:.D];&quot;Dolar&quot;;[$Analítico_Deriv.F:.F];[$Resumo_Derivativos.H19];[$Analítico_Deriv.P:.P];[$Resumo_Derivativos.B24];[$Analítico_Deriv.E:.E];[$Resumo_Derivativos.H18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Y:.Y];[$Analítico_Deriv.D:.D];&quot;Dolar&quot;;[$Analítico_Deriv.F:.F];[$Resumo_Derivativos.J19];[$Analítico_Deriv.P:.P];[$Resumo_Derivativos.B24];[$Analítico_Deriv.E:.E];[$Resumo_Derivativos.H18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([.D24:.K24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Default" table:number-columns-repeated="16371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Venda</text:p>
          </table:table-cell>
          <table:covered-table-cell table:style-name="ce157"/>
          <table:table-cell table:style-name="ce168" table:formula="of:=SUMIFS([$Analítico_Deriv.Y:.Y];[$Analítico_Deriv.D:.D];&quot;Dolar&quot;;[$Analítico_Deriv.F:.F];[$Resumo_Derivativos.D19];[$Analítico_Deriv.P:.P];[$Resumo_Derivativos.B25];[$Analítico_Deriv.E:.E];[$Resumo_Derivativos.D18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ce168" table:formula="of:=SUMIFS([$Analítico_Deriv.Y:.Y];[$Analítico_Deriv.D:.D];&quot;Dolar&quot;;[$Analítico_Deriv.F:.F];[$Resumo_Derivativos.F19];[$Analítico_Deriv.P:.P];[$Resumo_Derivativos.B25];[$Analítico_Deriv.E:.E];[$Resumo_Derivativos.D18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ce168" table:formula="of:=SUMIFS([$Analítico_Deriv.Y:.Y];[$Analítico_Deriv.D:.D];&quot;Dolar&quot;;[$Analítico_Deriv.F:.F];[$Resumo_Derivativos.H19];[$Analítico_Deriv.P:.P];[$Resumo_Derivativos.B25];[$Analítico_Deriv.E:.E];[$Resumo_Derivativos.H18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ce168" table:formula="of:=SUMIFS([$Analítico_Deriv.Y:.Y];[$Analítico_Deriv.D:.D];&quot;Dolar&quot;;[$Analítico_Deriv.F:.F];[$Resumo_Derivativos.J19];[$Analítico_Deriv.P:.P];[$Resumo_Derivativos.B25];[$Analítico_Deriv.E:.E];[$Resumo_Derivativos.H18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ce168" table:formula="of:=SUM([.D25:.K25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Default" table:number-columns-repeated="16371"/>
        </table:table-row>
        <table:table-row table:style-name="ro5">
          <table:table-cell/>
          <table:table-cell table:style-name="ce153" office:value-type="string" calcext:value-type="string" table:number-columns-spanned="2" table:number-rows-spanned="1">
            <text:p>Total</text:p>
          </table:table-cell>
          <table:covered-table-cell table:style-name="ce159"/>
          <table:table-cell table:style-name="ce169" table:formula="of:=SUM([.D23];[.D20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ce169" table:formula="of:=SUM([.F23];[.F20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ce169" table:formula="of:=SUM([.H23];[.H20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ce169" table:formula="of:=SUM([.J23];[.J20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ce169" table:formula="of:=SUM([.L23];[.L20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Default" table:number-columns-repeated="16371"/>
        </table:table-row>
        <table:table-row table:style-name="ro1" table:number-rows-repeated="2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47" office:value-type="string" calcext:value-type="string" table:number-columns-spanned="12" table:number-rows-spanned="2">
            <text:p>EXPOSIÇÃO CAMBIAL A BASIS (USD)</text:p>
          </table:table-cell>
          <table:covered-table-cell table:number-columns-repeated="11" table:style-name="ce148"/>
          <table:table-cell table:style-name="Default" table:number-columns-repeated="16371"/>
        </table:table-row>
        <table:table-row table:style-name="ro1">
          <table:table-cell/>
          <table:covered-table-cell table:number-columns-repeated="12" table:style-name="ce148"/>
          <table:table-cell table:style-name="Default" table:number-columns-repeated="16371"/>
        </table:table-row>
        <table:table-row table:style-name="ro1">
          <table:table-cell/>
          <table:table-cell table:style-name="ce155" table:number-columns-spanned="2" table:number-rows-spanned="2"/>
          <table:covered-table-cell table:style-name="ce161"/>
          <table:table-cell table:style-name="ce165" office:value-type="string" calcext:value-type="string" table:number-columns-spanned="4" table:number-rows-spanned="1">
            <text:p>Soja</text:p>
          </table:table-cell>
          <table:covered-table-cell table:number-columns-repeated="3" table:style-name="ce165"/>
          <table:table-cell table:style-name="ce165" office:value-type="string" calcext:value-type="string" table:number-columns-spanned="4" table:number-rows-spanned="1">
            <text:p>Milho</text:p>
          </table:table-cell>
          <table:covered-table-cell table:number-columns-repeated="3" table:style-name="ce165"/>
          <table:table-cell table:style-name="ce161" table:number-columns-spanned="2" table:number-rows-spanned="1"/>
          <table:covered-table-cell table:style-name="ce161"/>
          <table:table-cell table:style-name="Default" table:number-columns-repeated="16371"/>
        </table:table-row>
        <table:table-row table:style-name="ro1">
          <table:table-cell/>
          <table:covered-table-cell table:number-columns-repeated="2" table:style-name="ce155"/>
          <table:table-cell table:style-name="ce165" office:value-type="string" calcext:value-type="string" table:number-columns-spanned="2" table:number-rows-spanned="1">
            <text:p>Safra Atual</text:p>
          </table:table-cell>
          <table:covered-table-cell table:style-name="ce165"/>
          <table:table-cell table:style-name="ce165" office:value-type="string" calcext:value-type="string" table:number-columns-spanned="2" table:number-rows-spanned="1">
            <text:p>Safra Próxima</text:p>
          </table:table-cell>
          <table:covered-table-cell table:style-name="ce165"/>
          <table:table-cell table:style-name="ce165" office:value-type="string" calcext:value-type="string" table:number-columns-spanned="2" table:number-rows-spanned="1">
            <text:p>Safra Atual</text:p>
          </table:table-cell>
          <table:covered-table-cell table:style-name="ce165"/>
          <table:table-cell table:style-name="ce165" office:value-type="string" calcext:value-type="string" table:number-columns-spanned="2" table:number-rows-spanned="1">
            <text:p>Safra Próxima</text:p>
          </table:table-cell>
          <table:covered-table-cell table:style-name="ce165"/>
          <table:table-cell table:style-name="ce165" office:value-type="string" calcext:value-type="string" table:number-columns-spanned="2" table:number-rows-spanned="1">
            <text:p>Total Geral</text:p>
          </table:table-cell>
          <table:covered-table-cell table:style-name="ce165"/>
          <table:table-cell table:style-name="Default" table:number-columns-repeated="16371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CBOT</text:p>
          </table:table-cell>
          <table:covered-table-cell table:style-name="ce162"/>
          <table:table-cell table:style-name="ce166" table:formula="of:=SUM([.D34:.E35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F34:.G35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H34:.I35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J34:.K35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D33:.K33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ompra</text:p>
          </table:table-cell>
          <table:covered-table-cell table:style-name="ce159"/>
          <table:table-cell table:style-name="ce167" table:formula="of:=SUMIFS([$Analítico_Deriv.AO:.AO];[$Analítico_Deriv.D:.D];[$Resumo_Derivativos.D31];[$Analítico_Deriv.F:.F];[$Resumo_Derivativos.D32];[$Analítico_Deriv.P:.P];[$Resumo_Derivativos.B34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AO:.AO];[$Analítico_Deriv.D:.D];[$Resumo_Derivativos.D31];[$Analítico_Deriv.F:.F];[$Resumo_Derivativos.F32];[$Analítico_Deriv.P:.P];[$Resumo_Derivativos.B34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AO:.AO];[$Analítico_Deriv.D:.D];[$Resumo_Derivativos.H31];[$Analítico_Deriv.F:.F];[$Resumo_Derivativos.H32];[$Analítico_Deriv.P:.P];[$Resumo_Derivativos.B34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AO:.AO];[$Analítico_Deriv.D:.D];[$Resumo_Derivativos.H31];[$Analítico_Deriv.F:.F];[$Resumo_Derivativos.J32];[$Analítico_Deriv.P:.P];[$Resumo_Derivativos.B34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([.D34:.K34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Venda</text:p>
          </table:table-cell>
          <table:covered-table-cell table:style-name="ce159"/>
          <table:table-cell table:style-name="ce167" table:formula="of:=SUMIFS([$Analítico_Deriv.AO:.AO];[$Analítico_Deriv.D:.D];[$Resumo_Derivativos.D31];[$Analítico_Deriv.F:.F];[$Resumo_Derivativos.D32];[$Analítico_Deriv.P:.P];[$Resumo_Derivativos.B35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AO:.AO];[$Analítico_Deriv.D:.D];[$Resumo_Derivativos.D31];[$Analítico_Deriv.F:.F];[$Resumo_Derivativos.F32];[$Analítico_Deriv.P:.P];[$Resumo_Derivativos.B35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AO:.AO];[$Analítico_Deriv.D:.D];[$Resumo_Derivativos.H31];[$Analítico_Deriv.F:.F];[$Resumo_Derivativos.H32];[$Analítico_Deriv.P:.P];[$Resumo_Derivativos.B35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AO:.AO];[$Analítico_Deriv.D:.D];[$Resumo_Derivativos.H31];[$Analítico_Deriv.F:.F];[$Resumo_Derivativos.J32];[$Analítico_Deriv.P:.P];[$Resumo_Derivativos.B35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([.D35:.K35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Default" table:number-columns-repeated="16371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NDF</text:p>
          </table:table-cell>
          <table:covered-table-cell table:style-name="ce162"/>
          <table:table-cell table:style-name="ce166" table:formula="of:=SUM([.D37:.E38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F37:.G38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H37:.I38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J37:.K38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ce166" table:formula="of:=SUM([.D36:.K36])" office:value-type="float" office:value="0" calcext:value-type="float" table:number-columns-spanned="2" table:number-rows-spanned="1">
            <text:p>0,00 </text:p>
          </table:table-cell>
          <table:covered-table-cell table:style-name="ce172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ompra</text:p>
          </table:table-cell>
          <table:covered-table-cell table:style-name="ce159"/>
          <table:table-cell table:style-name="ce167" table:formula="of:=SUMIFS([$Analítico_Deriv.AO:.AO];[$Analítico_Deriv.D:.D];&quot;Dolar&quot;;[$Analítico_Deriv.F:.F];[$Resumo_Derivativos.D32];[$Analítico_Deriv.P:.P];[$Resumo_Derivativos.B37];[$Analítico_Deriv.E:.E];[$Resumo_Derivativos.D31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AO:.AO];[$Analítico_Deriv.D:.D];&quot;Dolar&quot;;[$Analítico_Deriv.F:.F];[$Resumo_Derivativos.F32];[$Analítico_Deriv.P:.P];[$Resumo_Derivativos.B37];[$Analítico_Deriv.E:.E];[$Resumo_Derivativos.D31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AO:.AO];[$Analítico_Deriv.D:.D];&quot;Dolar&quot;;[$Analítico_Deriv.F:.F];[$Resumo_Derivativos.H32];[$Analítico_Deriv.P:.P];[$Resumo_Derivativos.B37];[$Analítico_Deriv.E:.E];[$Resumo_Derivativos.H31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IFS([$Analítico_Deriv.AO:.AO];[$Analítico_Deriv.D:.D];&quot;Dolar&quot;;[$Analítico_Deriv.F:.F];[$Resumo_Derivativos.J32];[$Analítico_Deriv.P:.P];[$Resumo_Derivativos.B37];[$Analítico_Deriv.E:.E];[$Resumo_Derivativos.H31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ce167" table:formula="of:=SUM([.D37:.K37])" office:value-type="float" office:value="0" calcext:value-type="float" table:number-columns-spanned="2" table:number-rows-spanned="1">
            <text:p>0,00 </text:p>
          </table:table-cell>
          <table:covered-table-cell table:style-name="ce171"/>
          <table:table-cell table:style-name="Default" table:number-columns-repeated="16371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Venda</text:p>
          </table:table-cell>
          <table:covered-table-cell table:style-name="ce157"/>
          <table:table-cell table:style-name="ce168" table:formula="of:=SUMIFS([$Analítico_Deriv.AO:.AO];[$Analítico_Deriv.D:.D];&quot;Dolar&quot;;[$Analítico_Deriv.F:.F];[$Resumo_Derivativos.D32];[$Analítico_Deriv.P:.P];[$Resumo_Derivativos.B38];[$Analítico_Deriv.E:.E];[$Resumo_Derivativos.D31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ce168" table:formula="of:=SUMIFS([$Analítico_Deriv.AO:.AO];[$Analítico_Deriv.D:.D];&quot;Dolar&quot;;[$Analítico_Deriv.F:.F];[$Resumo_Derivativos.F32];[$Analítico_Deriv.P:.P];[$Resumo_Derivativos.B38];[$Analítico_Deriv.E:.E];[$Resumo_Derivativos.D31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ce168" table:formula="of:=SUMIFS([$Analítico_Deriv.AO:.AO];[$Analítico_Deriv.D:.D];&quot;Dolar&quot;;[$Analítico_Deriv.F:.F];[$Resumo_Derivativos.H32];[$Analítico_Deriv.P:.P];[$Resumo_Derivativos.B38];[$Analítico_Deriv.E:.E];[$Resumo_Derivativos.H31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ce168" table:formula="of:=SUMIFS([$Analítico_Deriv.AO:.AO];[$Analítico_Deriv.D:.D];&quot;Dolar&quot;;[$Analítico_Deriv.F:.F];[$Resumo_Derivativos.J32];[$Analítico_Deriv.P:.P];[$Resumo_Derivativos.B38];[$Analítico_Deriv.E:.E];[$Resumo_Derivativos.H31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ce168" table:formula="of:=SUM([.D38:.K38])" office:value-type="float" office:value="0" calcext:value-type="float" table:number-columns-spanned="2" table:number-rows-spanned="1">
            <text:p>0,00 </text:p>
          </table:table-cell>
          <table:covered-table-cell table:style-name="ce168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Total</text:p>
          </table:table-cell>
          <table:covered-table-cell table:style-name="ce159"/>
          <table:table-cell table:style-name="ce169" table:formula="of:=SUM([.D36];[.D33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ce169" table:formula="of:=SUM([.F36];[.F33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ce169" table:formula="of:=SUM([.H36];[.H33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ce169" table:formula="of:=SUM([.J36];[.J33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ce169" table:formula="of:=SUM([.L36];[.L33])" office:value-type="float" office:value="0" calcext:value-type="float" table:number-columns-spanned="2" table:number-rows-spanned="1">
            <text:p>0,00 </text:p>
          </table:table-cell>
          <table:covered-table-cell table:style-name="ce173"/>
          <table:table-cell table:style-name="Default" table:number-columns-repeated="16371"/>
        </table:table-row>
        <table:table-row table:style-name="ro1" table:number-rows-repeated="2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47" office:value-type="string" calcext:value-type="string" table:number-columns-spanned="8" table:number-rows-spanned="2">
            <text:p>MTM DE DERIVATIVOS (R$)</text:p>
          </table:table-cell>
          <table:covered-table-cell table:number-columns-repeated="7" table:style-name="ce148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covered-table-cell table:number-columns-repeated="8" table:style-name="ce148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table-cell table:style-name="ce158" office:value-type="string" calcext:value-type="string" table:number-columns-spanned="2" table:number-rows-spanned="2">
            <text:p>Produto</text:p>
          </table:table-cell>
          <table:covered-table-cell table:style-name="ce151"/>
          <table:table-cell table:style-name="ce158" office:value-type="string" calcext:value-type="string" table:number-columns-spanned="2" table:number-rows-spanned="2">
            <text:p>Safra Atual</text:p>
          </table:table-cell>
          <table:covered-table-cell table:style-name="ce151"/>
          <table:table-cell table:style-name="ce158" office:value-type="string" calcext:value-type="string" table:number-columns-spanned="2" table:number-rows-spanned="2">
            <text:p>Safra Próxima</text:p>
          </table:table-cell>
          <table:covered-table-cell table:style-name="ce151"/>
          <table:table-cell table:style-name="ce158" office:value-type="string" calcext:value-type="string" table:number-columns-spanned="2" table:number-rows-spanned="2">
            <text:p>Total</text:p>
          </table:table-cell>
          <table:covered-table-cell table:style-name="ce151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covered-table-cell table:number-columns-repeated="8" table:style-name="ce158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2">
            <text:p>Soja</text:p>
          </table:table-cell>
          <table:covered-table-cell table:style-name="ce159"/>
          <table:table-cell table:style-name="ce170" table:formula="of:=SUMIFS([$Analítico_Deriv.AB:.AB];[$Analítico_Deriv.D:.D];[$Resumo_Derivativos.B46];[$Analítico_Deriv.F:.F];[$Resumo_Derivativos.D44])" office:value-type="float" office:value="0" calcext:value-type="float" table:number-columns-spanned="2" table:number-rows-spanned="2">
            <text:p>0,00 </text:p>
          </table:table-cell>
          <table:covered-table-cell table:style-name="ce170"/>
          <table:table-cell table:style-name="ce170" table:formula="of:=SUMIFS([$Analítico_Deriv.AB:.AB];[$Analítico_Deriv.D:.D];[$Resumo_Derivativos.B46];[$Analítico_Deriv.F:.F];[$Resumo_Derivativos.F44])" office:value-type="float" office:value="0" calcext:value-type="float" table:number-columns-spanned="2" table:number-rows-spanned="2">
            <text:p>0,00 </text:p>
          </table:table-cell>
          <table:covered-table-cell table:style-name="ce170"/>
          <table:table-cell table:style-name="ce170" table:formula="of:=SUM([.D46:.G47])" office:value-type="float" office:value="0" calcext:value-type="float" table:number-columns-spanned="2" table:number-rows-spanned="2">
            <text:p>0,00 </text:p>
          </table:table-cell>
          <table:covered-table-cell table:style-name="ce170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covered-table-cell table:number-columns-repeated="2" table:style-name="ce159"/>
          <table:covered-table-cell table:number-columns-repeated="6" table:style-name="ce171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2">
            <text:p>Milho</text:p>
          </table:table-cell>
          <table:covered-table-cell table:style-name="ce159"/>
          <table:table-cell table:style-name="ce167" table:formula="of:=SUMIFS([$Analítico_Deriv.AB:.AB];[$Analítico_Deriv.D:.D];[$Resumo_Derivativos.B48];[$Analítico_Deriv.F:.F];[$Resumo_Derivativos.D44])" office:value-type="float" office:value="0" calcext:value-type="float" table:number-columns-spanned="2" table:number-rows-spanned="2">
            <text:p>0,00 </text:p>
          </table:table-cell>
          <table:covered-table-cell table:style-name="ce171"/>
          <table:table-cell table:style-name="ce167" table:formula="of:=SUMIFS([$Analítico_Deriv.AB:.AB];[$Analítico_Deriv.D:.D];[$Resumo_Derivativos.B48];[$Analítico_Deriv.F:.F];[$Resumo_Derivativos.F44])" office:value-type="float" office:value="5365.74600000044" calcext:value-type="float" table:number-columns-spanned="2" table:number-rows-spanned="2">
            <text:p>5.365,75 </text:p>
          </table:table-cell>
          <table:covered-table-cell table:style-name="ce171"/>
          <table:table-cell table:style-name="ce167" table:formula="of:=SUM([.D48:.G49])" office:value-type="float" office:value="5365.74600000044" calcext:value-type="float" table:number-columns-spanned="2" table:number-rows-spanned="2">
            <text:p>5.365,75 </text:p>
          </table:table-cell>
          <table:covered-table-cell table:style-name="ce171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covered-table-cell table:number-columns-repeated="2" table:style-name="ce159"/>
          <table:covered-table-cell table:number-columns-repeated="6" table:style-name="ce171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table-cell table:style-name="ce157" office:value-type="string" calcext:value-type="string" table:number-columns-spanned="2" table:number-rows-spanned="2">
            <text:p>Dolar</text:p>
          </table:table-cell>
          <table:covered-table-cell table:style-name="ce163"/>
          <table:table-cell table:style-name="ce168" table:formula="of:=SUMIFS([$Analítico_Deriv.AB:.AB];[$Analítico_Deriv.D:.D];[$Resumo_Derivativos.B50];[$Analítico_Deriv.F:.F];[$Resumo_Derivativos.D44])" office:value-type="float" office:value="0" calcext:value-type="float" table:number-columns-spanned="2" table:number-rows-spanned="2">
            <text:p>0,00 </text:p>
          </table:table-cell>
          <table:covered-table-cell table:style-name="ce174"/>
          <table:table-cell table:style-name="ce168" table:formula="of:=SUMIFS([$Analítico_Deriv.AB:.AB];[$Analítico_Deriv.D:.D];[$Resumo_Derivativos.B50];[$Analítico_Deriv.F:.F];[$Resumo_Derivativos.F44])" office:value-type="float" office:value="0" calcext:value-type="float" table:number-columns-spanned="2" table:number-rows-spanned="2">
            <text:p>0,00 </text:p>
          </table:table-cell>
          <table:covered-table-cell table:style-name="ce174"/>
          <table:table-cell table:style-name="ce168" table:formula="of:=SUM([.D50:.G51])" office:value-type="float" office:value="0" calcext:value-type="float" table:number-columns-spanned="2" table:number-rows-spanned="2">
            <text:p>0,00 </text:p>
          </table:table-cell>
          <table:covered-table-cell table:style-name="ce174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covered-table-cell table:number-columns-repeated="2" table:style-name="ce157"/>
          <table:covered-table-cell table:number-columns-repeated="6" table:style-name="ce168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table-cell table:style-name="ce153" office:value-type="string" calcext:value-type="string" table:number-columns-spanned="2" table:number-rows-spanned="2">
            <text:p>Total</text:p>
          </table:table-cell>
          <table:covered-table-cell table:style-name="ce159"/>
          <table:table-cell table:style-name="ce167" table:formula="of:=SUM([.D46:.E51])" office:value-type="float" office:value="0" calcext:value-type="float" table:number-columns-spanned="2" table:number-rows-spanned="2">
            <text:p>0,00 </text:p>
          </table:table-cell>
          <table:covered-table-cell table:style-name="ce171"/>
          <table:table-cell table:style-name="ce167" table:formula="of:=SUM([.F46:.G51])" office:value-type="float" office:value="5365.74600000044" calcext:value-type="float" table:number-columns-spanned="2" table:number-rows-spanned="2">
            <text:p>5.365,75 </text:p>
          </table:table-cell>
          <table:covered-table-cell table:style-name="ce171"/>
          <table:table-cell table:style-name="ce167" table:formula="of:=SUM([.D52:.G53])" office:value-type="float" office:value="5365.74600000044" calcext:value-type="float" table:number-columns-spanned="2" table:number-rows-spanned="2">
            <text:p>5.365,75 </text:p>
          </table:table-cell>
          <table:covered-table-cell table:style-name="ce171"/>
          <table:table-cell table:number-columns-repeated="4"/>
          <table:table-cell table:style-name="Default" table:number-columns-repeated="16371"/>
        </table:table-row>
        <table:table-row table:style-name="ro1">
          <table:table-cell/>
          <table:covered-table-cell table:number-columns-repeated="2" table:style-name="ce159"/>
          <table:covered-table-cell table:number-columns-repeated="6" table:style-name="ce171"/>
          <table:table-cell table:number-columns-repeated="4"/>
          <table:table-cell table:style-name="Default" table:number-columns-repeated="16371"/>
        </table:table-row>
        <table:table-row table:style-name="ro1" table:number-rows-repeated="3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47" office:value-type="string" calcext:value-type="string" table:number-columns-spanned="12" table:number-rows-spanned="2">
            <text:p>ACOMPANHAMENTO MTM DE DERIVATIVOS</text:p>
          </table:table-cell>
          <table:covered-table-cell table:number-columns-repeated="11" table:style-name="ce148"/>
          <table:table-cell table:style-name="Default" table:number-columns-repeated="16371"/>
        </table:table-row>
        <table:table-row table:style-name="ro1">
          <table:table-cell/>
          <table:covered-table-cell table:number-columns-repeated="12" table:style-name="ce148"/>
          <table:table-cell table:style-name="Default" table:number-columns-repeated="16371"/>
        </table:table-row>
        <table:table-row table:style-name="ro1">
          <table:table-cell/>
          <table:table-cell>
            <draw:frame table:end-cell-address="Resumo_Derivativos.M71" table:end-x="1.445cm" table:end-y="0.529cm" draw:z-index="0" draw:name="Gráfico 1" draw:style-name="gr9" draw:text-style-name="P1" svg:width="17.356cm" svg:height="6.879cm" svg:x="0cm" svg:y="0cm">
              <draw:object draw:notify-on-update-of-ranges="Evolução_MTM.B4:Evolução_MTM.B8 Evolução_MTM.C3:Evolução_MTM.C3 Evolução_MTM.C4:Evolução_MTM.C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  <table:table-cell table:style-name="Default" table:number-columns-repeated="16371"/>
        </table:table-row>
      </table:table>
      <table:table table:name="Evolução_MTM" table:style-name="ta11">
        <table:table-column table:style-name="co1" table:default-cell-style-name="Default"/>
        <table:table-column table:style-name="co26" table:default-cell-style-name="ce34"/>
        <table:table-column table:style-name="co1" table:default-cell-style-name="Default"/>
        <table:table-column table:style-name="co1" table:number-columns-repeated="16381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TM Total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date" office:date-value="2026-06-24" calcext:value-type="date">
            <text:p>24/6/2026</text:p>
          </table:table-cell>
          <table:table-cell office:value-type="float" office:value="77050.54" calcext:value-type="float">
            <text:p>77050,54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date" office:date-value="2026-06-25" calcext:value-type="date">
            <text:p>25/6/2026</text:p>
          </table:table-cell>
          <table:table-cell office:value-type="float" office:value="63992.44" calcext:value-type="float">
            <text:p>63992,44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date" office:date-value="2026-06-26" calcext:value-type="date">
            <text:p>26/6/2026</text:p>
          </table:table-cell>
          <table:table-cell office:value-type="float" office:value="65050.42" calcext:value-type="float">
            <text:p>65050,42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date" office:date-value="2026-06-29" calcext:value-type="date">
            <text:p>29/6/2026</text:p>
          </table:table-cell>
          <table:table-cell office:value-type="float" office:value="66222.14" calcext:value-type="float">
            <text:p>66222,14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date" office:date-value="2026-06-30" calcext:value-type="date">
            <text:p>30/6/2026</text:p>
          </table:table-cell>
          <table:table-cell office:value-type="float" office:value="57995.38" calcext:value-type="float">
            <text:p>57995,38</text:p>
          </table:table-cell>
          <table:table-cell table:style-name="Default" table:number-columns-repeated="16381"/>
        </table:table-row>
      </table:table>
      <table:table table:name="Liquidações.Derivativos" table:style-name="ta12">
        <table:table-column table:style-name="co27" table:number-columns-repeated="4" table:default-cell-style-name="ce27"/>
        <table:table-column table:style-name="co27" table:visibility="collapse" table:default-cell-style-name="ce27"/>
        <table:table-column table:style-name="co27" table:number-columns-repeated="2" table:default-cell-style-name="ce27"/>
        <table:table-column table:style-name="co27" table:number-columns-repeated="2" table:default-cell-style-name="ce186"/>
        <table:table-column table:style-name="co27" table:number-columns-repeated="3" table:default-cell-style-name="ce27"/>
        <table:table-column table:style-name="co27" table:number-columns-repeated="3" table:default-cell-style-name="ce188"/>
        <table:table-column table:style-name="co27" table:default-cell-style-name="ce27"/>
        <table:table-column table:style-name="co28" table:default-cell-style-name="ce27"/>
        <table:table-column table:style-name="co29" table:number-columns-repeated="2" table:default-cell-style-name="ce27"/>
        <table:table-column table:style-name="co27" table:visibility="collapse" table:number-columns-repeated="2" table:default-cell-style-name="Default"/>
        <table:table-column table:style-name="co1" table:number-columns-repeated="16363"/>
        <table:table-row table:style-name="ro1">
          <table:table-cell>
            <draw:frame draw:z-index="0" draw:name="Imagem 1" draw:style-name="gr10" draw:text-style-name="P1" svg:width="5.106cm" svg:height="2.215cm" svg:x="0.37cm" svg:y="0.265cm">
              <draw:image xlink:href="Pictures/10000001000001F2000000C26B9DFDBB.png" xlink:type="simple" xlink:show="embed" xlink:actuate="onLoad" draw:mime-type="image/png">
                <text:p/>
              </draw:image>
              <svg:desc>Grupo Spasso | Armazenagem e Comercialização de Grãos no Brasil</svg:desc>
            </draw:frame>
          </table:table-cell>
          <table:table-cell table:number-columns-repeated="20"/>
          <table:table-cell table:style-name="Default" table:number-columns-repeated="16363"/>
        </table:table-row>
        <table:table-row table:style-name="ro1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2"/>
          <table:table-cell>
            <draw:custom-shape draw:z-index="1" draw:name="CaixaDeTexto 2" draw:style-name="gr2" draw:text-style-name="P3" svg:width="7.696cm" svg:height="0.951cm" svg:x="0.08cm" svg:y="0.106cm">
              <text:p text:style-name="P2"><text:span text:style-name="T9">LIQUIDAÇÕES DE DERIVATIVO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8"/>
          <table:table-cell table:style-name="Default" table:number-columns-repeated="16363"/>
        </table:table-row>
        <table:table-row table:style-name="ro1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13"/>
          <table:table-cell table:style-name="ce190" table:formula="of:=SUBTOTAL(9;[$'Liquidações.Derivativos'.$N$7:.$N$8])" office:value-type="float" office:value="12187.2244922514" calcext:value-type="float">
            <text:p>12.187,22</text:p>
          </table:table-cell>
          <table:table-cell table:style-name="ce190" table:formula="of:=SUBTOTAL(9;[$'Liquidações.Derivativos'.$O$7:.$O$8])" office:value-type="float" office:value="63271.2" calcext:value-type="float">
            <text:p>63.271,20</text:p>
          </table:table-cell>
          <table:table-cell table:number-columns-repeated="6"/>
          <table:table-cell table:style-name="Default" table:number-columns-repeated="16363"/>
        </table:table-row>
        <table:table-row table:style-name="ro2">
          <table:table-cell table:style-name="ce93" office:value-type="string" calcext:value-type="string">
            <text:p>Empresa</text:p>
          </table:table-cell>
          <table:table-cell table:style-name="ce93" office:value-type="string" calcext:value-type="string">
            <text:p>Corretora</text:p>
          </table:table-cell>
          <table:table-cell table:style-name="ce93" office:value-type="string" calcext:value-type="string">
            <text:p>Produto</text:p>
          </table:table-cell>
          <table:table-cell table:style-name="ce93" office:value-type="string" calcext:value-type="string">
            <text:p>Bolsa</text:p>
          </table:table-cell>
          <table:table-cell table:style-name="ce185" office:value-type="string" calcext:value-type="string">
            <text:p>Chave Volume</text:p>
          </table:table-cell>
          <table:table-cell table:style-name="ce93" office:value-type="string" calcext:value-type="string">
            <text:p>Ticker</text:p>
          </table:table-cell>
          <table:table-cell table:style-name="ce93" office:value-type="string" calcext:value-type="string">
            <text:p>Volume (Lotes ou Notional)</text:p>
          </table:table-cell>
          <table:table-cell table:style-name="ce187" office:value-type="string" calcext:value-type="string">
            <text:p>Volume Tons</text:p>
          </table:table-cell>
          <table:table-cell table:style-name="ce187" office:value-type="string" calcext:value-type="string">
            <text:p>Volume Scs</text:p>
          </table:table-cell>
          <table:table-cell table:style-name="ce93" office:value-type="string" calcext:value-type="string">
            <text:p>Ciclo</text:p>
          </table:table-cell>
          <table:table-cell table:style-name="ce93" office:value-type="string" calcext:value-type="string">
            <text:p>Estratégia</text:p>
          </table:table-cell>
          <table:table-cell table:style-name="ce93" office:value-type="string" calcext:value-type="string">
            <text:p>Data</text:p>
          </table:table-cell>
          <table:table-cell table:style-name="ce189" office:value-type="string" calcext:value-type="string">
            <text:p>Taxa BRL/USD</text:p>
          </table:table-cell>
          <table:table-cell table:style-name="ce189" office:value-type="string" calcext:value-type="string">
            <text:p>Liquidação USD </text:p>
          </table:table-cell>
          <table:table-cell table:style-name="ce189" office:value-type="string" calcext:value-type="string">
            <text:p>Liquidação BRL</text:p>
          </table:table-cell>
          <table:table-cell table:style-name="ce93" office:value-type="string" calcext:value-type="string">
            <text:p>Commodity Vinculada</text:p>
          </table:table-cell>
          <table:table-cell table:style-name="ce93" office:value-type="string" calcext:value-type="string">
            <text:p>ID's Vinculados</text:p>
          </table:table-cell>
          <table:table-cell table:style-name="ce93" office:value-type="string" calcext:value-type="string">
            <text:p>Tipo de Liquidação</text:p>
          </table:table-cell>
          <table:table-cell table:style-name="ce93" office:value-type="string" calcext:value-type="string">
            <text:p>Comentários Gestão de Riscos</text:p>
          </table:table-cell>
          <table:table-cell table:style-name="ce185" office:value-type="string" calcext:value-type="string">
            <text:p>Mês</text:p>
          </table:table-cell>
          <table:table-cell table:style-name="ce185" office:value-type="string" calcext:value-type="string">
            <text:p>Ano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Intergrãos</text:p>
          </table:table-cell>
          <table:table-cell office:value-type="string" calcext:value-type="string">
            <text:p>Stonex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CBOT</text:p>
          </table:table-cell>
          <table:table-cell table:formula="of:=COM.MICROSOFT.CONCAT([$'Liquidações.Derivativos'.$C7];&quot; &quot;;[$'Liquidações.Derivativos'.$D7])" office:value-type="string" office:string-value="Soja CBOT" calcext:value-type="string">
            <text:p>Soja CBOT</text:p>
          </table:table-cell>
          <table:table-cell office:value-type="string" calcext:value-type="string">
            <text:p>ZSQ6</text:p>
          </table:table-cell>
          <table:table-cell office:value-type="float" office:value="5.48" calcext:value-type="float">
            <text:p>5,48</text:p>
          </table:table-cell>
          <table:table-cell table:formula="of:=IF([$'Liquidações.Derivativos'.$E7]=&quot;Soja CBOT&quot;;([$'Liquidações.Derivativos'.$G7]*136078)/1000;IF([$'Liquidações.Derivativos'.$E7]=&quot;Milho CBOT&quot;;[$'Liquidações.Derivativos'.$G7]*127000/1000;IF([$'Liquidações.Derivativos'.$E7]=&quot;Milho BMF&quot;;[$'Liquidações.Derivativos'.$G7]*27000/1000;IF([$'Liquidações.Derivativos'.$E7]=&quot;Dólar BMF&quot;;0;&quot;VALIDAR&quot;))))" office:value-type="float" office:value="745.70744" calcext:value-type="float">
            <text:p>746</text:p>
          </table:table-cell>
          <table:table-cell table:formula="of:=[$'Liquidações.Derivativos'.$H7]*1000/60" office:value-type="float" office:value="12428.4573333333" calcext:value-type="float">
            <text:p>12.428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Futuro</text:p>
          </table:table-cell>
          <table:table-cell table:style-name="ce95" office:value-type="date" office:date-value="2026-06-23" calcext:value-type="date">
            <text:p>23/6/2026</text:p>
          </table:table-cell>
          <table:table-cell table:formula="of:=[$'Liquidações.Derivativos'.$O7]/[$'Liquidações.Derivativos'.$N7]" office:value-type="float" office:value="5.13947839626314" calcext:value-type="float">
            <text:p>5,14</text:p>
          </table:table-cell>
          <table:table-cell office:value-type="float" office:value="642.25" calcext:value-type="float">
            <text:p>642,25</text:p>
          </table:table-cell>
          <table:table-cell office:value-type="float" office:value="3300.83" calcext:value-type="float">
            <text:p>3.300,83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F1, F2, F3, F4, F5, F6, F7, F8</text:p>
          </table:table-cell>
          <table:table-cell table:content-validation-name="val1" office:value-type="string" calcext:value-type="string">
            <text:p>Offset de posição antecipado</text:p>
          </table:table-cell>
          <table:table-cell office:value-type="string" calcext:value-type="string">
            <text:p>Liquidação de Long Basis de Soja</text:p>
          </table:table-cell>
          <table:table-cell table:style-name="ce27" table:formula="of:=COM.MICROSOFT.XLOOKUP([$'Liquidações.Derivativos'.$L7];[$dms.J:.J];[$dms.L:.L])" office:value-type="string" office:string-value="Jun" calcext:value-type="string">
            <text:p>Jun</text:p>
          </table:table-cell>
          <table:table-cell table:style-name="ce27" table:formula="of:=COM.MICROSOFT.XLOOKUP([$'Liquidações.Derivativos'.$L7];[$dms.J:.J];[$dms.M:.M])" office:value-type="float" office:value="2026" calcext:value-type="float">
            <text:p>2026</text:p>
          </table:table-cell>
          <table:table-cell table:style-name="Default" table:number-columns-repeated="16363"/>
        </table:table-row>
        <table:table-row table:style-name="ro6">
          <table:table-cell office:value-type="string" calcext:value-type="string">
            <text:p>Intergrãos</text:p>
          </table:table-cell>
          <table:table-cell office:value-type="string" calcext:value-type="string">
            <text:p>Stonex</text:p>
          </table:table-cell>
          <table:table-cell office:value-type="string" calcext:value-type="string">
            <text:p>Dólar</text:p>
          </table:table-cell>
          <table:table-cell office:value-type="string" calcext:value-type="string">
            <text:p>BMF</text:p>
          </table:table-cell>
          <table:table-cell table:formula="of:=COM.MICROSOFT.CONCAT([$'Liquidações.Derivativos'.$C8];&quot; &quot;;[$'Liquidações.Derivativos'.$D8])" office:value-type="string" office:string-value="Dólar BMF" calcext:value-type="string">
            <text:p>Dólar BMF</text:p>
          </table:table-cell>
          <table:table-cell table:style-name="ce95" office:value-type="date" office:date-value="2026-06-30" calcext:value-type="date">
            <text:p>30/6/2026</text:p>
          </table:table-cell>
          <table:table-cell office:value-type="float" office:value="240920" calcext:value-type="float">
            <text:p>240920</text:p>
          </table:table-cell>
          <table:table-cell table:formula="of:=IF([$'Liquidações.Derivativos'.$E8]=&quot;Soja CBOT&quot;;([$'Liquidações.Derivativos'.$G8]*136078)/1000;IF([$'Liquidações.Derivativos'.$E8]=&quot;Milho CBOT&quot;;[$'Liquidações.Derivativos'.$G8]*127000/1000;IF([$'Liquidações.Derivativos'.$E8]=&quot;Milho BMF&quot;;[$'Liquidações.Derivativos'.$G8]*27000/1000;IF([$'Liquidações.Derivativos'.$E8]=&quot;Dólar BMF&quot;;0;&quot;VALIDAR&quot;))))" office:value-type="float" office:value="0" calcext:value-type="float">
            <text:p>0</text:p>
          </table:table-cell>
          <table:table-cell table:formula="of:=[$'Liquidações.Derivativos'.$H8]*1000/60" office:value-type="float" office:value="0" calcext:value-type="float">
            <text:p>0</text:p>
          </table:table-cell>
          <table:table-cell office:value-type="string" calcext:value-type="string">
            <text:p>Safra Atual</text:p>
          </table:table-cell>
          <table:table-cell office:value-type="string" calcext:value-type="string">
            <text:p>Futuro</text:p>
          </table:table-cell>
          <table:table-cell table:style-name="ce95" office:value-type="date" office:date-value="2026-07-02" calcext:value-type="date">
            <text:p>2/7/2026</text:p>
          </table:table-cell>
          <table:table-cell office:value-type="float" office:value="5.1945" calcext:value-type="float">
            <text:p>5,19</text:p>
          </table:table-cell>
          <table:table-cell table:formula="of:=[$'Liquidações.Derivativos'.$O8]/[$'Liquidações.Derivativos'.$M8]" office:value-type="float" office:value="11544.9744922514" calcext:value-type="float">
            <text:p>11.544,97</text:p>
          </table:table-cell>
          <table:table-cell office:value-type="float" office:value="59970.37" calcext:value-type="float">
            <text:p>59.970,37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F9, F10, F11, F12, F13, F14, F16, F17</text:p>
          </table:table-cell>
          <table:table-cell table:content-validation-name="val1" office:value-type="string" calcext:value-type="string">
            <text:p>Offset de posição por vencimento</text:p>
          </table:table-cell>
          <table:table-cell office:value-type="string" calcext:value-type="string">
            <text:p>Liquidação da posição de dólar de long basis de soja</text:p>
          </table:table-cell>
          <table:table-cell table:style-name="ce27" table:formula="of:=COM.MICROSOFT.XLOOKUP([$'Liquidações.Derivativos'.$L8];[$dms.J:.J];[$dms.L:.L])" office:value-type="string" office:string-value="Jul" calcext:value-type="string">
            <text:p>Jul</text:p>
          </table:table-cell>
          <table:table-cell table:style-name="ce27" table:formula="of:=COM.MICROSOFT.XLOOKUP([$'Liquidações.Derivativos'.$L8];[$dms.J:.J];[$dms.M:.M])" office:value-type="float" office:value="2026" calcext:value-type="float">
            <text:p>2026</text:p>
          </table:table-cell>
          <table:table-cell table:style-name="Default" table:number-columns-repeated="16363"/>
        </table:table-row>
        <table:table-row table:style-name="ro1" table:number-rows-repeated="1048567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21"/>
          <table:table-cell table:style-name="Default" table:number-columns-repeated="16363"/>
        </table:table-row>
        <calcext:conditional-formats>
          <calcext:conditional-format calcext:target-range-address="'Liquidações.Derivativos'.M1:'Liquidações.Derivativos'.O1048576">
            <calcext:condition calcext:apply-style-name="ConditionalStyle_28" calcext:value="between(-0.00000001,-9.99999999999999E+024)" calcext:base-cell-address="'Liquidações.Derivativos'.M1"/>
          </calcext:conditional-format>
        </calcext:conditional-formats>
      </table:table>
      <table:table table:name="Caixa_Corretoras" table:style-name="ta13">
        <table:table-column table:style-name="co30" table:number-columns-repeated="4" table:default-cell-style-name="ce27"/>
        <table:table-column table:style-name="co30" table:default-cell-style-name="ce195"/>
        <table:table-column table:style-name="co30" table:default-cell-style-name="ce27"/>
        <table:table-column table:style-name="co30" table:default-cell-style-name="ce195"/>
        <table:table-column table:style-name="co31" table:default-cell-style-name="ce197"/>
        <table:table-column table:style-name="co30" table:number-columns-repeated="2" table:default-cell-style-name="ce27"/>
        <table:table-column table:style-name="co32" table:default-cell-style-name="ce27"/>
        <table:table-column table:style-name="co30" table:visibility="collapse" table:number-columns-repeated="2" table:default-cell-style-name="Default"/>
        <table:table-column table:style-name="co1" table:number-columns-repeated="16371"/>
        <table:table-row table:style-name="ro1">
          <table:table-cell>
            <draw:frame draw:z-index="0" draw:name="Imagem 1" draw:style-name="gr10" draw:text-style-name="P1" svg:width="5.079cm" svg:height="2.215cm" svg:x="0cm" svg:y="0.423cm">
              <draw:image xlink:href="Pictures/10000001000001F2000000C26B9DFDBB.png" xlink:type="simple" xlink:show="embed" xlink:actuate="onLoad" draw:mime-type="image/png">
                <text:p/>
              </draw:image>
              <svg:desc>Grupo Spasso | Armazenagem e Comercialização de Grãos no Brasil</svg:desc>
            </draw:frame>
          </table:table-cell>
          <table:table-cell table:number-columns-repeated="12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>
            <draw:custom-shape draw:z-index="1" draw:name="CaixaDeTexto 2" draw:style-name="gr2" draw:text-style-name="P3" svg:width="9.185cm" svg:height="0.951cm" svg:x="2.17cm" svg:y="0.265cm">
              <text:p text:style-name="P2"><text:span text:style-name="T9">CAIXA CORRETORAS DE DERIVATIVO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 table:style-name="Default" table:number-columns-repeated="16371"/>
        </table:table-row>
        <table:table-row table:style-name="ro1" table:number-rows-repeated="2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91" office:value-type="string" calcext:value-type="string">
            <text:p>Data</text:p>
          </table:table-cell>
          <table:table-cell table:style-name="ce191" office:value-type="string" calcext:value-type="string">
            <text:p>Corretora</text:p>
          </table:table-cell>
          <table:table-cell table:style-name="ce191" office:value-type="string" calcext:value-type="string">
            <text:p>Empresa</text:p>
          </table:table-cell>
          <table:table-cell table:style-name="ce191" office:value-type="string" calcext:value-type="string">
            <text:p>USD</text:p>
          </table:table-cell>
          <table:table-cell table:style-name="ce191" office:value-type="string" calcext:value-type="string">
            <text:p>BRL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table:style-name="ce191" office:value-type="string" calcext:value-type="string">
            <text:p>Caixa Inicial</text:p>
          </table:table-cell>
          <table:table-cell table:style-name="ce193" office:value-type="date" office:date-value="2026-06-01" calcext:value-type="date">
            <text:p>1/6/2026</text:p>
          </table:table-cell>
          <table:table-cell table:style-name="ce194" office:value-type="string" calcext:value-type="string">
            <text:p>Stonex</text:p>
          </table:table-cell>
          <table:table-cell table:style-name="ce194" office:value-type="string" calcext:value-type="string">
            <text:p>Intergrãos</text:p>
          </table:table-cell>
          <table:table-cell table:style-name="ce194" office:value-type="float" office:value="0" calcext:value-type="float">
            <text:p>0,00 </text:p>
          </table:table-cell>
          <table:table-cell table:style-name="ce194" table:formula="of:=[.E7]*[$Preços_MTM.I4]" office:value-type="float" office:value="0" calcext:value-type="float">
            <text:p>0,00 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table:style-name="ce191" office:value-type="string" calcext:value-type="string">
            <text:p>Caixa Atual</text:p>
          </table:table-cell>
          <table:table-cell table:style-name="ce193" table:formula="of:=TODAY()" office:value-type="date" office:date-value="2026-07-14" calcext:value-type="date">
            <text:p>14/7/2026</text:p>
          </table:table-cell>
          <table:table-cell table:style-name="ce194" office:value-type="string" calcext:value-type="string">
            <text:p>Stonex</text:p>
          </table:table-cell>
          <table:table-cell table:style-name="ce194" office:value-type="string" calcext:value-type="string">
            <text:p>Intergrãos</text:p>
          </table:table-cell>
          <table:table-cell table:style-name="ce194" table:formula="of:=[.E7]+[.E10]" office:value-type="float" office:value="0" calcext:value-type="float">
            <text:p>0,00 </text:p>
          </table:table-cell>
          <table:table-cell table:style-name="ce194" table:formula="of:=[.F7]+[$'Liquidações.Derivativos'.O5]+[$Analítico_Deriv.AP5]+[$Caixa_Corretoras.G10]" office:value-type="float" office:value="62421.74" calcext:value-type="float">
            <text:p>62.421,74 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 table:style-name="ce192" table:number-columns-repeated="4"/>
          <table:table-cell table:style-name="ce192" table:formula="of:=SUM([$Caixa_Corretoras.$E$12:.$E$13])" office:value-type="float" office:value="0" calcext:value-type="float">
            <text:p>0,00 </text:p>
          </table:table-cell>
          <table:table-cell table:style-name="ce192"/>
          <table:table-cell table:style-name="ce192" table:formula="of:=SUM([$Caixa_Corretoras.$G$12:.$G$13])" office:value-type="float" office:value="-4.96" calcext:value-type="float">
            <text:p>-4,96 </text:p>
          </table:table-cell>
          <table:table-cell table:style-name="ce192" table:number-columns-repeated="4"/>
          <table:table-cell table:style-name="ce199" table:number-columns-repeated="16373"/>
        </table:table-row>
        <table:table-row table:style-name="ro2"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Empresa</text:p>
          </table:table-cell>
          <table:table-cell table:style-name="ce93" office:value-type="string" calcext:value-type="string">
            <text:p>Corretora</text:p>
          </table:table-cell>
          <table:table-cell table:style-name="ce93" office:value-type="string" calcext:value-type="string">
            <text:p>ID</text:p>
          </table:table-cell>
          <table:table-cell table:style-name="ce196" office:value-type="string" calcext:value-type="string">
            <text:p>Valor (USD)</text:p>
          </table:table-cell>
          <table:table-cell table:style-name="ce93" office:value-type="string" calcext:value-type="string">
            <text:p>Dólar</text:p>
          </table:table-cell>
          <table:table-cell table:style-name="ce196" office:value-type="string" calcext:value-type="string">
            <text:p>Valor (BRL)</text:p>
          </table:table-cell>
          <table:table-cell table:style-name="ce198" office:value-type="string" calcext:value-type="string">
            <text:p>Tipo de Movimentação</text:p>
          </table:table-cell>
          <table:table-cell table:style-name="ce93" office:value-type="string" calcext:value-type="string">
            <text:p>Origem</text:p>
          </table:table-cell>
          <table:table-cell table:style-name="ce93" office:value-type="string" calcext:value-type="string">
            <text:p>Destino</text:p>
          </table:table-cell>
          <table:table-cell table:style-name="ce93" office:value-type="string" calcext:value-type="string">
            <text:p>Observação (Gestão de Riscos)</text:p>
          </table:table-cell>
          <table:table-cell table:style-name="ce96" office:value-type="string" calcext:value-type="string">
            <text:p>Mês</text:p>
          </table:table-cell>
          <table:table-cell table:style-name="ce96" office:value-type="string" calcext:value-type="string">
            <text:p>Ano</text:p>
          </table:table-cell>
          <table:table-cell table:style-name="Default" table:number-columns-repeated="16371"/>
        </table:table-row>
        <table:table-row table:style-name="ro6">
          <table:table-cell table:style-name="ce95" office:value-type="date" office:date-value="2026-06-23" calcext:value-type="date">
            <text:p>23/6/2026</text:p>
          </table:table-cell>
          <table:table-cell office:value-type="string" calcext:value-type="string">
            <text:p>Intergrãos</text:p>
          </table:table-cell>
          <table:table-cell office:value-type="string" calcext:value-type="string">
            <text:p>Stonex</text:p>
          </table:table-cell>
          <table:table-cell office:value-type="string" calcext:value-type="string">
            <text:p>F1, F2, F3, F4, F5, F6</text:p>
          </table:table-cell>
          <table:table-cell office:value-type="float" office:value="0" calcext:value-type="float">
            <text:p>0,00 </text:p>
          </table:table-cell>
          <table:table-cell office:value-type="float" office:value="0" calcext:value-type="float">
            <text:p>0</text:p>
          </table:table-cell>
          <table:table-cell office:value-type="float" office:value="-1.99" calcext:value-type="float">
            <text:p>-1,99 </text:p>
          </table:table-cell>
          <table:table-cell table:content-validation-name="val2" office:value-type="string" calcext:value-type="string">
            <text:p>IRRF S/ Operações OTC</text:p>
          </table:table-cell>
          <table:table-cell table:number-columns-repeated="2"/>
          <table:table-cell office:value-type="string" calcext:value-type="string">
            <text:p>Imposto de Renda sobre offsets de operações com resultado positivo</text:p>
          </table:table-cell>
          <table:table-cell table:style-name="ce27" table:formula="of:=COM.MICROSOFT.XLOOKUP([$Caixa_Corretoras.$A12];[$dms.J:.J];[$dms.L:.L])" office:value-type="string" office:string-value="Jun" calcext:value-type="string">
            <text:p>Jun</text:p>
          </table:table-cell>
          <table:table-cell table:style-name="ce27" table:formula="of:=COM.MICROSOFT.XLOOKUP([$Caixa_Corretoras.$A12];[$dms.J:.J];[$dms.M:.M])" office:value-type="float" office:value="2026" calcext:value-type="float">
            <text:p>2026</text:p>
          </table:table-cell>
          <table:table-cell table:style-name="Default" table:number-columns-repeated="16371"/>
        </table:table-row>
        <table:table-row table:style-name="ro6">
          <table:table-cell table:style-name="ce95" office:value-type="date" office:date-value="2026-07-01" calcext:value-type="date">
            <text:p>1/7/2026</text:p>
          </table:table-cell>
          <table:table-cell office:value-type="string" calcext:value-type="string">
            <text:p>Intergrãos</text:p>
          </table:table-cell>
          <table:table-cell office:value-type="string" calcext:value-type="string">
            <text:p>Stonex</text:p>
          </table:table-cell>
          <table:table-cell office:value-type="string" calcext:value-type="string">
            <text:p>F9, F10, F11, F12, F13, F14, F16, F17</text:p>
          </table:table-cell>
          <table:table-cell office:value-type="float" office:value="0" calcext:value-type="float">
            <text:p>0,00 </text:p>
          </table:table-cell>
          <table:table-cell office:value-type="float" office:value="0" calcext:value-type="float">
            <text:p>0</text:p>
          </table:table-cell>
          <table:table-cell office:value-type="float" office:value="-2.97" calcext:value-type="float">
            <text:p>-2,97 </text:p>
          </table:table-cell>
          <table:table-cell table:content-validation-name="val2" office:value-type="string" calcext:value-type="string">
            <text:p>IRRF S/ Operações OTC</text:p>
          </table:table-cell>
          <table:table-cell table:number-columns-repeated="2"/>
          <table:table-cell office:value-type="string" calcext:value-type="string">
            <text:p>Imposto de Renda sobre offsets de operações com resultado positivo</text:p>
          </table:table-cell>
          <table:table-cell table:style-name="ce27" table:formula="of:=COM.MICROSOFT.XLOOKUP([$Caixa_Corretoras.$A13];[$dms.J:.J];[$dms.L:.L])" office:value-type="string" office:string-value="Jul" calcext:value-type="string">
            <text:p>Jul</text:p>
          </table:table-cell>
          <table:table-cell table:style-name="ce27" table:formula="of:=COM.MICROSOFT.XLOOKUP([$Caixa_Corretoras.$A13];[$dms.J:.J];[$dms.M:.M])" office:value-type="float" office:value="2026" calcext:value-type="float">
            <text:p>2026</text:p>
          </table:table-cell>
          <table:table-cell table:style-name="Default" table:number-columns-repeated="16371"/>
        </table:table-row>
        <table:table-row table:style-name="ro1" table:number-rows-repeated="1048562">
          <table:table-cell table:number-columns-repeated="13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</table:table>
      <table:table table:name="Var_Cambial" table:style-name="ta14">
        <table:table-column table:style-name="co1" table:default-cell-style-name="Default"/>
        <table:table-column table:style-name="co33" table:default-cell-style-name="Default"/>
        <table:table-column table:style-name="co34" table:default-cell-style-name="ce203"/>
        <table:table-column table:style-name="co35" table:default-cell-style-name="ce214"/>
        <table:table-column table:style-name="co35" table:default-cell-style-name="ce203"/>
        <table:table-column table:style-name="co36" table:default-cell-style-name="Default"/>
        <table:table-column table:style-name="co37" table:default-cell-style-name="ce203"/>
        <table:table-column table:style-name="co38" table:default-cell-style-name="ce246"/>
        <table:table-column table:style-name="co36" table:default-cell-style-name="Default"/>
        <table:table-column table:style-name="co37" table:default-cell-style-name="ce260"/>
        <table:table-column table:style-name="co38" table:default-cell-style-name="ce260"/>
        <table:table-column table:style-name="co33" table:default-cell-style-name="Default"/>
        <table:table-column table:style-name="co1" table:number-columns-repeated="12" table:default-cell-style-name="Default"/>
        <table:table-column table:style-name="co1" table:number-columns-repeated="16360"/>
        <table:table-row table:style-name="ro1">
          <table:table-cell table:number-columns-repeated="24"/>
          <table:table-cell table:style-name="Default" table:number-columns-repeated="16360"/>
        </table:table-row>
        <table:table-row table:style-name="ro1">
          <table:table-cell/>
          <table:table-cell table:style-name="ce200"/>
          <table:table-cell table:style-name="ce204"/>
          <table:table-cell table:style-name="ce215"/>
          <table:table-cell table:style-name="ce204"/>
          <table:table-cell table:style-name="ce233"/>
          <table:table-cell table:style-name="ce204"/>
          <table:table-cell table:style-name="ce247"/>
          <table:table-cell table:style-name="ce233"/>
          <table:table-cell table:style-name="ce261" table:number-columns-repeated="2"/>
          <table:table-cell table:style-name="ce265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5">
            <draw:frame draw:z-index="0" draw:name="Imagem 1" draw:style-name="gr10" draw:text-style-name="P1" svg:width="4.473cm" svg:height="2.062cm" svg:x="3.572cm" svg:y="0cm">
              <draw:image xlink:href="Pictures/10000001000001F2000000C26B9DFDBB.png" xlink:type="simple" xlink:show="embed" xlink:actuate="onLoad" draw:mime-type="image/png">
                <text:p/>
              </draw:image>
              <svg:desc>Grupo Spasso | Armazenagem e Comercialização de Grãos no Brasil</svg:desc>
            </draw:frame>
          </table:table-cell>
          <table:table-cell table:style-name="ce216"/>
          <table:table-cell table:style-name="ce205"/>
          <table:table-cell table:style-name="ce234"/>
          <table:table-cell table:style-name="ce205"/>
          <table:table-cell table:style-name="ce248"/>
          <table:table-cell table:style-name="ce234"/>
          <table:table-cell table:style-name="ce262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5"/>
          <table:table-cell table:style-name="ce216"/>
          <table:table-cell table:style-name="ce205"/>
          <table:table-cell table:style-name="ce234"/>
          <table:table-cell table:style-name="ce227" office:value-type="string" calcext:value-type="string" table:number-columns-spanned="2" table:number-rows-spanned="1">
            <text:p>Liquidação de posição por produto</text:p>
          </table:table-cell>
          <table:covered-table-cell table:style-name="ce249"/>
          <table:table-cell table:style-name="ce234"/>
          <table:table-cell table:style-name="ce263" office:value-type="string" calcext:value-type="string" table:number-columns-spanned="2" table:number-rows-spanned="1">
            <text:p>Campos de Buscas</text:p>
          </table:table-cell>
          <table:covered-table-cell table:style-name="ce263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5"/>
          <table:table-cell table:style-name="ce216"/>
          <table:table-cell table:style-name="ce205"/>
          <table:table-cell table:style-name="ce234"/>
          <table:table-cell table:style-name="ce236" office:value-type="string" calcext:value-type="string">
            <text:p>Liquidações de posição</text:p>
          </table:table-cell>
          <table:table-cell table:style-name="ce250" table:formula="of:=SUM([.H6];[.H13])" office:value-type="float" office:value="59970.37" calcext:value-type="float">
            <text:p>59.970,37</text:p>
          </table:table-cell>
          <table:table-cell table:style-name="ce234"/>
          <table:table-cell table:style-name="ce264" office:value-type="string" calcext:value-type="string">
            <text:p>Corretora</text:p>
          </table:table-cell>
          <table:table-cell table:style-name="ce264" office:value-type="string" calcext:value-type="string">
            <text:p>Stonex</text:p>
          </table:table-cell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5">
            <draw:custom-shape draw:z-index="1" draw:name="CaixaDeTexto 2" draw:style-name="gr2" draw:text-style-name="P3" svg:width="6.183cm" svg:height="0.777cm" svg:x="3.228cm" svg:y="0.291cm">
              <text:p text:style-name="P2"><text:span text:style-name="T11">Movimentação Mensal de Caixa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6"/>
          <table:table-cell table:style-name="ce205"/>
          <table:table-cell table:style-name="ce234"/>
          <table:table-cell table:style-name="ce237" office:value-type="string" calcext:value-type="string">
            <text:p>Offset de posição por vencimento</text:p>
          </table:table-cell>
          <table:table-cell table:style-name="ce251" table:formula="of:=SUM([.H7];[.H10])" office:value-type="float" office:value="59970.37" calcext:value-type="float">
            <text:p>59.970,37</text:p>
          </table:table-cell>
          <table:table-cell table:style-name="ce234"/>
          <table:table-cell table:style-name="ce264" office:value-type="string" calcext:value-type="string">
            <text:p>Empresa</text:p>
          </table:table-cell>
          <table:table-cell table:style-name="ce264" office:value-type="string" calcext:value-type="string">
            <text:p>Intergrãos</text:p>
          </table:table-cell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5">
            <draw:custom-shape draw:z-index="2" draw:name="CaixaDeTexto 3" draw:style-name="gr2" draw:text-style-name="P3" svg:width="8.255cm" svg:height="0.777cm" svg:x="2.143cm" svg:y="0.476cm">
              <text:p text:style-name="P2"><text:span text:style-name="T11">[CORRETORAS OP DERIVATIVOS DE GRAOS]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6"/>
          <table:table-cell table:style-name="ce205"/>
          <table:table-cell table:style-name="ce234"/>
          <table:table-cell table:style-name="ce238" office:value-type="string" calcext:value-type="string">
            <text:p>Commodities</text:p>
          </table:table-cell>
          <table:table-cell table:style-name="ce252" table:formula="of:=SUM([.H8:.H9])" office:value-type="float" office:value="0" calcext:value-type="float">
            <text:p>0,00</text:p>
          </table:table-cell>
          <table:table-cell table:style-name="ce234"/>
          <table:table-cell table:style-name="ce264" office:value-type="string" calcext:value-type="string">
            <text:p>Mês</text:p>
          </table:table-cell>
          <table:table-cell table:style-name="ce264" office:value-type="string" calcext:value-type="string">
            <text:p>Jul</text:p>
          </table:table-cell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5"/>
          <table:table-cell table:style-name="ce216"/>
          <table:table-cell table:style-name="ce205"/>
          <table:table-cell table:style-name="ce234"/>
          <table:table-cell table:style-name="ce239" office:value-type="string" calcext:value-type="string">
            <text:p>Soja</text:p>
          </table:table-cell>
          <table:table-cell table:style-name="ce253" table:formula="of:=SUMIFS([$'Liquidações.Derivativos'.O:.O];[$'Liquidações.Derivativos'.R:.R];[$Var_Cambial.G6];[$'Liquidações.Derivativos'.B:.B];[$Var_Cambial.K5];[$'Liquidações.Derivativos'.A:.A];[$Var_Cambial.K6];[$'Liquidações.Derivativos'.T:.T];[$Var_Cambial.K7];[$'Liquidações.Derivativos'.U:.U];[$Var_Cambial.K8];[$'Liquidações.Derivativos'.C:.C];[$Var_Cambial.G8])" office:value-type="float" office:value="0" calcext:value-type="float">
            <text:p>0,00</text:p>
          </table:table-cell>
          <table:table-cell table:style-name="ce234"/>
          <table:table-cell table:style-name="ce262" office:value-type="string" calcext:value-type="string">
            <text:p>Ano</text:p>
          </table:table-cell>
          <table:table-cell table:style-name="ce262" office:value-type="float" office:value="2026" calcext:value-type="float">
            <text:p>2026</text:p>
          </table:table-cell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5"/>
          <table:table-cell table:style-name="ce216"/>
          <table:table-cell table:style-name="ce205"/>
          <table:table-cell table:style-name="ce234"/>
          <table:table-cell table:style-name="ce240" office:value-type="string" calcext:value-type="string">
            <text:p>Milho</text:p>
          </table:table-cell>
          <table:table-cell table:style-name="ce254" table:formula="of:=SUMIFS([$'Liquidações.Derivativos'.O:.O];[$'Liquidações.Derivativos'.R:.R];[$Var_Cambial.G6];[$'Liquidações.Derivativos'.B:.B];[$Var_Cambial.K5];[$'Liquidações.Derivativos'.A:.A];[$Var_Cambial.K6];[$'Liquidações.Derivativos'.T:.T];[$Var_Cambial.K7];[$'Liquidações.Derivativos'.U:.U];[$Var_Cambial.K8];[$'Liquidações.Derivativos'.C:.C];[$Var_Cambial.G9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6" office:value-type="string" calcext:value-type="string">
            <text:p>Movimentação</text:p>
          </table:table-cell>
          <table:table-cell table:style-name="ce217" office:value-type="string" calcext:value-type="string">
            <text:p>Valor (BRL)</text:p>
          </table:table-cell>
          <table:table-cell table:style-name="ce205"/>
          <table:table-cell table:style-name="ce234"/>
          <table:table-cell table:style-name="ce241" office:value-type="string" calcext:value-type="string">
            <text:p>Dólar</text:p>
          </table:table-cell>
          <table:table-cell table:style-name="ce255" table:formula="of:=SUM([.H11:.H12])" office:value-type="float" office:value="59970.37" calcext:value-type="float">
            <text:p>59.970,37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Comissões</text:p>
          </table:table-cell>
          <table:table-cell table:style-name="ce218" table:formula="of:=[.H22]" office:value-type="float" office:value="0" calcext:value-type="float">
            <text:p>0,00 </text:p>
          </table:table-cell>
          <table:table-cell table:style-name="ce205"/>
          <table:table-cell table:style-name="ce234"/>
          <table:table-cell table:style-name="ce239" office:value-type="string" calcext:value-type="string">
            <text:p>Soja</text:p>
          </table:table-cell>
          <table:table-cell table:style-name="ce253" table:formula="of:=SUMIFS([$'Liquidações.Derivativos'.O:.O];[$'Liquidações.Derivativos'.R:.R];[$Var_Cambial.G6];[$'Liquidações.Derivativos'.B:.B];[$Var_Cambial.K5];[$'Liquidações.Derivativos'.A:.A];[$Var_Cambial.K6];[$'Liquidações.Derivativos'.T:.T];[$Var_Cambial.K7];[$'Liquidações.Derivativos'.U:.U];[$Var_Cambial.K8];[$'Liquidações.Derivativos'.C:.C];[$Var_Cambial.G10];[$'Liquidações.Derivativos'.P:.P];[$Var_Cambial.G11])" office:value-type="float" office:value="59970.37" calcext:value-type="float">
            <text:p>59.970,37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Envio de recurso próprio</text:p>
          </table:table-cell>
          <table:table-cell table:style-name="ce218" table:formula="of:=SUMIFS([$Caixa_Corretoras.G:.G];[$Caixa_Corretoras.H:.H];[$Var_Cambial.C12];[$Caixa_Corretoras.C:.C];[$Var_Cambial.K5];[$Caixa_Corretoras.B:.B];[$Var_Cambial.K6];[$Caixa_Corretoras.L:.L];[$Var_Cambial.K7];[$Caixa_Corretoras.M:.M];[$Var_Cambial.K8])" office:value-type="float" office:value="0" calcext:value-type="float">
            <text:p>0,00 </text:p>
          </table:table-cell>
          <table:table-cell table:style-name="ce205"/>
          <table:table-cell table:style-name="ce234"/>
          <table:table-cell table:style-name="ce242" office:value-type="string" calcext:value-type="string">
            <text:p>Milho</text:p>
          </table:table-cell>
          <table:table-cell table:style-name="ce256" table:formula="of:=SUMIFS([$'Liquidações.Derivativos'.O:.O];[$'Liquidações.Derivativos'.R:.R];[$Var_Cambial.G6];[$'Liquidações.Derivativos'.B:.B];[$Var_Cambial.K5];[$'Liquidações.Derivativos'.A:.A];[$Var_Cambial.K6];[$'Liquidações.Derivativos'.T:.T];[$Var_Cambial.K7];[$'Liquidações.Derivativos'.U:.U];[$Var_Cambial.K8];[$'Liquidações.Derivativos'.C:.C];[$Var_Cambial.G10];[$'Liquidações.Derivativos'.P:.P];[$Var_Cambial.G12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/>
          <table:table-cell/>
          <table:table-cell table:style-name="ce268" table:number-columns-repeated="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Juros para utilização de limite de crédito</text:p>
          </table:table-cell>
          <table:table-cell table:style-name="ce218" table:formula="of:=SUMIFS([$Caixa_Corretoras.G:.G];[$Caixa_Corretoras.H:.H];[$Var_Cambial.C13];[$Caixa_Corretoras.C:.C];[$Var_Cambial.K5];[$Caixa_Corretoras.B:.B];[$Var_Cambial.K6];[$Caixa_Corretoras.L:.L];[$Var_Cambial.K7];[$Caixa_Corretoras.M:.M];[$Var_Cambial.K8])" office:value-type="float" office:value="0" calcext:value-type="float">
            <text:p>0,00 </text:p>
          </table:table-cell>
          <table:table-cell table:style-name="ce205"/>
          <table:table-cell table:style-name="ce234"/>
          <table:table-cell table:style-name="ce237" office:value-type="string" calcext:value-type="string">
            <text:p>Offset de posição antecipado</text:p>
          </table:table-cell>
          <table:table-cell table:style-name="ce251" table:formula="of:=SUM([.H17];[.H14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Liquidações</text:p>
          </table:table-cell>
          <table:table-cell table:style-name="ce218" table:formula="of:=[.H5]" office:value-type="float" office:value="59970.37" calcext:value-type="float">
            <text:p>59.970,37 </text:p>
          </table:table-cell>
          <table:table-cell table:style-name="ce205"/>
          <table:table-cell table:style-name="ce234"/>
          <table:table-cell table:style-name="ce243" office:value-type="string" calcext:value-type="string">
            <text:p>Commodities</text:p>
          </table:table-cell>
          <table:table-cell table:style-name="ce257" table:formula="of:=SUM([.H15:.H16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Prêmio de opção</text:p>
          </table:table-cell>
          <table:table-cell table:style-name="ce218" table:formula="of:=SUMIFS([$Caixa_Corretoras.G:.G];[$Caixa_Corretoras.H:.H];[$Var_Cambial.C15];[$Caixa_Corretoras.C:.C];[$Var_Cambial.K5];[$Caixa_Corretoras.B:.B];[$Var_Cambial.K6];[$Caixa_Corretoras.L:.L];[$Var_Cambial.K7];[$Caixa_Corretoras.M:.M];[$Var_Cambial.K8])" office:value-type="float" office:value="0" calcext:value-type="float">
            <text:p>0,00 </text:p>
          </table:table-cell>
          <table:table-cell table:style-name="ce205"/>
          <table:table-cell table:style-name="ce234"/>
          <table:table-cell table:style-name="ce239" office:value-type="string" calcext:value-type="string">
            <text:p>Soja</text:p>
          </table:table-cell>
          <table:table-cell table:style-name="ce253" table:formula="of:=SUMIFS([$'Liquidações.Derivativos'.O:.O];[$'Liquidações.Derivativos'.R:.R];[$Var_Cambial.G13];[$'Liquidações.Derivativos'.B:.B];[$Var_Cambial.K5];[$'Liquidações.Derivativos'.A:.A];[$Var_Cambial.K6];[$'Liquidações.Derivativos'.T:.T];[$Var_Cambial.K7];[$'Liquidações.Derivativos'.U:.U];[$Var_Cambial.K8];[$'Liquidações.Derivativos'.C:.C];[$Var_Cambial.G15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Reversão</text:p>
          </table:table-cell>
          <table:table-cell table:style-name="ce218" table:formula="of:=SUMIFS([$Caixa_Corretoras.G:.G];[$Caixa_Corretoras.H:.H];[$Var_Cambial.C16];[$Caixa_Corretoras.C:.C];[$Var_Cambial.K5];[$Caixa_Corretoras.B:.B];[$Var_Cambial.K6];[$Caixa_Corretoras.L:.L];[$Var_Cambial.K7];[$Caixa_Corretoras.M:.M];[$Var_Cambial.K8])" office:value-type="float" office:value="0" calcext:value-type="float">
            <text:p>0,00 </text:p>
          </table:table-cell>
          <table:table-cell table:style-name="ce205"/>
          <table:table-cell table:style-name="ce234"/>
          <table:table-cell table:style-name="ce240" office:value-type="string" calcext:value-type="string">
            <text:p>Milho</text:p>
          </table:table-cell>
          <table:table-cell table:style-name="ce254" table:formula="of:=SUMIFS([$'Liquidações.Derivativos'.O:.O];[$'Liquidações.Derivativos'.R:.R];[$Var_Cambial.G13];[$'Liquidações.Derivativos'.B:.B];[$Var_Cambial.K5];[$'Liquidações.Derivativos'.A:.A];[$Var_Cambial.K6];[$'Liquidações.Derivativos'.T:.T];[$Var_Cambial.K7];[$'Liquidações.Derivativos'.U:.U];[$Var_Cambial.K8];[$'Liquidações.Derivativos'.C:.C];[$Var_Cambial.G16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Saque</text:p>
          </table:table-cell>
          <table:table-cell table:style-name="ce218" table:formula="of:=SUMIFS([$Caixa_Corretoras.G:.G];[$Caixa_Corretoras.H:.H];[$Var_Cambial.C17];[$Caixa_Corretoras.C:.C];[$Var_Cambial.K5];[$Caixa_Corretoras.B:.B];[$Var_Cambial.K6];[$Caixa_Corretoras.L:.L];[$Var_Cambial.K7];[$Caixa_Corretoras.M:.M];[$Var_Cambial.K8])" office:value-type="float" office:value="0" calcext:value-type="float">
            <text:p>0,00 </text:p>
          </table:table-cell>
          <table:table-cell table:style-name="ce205"/>
          <table:table-cell table:style-name="ce234"/>
          <table:table-cell table:style-name="ce241" office:value-type="string" calcext:value-type="string">
            <text:p>Dólar</text:p>
          </table:table-cell>
          <table:table-cell table:style-name="ce255" table:formula="of:=SUM([.H18:.H19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Selldown</text:p>
          </table:table-cell>
          <table:table-cell table:style-name="ce218" table:formula="of:=SUMIFS([$Caixa_Corretoras.G:.G];[$Caixa_Corretoras.H:.H];[$Var_Cambial.C18];[$Caixa_Corretoras.C:.C];[$Var_Cambial.K5];[$Caixa_Corretoras.B:.B];[$Var_Cambial.K6];[$Caixa_Corretoras.L:.L];[$Var_Cambial.K7];[$Caixa_Corretoras.M:.M];[$Var_Cambial.K8])" office:value-type="float" office:value="0" calcext:value-type="float">
            <text:p>0,00 </text:p>
          </table:table-cell>
          <table:table-cell table:style-name="ce205"/>
          <table:table-cell table:style-name="ce234"/>
          <table:table-cell table:style-name="ce239" office:value-type="string" calcext:value-type="string">
            <text:p>Soja</text:p>
          </table:table-cell>
          <table:table-cell table:style-name="ce253" table:formula="of:=SUMIFS([$'Liquidações.Derivativos'.O:.O];[$'Liquidações.Derivativos'.R:.R];[$Var_Cambial.G13];[$'Liquidações.Derivativos'.B:.B];[$Var_Cambial.K5];[$'Liquidações.Derivativos'.A:.A];[$Var_Cambial.K6];[$'Liquidações.Derivativos'.T:.T];[$Var_Cambial.K7];[$'Liquidações.Derivativos'.U:.U];[$Var_Cambial.K8];[$'Liquidações.Derivativos'.C:.C];[$Var_Cambial.G17];[$'Liquidações.Derivativos'.P:.P];[$Var_Cambial.G18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Transferência interna</text:p>
          </table:table-cell>
          <table:table-cell table:style-name="ce218" table:formula="of:=SUMIFS([$Caixa_Corretoras.G:.G];[$Caixa_Corretoras.H:.H];[$Var_Cambial.C19];[$Caixa_Corretoras.C:.C];[$Var_Cambial.K5];[$Caixa_Corretoras.B:.B];[$Var_Cambial.K6];[$Caixa_Corretoras.L:.L];[$Var_Cambial.K7];[$Caixa_Corretoras.M:.M];[$Var_Cambial.K8])" office:value-type="float" office:value="0" calcext:value-type="float">
            <text:p>0,00 </text:p>
          </table:table-cell>
          <table:table-cell table:style-name="ce205"/>
          <table:table-cell table:style-name="ce234"/>
          <table:table-cell table:style-name="ce244" office:value-type="string" calcext:value-type="string">
            <text:p>Milho</text:p>
          </table:table-cell>
          <table:table-cell table:style-name="ce258" table:formula="of:=SUMIFS([$'Liquidações.Derivativos'.O:.O];[$'Liquidações.Derivativos'.R:.R];[$Var_Cambial.G13];[$'Liquidações.Derivativos'.B:.B];[$Var_Cambial.K5];[$'Liquidações.Derivativos'.A:.A];[$Var_Cambial.K6];[$'Liquidações.Derivativos'.T:.T];[$Var_Cambial.K7];[$'Liquidações.Derivativos'.U:.U];[$Var_Cambial.K8];[$'Liquidações.Derivativos'.C:.C];[$Var_Cambial.G17];[$'Liquidações.Derivativos'.P:.P];[$Var_Cambial.G19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8"/>
          <table:table-cell table:style-name="ce268" table:number-columns-repeated="4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office:value-type="string" calcext:value-type="string">
            <text:p>IRRF S/ Operações OTC</text:p>
          </table:table-cell>
          <table:table-cell table:style-name="ce219" table:formula="of:=SUMIFS([$Caixa_Corretoras.G:.G];[$Caixa_Corretoras.H:.H];[$Var_Cambial.C20];[$Caixa_Corretoras.C:.C];[$Var_Cambial.K5];[$Caixa_Corretoras.B:.B];[$Var_Cambial.K6];[$Caixa_Corretoras.L:.L];[$Var_Cambial.K7];[$Caixa_Corretoras.M:.M];[$Var_Cambial.K8])" office:value-type="float" office:value="-2.97" calcext:value-type="float">
            <text:p>-2,97 </text:p>
          </table:table-cell>
          <table:table-cell table:style-name="ce205"/>
          <table:table-cell table:style-name="ce234"/>
          <table:table-cell table:style-name="ce205"/>
          <table:table-cell table:style-name="ce248"/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8" office:value-type="string" calcext:value-type="string">
            <text:p>TOTAL</text:p>
          </table:table-cell>
          <table:table-cell table:style-name="ce220" table:formula="of:=SUM([.D11:.D20])" office:value-type="float" office:value="59967.4" calcext:value-type="float">
            <text:p>59.967,40 </text:p>
          </table:table-cell>
          <table:table-cell table:style-name="ce205"/>
          <table:table-cell table:style-name="ce234"/>
          <table:table-cell table:style-name="ce245" office:value-type="string" calcext:value-type="string" table:number-columns-spanned="2" table:number-rows-spanned="1">
            <text:p>Comissões de operação por produto</text:p>
          </table:table-cell>
          <table:covered-table-cell table:style-name="ce245"/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9"/>
          <table:table-cell table:style-name="ce221"/>
          <table:table-cell table:style-name="ce209"/>
          <table:table-cell table:style-name="ce234"/>
          <table:table-cell table:style-name="ce236" office:value-type="string" calcext:value-type="string">
            <text:p>Comissões de Operações</text:p>
          </table:table-cell>
          <table:table-cell table:style-name="ce250" table:formula="of:=[.H23]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8" office:value-type="string" calcext:value-type="string">
            <text:p>Movimento</text:p>
          </table:table-cell>
          <table:table-cell table:style-name="ce222" office:value-type="string" calcext:value-type="string">
            <text:p>BRL</text:p>
          </table:table-cell>
          <table:table-cell table:style-name="ce227" office:value-type="string" calcext:value-type="string">
            <text:p>Data</text:p>
          </table:table-cell>
          <table:table-cell table:style-name="ce234"/>
          <table:table-cell table:style-name="ce237" office:value-type="string" calcext:value-type="string">
            <text:p>Comissões de operações próprias</text:p>
          </table:table-cell>
          <table:table-cell table:style-name="ce251" table:formula="of:=SUM([.H24];[.H27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10" office:value-type="string" calcext:value-type="string">
            <text:p>Caixa Inicial</text:p>
          </table:table-cell>
          <table:table-cell table:style-name="ce223" office:value-type="float" office:value="2454.34" calcext:value-type="float">
            <text:p>2.454,34 </text:p>
          </table:table-cell>
          <table:table-cell table:style-name="ce228" office:value-type="date" office:date-value="2026-06-30" calcext:value-type="date">
            <text:p>30/6/2026</text:p>
          </table:table-cell>
          <table:table-cell table:style-name="ce234"/>
          <table:table-cell table:style-name="ce238" office:value-type="string" calcext:value-type="string">
            <text:p>Commodities</text:p>
          </table:table-cell>
          <table:table-cell table:style-name="ce252" table:formula="of:=SUM([.H25:.H26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Movimentações (exceto envio de recurso)</text:p>
          </table:table-cell>
          <table:table-cell table:style-name="ce218" table:formula="of:=SUM([.D11];[.D13];[.D14];[.D16];[.D15];[.D18];[.D19];[.D20])" office:value-type="float" office:value="59967.4" calcext:value-type="float">
            <text:p>59.967,40 </text:p>
          </table:table-cell>
          <table:table-cell table:style-name="ce229"/>
          <table:table-cell table:style-name="ce234"/>
          <table:table-cell table:style-name="ce239" office:value-type="string" calcext:value-type="string">
            <text:p>Soja</text:p>
          </table:table-cell>
          <table:table-cell table:style-name="ce253" table:formula="of:=SUMIFS([$Analítico_Deriv.AP:.AP];[$Analítico_Deriv.L:.L];[$Var_Cambial.K6];[$Analítico_Deriv.M:.M];[$Var_Cambial.K5];[$Analítico_Deriv.AQ:.AQ];[$Var_Cambial.K7];[$Analítico_Deriv.AR:.AR];[$Var_Cambial.K8];[$Analítico_Deriv.D:.D];[$Var_Cambial.G25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Envio de recurso próprio</text:p>
          </table:table-cell>
          <table:table-cell table:style-name="ce218" table:formula="of:=[.D12]" office:value-type="float" office:value="0" calcext:value-type="float">
            <text:p>0,00 </text:p>
          </table:table-cell>
          <table:table-cell table:style-name="ce229"/>
          <table:table-cell table:style-name="ce234"/>
          <table:table-cell table:style-name="ce240" office:value-type="string" calcext:value-type="string">
            <text:p>Milho</text:p>
          </table:table-cell>
          <table:table-cell table:style-name="ce254" table:formula="of:=SUMIFS([$Analítico_Deriv.AP:.AP];[$Analítico_Deriv.L:.L];[$Var_Cambial.K6];[$Analítico_Deriv.M:.M];[$Var_Cambial.K5];[$Analítico_Deriv.AQ:.AQ];[$Var_Cambial.K7];[$Analítico_Deriv.AR:.AR];[$Var_Cambial.K8];[$Analítico_Deriv.D:.D];[$Var_Cambial.G26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07" office:value-type="string" calcext:value-type="string">
            <text:p>Saques</text:p>
          </table:table-cell>
          <table:table-cell table:style-name="ce218" table:formula="of:=[.D17]" office:value-type="float" office:value="0" calcext:value-type="float">
            <text:p>0,00 </text:p>
          </table:table-cell>
          <table:table-cell table:style-name="ce229"/>
          <table:table-cell table:style-name="ce234"/>
          <table:table-cell table:style-name="ce241" office:value-type="string" calcext:value-type="string">
            <text:p>Dólar</text:p>
          </table:table-cell>
          <table:table-cell table:style-name="ce255" table:formula="of:=SUM([.H28:.H29])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11" office:value-type="string" calcext:value-type="string">
            <text:p>Caixa Final</text:p>
          </table:table-cell>
          <table:table-cell table:style-name="ce224" table:formula="of:=SUM([.D24:.D27])" office:value-type="float" office:value="62421.74" calcext:value-type="float">
            <text:p>62.421,74 </text:p>
          </table:table-cell>
          <table:table-cell table:style-name="ce230" office:value-type="date" office:date-value="2026-07-30" calcext:value-type="date">
            <text:p>30/7/2026</text:p>
          </table:table-cell>
          <table:table-cell table:style-name="ce234"/>
          <table:table-cell table:style-name="ce239" office:value-type="string" calcext:value-type="string">
            <text:p>Soja</text:p>
          </table:table-cell>
          <table:table-cell table:style-name="ce253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12" office:value-type="string" calcext:value-type="string">
            <text:p>Extrato </text:p>
          </table:table-cell>
          <table:table-cell table:style-name="ce225" office:value-type="float" office:value="62421.74" calcext:value-type="float">
            <text:p>62.421,74 </text:p>
          </table:table-cell>
          <table:table-cell table:style-name="ce231" office:value-type="date" office:date-value="2026-06-30" calcext:value-type="date">
            <text:p>30/6/2026</text:p>
          </table:table-cell>
          <table:table-cell table:style-name="ce234"/>
          <table:table-cell table:style-name="ce244" office:value-type="string" calcext:value-type="string">
            <text:p>Milho</text:p>
          </table:table-cell>
          <table:table-cell table:style-name="ce258" office:value-type="float" office:value="0" calcext:value-type="float">
            <text:p>0,00</text:p>
          </table:table-cell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1"/>
          <table:table-cell table:style-name="ce213" office:value-type="string" calcext:value-type="string">
            <text:p>Variação Cambial</text:p>
          </table:table-cell>
          <table:table-cell table:style-name="ce226" table:formula="of:=[.D29]-[.D28]" office:value-type="float" office:value="0" calcext:value-type="float">
            <text:p>0,00 </text:p>
          </table:table-cell>
          <table:table-cell table:style-name="ce232" table:formula="of:=IF([.D30]&lt;0;&quot;PASSIVA&quot;;IF([.D30]=0;&quot;SEM VARIAÇÃO&quot;;IF([.D30]&gt;0;&quot;ATIVA&quot;;&quot;VALIDAR&quot;)))" office:value-type="string" office:string-value="SEM VARIAÇÃO" calcext:value-type="string">
            <text:p>SEM VARIAÇÃO</text:p>
          </table:table-cell>
          <table:table-cell table:style-name="ce234"/>
          <table:table-cell table:style-name="ce205"/>
          <table:table-cell table:style-name="ce248"/>
          <table:table-cell table:style-name="ce234"/>
          <table:table-cell table:style-name="ce264" table:number-columns-repeated="2"/>
          <table:table-cell table:style-name="ce266"/>
          <table:table-cell table:number-columns-repeated="12"/>
          <table:table-cell table:style-name="Default" table:number-columns-repeated="16360"/>
        </table:table-row>
        <table:table-row table:style-name="ro1">
          <table:table-cell/>
          <table:table-cell table:style-name="ce202"/>
          <table:table-cell table:style-name="ce209"/>
          <table:table-cell table:style-name="ce221"/>
          <table:table-cell table:style-name="ce209"/>
          <table:table-cell table:style-name="ce235"/>
          <table:table-cell table:style-name="ce209"/>
          <table:table-cell table:style-name="ce259"/>
          <table:table-cell table:style-name="ce235"/>
          <table:table-cell table:style-name="ce262" table:number-columns-repeated="2"/>
          <table:table-cell table:style-name="ce267"/>
          <table:table-cell table:number-columns-repeated="12"/>
          <table:table-cell table:style-name="Default" table:number-columns-repeated="16360"/>
        </table:table-row>
        <table:table-row table:style-name="ro1" table:number-rows-repeated="1048544">
          <table:table-cell table:number-columns-repeated="24"/>
          <table:table-cell table:style-name="Default" table:number-columns-repeated="16360"/>
        </table:table-row>
        <table:table-row table:style-name="ro1">
          <table:table-cell table:number-columns-repeated="24"/>
          <table:table-cell table:style-name="Default" table:number-columns-repeated="16360"/>
        </table:table-row>
        <calcext:conditional-formats>
          <calcext:conditional-format calcext:target-range-address="Var_Cambial.E30:Var_Cambial.E30">
            <calcext:condition calcext:apply-style-name="ConditionalStyle_27" calcext:value="contains-text(&quot;ATIVA&quot;)" calcext:base-cell-address="Var_Cambial.E30"/>
            <calcext:condition calcext:apply-style-name="ConditionalStyle_26" calcext:value="contains-text(&quot;PASSIVA&quot;)" calcext:base-cell-address="Var_Cambial.E30"/>
          </calcext:conditional-format>
          <calcext:conditional-format calcext:target-range-address="Var_Cambial.H1:Var_Cambial.H20 Var_Cambial.H22:Var_Cambial.H1048576">
            <calcext:condition calcext:apply-style-name="ConditionalStyle_25" calcext:value="between(-0.0000000001,-9.99999999999999E+021)" calcext:base-cell-address="Var_Cambial.H1"/>
          </calcext:conditional-format>
        </calcext:conditional-formats>
      </table:table>
      <table:table table:name="Fluxo_Caixa" table:style-name="ta15">
        <table:table-column table:style-name="co8" table:default-cell-style-name="Default"/>
        <table:table-column table:style-name="co39" table:number-columns-repeated="3" table:default-cell-style-name="ce171"/>
        <table:table-column table:style-name="co40" table:default-cell-style-name="ce171"/>
        <table:table-column table:style-name="co40" table:number-columns-repeated="9" table:default-cell-style-name="ce299"/>
        <table:table-column table:style-name="co40" table:number-columns-repeated="11"/>
        <table:table-column table:style-name="co1" table:number-columns-repeated="16359"/>
        <table:table-row table:style-name="ro1">
          <table:table-cell>
            <draw:frame draw:z-index="0" draw:name="Imagem 1" draw:style-name="gr10" draw:text-style-name="P1" svg:width="2.987cm" svg:height="1.164cm" svg:x="0.159cm" svg:y="0.45cm">
              <draw:image xlink:href="Pictures/10000001000001030000006572F976C5.png" xlink:type="simple" xlink:show="embed" xlink:actuate="onLoad" draw:mime-type="image/png">
                <text:p/>
              </draw:image>
              <svg:desc>Grupo Spasso | Armazenagem e Comercialização de Grãos no Brasil</svg:desc>
            </draw:frame>
          </table:table-cell>
          <table:table-cell table:number-columns-repeated="13"/>
          <table:table-cell table:style-name="Default" table:number-columns-repeated="16370"/>
        </table:table-row>
        <table:table-row table:style-name="ro1" table:number-rows-repeated="2">
          <table:table-cell table:number-columns-repeated="14"/>
          <table:table-cell table:style-name="Default" table:number-columns-repeated="16370"/>
        </table:table-row>
        <table:table-row table:style-name="ro1">
          <table:table-cell>
            <draw:custom-shape draw:z-index="1" draw:name="CaixaDeTexto 2" draw:style-name="gr2" draw:text-style-name="P3" svg:width="9.358cm" svg:height="0.777cm" svg:x="0cm" svg:y="0.079cm">
              <text:p text:style-name="P2"><text:span text:style-name="T11">FLUXO DE CAIXA MENSAL - CONTAS CORRETORA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3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style-name="ce269" office:value-type="string" calcext:value-type="string">
            <text:p><text:s/></text:p>
          </table:table-cell>
          <table:table-cell table:style-name="ce277" office:value-type="string" calcext:value-type="string">
            <text:p>Rótulos de coluna</text:p>
          </table:table-cell>
          <table:table-cell table:style-name="ce286"/>
          <table:table-cell table:style-name="ce290"/>
          <table:table-cell table:style-name="ce298"/>
          <table:table-cell table:style-name="ce300" table:number-columns-repeated="9"/>
          <table:table-cell table:style-name="ce298" table:number-columns-repeated="16370"/>
        </table:table-row>
        <table:table-row table:style-name="ro1">
          <table:table-cell table:style-name="ce270"/>
          <table:table-cell table:style-name="ce278" office:value-type="float" office:value="2026" calcext:value-type="float">
            <text:p>2.026,00</text:p>
          </table:table-cell>
          <table:table-cell table:style-name="ce287" office:value-type="float" office:value="2027" calcext:value-type="float">
            <text:p>2.027,00</text:p>
          </table:table-cell>
          <table:table-cell table:style-name="ce291" office:value-type="string" calcext:value-type="string">
            <text:p>Total Resultado</text:p>
          </table:table-cell>
          <table:table-cell table:style-name="ce298"/>
          <table:table-cell table:style-name="ce300" table:number-columns-repeated="9"/>
          <table:table-cell table:style-name="ce298" table:number-columns-repeated="16370"/>
        </table:table-row>
        <table:table-row table:style-name="ro1">
          <table:table-cell table:style-name="ce271" office:value-type="string" calcext:value-type="string">
            <text:p>Rótulos de linha</text:p>
          </table:table-cell>
          <table:table-cell table:style-name="ce279" office:value-type="string" calcext:value-type="string">
            <text:p>Jul</text:p>
          </table:table-cell>
          <table:table-cell table:style-name="ce288" office:value-type="string" calcext:value-type="string">
            <text:p>Jan</text:p>
          </table:table-cell>
          <table:table-cell table:style-name="ce292"/>
          <table:table-cell table:style-name="ce298"/>
          <table:table-cell table:style-name="ce300" table:number-columns-repeated="9"/>
          <table:table-cell table:style-name="ce298" table:number-columns-repeated="16370"/>
        </table:table-row>
        <table:table-row table:style-name="ro1">
          <table:table-cell table:style-name="ce272" office:value-type="string" calcext:value-type="string">
            <text:p>Intergrãos</text:p>
          </table:table-cell>
          <table:table-cell table:style-name="ce280"/>
          <table:table-cell table:style-name="ce281"/>
          <table:table-cell table:style-name="ce293"/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273" office:value-type="string" calcext:value-type="string">
            <text:p>Stonex</text:p>
          </table:table-cell>
          <table:table-cell table:style-name="ce281"/>
          <table:table-cell table:style-name="ce280"/>
          <table:table-cell table:style-name="ce293"/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274" office:value-type="string" calcext:value-type="string">
            <text:p>Milho</text:p>
          </table:table-cell>
          <table:table-cell table:style-name="ce282"/>
          <table:table-cell table:style-name="ce281"/>
          <table:table-cell table:style-name="ce294"/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275" office:value-type="string" calcext:value-type="string">
            <text:p>Milho</text:p>
          </table:table-cell>
          <table:table-cell table:style-name="ce283"/>
          <table:table-cell table:style-name="ce289" office:value-type="float" office:value="5365.74600000044" calcext:value-type="float">
            <text:p>5.365,75 </text:p>
          </table:table-cell>
          <table:table-cell table:style-name="ce295" office:value-type="float" office:value="5365.74600000044" calcext:value-type="float">
            <text:p>5.365,75 </text:p>
          </table:table-cell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274" office:value-type="string" calcext:value-type="string">
            <text:p>Soja</text:p>
          </table:table-cell>
          <table:table-cell table:style-name="ce282" table:number-columns-repeated="2"/>
          <table:table-cell table:style-name="ce294"/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276" office:value-type="string" calcext:value-type="string">
            <text:p>Dolar</text:p>
          </table:table-cell>
          <table:table-cell table:style-name="ce284" office:value-type="float" office:value="0" calcext:value-type="float">
            <text:p>0,00 </text:p>
          </table:table-cell>
          <table:table-cell table:style-name="ce284"/>
          <table:table-cell table:style-name="ce296" office:value-type="float" office:value="0" calcext:value-type="float">
            <text:p>0,00 </text:p>
          </table:table-cell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275" office:value-type="string" calcext:value-type="string">
            <text:p>Soja</text:p>
          </table:table-cell>
          <table:table-cell table:style-name="ce283" office:value-type="float" office:value="0" calcext:value-type="float">
            <text:p>0,00 </text:p>
          </table:table-cell>
          <table:table-cell table:style-name="ce283"/>
          <table:table-cell table:style-name="ce295" office:value-type="float" office:value="0" calcext:value-type="float">
            <text:p>0,00 </text:p>
          </table:table-cell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10" office:value-type="string" calcext:value-type="string">
            <text:p>Total Resultado</text:p>
          </table:table-cell>
          <table:table-cell table:style-name="ce285" office:value-type="float" office:value="0" calcext:value-type="float">
            <text:p>0,00 </text:p>
          </table:table-cell>
          <table:table-cell table:style-name="ce285" office:value-type="float" office:value="5365.74600000044" calcext:value-type="float">
            <text:p>5.365,75 </text:p>
          </table:table-cell>
          <table:table-cell table:style-name="ce297" office:value-type="float" office:value="5365.74600000044" calcext:value-type="float">
            <text:p>5.365,75 </text:p>
          </table:table-cell>
          <table:table-cell table:number-columns-repeated="10"/>
          <table:table-cell table:style-name="Default" table:number-columns-repeated="16370"/>
        </table:table-row>
        <table:table-row table:style-name="ro1" table:number-rows-repeated="1048559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</table:table>
      <table:table table:name="Gestão_Stonex" table:style-name="ta16">
        <table:table-column table:style-name="co1" table:default-cell-style-name="Default"/>
        <table:table-column table:style-name="co19" table:number-columns-repeated="4" table:default-cell-style-name="Default"/>
        <table:table-column table:style-name="co19" table:default-cell-style-name="ce312"/>
        <table:table-column table:style-name="co19" table:number-columns-repeated="2" table:default-cell-style-name="Default"/>
        <table:table-column table:style-name="co19"/>
        <table:table-column table:style-name="co1" table:number-columns-repeated="16375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16376"/>
        </table:table-row>
        <table:table-row table:style-name="ro1">
          <table:table-cell/>
          <table:table-cell>
            <draw:frame draw:z-index="0" draw:name="Imagem 2" draw:style-name="gr11" draw:text-style-name="P1" svg:width="2.272cm" svg:height="1.243cm" svg:x="0.45cm" svg:y="0.185cm">
              <draw:image xlink:href="Pictures/100000010000011B000001646CED050C.png" xlink:type="simple" xlink:show="embed" xlink:actuate="onLoad" draw:mime-type="image/png">
                <text:p/>
              </draw:image>
              <svg:desc>Relfer – Estruturas Metálicas</svg:desc>
            </draw:frame>
            <draw:custom-shape table:end-cell-address="Gestão_Stonex.H4" table:end-x="2.248cm" table:end-y="0.528cm" draw:z-index="2" draw:name="Retângulo 4" draw:style-name="gr5" draw:text-style-name="P4" svg:width="15.742cm" svg:height="1.577cm" svg:x="0cm" svg:y="0.01cm">
              <text:p text:style-name="P2"><text:span text:style-name="T5"/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1" draw:name="CaixaDeTexto 3" draw:style-name="gr2" draw:text-style-name="P3" svg:width="8.669cm" svg:height="0.951cm" svg:x="2.196cm" svg:y="0.397cm">
              <text:p text:style-name="P2"><text:span text:style-name="T10">GESTÃO DE LIMITES E STRESS TEST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1637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 table:number-columns-repeated="16376"/>
        </table:table-row>
        <table:table-row table:style-name="ro1">
          <table:table-cell/>
          <table:table-cell table:style-name="ce301" office:value-type="string" calcext:value-type="string" table:number-columns-spanned="5" table:number-rows-spanned="1">
            <text:p>Corretora</text:p>
          </table:table-cell>
          <table:covered-table-cell table:number-columns-repeated="4" table:style-name="ce301"/>
          <table:table-cell table:style-name="ce315" office:value-type="string" calcext:value-type="string" table:number-columns-spanned="2" table:number-rows-spanned="1">
            <text:p>Stonex</text:p>
          </table:table-cell>
          <table:covered-table-cell table:style-name="ce315"/>
          <table:table-cell table:style-name="Default" table:number-columns-repeated="16376"/>
        </table:table-row>
        <table:table-row table:style-name="ro1">
          <table:table-cell/>
          <table:table-cell table:style-name="ce302" office:value-type="string" calcext:value-type="string" table:number-columns-spanned="5" table:number-rows-spanned="1">
            <text:p>Empresa</text:p>
          </table:table-cell>
          <table:covered-table-cell table:number-columns-repeated="4" table:style-name="ce302"/>
          <table:table-cell table:style-name="ce315" office:value-type="string" calcext:value-type="string" table:number-columns-spanned="2" table:number-rows-spanned="1">
            <text:p>Intergrãos</text:p>
          </table:table-cell>
          <table:covered-table-cell table:style-name="ce315"/>
          <table:table-cell table:style-name="Default" table:number-columns-repeated="16376"/>
        </table:table-row>
        <table:table-row table:style-name="ro1">
          <table:table-cell/>
          <table:table-cell table:style-name="ce303" table:number-columns-repeated="7"/>
          <table:table-cell table:style-name="Default" table:number-columns-repeated="16376"/>
        </table:table-row>
        <table:table-row table:style-name="ro1">
          <table:table-cell/>
          <table:table-cell table:style-name="ce304" office:value-type="string" calcext:value-type="string" table:number-columns-spanned="5" table:number-rows-spanned="1">
            <text:p>Gestão de Carteira e Limite de Crédito</text:p>
          </table:table-cell>
          <table:covered-table-cell table:number-columns-repeated="4" table:style-name="ce304"/>
          <table:table-cell table:style-name="ce311" office:value-type="string" calcext:value-type="string">
            <text:p>USD</text:p>
          </table:table-cell>
          <table:table-cell table:style-name="ce311" office:value-type="string" calcext:value-type="string">
            <text:p>BRL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5" office:value-type="string" calcext:value-type="string" table:number-columns-spanned="5" table:number-rows-spanned="1">
            <text:p>Caixa Inicial (USD)</text:p>
          </table:table-cell>
          <table:covered-table-cell table:number-columns-repeated="3" table:style-name="ce312"/>
          <table:covered-table-cell/>
          <table:table-cell table:style-name="ce316" table:formula="of:=[.H10]/[$Preços_MTM.I4]" office:value-type="float" office:value="12016.8909423429" calcext:value-type="float">
            <text:p>12.016,89 </text:p>
          </table:table-cell>
          <table:table-cell table:style-name="ce316" table:formula="of:=[$Var_Cambial.D28]" office:value-type="float" office:value="62421.74" calcext:value-type="float">
            <text:p>62.421,74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6" office:value-type="string" calcext:value-type="string" table:number-columns-spanned="5" table:number-rows-spanned="1">
            <text:p>MTM (USD)</text:p>
          </table:table-cell>
          <table:covered-table-cell table:number-columns-repeated="4" table:style-name="ce313"/>
          <table:table-cell table:style-name="ce317" table:formula="of:=SUMIFS([$Analítico_Deriv.AA:.AA];[$Analítico_Deriv.M:.M];[$Gestão_Stonex.G6];[$Analítico_Deriv.C:.C];&quot;Vigente&quot;)" office:value-type="float" office:value="1032.9667917991" calcext:value-type="float">
            <text:p>1.032,97 </text:p>
          </table:table-cell>
          <table:table-cell table:style-name="ce317" table:formula="of:=SUMIFS([$Analítico_Deriv.AB:.AB];[$Analítico_Deriv.M:.M];[$Gestão_Stonex.G6];[$Analítico_Deriv.C:.C];&quot;Vigente&quot;)" office:value-type="float" office:value="5365.74600000044" calcext:value-type="float">
            <text:p>5.365,75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5" office:value-type="string" calcext:value-type="string" table:number-columns-spanned="5" table:number-rows-spanned="1">
            <text:p>Net de Liquidação (USD)</text:p>
          </table:table-cell>
          <table:covered-table-cell table:number-columns-repeated="3" table:style-name="ce312"/>
          <table:covered-table-cell/>
          <table:table-cell table:style-name="ce316" table:formula="of:=SUM([.G10:.G11])" office:value-type="float" office:value="13049.857734142" calcext:value-type="float">
            <text:p>13.049,86 </text:p>
          </table:table-cell>
          <table:table-cell table:style-name="ce316" table:formula="of:=SUM([.H10:.H11])" office:value-type="float" office:value="67787.4860000004" calcext:value-type="float">
            <text:p>67.787,49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6" office:value-type="string" calcext:value-type="string" table:number-columns-spanned="5" table:number-rows-spanned="1">
            <text:p>Margem Inicial (USD)</text:p>
          </table:table-cell>
          <table:covered-table-cell table:number-columns-repeated="4" table:style-name="ce313"/>
          <table:table-cell table:style-name="ce317" office:value-type="float" office:value="250000" calcext:value-type="float">
            <text:p>250.000,00 </text:p>
          </table:table-cell>
          <table:table-cell table:style-name="ce317" table:formula="of:=[.G13]*[$Preços_MTM.I4]" office:value-type="float" office:value="1298625" calcext:value-type="float">
            <text:p>1.298.625,00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5" office:value-type="string" calcext:value-type="string" table:number-columns-spanned="5" table:number-rows-spanned="1">
            <text:p>Margem de Variação (USD)</text:p>
          </table:table-cell>
          <table:covered-table-cell table:number-columns-repeated="3" table:style-name="ce312"/>
          <table:covered-table-cell/>
          <table:table-cell table:style-name="ce316" office:value-type="float" office:value="250000" calcext:value-type="float">
            <text:p>250.000,00 </text:p>
          </table:table-cell>
          <table:table-cell table:style-name="ce316" table:formula="of:=[.G14]*[$Preços_MTM.I4]" office:value-type="float" office:value="1298625" calcext:value-type="float">
            <text:p>1.298.625,00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6" office:value-type="string" calcext:value-type="string" table:number-columns-spanned="5" table:number-rows-spanned="1">
            <text:p>Margem de Variação <text:s/>Excesso/Deficit(USD)</text:p>
          </table:table-cell>
          <table:covered-table-cell table:number-columns-repeated="4" table:style-name="ce313"/>
          <table:table-cell table:style-name="ce317" table:formula="of:=[.G11]+[.G14]" office:value-type="float" office:value="251032.966791799" calcext:value-type="float">
            <text:p>251.032,97 </text:p>
          </table:table-cell>
          <table:table-cell table:style-name="ce317" table:formula="of:=[.H11]+[.H14]" office:value-type="float" office:value="1303990.746" calcext:value-type="float">
            <text:p>1.303.990,75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5" office:value-type="string" calcext:value-type="string" table:number-columns-spanned="5" table:number-rows-spanned="1">
            <text:p>Consumo de Margem Inicial (USD)</text:p>
          </table:table-cell>
          <table:covered-table-cell table:number-columns-repeated="3" table:style-name="ce312"/>
          <table:covered-table-cell/>
          <table:table-cell table:style-name="ce316" table:formula="of:=[.H16]/[$Preços_MTM.I4]" office:value-type="float" office:value="-7125.94859948022" calcext:value-type="float">
            <text:p>-7.125,95 </text:p>
          </table:table-cell>
          <table:table-cell table:style-name="ce320" office:value-type="float" office:value="-37015.74" calcext:value-type="float">
            <text:p>-37.015,74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7" office:value-type="string" calcext:value-type="string" table:number-columns-spanned="5" table:number-rows-spanned="1">
            <text:p>Margem Inicial Excesso/Deficit (USD)</text:p>
          </table:table-cell>
          <table:covered-table-cell table:number-columns-repeated="4" table:style-name="ce307"/>
          <table:table-cell table:style-name="ce318" table:formula="of:=SUM([.G16];[.G13])" office:value-type="float" office:value="242874.05140052" calcext:value-type="float">
            <text:p>242.874,05 </text:p>
          </table:table-cell>
          <table:table-cell table:style-name="ce318" table:formula="of:=SUM([.H16];[.H13])" office:value-type="float" office:value="1261609.26" calcext:value-type="float">
            <text:p>1.261.609,26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8" office:value-type="string" calcext:value-type="string" table:number-columns-spanned="5" table:number-rows-spanned="1">
            <text:p>Saldo Disponível</text:p>
          </table:table-cell>
          <table:covered-table-cell table:number-columns-repeated="4" table:style-name="ce308"/>
          <table:table-cell table:style-name="ce319" table:formula="of:=[.H18]/[$Preços_MTM.I4]" office:value-type="float" office:value="12016.8909423429" calcext:value-type="float">
            <text:p>12.016,89 </text:p>
          </table:table-cell>
          <table:table-cell table:style-name="ce319" table:formula="of:=IF([.H15]&gt;0;[.H10];&quot;AJUSTAR&quot;)" office:value-type="float" office:value="62421.74" calcext:value-type="float">
            <text:p>62.421,74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9" office:value-type="string" calcext:value-type="string" table:number-columns-spanned="5" table:number-rows-spanned="1">
            <text:p>Excesso/Díbito total</text:p>
          </table:table-cell>
          <table:covered-table-cell table:number-columns-repeated="4" table:style-name="ce310"/>
          <table:table-cell table:style-name="ce225" table:formula="of:=[.G11]+[.G18]" office:value-type="float" office:value="13049.857734142" calcext:value-type="float">
            <text:p>13.049,86 </text:p>
          </table:table-cell>
          <table:table-cell table:style-name="ce225" table:formula="of:=[.H11]+[.H18]" office:value-type="float" office:value="67787.4860000004" calcext:value-type="float">
            <text:p>67.787,49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10" office:value-type="string" calcext:value-type="string">
            <text:p>Margeamento</text:p>
          </table:table-cell>
          <table:table-cell table:style-name="ce310" table:number-columns-repeated="4"/>
          <table:table-cell table:style-name="ce225"/>
          <table:table-cell table:style-name="ce225" table:formula="of:=IF([.H15]&lt;0;[.H15];0)" office:value-type="float" office:value="0" calcext:value-type="float">
            <text:p>0,00 </text:p>
          </table:table-cell>
          <table:table-cell table:style-name="Default" table:number-columns-repeated="1637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16376"/>
        </table:table-row>
        <table:table-row table:style-name="ro1">
          <table:table-cell/>
          <table:table-cell table:style-name="ce303" table:number-columns-repeated="7"/>
          <table:table-cell table:style-name="Default" table:number-columns-repeated="16376"/>
        </table:table-row>
        <table:table-row table:style-name="ro1">
          <table:table-cell/>
          <table:table-cell table:style-name="ce311" office:value-type="string" calcext:value-type="string" table:number-columns-spanned="5" table:number-rows-spanned="1">
            <text:p>Teste de Stress</text:p>
          </table:table-cell>
          <table:covered-table-cell table:number-columns-repeated="4" table:style-name="ce311"/>
          <table:table-cell table:style-name="ce311" office:value-type="string" calcext:value-type="string">
            <text:p>Referência</text:p>
          </table:table-cell>
          <table:table-cell table:style-name="ce311" office:value-type="string" calcext:value-type="string">
            <text:p>Variação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2" office:value-type="string" calcext:value-type="string" table:number-columns-spanned="5" table:number-rows-spanned="1">
            <text:p>Variação CBOT Soja</text:p>
          </table:table-cell>
          <table:covered-table-cell table:number-columns-repeated="4" table:style-name="ce302"/>
          <table:table-cell table:style-name="ce315" office:value-type="string" calcext:value-type="string">
            <text:p>Soja CBOT</text:p>
          </table:table-cell>
          <table:table-cell table:style-name="ce321" office:value-type="percentage" office:value="0" calcext:value-type="percentage">
            <text:p>0%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2" office:value-type="string" calcext:value-type="string" table:number-columns-spanned="5" table:number-rows-spanned="1">
            <text:p>Variação CBOT Milho</text:p>
          </table:table-cell>
          <table:covered-table-cell table:number-columns-repeated="4" table:style-name="ce302"/>
          <table:table-cell table:style-name="ce315" office:value-type="string" calcext:value-type="string">
            <text:p>Milho CBOT</text:p>
          </table:table-cell>
          <table:table-cell table:style-name="ce321" office:value-type="percentage" office:value="0" calcext:value-type="percentage">
            <text:p>0%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2" office:value-type="string" calcext:value-type="string" table:number-columns-spanned="5" table:number-rows-spanned="1">
            <text:p>Variação BMF Milho</text:p>
          </table:table-cell>
          <table:covered-table-cell table:number-columns-repeated="4" table:style-name="ce302"/>
          <table:table-cell table:style-name="ce315" office:value-type="string" calcext:value-type="string">
            <text:p>Milho BMF</text:p>
          </table:table-cell>
          <table:table-cell table:style-name="ce321" office:value-type="percentage" office:value="0.55" calcext:value-type="percentage">
            <text:p>55%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2" office:value-type="string" calcext:value-type="string" table:number-columns-spanned="5" table:number-rows-spanned="1">
            <text:p>Variação BMF Dolar</text:p>
          </table:table-cell>
          <table:covered-table-cell table:number-columns-repeated="4" table:style-name="ce302"/>
          <table:table-cell table:style-name="ce315" office:value-type="string" calcext:value-type="string">
            <text:p>Dolar BMF</text:p>
          </table:table-cell>
          <table:table-cell table:style-name="ce321" office:value-type="percentage" office:value="0" calcext:value-type="percentage">
            <text:p>0%</text:p>
          </table:table-cell>
          <table:table-cell table:style-name="Default" table:number-columns-repeated="16376"/>
        </table:table-row>
        <table:table-row table:style-name="ro1" table:number-rows-repeated="2">
          <table:table-cell table:number-columns-repeated="5"/>
          <table:table-cell table:style-name="ce314"/>
          <table:table-cell table:number-columns-repeated="2"/>
          <table:table-cell table:style-name="Default" table:number-columns-repeated="16376"/>
        </table:table-row>
        <table:table-row table:style-name="ro1">
          <table:table-cell/>
          <table:table-cell table:style-name="ce304" office:value-type="string" calcext:value-type="string" table:number-columns-spanned="5" table:number-rows-spanned="1">
            <text:p>Gestão de Carteira e Limite de Crédito</text:p>
          </table:table-cell>
          <table:covered-table-cell table:number-columns-repeated="4" table:style-name="ce304"/>
          <table:table-cell table:style-name="ce311" office:value-type="string" calcext:value-type="string">
            <text:p>USD</text:p>
          </table:table-cell>
          <table:table-cell table:style-name="ce311" office:value-type="string" calcext:value-type="string">
            <text:p>BRL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5" office:value-type="string" calcext:value-type="string" table:number-columns-spanned="5" table:number-rows-spanned="1">
            <text:p>Caixa Inicial (USD)</text:p>
          </table:table-cell>
          <table:covered-table-cell table:number-columns-repeated="3" table:style-name="ce312"/>
          <table:covered-table-cell/>
          <table:table-cell table:style-name="ce316" table:formula="of:=[.G10]" office:value-type="float" office:value="12016.8909423429" calcext:value-type="float">
            <text:p>12.016,89 </text:p>
          </table:table-cell>
          <table:table-cell table:style-name="ce316" table:formula="of:=[.H10]" office:value-type="float" office:value="62421.74" calcext:value-type="float">
            <text:p>62.421,74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6" office:value-type="string" calcext:value-type="string" table:number-columns-spanned="5" table:number-rows-spanned="1">
            <text:p>MTM (USD)</text:p>
          </table:table-cell>
          <table:covered-table-cell table:number-columns-repeated="4" table:style-name="ce313"/>
          <table:table-cell table:style-name="ce317" table:formula="of:=SUMIFS([$Analítico_Deriv.AL:.AL];[$Analítico_Deriv.M:.M];[$Gestão_Stonex.G6];[$Analítico_Deriv.C:.C];&quot;Vigente&quot;)" office:value-type="float" office:value="-250020.674848397" calcext:value-type="float">
            <text:p>-250.020,67 </text:p>
          </table:table-cell>
          <table:table-cell table:style-name="ce317" table:formula="of:=SUMIFS([$Analítico_Deriv.AM:.AM];[$Analítico_Deriv.M:.M];[$Gestão_Stonex.G6];[$Analítico_Deriv.C:.C];&quot;Vigente&quot;)" office:value-type="float" office:value="-1298732.3955" calcext:value-type="float">
            <text:p>-1.298.732,40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5" office:value-type="string" calcext:value-type="string" table:number-columns-spanned="5" table:number-rows-spanned="1">
            <text:p>Net de Liquidação (USD)</text:p>
          </table:table-cell>
          <table:covered-table-cell table:number-columns-repeated="3" table:style-name="ce312"/>
          <table:covered-table-cell/>
          <table:table-cell table:style-name="ce316" table:formula="of:=SUM([.G31:.G32])" office:value-type="float" office:value="-238003.783906054" calcext:value-type="float">
            <text:p>-238.003,78 </text:p>
          </table:table-cell>
          <table:table-cell table:style-name="ce316" table:formula="of:=SUM([.H31:.H32])" office:value-type="float" office:value="-1236310.6555" calcext:value-type="float">
            <text:p>-1.236.310,66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6" office:value-type="string" calcext:value-type="string" table:number-columns-spanned="5" table:number-rows-spanned="1">
            <text:p>Margem Inicial (USD)</text:p>
          </table:table-cell>
          <table:covered-table-cell table:number-columns-repeated="4" table:style-name="ce313"/>
          <table:table-cell table:style-name="ce317" office:value-type="float" office:value="250000" calcext:value-type="float">
            <text:p>250.000,00 </text:p>
          </table:table-cell>
          <table:table-cell table:style-name="ce317" table:formula="of:=[.G34]*[$Preços_MTM.I4]" office:value-type="float" office:value="1298625" calcext:value-type="float">
            <text:p>1.298.625,00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5" office:value-type="string" calcext:value-type="string" table:number-columns-spanned="5" table:number-rows-spanned="1">
            <text:p>Margem de Variação (USD)</text:p>
          </table:table-cell>
          <table:covered-table-cell table:number-columns-repeated="3" table:style-name="ce312"/>
          <table:covered-table-cell/>
          <table:table-cell table:style-name="ce316" office:value-type="float" office:value="250000" calcext:value-type="float">
            <text:p>250.000,00 </text:p>
          </table:table-cell>
          <table:table-cell table:style-name="ce316" table:formula="of:=[.G35]*[$Preços_MTM.I4]" office:value-type="float" office:value="1298625" calcext:value-type="float">
            <text:p>1.298.625,00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6" office:value-type="string" calcext:value-type="string" table:number-columns-spanned="5" table:number-rows-spanned="1">
            <text:p>Margem de Variação <text:s/>Excesso/Deficit(USD)</text:p>
          </table:table-cell>
          <table:covered-table-cell table:number-columns-repeated="4" table:style-name="ce313"/>
          <table:table-cell table:style-name="ce317" table:formula="of:=[.G32]+[.G35]" office:value-type="float" office:value="-20.6748483972042" calcext:value-type="float">
            <text:p>-20,67 </text:p>
          </table:table-cell>
          <table:table-cell table:style-name="ce317" table:formula="of:=[.H32]+[.H35]" office:value-type="float" office:value="-107.395499999169" calcext:value-type="float">
            <text:p>-107,40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5" office:value-type="string" calcext:value-type="string" table:number-columns-spanned="5" table:number-rows-spanned="1">
            <text:p>Consumo de Margem Inicial (USD)</text:p>
          </table:table-cell>
          <table:covered-table-cell table:number-columns-repeated="3" table:style-name="ce312"/>
          <table:covered-table-cell/>
          <table:table-cell table:style-name="ce316" table:formula="of:=[.G16]" office:value-type="float" office:value="-7125.94859948022" calcext:value-type="float">
            <text:p>-7.125,95 </text:p>
          </table:table-cell>
          <table:table-cell table:style-name="ce320" table:formula="of:=[.H16]" office:value-type="float" office:value="-37015.74" calcext:value-type="float">
            <text:p>-37.015,74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7" office:value-type="string" calcext:value-type="string" table:number-columns-spanned="5" table:number-rows-spanned="1">
            <text:p>Margem Inicial Excesso/Deficit (USD)</text:p>
          </table:table-cell>
          <table:covered-table-cell table:number-columns-repeated="4" table:style-name="ce307"/>
          <table:table-cell table:style-name="ce318" table:formula="of:=SUM([.G37];[.G34])" office:value-type="float" office:value="242874.05140052" calcext:value-type="float">
            <text:p>242.874,05 </text:p>
          </table:table-cell>
          <table:table-cell table:style-name="ce318" table:formula="of:=SUM([.H37];[.H34])" office:value-type="float" office:value="1261609.26" calcext:value-type="float">
            <text:p>1.261.609,26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8" office:value-type="string" calcext:value-type="string" table:number-columns-spanned="5" table:number-rows-spanned="1">
            <text:p>Saldo Disponível</text:p>
          </table:table-cell>
          <table:covered-table-cell table:number-columns-repeated="4" table:style-name="ce308"/>
          <table:table-cell table:style-name="ce319" table:formula="of:=[.G18]" office:value-type="float" office:value="12016.8909423429" calcext:value-type="float">
            <text:p>12.016,89 </text:p>
          </table:table-cell>
          <table:table-cell table:style-name="ce319" table:formula="of:=[.H18]" office:value-type="float" office:value="62421.74" calcext:value-type="float">
            <text:p>62.421,74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09" office:value-type="string" calcext:value-type="string" table:number-columns-spanned="5" table:number-rows-spanned="1">
            <text:p>Excesso/Díbito total</text:p>
          </table:table-cell>
          <table:covered-table-cell table:number-columns-repeated="4" table:style-name="ce310"/>
          <table:table-cell table:style-name="ce225" table:formula="of:=[.G32]+[.G39]" office:value-type="float" office:value="-238003.783906054" calcext:value-type="float">
            <text:p>-238.003,78 </text:p>
          </table:table-cell>
          <table:table-cell table:style-name="ce225" table:formula="of:=[.H32]+[.H39]" office:value-type="float" office:value="-1236310.6555" calcext:value-type="float">
            <text:p>-1.236.310,66 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310" office:value-type="string" calcext:value-type="string">
            <text:p>Margeamento</text:p>
          </table:table-cell>
          <table:table-cell table:number-columns-repeated="3"/>
          <table:table-cell table:style-name="Default"/>
          <table:table-cell/>
          <table:table-cell table:style-name="ce225" table:formula="of:=IF([.H36]&lt;0;[.H36];0)" office:value-type="float" office:value="-107.395499999169" calcext:value-type="float">
            <text:p>-107,40 </text:p>
          </table:table-cell>
          <table:table-cell table:style-name="Default" table:number-columns-repeated="16376"/>
        </table:table-row>
      </table:table>
      <table:named-expressions>
        <table:named-range table:name="_xlchart.v5.0" table:base-cell-address="$dms.$A$1" table:cell-range-address="$Reporte_Liq.$X$12:.$X$17" table:range-usable-as="hidden"/>
        <table:named-range table:name="_xlchart.v5.1" table:base-cell-address="$dms.$A$1" table:cell-range-address="$Reporte_Liq.$Y$12:.$Y$17" table:range-usable-as="hidden"/>
      </table:named-expressions>
      <table:database-ranges>
        <table:database-range table:name="Tabela1" table:target-range-address="Analítico_Deriv.A6:Analítico_Deriv.AT30" table:display-filter-buttons="true"/>
        <table:database-range table:name="Tabela10" table:target-range-address="'Liquidações.Derivativos'.A6:'Liquidações.Derivativos'.U8" table:display-filter-buttons="true"/>
        <table:database-range table:name="Tabela11" table:target-range-address="dms.P4:dms.Q12" table:display-filter-buttons="true"/>
        <table:database-range table:name="Tabela113" table:target-range-address="Analítico_Deriv_Op.A6:Analítico_Deriv_Op.V7" table:display-filter-buttons="true"/>
        <table:database-range table:name="Tabela13" table:target-range-address="Caixa_Corretoras.A11:Caixa_Corretoras.M13" table:display-filter-buttons="true"/>
        <table:database-range table:name="Tabela2" table:target-range-address="Preços_MTM.A3:Preços_MTM.D5" table:display-filter-buttons="true"/>
        <table:database-range table:name="Tabela24" table:target-range-address="Preços_MTM.F3:Preços_MTM.I5" table:display-filter-buttons="true"/>
        <table:database-range table:name="Tabela4" table:target-range-address="dms.D4:dms.E7" table:display-filter-buttons="true"/>
        <table:database-range table:name="Tabela5" table:target-range-address="dms.G4:dms.H16" table:display-filter-buttons="true"/>
        <table:database-range table:name="Tabela6" table:target-range-address="dms.J4:dms.N568" table:display-filter-buttons="true"/>
        <table:database-range table:name="Tabela7" table:target-range-address="'Op. Long_Basis_Vig'.A6:'Op. Long_Basis_Vig'.BB10" table:display-filter-buttons="true"/>
        <table:database-range table:name="Tabela710" table:target-range-address="'Op. Long_Basis_Liq'.A6:'Op. Long_Basis_Liq'.AY13" table:display-filter-buttons="true"/>
        <table:database-range table:name="Tabela8" table:target-range-address="Preços_MTM.K3:Preços_MTM.Q7" table:display-filter-buttons="true"/>
      </table:database-ranges>
      <table:data-pilot-tables>
        <table:data-pilot-table table:name="Tabela dinâmica7" table:application-data="" table:target-range-address="Fluxo_Caixa.A6:Fluxo_Caixa.D16" table:buttons="Fluxo_Caixa.A8 Fluxo_Caixa.B6" table:show-filter-button="false" loext:show-drill-down-buttons="true">
          <table:source-cell-range table:cell-range-address="Analítico_Deriv.A6:Analítico_Deriv.AT30"/>
          <table:data-pilot-field table:source-field-name="Empresa" table:orientation="row" table:used-hierarchy="-1" table:function="auto">
            <table:data-pilot-level table:show-empty="false" calcext:repeat-item-labels="false">
              <table:data-pilot-members>
                <table:data-pilot-member table:name="Intergrão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rretora" table:orientation="row" table:used-hierarchy="-1" table:function="auto">
            <table:data-pilot-level table:show-empty="false" calcext:repeat-item-labels="false">
              <table:data-pilot-members>
                <table:data-pilot-member table:name="Stonex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mmodity Vinculada" table:orientation="row" table:used-hierarchy="-1" table:function="auto">
            <table:data-pilot-level table:show-empty="false" calcext:repeat-item-labels="false">
              <table:data-pilot-members>
                <table:data-pilot-member table:name="Milho" table:display="true" table:show-details="true"/>
                <table:data-pilot-member table:name="Soj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mmodity" table:orientation="row" table:used-hierarchy="-1" table:function="auto">
            <table:data-pilot-level table:show-empty="false" calcext:repeat-item-labels="false">
              <table:data-pilot-members>
                <table:data-pilot-member table:name="Dolar" table:display="true" table:show-details="true"/>
                <table:data-pilot-member table:name="Milho" table:display="true" table:show-details="true"/>
                <table:data-pilot-member table:name="Soj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Ano Fluxo Caixa" table:orientation="column" table:used-hierarchy="-1" table:function="auto">
            <table:data-pilot-level table:show-empty="false" calcext:repeat-item-labels="false">
              <table:data-pilot-members>
                <table:data-pilot-member table:name="2.026,00" table:display="true" table:show-details="true"/>
                <table:data-pilot-member table:name="2.027,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Mês Fluxo Caixa" table:orientation="column" table:used-hierarchy="-1" table:function="auto">
            <table:data-pilot-level table:show-empty="false" calcext:repeat-item-labels="false">
              <table:data-pilot-members>
                <table:data-pilot-member table:name="Jan" table:display="true" table:show-details="true"/>
                <table:data-pilot-member table:name="Ju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ID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a Hedge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Status Extrat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Safra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oviment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Víncul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Status Operaçã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rade ID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ntrat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Operaçã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stratégia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xposiçã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 Lotes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 Lotes Exposiçã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Bolsa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Referência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Strike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a de Expiraçã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a de Venciment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Notional USD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xposição Cambial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FV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USD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Posição Dol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have Commo + Bolsa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Vol Kgs Exposiçã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xposição em Tons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ês" table:orientation="hidden" table:used-hierarchy="-1" table:function="auto">
            <table:data-pilot-level table:show-empty="false" calcext:repeat-item-labels="false">
              <table:data-pilot-members>
                <table:data-pilot-member table:name="Jan" table:display="true" table:show-details="true"/>
                <table:data-pilot-member table:name="Jun" table:display="true" table:show-details="true"/>
                <table:data-pilot-member table:name="Ag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Ano" table:orientation="hidden" table:used-hierarchy="-1" table:function="auto">
            <table:data-pilot-level table:show-empty="false" calcext:repeat-item-labels="false">
              <table:data-pilot-members>
                <table:data-pilot-member table:name="2026" table:display="true" table:show-details="true"/>
                <table:data-pilot-member table:name="2027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Operação Vinculada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Stress Test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FV Stress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USD Stress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BRL Stress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Posição Dol Stress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xposição Basis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Comissã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Mês Comissã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Ano Comissão" table:orientation="hidde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MTM BRL" tableooo:display-name=" " table:orientation="data" table:used-hierarchy="-1" table:function="sum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Tabela dinâmica3" table:application-data="" table:target-range-address="'Din.MTM_LB'.A1:'Din.MTM_LB'.B6" table:buttons="'Din.MTM_LB'.A1 'Din.MTM_LB'.A2 'Din.MTM_LB'.A3" table:show-filter-button="false" loext:show-drill-down-buttons="true">
          <table:source-cell-range table:cell-range-address="'Op. Long_Basis_Vig'.A6:'Op. Long_Basis_Vig'.BB10"/>
          <table:data-pilot-field table:source-field-name="Unidad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acramento" table:display="true" table:show-details="true"/>
                <table:data-pilot-member table:name="Matup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mpresa" table:orientation="page" table:used-hierarchy="-1" table:function="auto" loext:ignore-selected-page="true" table:selected-page="Intergrãos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ntergrão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Operação Vinculada" table:orientation="page" table:used-hierarchy="-1" table:function="auto" loext:ignore-selected-page="true" table:selected-page="LB-Milho-26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B-Milho-2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ID Operaçã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a" table:orientation="hidden" table:used-hierarchy="-1" table:function="auto">
            <table:data-pilot-level calcext:repeat-item-labels="false"/>
          </table:data-pilot-field>
          <table:data-pilot-field table:source-field-name="Status Comerci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Operaçã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U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have Empres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 Contra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ntrapar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mmodit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Vol Kg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Vol Saca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Safr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oed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osição Entreg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reço Negociad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Vc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ID Derivativo Comm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Bols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ick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Vcto Tick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dy Lot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Vol Kgs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Strik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xposição Kg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ID ND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otion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Strike ND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Vcto ND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have MT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FV Commodit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FV Bols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FV ND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Físi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Bols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Dola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Tot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axa Juro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Juros do Período MT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usto Financeiro Estimad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Outros Custos Estimado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usto Tot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Líquid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have Basi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Basis Entrad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Basis Atu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por sac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usto por sac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liquido por sac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por saca grafi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usto por saca grafi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M liquido por saca grafi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yRIAD PRO" svg:font-family="'MyRIAD PRO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4" number:min-decimal-places="4" number:min-integer-digits="1" number:grouping="true"/>
    </number:number-style>
    <number:number-style style:name="N139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date-style style:name="N141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42" style:display-name="ConditionalStyle_42" style:family="table-cell" style:parent-style-name="Default">
      <style:text-properties fo:color="#ff0000"/>
    </style:style>
    <style:style style:name="ConditionalStyle_5f_44" style:display-name="ConditionalStyle_44" style:family="table-cell" style:parent-style-name="Default">
      <style:text-properties fo:color="#ff0000"/>
    </style:style>
    <style:style style:name="ConditionalStyle_5f_43" style:display-name="ConditionalStyle_43" style:family="table-cell" style:parent-style-name="Default">
      <style:text-properties fo:color="#ff0000"/>
    </style:style>
    <style:style style:name="ConditionalStyle_5f_28" style:display-name="ConditionalStyle_28" style:family="table-cell" style:parent-style-name="Default">
      <style:text-properties fo:color="#ff0000"/>
    </style:style>
    <style:style style:name="Excel_20_Built-in_20_Comma" style:display-name="Excel Built-in Comma" style:family="table-cell" style:parent-style-name="Default" style:data-style-name="N131"/>
    <style:style style:name="ConditionalStyle_5f_27" style:display-name="ConditionalStyle_27" style:family="table-cell" style:parent-style-name="Default">
      <style:text-properties fo:color="#0b77a0">
        <loext:char-complex-color loext:theme-type="accent4" loext:color-type="theme">
          <loext:transformation loext:type="lummod" loext:value="7500"/>
        </loext:char-complex-color>
      </style:text-properties>
    </style:style>
    <style:style style:name="ConditionalStyle_5f_26" style:display-name="ConditionalStyle_26" style:family="table-cell" style:parent-style-name="Default">
      <style:text-properties fo:color="#ff0000"/>
    </style:style>
    <style:style style:name="ConditionalStyle_5f_25" style:display-name="ConditionalStyle_25" style:family="table-cell" style:parent-style-name="Default">
      <style:text-properties fo:color="#ff0000"/>
    </style:style>
    <style:style style:name="ConditionalStyle_5f_34" style:display-name="ConditionalStyle_34" style:family="table-cell" style:parent-style-name="Default">
      <style:table-cell-properties fo:background-color="#f8d4c1"/>
    </style:style>
    <style:style style:name="ConditionalStyle_5f_33" style:display-name="ConditionalStyle_33" style:family="table-cell" style:parent-style-name="Default">
      <style:table-cell-properties fo:background-color="#c8e7a7"/>
    </style:style>
    <style:style style:name="ConditionalStyle_5f_31" style:display-name="ConditionalStyle_31" style:family="table-cell" style:parent-style-name="Default">
      <style:text-properties fo:color="#ff0000"/>
    </style:style>
    <style:style style:name="ConditionalStyle_5f_32" style:display-name="ConditionalStyle_32" style:family="table-cell" style:parent-style-name="Default">
      <style:text-properties fo:color="#ff0000"/>
    </style:style>
    <style:style style:name="ConditionalStyle_5f_35" style:display-name="ConditionalStyle_35" style:family="table-cell" style:parent-style-name="Default">
      <style:text-properties fo:color="#ff0000"/>
    </style:style>
    <style:style style:name="ConditionalStyle_5f_37" style:display-name="ConditionalStyle_37" style:family="table-cell" style:parent-style-name="Default">
      <style:text-properties fo:color="#ff0000"/>
    </style:style>
    <style:style style:name="ConditionalStyle_5f_36" style:display-name="ConditionalStyle_36" style:family="table-cell" style:parent-style-name="Default">
      <style:text-properties fo:color="#ff0000"/>
    </style:style>
    <style:style style:name="Excel_20_Built-in_20_Currency" style:display-name="Excel Built-in Currency" style:family="table-cell" style:parent-style-name="Default" style:data-style-name="N132"/>
    <style:style style:name="ConditionalStyle_5f_41" style:display-name="ConditionalStyle_41" style:family="table-cell" style:parent-style-name="Default">
      <style:table-cell-properties fo:background-color="#c8e7a7"/>
    </style:style>
    <style:style style:name="ConditionalStyle_5f_40" style:display-name="ConditionalStyle_40" style:family="table-cell" style:parent-style-name="Default">
      <style:table-cell-properties fo:background-color="#ff7f7f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volução_5f_MTM" style:display-name="PageStyle_Evolução_MT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o_5f_Derivativos" style:display-name="PageStyle_Resumo_Deriva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ços_5f_MTM" style:display-name="PageStyle_Preços_MT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n.MTM_5f_LB" style:display-name="PageStyle_Din.MTM_L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TM_5f_LB-Milho-26" style:display-name="PageStyle_MTM_LB-Milho-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._20_Long_5f_Basis_5f_Liq" style:display-name="PageStyle_Op. Long_Basis_Liq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xo_5f_Caixa" style:display-name="PageStyle_Fluxo_Caix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quidações.Derivativos" style:display-name="PageStyle_Liquidações.Derivativ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_5f_Cambial" style:display-name="PageStyle_Var_Camb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ítico_5f_Deriv" style:display-name="PageStyle_Analítico_Deri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ítico_5f_Deriv_5f_Op" style:display-name="PageStyle_Analítico_Deriv_O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stão_5f_Stonex" style:display-name="PageStyle_Gestão_Stone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ixa_5f_Corretoras" style:display-name="PageStyle_Caixa_Corretor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._20_Long_5f_Basis_5f_Vig" style:display-name="PageStyle_Op. Long_Basis_V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porte_5f_Liq" style:display-name="PageStyle_Reporte_Li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ms" style:display-name="PageStyle_d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ely Anschau</meta:initial-creator>
    <meta:print-date>2026-06-18T17:39:50</meta:print-date>
    <meta:creation-date>2026-06-10T15:59:39</meta:creation-date>
    <dc:date>2026-07-14T17:00:13.462310000</dc:date>
    <meta:generator>LibreOffice/25.8.6.2$Windows_X86_64 LibreOffice_project/b4b39682cd9868fa725bc664aff94278d315bd04</meta:generator>
    <meta:editing-duration>PT7H38M54S</meta:editing-duration>
    <meta:editing-cycles>1</meta:editing-cycles>
    <meta:document-statistic meta:table-count="16" meta:cell-count="5453" meta:object-count="38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d0d0d" style:text-position="0% 100%" fo:font-family="'Aptos Narrow'" fo:font-size="9pt" style:font-size-asian="9pt" style:font-size-complex="9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0d0d0d" style:text-position="0% 100%" fo:font-family="'Aptos Narrow'" fo:font-size="9pt" fo:font-weight="bold" style:font-size-asian="9pt" style:font-weight-asian="bold" style:font-size-complex="9pt" style:font-weight-complex="bold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19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0d0d0d" style:text-position="0% 100%" fo:font-family="'Aptos Narrow'" fo:font-size="9pt" style:font-size-asian="9pt" style:font-size-complex="9pt"/>
    </style:style>
    <style:style style:name="ch6" style:family="chart">
      <style:graphic-properties draw:stroke="dash" draw:stroke-dash="msLineDash_20_1" svg:stroke-width="0.026cm" svg:stroke-color="#d9d9d9"/>
    </style:style>
    <style:style style:name="ch7" style:family="chart" style:data-style-name="N4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svg:stroke-width="0.035cm" draw:fill-color="#1b4b59" fo:wrap-option="wrap"/>
      <style:text-properties fo:color="#0d0d0d" style:text-position="0% 100%" fo:font-family="'Aptos Narrow'" fo:font-size="9pt" fo:font-weight="bold" style:font-size-asian="9pt" style:font-weight-asian="bold" style:font-size-complex="9pt" style:font-weight-complex="bold"/>
    </style:style>
    <style:style style:name="ch8" style:family="chart" style:data-style-name="N4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svg:stroke-width="0.035cm" draw:fill-color="#ffc000" fo:wrap-option="wrap"/>
      <style:text-properties fo:color="#0d0d0d" style:text-position="0% 100%" fo:font-family="'Aptos Narrow'" fo:font-size="9pt" fo:font-weight="bold" style:font-size-asian="9pt" style:font-weight-asian="bold" style:font-size-complex="9pt" style:font-weight-complex="bold"/>
    </style:style>
    <style:style style:name="ch9" style:family="chart" style:data-style-name="N4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79cm" svg:stroke-color="#196b24" svg:stroke-linecap="round" draw:fill-color="#196b24" fo:wrap-option="wrap"/>
      <style:text-properties fo:color="#e57424" style:text-position="0% 100%" fo:font-family="'Aptos Narrow'" fo:font-size="9pt" fo:font-weight="bold" style:font-size-asian="9pt" style:font-weight-asian="bold" style:font-size-complex="9pt" style:font-weight-complex="bold"/>
    </style:style>
    <style:style style:name="ch10" style:family="chart">
      <style:chart-properties chart:solid-type="cuboid" chart:symbol-type="named-symbol" chart:symbol-name="circle" chart:symbol-width="0.176cm" chart:symbol-height="0.176cm"/>
      <style:text-properties fo:font-size="16pt" style:font-size-asian="16pt" style:font-size-complex="16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373cm" svg:height="7.938cm" xlink:href=".." xlink:type="simple" chart:class="chart:bar" chart:style-name="ch1">
        <chart:legend chart:legend-position="bottom" svg:x="5.146cm" svg:y="7.418cm" style:legend-expansion="wide" chart:style-name="ch2"/>
        <chart:plot-area chart:style-name="ch3" svg:x="0.327cm" svg:y="0.158cm" svg:width="15.719cm" svg:height="6.918cm">
          <chart:coordinate-region svg:x="0.962cm" svg:y="0.318cm" svg:width="15.084cm" svg:height="6.34cm"/>
          <chart:axis chart:dimension="x" chart:name="primary-x" chart:style-name="ch4" chartooo:axis-type="auto">
            <chartooo:date-scale/>
            <chart:categories table:cell-range-address="'Din.MTM_LB'.A5:'Din.MTM_LB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n.MTM_LB'.B5:'Din.MTM_LB'.B7" chart:label-cell-address="'Din.MTM_LB'.B4:'Din.MTM_LB'.B4" chart:class="chart:bar">
            <chart:data-point chart:repeated="3"/>
          </chart:series>
          <chart:series chart:style-name="ch8" chart:values-cell-range-address="'Din.MTM_LB'.C5:'Din.MTM_LB'.C7" chart:label-cell-address="'Din.MTM_LB'.C4:'Din.MTM_LB'.C4" chart:class="chart:bar">
            <chart:data-point chart:repeated="3"/>
          </chart:series>
          <chart:series chart:style-name="ch9" chart:values-cell-range-address="'Din.MTM_LB'.D5:'Din.MTM_LB'.D7" chart:label-cell-address="'Din.MTM_LB'.D4:'Din.MTM_LB'.D4" chart:class="chart:line">
            <chart:data-point chart:style-name="ch10" loext:custom-label-pos-x="0.01364522417154" loext:custom-label-pos-y="-0.0355555555555556"/>
            <chart:data-point chart:style-name="ch10" loext:custom-label-pos-x="-1.42948316160225E-016" loext:custom-label-pos-y="-0.0444444444444444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in.MTM_LB'.B4:'Din.MTM_LB'.B4</svg:desc>
                </draw:g>
              </table:table-cell>
              <table:table-cell office:value-type="string">
                <text:p/>
                <draw:g>
                  <svg:desc>'Din.MTM_LB'.C4:'Din.MTM_LB'.C4</svg:desc>
                </draw:g>
              </table:table-cell>
              <table:table-cell office:value-type="string">
                <text:p/>
                <draw:g>
                  <svg:desc>'Din.MTM_LB'.D4:'Din.MTM_LB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upa</text:p>
                <draw:g>
                  <svg:desc>'Din.MTM_LB'.A5:'Din.MTM_LB'.A7</svg:desc>
                </draw:g>
              </table:table-cell>
              <table:table-cell office:value-type="float" office:value="NaN">
                <text:p>NaN</text:p>
                <draw:g>
                  <svg:desc>'Din.MTM_LB'.B5:'Din.MTM_LB'.B7</svg:desc>
                </draw:g>
              </table:table-cell>
              <table:table-cell office:value-type="float" office:value="NaN">
                <text:p>NaN</text:p>
                <draw:g>
                  <svg:desc>'Din.MTM_LB'.C5:'Din.MTM_LB'.C7</svg:desc>
                </draw:g>
              </table:table-cell>
              <table:table-cell office:value-type="float" office:value="NaN">
                <text:p>NaN</text:p>
                <draw:g>
                  <svg:desc>'Din.MTM_LB'.D5:'Din.MTM_LB'.D7</svg:desc>
                </draw:g>
              </table:table-cell>
            </table:table-row>
            <table:table-row>
              <table:table-cell office:value-type="string">
                <text:p>Total Resulta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msLineDash_20_1" draw:display-name="msLineDash 1" draw:style="rect" draw:dots1="1" draw:dots1-length="400%" draw:dots2="1" draw:dots2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41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solid" svg:stroke-width="0.026cm" svg:stroke-color="#d9d9d9" draw:fill="bitmap" draw:fill-image-name="msFillBitmap_20_1" draw:opacity="6%" style:repeat="no-repeat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3" style:family="chart" style:data-style-name="N141">
      <style:chart-properties chart:display-label="true" chart:logarithmic="false" chart:reverse-direction="false" text:line-break="false" loext:try-staggering-first="fals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draw:stroke="dash" draw:stroke-dash="msLineDash_20_1" svg:stroke-width="0.026cm" svg:stroke-color="#d9d9d9"/>
    </style:style>
    <style:style style:name="ch6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152858" svg:stroke-linecap="round" draw:fill-color="#152858" fo:wrap-option="wrap"/>
      <style:text-properties fo:color="#000000" style:text-position="0% 100%" fo:font-family="'Aptos Narrow'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7.357cm" svg:height="6.88cm" xlink:href=".." xlink:type="simple" chart:class="chart:line" chart:style-name="ch1">
        <chart:plot-area chart:style-name="ch2" svg:x="0.347cm" svg:y="0.137cm" svg:width="16.663cm" svg:height="6.606cm">
          <chart:coordinate-region svg:x="1.112cm" svg:y="0.297cm" svg:width="15.898cm" svg:height="5.878cm"/>
          <chart:axis chart:dimension="x" chart:name="primary-x" chart:style-name="ch3" chartooo:axis-type="date">
            <chartooo:date-scale chart:base-time-unit="days"/>
            <chart:categories table:cell-range-address="Evolução_MTM.B4:Evolução_MTM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volução_MTM.C4:Evolução_MTM.C8" chart:label-cell-address="Evolução_MTM.C3:Evolução_MTM.C3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M Total</text:p>
                <draw:g>
                  <svg:desc>Evolução_MTM.C3:Evolução_MTM.C3</svg:desc>
                </draw:g>
              </table:table-cell>
            </table:table-row>
          </table:table-header-rows>
          <table:table-rows>
            <table:table-row>
              <table:table-cell office:value-type="float" office:value="46197">
                <text:p>46197</text:p>
                <draw:g>
                  <svg:desc>Evolução_MTM.B4:Evolução_MTM.B8</svg:desc>
                </draw:g>
              </table:table-cell>
              <table:table-cell office:value-type="float" office:value="77050.54">
                <text:p>77050.54</text:p>
                <draw:g>
                  <svg:desc>Evolução_MTM.C4:Evolução_MTM.C8</svg:desc>
                </draw:g>
              </table:table-cell>
            </table:table-row>
            <table:table-row>
              <table:table-cell office:value-type="float" office:value="46198">
                <text:p>46198</text:p>
              </table:table-cell>
              <table:table-cell office:value-type="float" office:value="63992.44">
                <text:p>63992.44</text:p>
              </table:table-cell>
            </table:table-row>
            <table:table-row>
              <table:table-cell office:value-type="float" office:value="46199">
                <text:p>46199</text:p>
              </table:table-cell>
              <table:table-cell office:value-type="float" office:value="65050.42">
                <text:p>65050.42</text:p>
              </table:table-cell>
            </table:table-row>
            <table:table-row>
              <table:table-cell office:value-type="float" office:value="46202">
                <text:p>46202</text:p>
              </table:table-cell>
              <table:table-cell office:value-type="float" office:value="66222.14">
                <text:p>66222.14</text:p>
              </table:table-cell>
            </table:table-row>
            <table:table-row>
              <table:table-cell office:value-type="float" office:value="46203">
                <text:p>46203</text:p>
              </table:table-cell>
              <table:table-cell office:value-type="float" office:value="57995.38">
                <text:p>57995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fill-image draw:name="msFillBitmap_20_1" draw:display-name="msFillBitmap 1" xlink:href="Pictures/10000001000001F2000000C26B9DFDBB.png" xlink:type="simple" xlink:show="embed" xlink:actuate="onLoad"/>
    <draw:stroke-dash draw:name="msLineDash_20_1" draw:display-name="msLineDash 1" draw:style="rect" draw:dots1="1" draw:dots1-length="400%" draw:dots2="1" draw:dots2-length="100%" draw:distance="300%"/>
    <draw:stroke-dash draw:name="msLineDash_20_2" draw:display-name="msLineDash 2" draw:style="round" draw:dots1="1" draw:dots1-length="201%" draw:distance="199%"/>
  </office:styles>
</office:document-styles>
</file>